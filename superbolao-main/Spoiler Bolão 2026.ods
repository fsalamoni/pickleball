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29B000002D058F00F5457A07490.png" manifest:media-type="image/png"/>
  <manifest:file-entry manifest:full-path="Pictures/10000201000002D0000002D03A56A06C9213C946.png" manifest:media-type="image/png"/>
  <manifest:file-entry manifest:full-path="Pictures/100002010000004500000126703547D5826A3D39.png" manifest:media-type="image/png"/>
  <manifest:file-entry manifest:full-path="Pictures/100002010000003900000168148968CF9A392033.png" manifest:media-type="image/png"/>
  <manifest:file-entry manifest:full-path="Pictures/10000201000001030000005CF078519BCC55B6FB.png" manifest:media-type="image/png"/>
  <manifest:file-entry manifest:full-path="Pictures/100002010000010500000198B8B5D3CAA3BF4D7A.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rebuchet MS&quot;" svg:font-family="'&quot;Trebuchet MS&quot;'"/>
    <style:font-face style:name="Arial" svg:font-family="Arial"/>
    <style:font-face style:name="Cambria" svg:font-family="Cambria"/>
    <style:font-face style:name="Caveat" svg:font-family="Caveat"/>
    <style:font-face style:name="Comfortaa" svg:font-family="Comfortaa"/>
    <style:font-face style:name="EB Garamond" svg:font-family="'EB Garamond'"/>
    <style:font-face style:name="Lexend" svg:font-family="Lexend"/>
    <style:font-face style:name="Oswald" svg:font-family="Oswald"/>
    <style:font-face style:name="Playfair Display" svg:font-family="'Playfair Display'"/>
    <style:font-face style:name="Trebuchet MS" svg:font-family="'Trebuchet MS'"/>
    <style:font-face style:name="Ubuntu" svg:font-family="Ubuntu"/>
    <style:font-face style:name="trebuchet ms" svg:font-family="'trebuchet m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84.76pt"/>
    </style:style>
    <style:style style:name="co2" style:family="table-column">
      <style:table-column-properties fo:break-before="auto" style:column-width="113.9pt"/>
    </style:style>
    <style:style style:name="co3" style:family="table-column">
      <style:table-column-properties fo:break-before="auto" style:column-width="42.41pt"/>
    </style:style>
    <style:style style:name="co4" style:family="table-column">
      <style:table-column-properties fo:break-before="auto" style:column-width="18.06pt"/>
    </style:style>
    <style:style style:name="co5" style:family="table-column">
      <style:table-column-properties fo:break-before="auto" style:column-width="111.86pt"/>
    </style:style>
    <style:style style:name="co6" style:family="table-column">
      <style:table-column-properties fo:break-before="auto" style:column-width="28.49pt"/>
    </style:style>
    <style:style style:name="co7" style:family="table-column">
      <style:table-column-properties fo:break-before="auto" style:column-width="7.65pt"/>
    </style:style>
    <style:style style:name="co8" style:family="table-column">
      <style:table-column-properties fo:break-before="auto" style:column-width="27.1pt"/>
    </style:style>
    <style:style style:name="co9" style:family="table-column">
      <style:table-column-properties fo:break-before="auto" style:column-width="22.2pt"/>
    </style:style>
    <style:style style:name="co10" style:family="table-column">
      <style:table-column-properties fo:break-before="auto" style:column-width="15.31pt"/>
    </style:style>
    <style:style style:name="co11" style:family="table-column">
      <style:table-column-properties fo:break-before="auto" style:column-width="16.64pt"/>
    </style:style>
    <style:style style:name="co12" style:family="table-column">
      <style:table-column-properties fo:break-before="auto" style:column-width="30.56pt"/>
    </style:style>
    <style:style style:name="co13" style:family="table-column">
      <style:table-column-properties fo:break-before="auto" style:column-width="70.16pt"/>
    </style:style>
    <style:style style:name="co14" style:family="table-column">
      <style:table-column-properties fo:break-before="auto" style:column-width="27.81pt"/>
    </style:style>
    <style:style style:name="co15" style:family="table-column">
      <style:table-column-properties fo:break-before="auto" style:column-width="361.84pt"/>
    </style:style>
    <style:style style:name="co16" style:family="table-column">
      <style:table-column-properties fo:break-before="auto" style:column-width="41.64pt"/>
    </style:style>
    <style:style style:name="co17" style:family="table-column">
      <style:table-column-properties fo:break-before="auto" style:column-width="39.6pt"/>
    </style:style>
    <style:style style:name="co18" style:family="table-column">
      <style:table-column-properties fo:break-before="auto" style:column-width="115.31pt"/>
    </style:style>
    <style:style style:name="co19" style:family="table-column">
      <style:table-column-properties fo:break-before="auto" style:column-width="3.49pt"/>
    </style:style>
    <style:style style:name="co20" style:family="table-column">
      <style:table-column-properties fo:break-before="auto" style:column-width="14.6pt"/>
    </style:style>
    <style:style style:name="co21" style:family="table-column">
      <style:table-column-properties fo:break-before="auto" style:column-width="25.71pt"/>
    </style:style>
    <style:style style:name="co22" style:family="table-column">
      <style:table-column-properties fo:break-before="auto" style:column-width="104.91pt"/>
    </style:style>
    <style:style style:name="co23" style:family="table-column">
      <style:table-column-properties fo:break-before="auto" style:column-width="20.15pt"/>
    </style:style>
    <style:style style:name="co24" style:family="table-column">
      <style:table-column-properties fo:break-before="auto" style:column-width="95.84pt"/>
    </style:style>
    <style:style style:name="co25" style:family="table-column">
      <style:table-column-properties fo:break-before="auto" style:column-width="23.61pt"/>
    </style:style>
    <style:style style:name="co26" style:family="table-column">
      <style:table-column-properties fo:break-before="auto" style:column-width="11.11pt"/>
    </style:style>
    <style:style style:name="co27" style:family="table-column">
      <style:table-column-properties fo:break-before="auto" style:column-width="32.66pt"/>
    </style:style>
    <style:style style:name="co28" style:family="table-column">
      <style:table-column-properties fo:break-before="auto" style:column-width="45.84pt"/>
    </style:style>
    <style:style style:name="co29" style:family="table-column">
      <style:table-column-properties fo:break-before="auto" style:column-width="24.29pt"/>
    </style:style>
    <style:style style:name="co30" style:family="table-column">
      <style:table-column-properties fo:break-before="auto" style:column-width="35.46pt"/>
    </style:style>
    <style:style style:name="co31" style:family="table-column">
      <style:table-column-properties fo:break-before="auto" style:column-width="38.21pt"/>
    </style:style>
    <style:style style:name="co32" style:family="table-column">
      <style:table-column-properties fo:break-before="auto" style:column-width="61.09pt"/>
    </style:style>
    <style:style style:name="co33" style:family="table-column">
      <style:table-column-properties fo:break-before="auto" style:column-width="44.45pt"/>
    </style:style>
    <style:style style:name="co34" style:family="table-column">
      <style:table-column-properties fo:break-before="auto" style:column-width="43.74pt"/>
    </style:style>
    <style:style style:name="co35" style:family="table-column">
      <style:table-column-properties fo:break-before="auto" style:column-width="40.99pt"/>
    </style:style>
    <style:style style:name="co36" style:family="table-column">
      <style:table-column-properties fo:break-before="auto" style:column-width="21.54pt"/>
    </style:style>
    <style:style style:name="co37" style:family="table-column">
      <style:table-column-properties fo:break-before="auto" style:column-width="72.96pt"/>
    </style:style>
    <style:style style:name="co38" style:family="table-column">
      <style:table-column-properties fo:break-before="auto" style:column-width="17.4pt"/>
    </style:style>
    <style:style style:name="co39" style:family="table-column">
      <style:table-column-properties fo:break-before="auto" style:column-width="66.64pt"/>
    </style:style>
    <style:style style:name="co40" style:family="table-column">
      <style:table-column-properties fo:break-before="auto" style:column-width="22.96pt"/>
    </style:style>
    <style:style style:name="co41" style:family="table-column">
      <style:table-column-properties fo:break-before="auto" style:column-width="13.21pt"/>
    </style:style>
    <style:style style:name="co42" style:family="table-column">
      <style:table-column-properties fo:break-before="auto" style:column-width="79.91pt"/>
    </style:style>
    <style:style style:name="co43" style:family="table-column">
      <style:table-column-properties fo:break-before="auto" style:column-width="12.5pt"/>
    </style:style>
    <style:style style:name="co44" style:family="table-column">
      <style:table-column-properties fo:break-before="auto" style:column-width="31.95pt"/>
    </style:style>
    <style:style style:name="co45" style:family="table-column">
      <style:table-column-properties fo:break-before="auto" style:column-width="31.24pt"/>
    </style:style>
    <style:style style:name="co46" style:family="table-column">
      <style:table-column-properties fo:break-before="auto" style:column-width="29.91pt"/>
    </style:style>
    <style:style style:name="ro1" style:family="table-row">
      <style:table-row-properties style:row-height="18.74pt" fo:break-before="auto" style:use-optimal-row-height="false"/>
    </style:style>
    <style:style style:name="ro2" style:family="table-row">
      <style:table-row-properties style:row-height="16.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9.75pt" fo:break-before="auto" style:use-optimal-row-height="false"/>
    </style:style>
    <style:style style:name="ro6" style:family="table-row">
      <style:table-row-properties style:row-height="21.74pt" fo:break-before="auto" style:use-optimal-row-height="false"/>
    </style:style>
    <style:style style:name="ro7" style:family="table-row">
      <style:table-row-properties style:row-height="11.25pt" fo:break-before="auto" style:use-optimal-row-height="false"/>
    </style:style>
    <style:style style:name="ro8" style:family="table-row">
      <style:table-row-properties style:row-height="13.49pt" fo:break-before="auto" style:use-optimal-row-height="false"/>
    </style:style>
    <style:style style:name="ro9" style:family="table-row">
      <style:table-row-properties style:row-height="21pt" fo:break-before="auto" style:use-optimal-row-height="false"/>
    </style:style>
    <style:style style:name="ro10" style:family="table-row">
      <style:table-row-properties style:row-height="18pt" fo:break-before="auto" style:use-optimal-row-height="false"/>
    </style:style>
    <style:style style:name="ro11" style:family="table-row">
      <style:table-row-properties style:row-height="6.01pt" fo:break-before="auto" style:use-optimal-row-height="false"/>
    </style:style>
    <style:style style:name="ro12" style:family="table-row">
      <style:table-row-properties style:row-height="7.51pt" fo:break-before="auto" style:use-optimal-row-height="false"/>
    </style:style>
    <style:style style:name="ta1" style:family="table" style:master-page-name="PageStyle_5f_BOLÃO_20_2026">
      <style:table-properties table:display="true" style:writing-mode="lr-tb"/>
    </style:style>
    <style:style style:name="ta2" style:family="table" style:master-page-name="PageStyle_5f_Regras">
      <style:table-properties table:display="true" style:writing-mode="lr-tb"/>
    </style:style>
    <style:style style:name="ta3" style:family="table" style:master-page-name="PageStyle_5f_Ranking_20_Completo">
      <style:table-properties table:display="true" style:writing-mode="lr-tb"/>
    </style:style>
    <style:style style:name="ta4" style:family="table" style:master-page-name="PageStyle_5f_Rk_20_Histórico">
      <style:table-properties table:display="true" style:writing-mode="lr-tb"/>
    </style:style>
    <style:style style:name="ta5" style:family="table" style:master-page-name="PageStyle_5f_Resultados_20_Oficiais">
      <style:table-properties table:display="true" style:writing-mode="lr-tb"/>
    </style:style>
    <style:style style:name="ta6" style:family="table" style:master-page-name="PageStyle_5f_Cartão_20_de_20_Apostas">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8d2648" style:text-outline="false" style:text-line-through-style="none" style:text-line-through-type="none" style:font-name="Ubuntu" fo:font-size="36pt" fo:font-style="normal" fo:text-shadow="none" style:text-underline-style="none" fo:font-weight="bold" style:font-size-asian="36pt" style:font-style-asian="normal" style:font-weight-asian="bold" style:font-name-complex="Ubuntu" style:font-size-complex="36pt" style:font-style-complex="normal" style:font-weight-complex="bold"/>
    </style:style>
    <style:style style:name="ce2"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3pt" fo:font-style="normal" fo:text-shadow="none" style:text-underline-style="none" fo:font-weight="normal" style:font-size-asian="13pt" style:font-style-asian="normal" style:font-weight-asian="normal" style:font-name-complex="Trebuchet MS" style:font-size-complex="13pt" style:font-style-complex="normal" style:font-weight-complex="normal"/>
    </style:style>
    <style:style style:name="ce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14873b" style:text-outline="false" style:text-line-through-style="none" style:text-line-through-type="none" style:font-name="Caveat" fo:font-size="26pt" fo:font-style="normal" fo:text-shadow="none" style:text-underline-style="none" fo:font-weight="bold" style:font-size-asian="26pt" style:font-style-asian="normal" style:font-weight-asian="bold" style:font-name-complex="Caveat" style:font-size-complex="26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4873b" style:text-outline="false" style:text-line-through-style="none" style:text-line-through-type="none" style:font-name="Caveat" fo:font-size="26pt" fo:font-style="normal" fo:text-shadow="none" style:text-underline-style="none" fo:font-weight="bold" style:font-size-asian="26pt" style:font-style-asian="normal" style:font-weight-asian="bold" style:font-name-complex="Caveat" style:font-size-complex="26pt" style:font-style-complex="normal" style:font-weight-complex="bold"/>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e94141"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73763"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529a52" style:text-outline="false" style:text-line-through-style="none" style:text-line-through-type="none" style:font-name="Comfortaa" fo:font-size="12pt" fo:font-style="normal" fo:text-shadow="none" style:text-underline-style="none" fo:font-weight="bold" style:font-size-asian="12pt" style:font-style-asian="normal" style:font-weight-asian="bold" style:font-name-complex="Comfortaa" style:font-size-complex="12pt" style:font-style-complex="normal" style:font-weight-complex="bold"/>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80000" style:text-outline="false" style:text-line-through-style="none" style:text-line-through-type="none" style:font-name="&quot;Trebuchet MS&quot;" fo:font-size="11pt" fo:font-style="normal" fo:text-shadow="none" style:text-underline-style="none" fo:font-weight="bold" style:font-size-asian="11pt" style:font-style-asian="normal" style:font-weight-asian="bold" style:font-name-complex="&quot;Trebuchet MS&quot;" style:font-size-complex="11pt" style:font-style-complex="normal" style:font-weight-complex="bold"/>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7f6000" style:text-outline="false" style:text-line-through-style="none" style:text-line-through-type="none" style:font-name="EB Garamond" fo:font-size="12pt" fo:font-style="normal" fo:text-shadow="none" style:text-underline-style="none" fo:font-weight="normal" style:font-size-asian="12pt" style:font-style-asian="normal" style:font-weight-asian="normal" style:font-name-complex="EB Garamond" style:font-size-complex="12pt" style:font-style-complex="normal" style:font-weight-complex="normal"/>
    </style:style>
    <style:style style:name="ce10" style:family="table-cell" style:parent-style-name="Default">
      <style:table-cell-properties fo:background-color="#ffffff"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7f6000" style:text-outline="false" style:text-line-through-style="none" style:text-line-through-type="none" style:font-name="EB Garamond" fo:font-size="12pt" fo:font-style="normal" fo:text-shadow="none" style:text-underline-style="none" fo:font-weight="normal" style:font-size-asian="12pt" style:font-style-asian="normal" style:font-weight-asian="normal" style:font-name-complex="EB Garamond" style:font-size-complex="12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1c232"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1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1c232"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14" style:family="table-cell" style:parent-style-name="Default">
      <style:table-cell-properties fo:border-bottom="1.76pt solid #ffffff" fo:background-color="#14873b"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mfortaa" fo:font-size="12pt" fo:font-style="normal" fo:text-shadow="none" style:text-underline-style="none" fo:font-weight="bold" style:font-size-asian="12pt" style:font-style-asian="normal" style:font-weight-asian="bold" style:font-name-complex="Comfortaa" style:font-size-complex="12pt" style:font-style-complex="normal" style:font-weight-complex="bold"/>
    </style:style>
    <style:style style:name="ce15" style:family="table-cell" style:parent-style-name="Default" style:data-style-name="N125">
      <style:table-cell-properties fo:border-bottom="1.76pt solid #ffffff" fo:background-color="#72ff72" style:diagonal-bl-tr="none" style:diagonal-tl-br="none" style:text-align-source="fix" style:repeat-content="false" fo:wrap-option="wrap" fo:border-left="none"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Comfortaa" fo:font-size="9pt" fo:font-style="normal" fo:text-shadow="none" style:text-underline-style="none" fo:font-weight="bold" style:font-size-asian="9pt" style:font-style-asian="normal" style:font-weight-asian="bold" style:font-name-complex="Comfortaa" style:font-size-complex="9pt" style:font-style-complex="normal" style:font-weight-complex="bold"/>
    </style:style>
    <style:style style:name="ce16" style:family="table-cell" style:parent-style-name="Default" style:data-style-name="N125">
      <style:table-cell-properties fo:border-bottom="1.76pt solid #ffffff" fo:background-color="#72ff72" style:diagonal-bl-tr="none" style:diagonal-tl-br="none" style:text-align-source="fix" style:repeat-content="false" fo:wrap-option="wrap" fo:border-left="none" style:direction="ltr" fo:border-right="1.76pt solid #ffffff" style:rotation-angle="0" style:rotation-align="none" style:shrink-to-fit="false" fo:border-top="1.76pt solid #ffffff"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Comfortaa" fo:font-size="9pt" fo:font-style="normal" fo:text-shadow="none" style:text-underline-style="none" fo:font-weight="bold" style:font-size-asian="9pt" style:font-style-asian="normal" style:font-weight-asian="bold" style:font-name-complex="Comfortaa" style:font-size-complex="9pt" style:font-style-complex="normal" style:font-weight-complex="bold"/>
    </style:style>
    <style:style style:name="ce17" style:family="table-cell" style:parent-style-name="Default" style:data-style-name="N125">
      <style:table-cell-properties fo:border-bottom="1.76pt solid #ffffff" fo:background-color="#72ff72" style:diagonal-bl-tr="none" style:diagonal-tl-br="none" style:text-align-source="fix" style:repeat-content="false" fo:wrap-option="no-wrap" fo:border-left="none" style:direction="ltr" fo:border-right="1.76pt solid #ffffff" style:rotation-angle="0" style:rotation-align="none" style:shrink-to-fit="false" fo:border-top="1.76pt solid #ffffff"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Comfortaa" fo:font-size="9pt" fo:font-style="normal" fo:text-shadow="none" style:text-underline-style="none" fo:font-weight="bold" style:font-size-asian="9pt" style:font-style-asian="normal" style:font-weight-asian="bold" style:font-name-complex="Comfortaa" style:font-size-complex="9pt" style:font-style-complex="normal" style:font-weight-complex="bold"/>
    </style:style>
    <style:style style:name="ce18" style:family="table-cell" style:parent-style-name="Default">
      <style:table-cell-properties fo:background-color="#0000ff"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mfortaa" fo:font-size="11pt" fo:font-style="normal" fo:text-shadow="none" style:text-underline-style="none" fo:font-weight="bold" style:font-size-asian="11pt" style:font-style-asian="normal" style:font-weight-asian="bold" style:font-name-complex="Comfortaa" style:font-size-complex="11pt" style:font-style-complex="normal" style:font-weight-complex="bold"/>
    </style:style>
    <style:style style:name="ce19" style:family="table-cell" style:parent-style-name="Default" style:data-style-name="N125">
      <style:table-cell-properties fo:border-bottom="1.76pt solid #ffffff" fo:background-color="#9fc5e8" style:diagonal-bl-tr="none" style:diagonal-tl-br="none" style:text-align-source="fix" style:repeat-content="false" fo:wrap-option="wrap" fo:border-left="0.74pt solid #ffffff"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073763" style:text-outline="false" style:text-line-through-style="none" style:text-line-through-type="none" style:font-name="Comfortaa" fo:font-size="9pt" fo:font-style="normal" fo:text-shadow="none" style:text-underline-style="none" fo:font-weight="bold" style:font-size-asian="9pt" style:font-style-asian="normal" style:font-weight-asian="bold" style:font-name-complex="Comfortaa" style:font-size-complex="9pt" style:font-style-complex="normal" style:font-weight-complex="bold"/>
    </style:style>
    <style:style style:name="ce20" style:family="table-cell" style:parent-style-name="Default" style:data-style-name="N125">
      <style:table-cell-properties fo:border-bottom="1.76pt solid #ffffff" fo:background-color="#9fc5e8" style:diagonal-bl-tr="none" style:diagonal-tl-br="none" style:text-align-source="fix" style:repeat-content="false" fo:wrap-option="no-wrap" fo:border-left="0.74pt solid #ffffff" style:direction="ltr" fo:border-right="1.76pt solid #ffffff" style:rotation-angle="0" style:rotation-align="none" style:shrink-to-fit="false" fo:border-top="1.76pt solid #ffffff" style:vertical-align="middle" loext:vertical-justify="auto"/>
      <style:paragraph-properties fo:text-align="center" css3t:text-justify="auto" fo:margin-left="0pt" style:writing-mode="page"/>
      <style:text-properties fo:color="#073763" style:text-outline="false" style:text-line-through-style="none" style:text-line-through-type="none" style:font-name="Comfortaa" fo:font-size="9pt" fo:font-style="normal" fo:text-shadow="none" style:text-underline-style="none" fo:font-weight="bold" style:font-size-asian="9pt" style:font-style-asian="normal" style:font-weight-asian="bold" style:font-name-complex="Comfortaa" style:font-size-complex="9pt" style:font-style-complex="normal" style:font-weight-complex="bold"/>
    </style:style>
    <style:style style:name="ce21" style:family="table-cell" style:parent-style-name="Default">
      <style:table-cell-properties fo:border-bottom="1.76pt solid #ffffff"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25">
      <style:table-cell-properties fo:border-bottom="1.76pt solid #ffffff" fo:background-color="#72ff72" style:diagonal-bl-tr="none" style:diagonal-tl-br="none" style:text-align-source="fix" style:repeat-content="false" fo:wrap-option="no-wrap" fo:border-left="none"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Comfortaa" fo:font-size="11pt" fo:font-style="normal" fo:text-shadow="none" style:text-underline-style="none" fo:font-weight="bold" style:font-size-asian="11pt" style:font-style-asian="normal" style:font-weight-asian="bold" style:font-name-complex="Comfortaa" style:font-size-complex="11pt" style:font-style-complex="normal" style:font-weight-complex="bold"/>
    </style:style>
    <style:style style:name="ce23" style:family="table-cell" style:parent-style-name="Default">
      <style:table-cell-properties fo:border-bottom="0.74pt solid #ffffff" style:diagonal-bl-tr="none" style:diagonal-tl-br="none" fo:border-left="none" fo:border-right="none"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25">
      <style:table-cell-properties fo:border-bottom="1.76pt solid #ffffff" fo:background-color="#cfe2f3" style:diagonal-bl-tr="none" style:diagonal-tl-br="none" style:text-align-source="fix" style:repeat-content="false" fo:wrap-option="wrap" fo:border-left="1.76pt solid #ffffff"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073763" style:text-outline="false" style:text-line-through-style="none" style:text-line-through-type="none" style:font-name="Comfortaa" fo:font-size="10pt" fo:font-style="normal" fo:text-shadow="none" style:text-underline-style="none" fo:font-weight="bold" style:font-size-asian="10pt" style:font-style-asian="normal" style:font-weight-asian="bold" style:font-name-complex="Comfortaa" style:font-size-complex="10pt" style:font-style-complex="normal" style:font-weight-complex="bold"/>
    </style:style>
    <style:style style:name="ce25" style:family="table-cell" style:parent-style-name="Default" style:data-style-name="N125">
      <style:table-cell-properties fo:background-color="#cfe2f3" style:diagonal-bl-tr="none" style:diagonal-tl-br="none" style:text-align-source="fix" style:repeat-content="false" fo:wrap-option="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073763" style:text-outline="false" style:text-line-through-style="none" style:text-line-through-type="none" style:font-name="Comfortaa" fo:font-size="10pt" fo:font-style="normal" fo:text-shadow="none" style:text-underline-style="none" fo:font-weight="bold" style:font-size-asian="10pt" style:font-style-asian="normal" style:font-weight-asian="bold" style:font-name-complex="Comfortaa" style:font-size-complex="10pt" style:font-style-complex="normal" style:font-weight-complex="bold"/>
    </style:style>
    <style:style style:name="ce26" style:family="table-cell" style:parent-style-name="Default">
      <style:table-cell-properties fo:border-bottom="1.76pt solid #ffffff" fo:background-color="#72ff72" style:diagonal-bl-tr="none" style:diagonal-tl-br="none" style:text-align-source="fix" style:repeat-content="false" fo:wrap-option="wrap" fo:border-left="1.76pt solid #ffffff"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Comfortaa" fo:font-size="10pt" fo:font-style="normal" fo:text-shadow="none" style:text-underline-style="none" fo:font-weight="bold" style:font-size-asian="10pt" style:font-style-asian="normal" style:font-weight-asian="bold" style:font-name-complex="Comfortaa" style:font-size-complex="10pt" style:font-style-complex="normal" style:font-weight-complex="bold"/>
    </style:style>
    <style:style style:name="ce27" style:family="table-cell" style:parent-style-name="Default">
      <style:table-cell-properties fo:background-color="#72ff72" style:diagonal-bl-tr="none" style:diagonal-tl-br="none" style:text-align-source="fix" style:repeat-content="false" fo:wrap-option="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Comfortaa" fo:font-size="10pt" fo:font-style="normal" fo:text-shadow="none" style:text-underline-style="none" fo:font-weight="bold" style:font-size-asian="10pt" style:font-style-asian="normal" style:font-weight-asian="bold" style:font-name-complex="Comfortaa" style:font-size-complex="10pt" style:font-style-complex="normal" style:font-weight-complex="bold"/>
    </style:style>
    <style:style style:name="ce28" style:family="table-cell" style:parent-style-name="Default">
      <style:table-cell-properties fo:border-bottom="0.74pt solid #ffffff" style:diagonal-bl-tr="none" style:diagonal-tl-br="none" fo:border-left="none" fo:border-right="0.74pt solid #ffffff"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3">
      <style:table-cell-properties fo:border-bottom="1.76pt solid #ffffff" fo:background-color="#cfe2f3" style:diagonal-bl-tr="none" style:diagonal-tl-br="none" style:text-align-source="fix" style:repeat-content="false" fo:wrap-option="no-wrap" fo:border-left="1.76pt solid #ffffff"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073763" style:text-outline="false" style:text-line-through-style="none" style:text-line-through-type="none" style:font-name="Comfortaa" fo:font-size="10pt" fo:font-style="normal" fo:text-shadow="none" style:text-underline-style="none" fo:font-weight="bold" style:font-size-asian="10pt" style:font-style-asian="normal" style:font-weight-asian="bold" style:font-name-complex="Comfortaa" style:font-size-complex="10pt" style:font-style-complex="normal" style:font-weight-complex="bold"/>
    </style:style>
    <style:style style:name="ce30" style:family="table-cell" style:parent-style-name="Default" style:data-style-name="N3">
      <style:table-cell-properties fo:background-color="#cfe2f3"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073763" style:text-outline="false" style:text-line-through-style="none" style:text-line-through-type="none" style:font-name="Comfortaa" fo:font-size="10pt" fo:font-style="normal" fo:text-shadow="none" style:text-underline-style="none" fo:font-weight="bold" style:font-size-asian="10pt" style:font-style-asian="normal" style:font-weight-asian="bold" style:font-name-complex="Comfortaa" style:font-size-complex="10pt" style:font-style-complex="normal" style:font-weight-complex="bold"/>
    </style:style>
    <style:style style:name="ce3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1c232" style:text-outline="false" style:text-line-through-style="none" style:text-line-through-type="none" style:font-name="Comfortaa" fo:font-size="9pt" fo:font-style="normal" fo:text-shadow="none" style:text-underline-style="none" fo:font-weight="normal" style:font-size-asian="9pt" style:font-style-asian="normal" style:font-weight-asian="normal" style:font-name-complex="Comfortaa" style:font-size-complex="9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EB Garamond" fo:font-size="13pt" fo:font-style="normal" fo:text-shadow="none" style:text-underline-style="solid" style:text-underline-width="auto" style:text-underline-color="font-color" fo:font-weight="normal" style:font-size-asian="13pt" style:font-style-asian="normal" style:font-weight-asian="normal" style:font-name-complex="EB Garamond" style:font-size-complex="13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EB Garamond" fo:font-size="13pt" fo:font-style="normal" fo:text-shadow="none" style:text-underline-style="none" fo:font-weight="normal" style:font-size-asian="13pt" style:font-style-asian="normal" style:font-weight-asian="normal" style:font-name-complex="EB Garamond" style:font-size-complex="13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EB Garamond" fo:font-size="13pt" fo:font-style="normal" fo:text-shadow="none" style:text-underline-style="none" fo:font-weight="normal" style:font-size-asian="13pt" style:font-style-asian="normal" style:font-weight-asian="normal" style:font-name-complex="EB Garamond" style:font-size-complex="13pt" style:font-style-complex="normal" style:font-weight-complex="normal"/>
    </style:style>
    <style:style style:name="ce3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quot;Trebuchet MS&quot;" fo:font-size="11pt" fo:font-style="normal" fo:text-shadow="none" style:text-underline-style="none" fo:font-weight="bold" style:font-size-asian="11pt" style:font-style-asian="normal" style:font-weight-asian="bold" style:font-name-complex="&quot;Trebuchet MS&quot;" style:font-size-complex="11pt" style:font-style-complex="normal" style:font-weight-complex="bold"/>
    </style:style>
    <style:style style:name="ce36"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d9d9d9"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EB Garamond" fo:font-size="13pt" fo:font-style="normal" fo:text-shadow="none" style:text-underline-style="none" fo:font-weight="normal" style:font-size-asian="13pt" style:font-style-asian="normal" style:font-weight-asian="normal" style:font-name-complex="EB Garamond" style:font-size-complex="13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EB Garamond" fo:font-size="13pt" fo:font-style="normal" fo:text-shadow="none" style:text-underline-style="none" fo:font-weight="normal" style:font-size-asian="13pt" style:font-style-asian="normal" style:font-weight-asian="normal" style:font-name-complex="EB Garamond" style:font-size-complex="13pt" style:font-style-complex="normal" style:font-weight-complex="normal"/>
    </style:style>
    <style:style style:name="ce39" style:family="table-cell" style:parent-style-name="Default">
      <style:table-cell-properties fo:border-bottom="none" fo:background-color="#bf9000"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mfortaa" fo:font-size="11pt" fo:font-style="normal" fo:text-shadow="none" style:text-underline-style="none" fo:font-weight="bold" style:font-size-asian="11pt" style:font-style-asian="normal" style:font-weight-asian="bold" style:font-name-complex="Comfortaa" style:font-size-complex="11pt" style:font-style-complex="normal" style:font-weight-complex="bold"/>
    </style:style>
    <style:style style:name="ce40" style:family="table-cell" style:parent-style-name="Default" style:data-style-name="N125">
      <style:table-cell-properties fo:border-bottom="1.76pt solid #ffffff" fo:background-color="#bf9000" style:diagonal-bl-tr="none" style:diagonal-tl-br="none" style:text-align-source="fix" style:repeat-content="false" fo:wrap-option="wrap" fo:border-left="0.74pt solid #ffffff" style:direction="ltr" fo:border-right="1.76pt solid #ffffff" style:rotation-angle="0" style:rotation-align="none" style:shrink-to-fit="false" fo:border-top="1.76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mfortaa" fo:font-size="9pt" fo:font-style="normal" fo:text-shadow="none" style:text-underline-style="none" fo:font-weight="normal" style:font-size-asian="9pt" style:font-style-asian="normal" style:font-weight-asian="normal" style:font-name-complex="Comfortaa" style:font-size-complex="9pt" style:font-style-complex="normal" style:font-weight-complex="normal"/>
    </style:style>
    <style:style style:name="ce41" style:family="table-cell" style:parent-style-name="Default" style:data-style-name="N125">
      <style:table-cell-properties fo:border-bottom="1.76pt solid #ffffff" fo:background-color="#bf9000" style:diagonal-bl-tr="none" style:diagonal-tl-br="none" style:text-align-source="fix" style:repeat-content="false" fo:wrap-option="no-wrap" fo:border-left="0.74pt solid #ffffff" style:direction="ltr" fo:border-right="1.76pt solid #ffffff" style:rotation-angle="0" style:rotation-align="none" style:shrink-to-fit="false" fo:border-top="1.76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mfortaa" fo:font-size="9pt" fo:font-style="normal" fo:text-shadow="none" style:text-underline-style="none" fo:font-weight="normal" style:font-size-asian="9pt" style:font-style-asian="normal" style:font-weight-asian="normal" style:font-name-complex="Comfortaa" style:font-size-complex="9pt" style:font-style-complex="normal" style:font-weight-complex="normal"/>
    </style:style>
    <style:style style:name="ce42" style:family="table-cell" style:parent-style-name="Default">
      <style:table-cell-properties fo:border-bottom="none" style:diagonal-bl-tr="none" style:diagonal-tl-br="none" fo:border-left="none" fo:border-right="none"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125">
      <style:table-cell-properties fo:background-color="#f1c12e" style:diagonal-bl-tr="none" style:diagonal-tl-br="none" style:text-align-source="fix" style:repeat-content="false" fo:wrap-option="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594300" style:text-outline="false" style:text-line-through-style="none" style:text-line-through-type="none" style:font-name="Comfortaa" fo:font-size="10pt" fo:font-style="normal" fo:text-shadow="none" style:text-underline-style="none" fo:font-weight="bold" style:font-size-asian="10pt" style:font-style-asian="normal" style:font-weight-asian="bold" style:font-name-complex="Comfortaa" style:font-size-complex="10pt" style:font-style-complex="normal" style:font-weight-complex="bold"/>
    </style:style>
    <style:style style:name="ce44" style:family="table-cell" style:parent-style-name="Default">
      <style:table-cell-properties fo:border-bottom="none" style:diagonal-bl-tr="none" style:diagonal-tl-br="none" fo:border-left="none" fo:border-right="0.74pt solid #ffffff"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3">
      <style:table-cell-properties fo:background-color="#f1c12e"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594300" style:text-outline="false" style:text-line-through-style="none" style:text-line-through-type="none" style:font-name="Comfortaa" fo:font-size="10pt" fo:font-style="normal" fo:text-shadow="none" style:text-underline-style="none" fo:font-weight="bold" style:font-size-asian="10pt" style:font-style-asian="normal" style:font-weight-asian="bold" style:font-name-complex="Comfortaa" style:font-size-complex="10pt" style:font-style-complex="normal" style:font-weight-complex="bold"/>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0pt" fo:font-style="italic" fo:text-shadow="none" style:text-underline-style="none" fo:font-weight="normal" style:font-size-asian="10pt" style:font-style-asian="italic" style:font-weight-asian="normal" style:font-name-complex="Trebuchet MS" style:font-size-complex="10pt" style:font-style-complex="italic" style:font-weight-complex="normal"/>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73763" style:text-outline="false" style:text-line-through-style="none" style:text-line-through-type="none" style:font-name="Trebuchet MS" fo:font-size="10pt" fo:font-style="normal" fo:text-shadow="none" style:text-underline-style="solid" style:text-underline-width="auto" style:text-underline-color="font-color" fo:font-weight="bold" style:font-size-asian="10pt" style:font-style-asian="normal" style:font-weight-asian="bold" style:font-name-complex="Trebuchet MS" style:font-size-complex="10pt" style:font-style-complex="normal" style:font-weight-complex="bold"/>
    </style:style>
    <style:style style:name="ce51"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73763"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5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98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5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3434" style:text-outline="false" style:text-line-through-style="none" style:text-line-through-type="none" style:font-name="Trebuchet MS" fo:font-size="10pt" fo:font-style="normal" fo:text-shadow="none" style:text-underline-style="solid" style:text-underline-width="auto" style:text-underline-color="font-color" fo:font-weight="bold" style:font-size-asian="10pt" style:font-style-asian="normal" style:font-weight-asian="bold" style:font-name-complex="Trebuchet MS" style:font-size-complex="10pt" style:font-style-complex="normal" style:font-weight-complex="bold"/>
    </style:style>
    <style:style style:name="ce5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55" style:family="table-cell" style:parent-style-name="Default">
      <style:table-cell-properties fo:background-color="#f3f3f3" style:rotation-align="none"/>
      <style:text-properties fo:color="#434343"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99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5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2f5374" style:text-outline="false" style:text-line-through-style="none" style:text-line-through-type="none" style:font-name="Trebuchet MS" fo:font-size="10pt" fo:font-style="normal" fo:text-shadow="none" style:text-underline-style="solid" style:text-underline-width="auto" style:text-underline-color="font-color" fo:font-weight="bold" style:font-size-asian="10pt" style:font-style-asian="normal" style:font-weight-asian="bold" style:font-name-complex="Trebuchet MS" style:font-size-complex="10pt" style:font-style-complex="normal" style:font-weight-complex="bold"/>
    </style:style>
    <style:style style:name="ce5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73763"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map style:condition="is-true-formula(LEN(TRIM([.C1]))&gt;0)" style:apply-style-name="ConditionalStyle_5f_1" style:base-cell-address="Regras.C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73763"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99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62" style:family="table-cell" style:parent-style-name="Default">
      <style:table-cell-properties fo:background-color="#fce6e6"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990000"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63" style:family="table-cell" style:parent-style-name="Default">
      <style:table-cell-properties fo:background-color="#efefef" style:diagonal-bl-tr="none" style:diagonal-tl-br="none" style:text-align-source="fix" style:repeat-content="false" fo:wrap-option="no-wrap" fo:border="1.76pt solid #ffffff"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64"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99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65"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66"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68" style:family="table-cell" style:parent-style-name="Default" style:data-style-name="N126">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69" style:family="table-cell" style:parent-style-name="Default">
      <style:table-cell-properties fo:background-color="#fcdddd"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990000"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70" style:family="table-cell" style:parent-style-name="Default">
      <style:table-cell-properties fo:background-color="#d9d9d9" style:diagonal-bl-tr="none" style:diagonal-tl-br="none" style:text-align-source="fix" style:repeat-content="false" fo:wrap-option="no-wrap" fo:border="1.76pt solid #ffffff"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71" style:family="table-cell" style:parent-style-name="Default" style:data-style-name="N12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f4cccc"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990000"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73" style:family="table-cell" style:parent-style-name="Default">
      <style:table-cell-properties fo:background-color="#f1a8a8"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990000"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74" style:family="table-cell" style:parent-style-name="Default">
      <style:table-cell-properties fo:background-color="#ff7d7d"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990000"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75" style:family="table-cell" style:parent-style-name="Default">
      <style:table-cell-properties fo:background-color="#cccccc" style:diagonal-bl-tr="none" style:diagonal-tl-br="none" style:text-align-source="fix" style:repeat-content="false" fo:wrap-option="no-wrap" fo:border="1.76pt solid #ffffff"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76" style:family="table-cell" style:parent-style-name="Default">
      <style:table-cell-properties fo:background-color="#ff3434"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7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3434"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78" style:family="table-cell" style:parent-style-name="Default">
      <style:table-cell-properties fo:background-color="#ff3434"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79" style:family="table-cell" style:parent-style-name="Default">
      <style:table-cell-properties fo:border-bottom="1.76pt solid #ffffff" style:diagonal-bl-tr="none" style:diagonal-tl-br="none" fo:border-left="1.76pt solid #ffffff"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none" style:diagonal-bl-tr="none" style:diagonal-tl-br="none" fo:border-left="none" fo:border-right="1.76pt solid #ffffff" style:rotation-align="none" fo:border-top="1.76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1.76pt solid #ffffff" style:diagonal-bl-tr="none" style:diagonal-tl-br="none" fo:border-left="none" fo:border-right="1.76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8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d9d9d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1.76pt solid #ffffff" fo:background-color="#00973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omfortaa" fo:font-size="12pt" fo:font-style="normal" fo:text-shadow="none" style:text-underline-style="none" fo:font-weight="bold" style:font-size-asian="12pt" style:font-style-asian="normal" style:font-weight-asian="bold" style:font-name-complex="Comfortaa" style:font-size-complex="12pt" style:font-style-complex="normal" style:font-weight-complex="bold"/>
    </style:style>
    <style:style style:name="ce85" style:family="table-cell" style:parent-style-name="Default" style:data-style-name="N125">
      <style:table-cell-properties fo:border-bottom="1.76pt solid #ffffff" fo:background-color="#bbffaf" style:diagonal-bl-tr="none" style:diagonal-tl-br="none" style:text-align-source="fix" style:repeat-content="false" fo:wrap-option="wrap" fo:border-left="none"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name-complex="Trebuchet MS" style:font-size-complex="8pt" style:font-style-complex="normal" style:font-weight-complex="bold"/>
    </style:style>
    <style:style style:name="ce86" style:family="table-cell" style:parent-style-name="Default" style:data-style-name="N125">
      <style:table-cell-properties fo:border-bottom="1.76pt solid #ffffff" fo:background-color="#bbffaf" style:diagonal-bl-tr="none" style:diagonal-tl-br="none" style:text-align-source="fix" style:repeat-content="false" fo:wrap-option="wrap" fo:border-left="none" style:direction="ltr" fo:border-right="1.76pt solid #ffffff" style:rotation-angle="0" style:rotation-align="none" style:shrink-to-fit="false" fo:border-top="1.76pt solid #ffffff"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name-complex="Trebuchet MS" style:font-size-complex="8pt" style:font-style-complex="normal" style:font-weight-complex="bold"/>
    </style:style>
    <style:style style:name="ce87" style:family="table-cell" style:parent-style-name="Default" style:data-style-name="N125">
      <style:table-cell-properties fo:border-bottom="1.76pt solid #ffffff" fo:background-color="#bbffaf" style:diagonal-bl-tr="none" style:diagonal-tl-br="none" style:text-align-source="fix" style:repeat-content="false" fo:wrap-option="no-wrap" fo:border-left="none" style:direction="ltr" fo:border-right="1.76pt solid #ffffff" style:rotation-angle="0" style:rotation-align="none" style:shrink-to-fit="false" fo:border-top="1.76pt solid #ffffff"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name-complex="Trebuchet MS" style:font-size-complex="8pt" style:font-style-complex="normal" style:font-weight-complex="bold"/>
    </style:style>
    <style:style style:name="ce88" style:family="table-cell" style:parent-style-name="Default" style:data-style-name="N125">
      <style:table-cell-properties fo:border-bottom="1.76pt solid #ffffff" fo:background-color="#bbffaf" style:diagonal-bl-tr="none" style:diagonal-tl-br="none" style:text-align-source="fix" style:repeat-content="false" fo:wrap-option="no-wrap" fo:border-left="none"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quot;Trebuchet MS&quot;" fo:font-size="11pt" fo:font-style="normal" fo:text-shadow="none" style:text-underline-style="none" fo:font-weight="bold" style:font-size-asian="11pt" style:font-style-asian="normal" style:font-weight-asian="bold" style:font-name-complex="&quot;Trebuchet MS&quot;" style:font-size-complex="11pt" style:font-style-complex="normal" style:font-weight-complex="bold"/>
    </style:style>
    <style:style style:name="ce89" style:family="table-cell" style:parent-style-name="Default">
      <style:table-cell-properties fo:border-bottom="1.76pt solid #ffffff" fo:background-color="#00973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d9ead3" style:text-outline="false" style:text-line-through-style="none" style:text-line-through-type="none" style:font-name="Comfortaa" fo:font-size="7pt" fo:font-style="normal" fo:text-shadow="none" style:text-underline-style="none" fo:font-weight="bold" style:font-size-asian="7pt" style:font-style-asian="normal" style:font-weight-asian="bold" style:font-name-complex="Comfortaa" style:font-size-complex="7pt" style:font-style-complex="normal" style:font-weight-complex="bold"/>
    </style:style>
    <style:style style:name="ce90" style:family="table-cell" style:parent-style-name="Default">
      <style:table-cell-properties fo:border-bottom="1.76pt solid #ffffff" fo:background-color="#bbffaf" style:diagonal-bl-tr="none" style:diagonal-tl-br="none" style:text-align-source="fix" style:repeat-content="false" fo:wrap-option="wrap" fo:border-left="1.76pt solid #ffffff"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91" style:family="table-cell" style:parent-style-name="Default">
      <style:table-cell-properties fo:background-color="#bbffaf" style:diagonal-bl-tr="none" style:diagonal-tl-br="none" style:text-align-source="fix" style:repeat-content="false" fo:wrap-option="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9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1c232" style:text-outline="false" style:text-line-through-style="none" style:text-line-through-type="none" style:font-name="Comfortaa" fo:font-size="8pt" fo:font-style="normal" fo:text-shadow="none" style:text-underline-style="solid" style:text-underline-width="auto" style:text-underline-color="font-color" fo:font-weight="bold" style:font-size-asian="8pt" style:font-style-asian="normal" style:font-weight-asian="bold" style:font-name-complex="Comfortaa" style:font-size-complex="8pt" style:font-style-complex="normal" style:font-weight-complex="bold"/>
    </style:style>
    <style:style style:name="ce9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d9d9d9" style:text-outline="false" style:text-line-through-style="none" style:text-line-through-type="none" style:font-name="Comfortaa" fo:font-size="9pt" fo:font-style="normal" fo:text-shadow="none" style:text-underline-style="none" fo:font-weight="normal" style:font-size-asian="9pt" style:font-style-asian="normal" style:font-weight-asian="normal" style:font-name-complex="Comfortaa" style:font-size-complex="9pt" style:font-style-complex="normal" style:font-weight-complex="normal"/>
    </style:style>
    <style:style style:name="ce94" style:family="table-cell" style:parent-style-name="Default">
      <style:table-cell-properties fo:border-bottom="1.76pt solid #ffffff" fo:background-color="#66666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mfortaa" fo:font-size="12pt" fo:font-style="normal" fo:text-shadow="none" style:text-underline-style="none" fo:font-weight="bold" style:font-size-asian="12pt" style:font-style-asian="normal" style:font-weight-asian="bold" style:font-name-complex="Comfortaa" style:font-size-complex="12pt" style:font-style-complex="normal" style:font-weight-complex="bold"/>
    </style:style>
    <style:style style:name="ce95" style:family="table-cell" style:parent-style-name="Default" style:data-style-name="N125">
      <style:table-cell-properties fo:border-bottom="1.76pt solid #ffffff" fo:background-color="#cbe2d6" style:diagonal-bl-tr="none" style:diagonal-tl-br="none" style:text-align-source="fix" style:repeat-content="false" fo:wrap-option="no-wrap" fo:border-left="none" style:direction="ltr" fo:border-right="1.76pt solid #ffffff" style:rotation-angle="0" style:rotation-align="none" style:shrink-to-fit="false" fo:border-top="none" style:vertical-align="bottom" loext:vertical-justify="auto"/>
      <style:paragraph-properties fo:text-align="center" css3t:text-justify="auto" fo:margin-left="0pt" style:writing-mode="page"/>
      <style:text-properties fo:color="#666666" style:text-outline="false" style:text-line-through-style="none" style:text-line-through-type="none" style:font-name="&quot;Trebuchet MS&quot;" fo:font-size="8pt" fo:font-style="normal" fo:text-shadow="none" style:text-underline-style="none" fo:font-weight="bold" style:font-size-asian="8pt" style:font-style-asian="normal" style:font-weight-asian="bold" style:font-name-complex="&quot;Trebuchet MS&quot;" style:font-size-complex="8pt" style:font-style-complex="normal" style:font-weight-complex="bold"/>
    </style:style>
    <style:style style:name="ce96" style:family="table-cell" style:parent-style-name="Default">
      <style:table-cell-properties fo:border-bottom="1.76pt solid #ffffff" fo:background-color="#66666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cccccc" style:text-outline="false" style:text-line-through-style="none" style:text-line-through-type="none" style:font-name="Comfortaa" fo:font-size="7pt" fo:font-style="normal" fo:text-shadow="none" style:text-underline-style="none" fo:font-weight="bold" style:font-size-asian="7pt" style:font-style-asian="normal" style:font-weight-asian="bold" style:font-name-complex="Comfortaa" style:font-size-complex="7pt" style:font-style-complex="normal" style:font-weight-complex="bold"/>
    </style:style>
    <style:style style:name="ce97" style:family="table-cell" style:parent-style-name="Default" style:data-style-name="N125">
      <style:table-cell-properties fo:border-bottom="1.76pt solid #ffffff" fo:background-color="#e3f0ea" style:diagonal-bl-tr="none" style:diagonal-tl-br="none" style:text-align-source="fix" style:repeat-content="false" fo:wrap-option="no-wrap" fo:border-left="none"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quot;Trebuchet MS&quot;" fo:font-size="11pt" fo:font-style="normal" fo:text-shadow="none" style:text-underline-style="none" fo:font-weight="bold" style:font-size-asian="11pt" style:font-style-asian="normal" style:font-weight-asian="bold" style:font-name-complex="&quot;Trebuchet MS&quot;" style:font-size-complex="11pt" style:font-style-complex="normal" style:font-weight-complex="bold"/>
    </style:style>
    <style:style style:name="ce98" style:family="table-cell" style:parent-style-name="Default">
      <style:table-cell-properties fo:border-bottom="1.76pt solid #ffffff" fo:background-color="#e3f0ea"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quot;Trebuchet MS&quot;" fo:font-size="11pt" fo:font-style="normal" fo:text-shadow="none" style:text-underline-style="none" fo:font-weight="bold" style:font-size-asian="11pt" style:font-style-asian="normal" style:font-weight-asian="bold" style:font-name-complex="&quot;Trebuchet MS&quot;" style:font-size-complex="11pt" style:font-style-complex="normal" style:font-weight-complex="bold"/>
    </style:style>
    <style:style style:name="ce99" style:family="table-cell" style:parent-style-name="Default">
      <style:table-cell-properties fo:border-bottom="1.76pt solid #ffffff" fo:background-color="#e3f0ea" style:diagonal-bl-tr="none" style:diagonal-tl-br="none" style:text-align-source="fix" style:repeat-content="false" fo:wrap-option="no-wrap" fo:border-left="1.76pt solid #ffffff"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quot;Trebuchet MS&quot;" fo:font-size="11pt" fo:font-style="normal" fo:text-shadow="none" style:text-underline-style="none" fo:font-weight="bold" style:font-size-asian="11pt" style:font-style-asian="normal" style:font-weight-asian="bold" style:font-name-complex="&quot;Trebuchet MS&quot;" style:font-size-complex="11pt" style:font-style-complex="normal" style:font-weight-complex="bold"/>
    </style:style>
    <style:style style:name="ce100" style:family="table-cell" style:parent-style-name="Default">
      <style:table-cell-properties fo:border-bottom="1.76pt solid #ffffff" fo:background-color="#666666" style:diagonal-bl-tr="none" style:diagonal-tl-br="none" style:text-align-source="fix" style:repeat-content="false" fo:wrap-option="no-wrap" fo:border-left="0.74pt solid #666666"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mfortaa" fo:font-size="12pt" fo:font-style="normal" fo:text-shadow="none" style:text-underline-style="none" fo:font-weight="bold" style:font-size-asian="12pt" style:font-style-asian="normal" style:font-weight-asian="bold" style:font-name-complex="Comfortaa" style:font-size-complex="12pt" style:font-style-complex="normal" style:font-weight-complex="bold"/>
    </style:style>
    <style:style style:name="ce101" style:family="table-cell" style:parent-style-name="Default" style:data-style-name="N125">
      <style:table-cell-properties fo:border-bottom="1.76pt solid #ffffff" fo:background-color="#cbe2d6" style:diagonal-bl-tr="none" style:diagonal-tl-br="none" style:text-align-source="fix" style:repeat-content="false" fo:wrap-option="no-wrap" fo:border-left="1.76pt solid #666666"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quot;Trebuchet MS&quot;" fo:font-size="8pt" fo:font-style="normal" fo:text-shadow="none" style:text-underline-style="none" fo:font-weight="bold" style:font-size-asian="8pt" style:font-style-asian="normal" style:font-weight-asian="bold" style:font-name-complex="&quot;Trebuchet MS&quot;" style:font-size-complex="8pt" style:font-style-complex="normal" style:font-weight-complex="bold"/>
    </style:style>
    <style:style style:name="ce102" style:family="table-cell" style:parent-style-name="Default">
      <style:table-cell-properties fo:border-bottom="1.76pt solid #ffffff" fo:background-color="#66666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cccccc" style:text-outline="false" style:text-line-through-style="none" style:text-line-through-type="none" style:font-name="Comfortaa" fo:font-size="7pt" fo:font-style="normal" fo:text-shadow="none" style:text-underline-style="none" fo:font-weight="bold" style:font-size-asian="7pt" style:font-style-asian="normal" style:font-weight-asian="bold" style:font-name-complex="Comfortaa" style:font-size-complex="7pt" style:font-style-complex="normal" style:font-weight-complex="bold"/>
    </style:style>
    <style:style style:name="ce103" style:family="table-cell" style:parent-style-name="Default">
      <style:table-cell-properties fo:border-bottom="1.76pt solid #ffffff" fo:background-color="#e3f0ea" style:diagonal-bl-tr="none" style:diagonal-tl-br="none" style:text-align-source="fix" style:repeat-content="false" fo:wrap-option="no-wrap" fo:border-left="none"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quot;Trebuchet MS&quot;" fo:font-size="11pt" fo:font-style="normal" fo:text-shadow="none" style:text-underline-style="none" fo:font-weight="bold" style:font-size-asian="11pt" style:font-style-asian="normal" style:font-weight-asian="bold" style:font-name-complex="&quot;Trebuchet MS&quot;" style:font-size-complex="11pt" style:font-style-complex="normal" style:font-weight-complex="bold"/>
    </style:style>
    <style:style style:name="ce104" style:family="table-cell" style:parent-style-name="Default">
      <style:table-cell-properties fo:background-color="#ff3434"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mfortaa" fo:font-size="12pt" fo:font-style="normal" fo:text-shadow="none" style:text-underline-style="none" fo:font-weight="bold" style:font-size-asian="12pt" style:font-style-asian="normal" style:font-weight-asian="bold" style:font-name-complex="Comfortaa" style:font-size-complex="12pt" style:font-style-complex="normal" style:font-weight-complex="bold"/>
    </style:style>
    <style:style style:name="ce105" style:family="table-cell" style:parent-style-name="Default" style:data-style-name="N125">
      <style:table-cell-properties fo:background-color="#f7c3c3" style:diagonal-bl-tr="none" style:diagonal-tl-br="none" style:text-align-source="fix" style:repeat-content="false" fo:wrap-option="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d12d2d"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name-complex="Trebuchet MS" style:font-size-complex="8pt" style:font-style-complex="normal" style:font-weight-complex="bold"/>
    </style:style>
    <style:style style:name="ce10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073763" style:diagonal-bl-tr="none" style:diagonal-tl-br="none" style:text-align-source="fix" style:repeat-content="false" fo:wrap-option="no-wrap" fo:border="1.76pt solid #073763"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mfortaa" fo:font-size="12pt" fo:font-style="normal" fo:text-shadow="none" style:text-underline-style="none" fo:font-weight="bold" style:font-size-asian="12pt" style:font-style-asian="normal" style:font-weight-asian="bold" style:font-name-complex="Comfortaa" style:font-size-complex="12pt" style:font-style-complex="normal" style:font-weight-complex="bold"/>
    </style:style>
    <style:style style:name="ce108" style:family="table-cell" style:parent-style-name="Default" style:data-style-name="N125">
      <style:table-cell-properties fo:border-bottom="1.76pt solid #ffffff" fo:background-color="#9fc5e8" style:diagonal-bl-tr="none" style:diagonal-tl-br="none" style:text-align-source="fix" style:repeat-content="false" fo:wrap-option="wrap" fo:border-left="none"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073763"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name-complex="Trebuchet MS" style:font-size-complex="8pt" style:font-style-complex="normal" style:font-weight-complex="bold"/>
    </style:style>
    <style:style style:name="ce109" style:family="table-cell" style:parent-style-name="Default" style:data-style-name="N125">
      <style:table-cell-properties fo:border-bottom="1.76pt solid #ffffff" fo:background-color="#9fc5e8" style:diagonal-bl-tr="none" style:diagonal-tl-br="none" style:text-align-source="fix" style:repeat-content="false" fo:wrap-option="no-wrap" fo:border-left="none" style:direction="ltr" fo:border-right="1.76pt solid #ffffff" style:rotation-angle="0" style:rotation-align="none" style:shrink-to-fit="false" fo:border-top="1.76pt solid #ffffff" style:vertical-align="middle" loext:vertical-justify="auto"/>
      <style:paragraph-properties fo:text-align="center" css3t:text-justify="auto" fo:margin-left="0pt" style:writing-mode="page"/>
      <style:text-properties fo:color="#073763"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name-complex="Trebuchet MS" style:font-size-complex="8pt" style:font-style-complex="normal" style:font-weight-complex="bold"/>
    </style:style>
    <style:style style:name="ce110"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e94141"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111" style:family="table-cell" style:parent-style-name="Default" style:data-style-name="N125">
      <style:table-cell-properties fo:background-color="#ffd3d3" style:diagonal-bl-tr="none" style:diagonal-tl-br="none" style:text-align-source="fix" style:repeat-content="false" fo:wrap-option="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d12d2d"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112" style:family="table-cell" style:parent-style-name="Default">
      <style:table-cell-properties fo:border-bottom="1.76pt solid #073763" style:diagonal-bl-tr="none" style:diagonal-tl-br="none" fo:border-left="none" fo:border-right="none" style:rotation-align="none" fo:border-top="1.76pt solid #07376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data-style-name="N125">
      <style:table-cell-properties fo:border-bottom="1.76pt solid #ffffff" fo:background-color="#cfe2f3" style:diagonal-bl-tr="none" style:diagonal-tl-br="none" style:text-align-source="fix" style:repeat-content="false" fo:wrap-option="wrap" fo:border-left="1.76pt solid #ffffff"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073763"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114" style:family="table-cell" style:parent-style-name="Default" style:data-style-name="N125">
      <style:table-cell-properties fo:background-color="#cfe2f3" style:diagonal-bl-tr="none" style:diagonal-tl-br="none" style:text-align-source="fix" style:repeat-content="false" fo:wrap-option="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073763"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115"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e94141"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116" style:family="table-cell" style:parent-style-name="Default">
      <style:table-cell-properties fo:background-color="#ff3434"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mfortaa" fo:font-size="7pt" fo:font-style="normal" fo:text-shadow="none" style:text-underline-style="none" fo:font-weight="bold" style:font-size-asian="7pt" style:font-style-asian="normal" style:font-weight-asian="bold" style:font-name-complex="Comfortaa" style:font-size-complex="7pt" style:font-style-complex="normal" style:font-weight-complex="bold"/>
    </style:style>
    <style:style style:name="ce117" style:family="table-cell" style:parent-style-name="Default">
      <style:table-cell-properties fo:border-bottom="1.76pt solid #ffffff" fo:background-color="#ffd3d3" style:diagonal-bl-tr="none" style:diagonal-tl-br="none" style:text-align-source="fix" style:repeat-content="false" fo:wrap-option="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pt" style:writing-mode="page"/>
      <style:text-properties fo:color="#d12d2d"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118" style:family="table-cell" style:parent-style-name="Default" style:data-style-name="N3">
      <style:table-cell-properties fo:border-bottom="1.76pt solid #ffffff" fo:background-color="#cfe2f3" style:diagonal-bl-tr="none" style:diagonal-tl-br="none" style:text-align-source="fix" style:repeat-content="false" fo:wrap-option="no-wrap" fo:border-left="1.76pt solid #ffffff" style:direction="ltr" fo:border-right="1.76pt solid #ffffff" style:rotation-angle="0" style:rotation-align="none" style:shrink-to-fit="false" fo:border-top="none" style:vertical-align="middle" loext:vertical-justify="auto"/>
      <style:paragraph-properties fo:text-align="center" css3t:text-justify="auto" fo:margin-left="0pt" style:writing-mode="page"/>
      <style:text-properties fo:color="#073763"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119" style:family="table-cell" style:parent-style-name="Default" style:data-style-name="N3">
      <style:table-cell-properties fo:background-color="#cfe2f3"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073763"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120" style:family="table-cell" style:parent-style-name="Default">
      <style:table-cell-properties fo:background-color="#ff3434"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mfortaa" fo:font-size="12pt" fo:font-style="normal" fo:text-shadow="none" style:text-underline-style="none" fo:font-weight="bold" style:font-size-asian="12pt" style:font-style-asian="normal" style:font-weight-asian="bold" style:font-name-complex="Comfortaa" style:font-size-complex="12pt" style:font-style-complex="normal" style:font-weight-complex="bold"/>
    </style:style>
    <style:style style:name="ce121" style:family="table-cell" style:parent-style-name="Default">
      <style:table-cell-properties fo:border-bottom="1.76pt solid #073763" style:diagonal-bl-tr="none" style:diagonal-tl-br="none" fo:border-left="none" fo:border-right="1.76pt solid #073763" style:rotation-align="none" fo:border-top="1.76pt solid #07376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ackground-color="#ffffff" style:rotation-align="none"/>
      <style:text-properties fo:color="#d9d9d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order-bottom="none" fo:background-color="#ffffff"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middle" loext:vertical-justify="auto"/>
      <style:paragraph-properties fo:text-align="end" css3t:text-justify="auto" fo:margin-left="0pt" style:writing-mode="page"/>
      <style:text-properties fo:color="#666666"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124" style:family="table-cell" style:parent-style-name="Default">
      <style:table-cell-properties fo:border-bottom="none" style:diagonal-bl-tr="none" style:diagonal-tl-br="none" fo:border-left="0.74pt solid #ffffff" fo:border-right="0.74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order-bottom="0.06pt solid #666666" fo:background-color="#ffffff" style:diagonal-bl-tr="none" style:diagonal-tl-br="none" style:text-align-source="fix" style:repeat-content="false" fo:wrap-option="no-wrap" fo:border-left="0.74pt solid #ffffff" style:direction="ltr" fo:border-right="0.06pt solid #666666" style:rotation-angle="0" style:rotation-align="none" style:shrink-to-fit="false" fo:border-top="0.74pt solid #ffffff" style:vertical-align="middle" loext:vertical-justify="auto"/>
      <style:paragraph-properties fo:text-align="end"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26" style:family="table-cell" style:parent-style-name="Default">
      <style:table-cell-properties fo:border-bottom="0.06pt solid #666666" fo:background-color="#ffffff" style:diagonal-bl-tr="none" style:diagonal-tl-br="none" style:text-align-source="fix" style:repeat-content="false" fo:wrap-option="no-wrap" fo:border-left="0.74pt solid #ffffff" style:direction="ltr" fo:border-right="0.06pt solid #666666" style:rotation-angle="0" style:rotation-align="none" style:shrink-to-fit="false" fo:border-top="0.06pt solid #666666" style:vertical-align="middle" loext:vertical-justify="auto"/>
      <style:paragraph-properties fo:text-align="end"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27" style:family="table-cell" style:parent-style-name="Default">
      <style:table-cell-properties fo:border-bottom="0.06pt solid #000000" fo:background-color="#ffffff" style:diagonal-bl-tr="none" style:diagonal-tl-br="none" style:text-align-source="fix" style:repeat-content="false" fo:wrap-option="no-wrap" fo:border-left="0.74pt solid #ffffff" style:direction="ltr" fo:border-right="0.06pt solid #666666" style:rotation-angle="0" style:rotation-align="none" style:shrink-to-fit="false" fo:border-top="0.06pt solid #666666" style:vertical-align="middle" loext:vertical-justify="auto"/>
      <style:paragraph-properties fo:text-align="end"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28" style:family="table-cell" style:parent-style-name="Default">
      <style:table-cell-properties fo:border-bottom="0.06pt solid #666666" fo:background-color="#ffffff" style:diagonal-bl-tr="none" style:diagonal-tl-br="none" style:text-align-source="fix" style:repeat-content="false" fo:wrap-option="no-wrap" fo:border-left="0.74pt solid #ffffff" style:direction="ltr" fo:border-right="0.06pt solid #666666" style:rotation-angle="0" style:rotation-align="none" style:shrink-to-fit="false" fo:border-top="none" style:vertical-align="middle" loext:vertical-justify="auto"/>
      <style:paragraph-properties fo:text-align="end"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29" style:family="table-cell" style:parent-style-name="Default">
      <style:table-cell-properties fo:border-bottom="0.06pt solid #666666" fo:background-color="#ffffff" style:diagonal-bl-tr="none" style:diagonal-tl-br="none" style:text-align-source="fix" style:repeat-content="false" fo:wrap-option="no-wrap" fo:border-left="none" style:direction="ltr" fo:border-right="0.06pt solid #666666" style:rotation-angle="0" style:rotation-align="none" style:shrink-to-fit="false" fo:border-top="0.06pt solid #666666" style:vertical-align="middle" loext:vertical-justify="auto"/>
      <style:paragraph-properties fo:text-align="end"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30" style:family="table-cell" style:parent-style-name="Default">
      <style:table-cell-properties fo:background-color="#f3f3f3"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31" style:family="table-cell" style:parent-style-name="Default">
      <style:table-cell-properties fo:border-bottom="none" fo:background-color="#f3f3f3"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32" style:family="table-cell" style:parent-style-name="Default">
      <style:table-cell-properties fo:border-bottom="none" fo:background-color="#f3f3f3"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133" style:family="table-cell" style:parent-style-name="Default" style:data-style-name="N125">
      <style:table-cell-properties fo:border-bottom="0.06pt solid #666666" fo:background-color="#f3f3f3" style:diagonal-bl-tr="none" style:diagonal-tl-br="none" style:text-align-source="fix" style:repeat-content="false" fo:wrap-option="no-wrap" fo:border-left="0.06pt solid #666666" style:direction="ltr" fo:border-right="0.06pt solid #666666" style:rotation-angle="0" style:rotation-align="none" style:shrink-to-fit="false" fo:border-top="0.74pt solid #ffffff"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34" style:family="table-cell" style:parent-style-name="Default" style:data-style-name="N125">
      <style:table-cell-properties fo:background-color="#f3f3f3" style:diagonal-bl-tr="none" style:diagonal-tl-br="none" style:text-align-source="fix" style:repeat-content="false" fo:wrap-option="no-wrap" fo:border="0.06pt solid #666666"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35" style:family="table-cell" style:parent-style-name="Default" style:data-style-name="N125">
      <style:table-cell-properties fo:border-bottom="0.06pt solid #000000" fo:background-color="#f3f3f3" style:diagonal-bl-tr="none" style:diagonal-tl-br="none" style:text-align-source="fix" style:repeat-content="false" fo:wrap-option="no-wrap" fo:border-left="0.06pt solid #666666" style:direction="ltr" fo:border-right="0.06pt solid #666666" style:rotation-angle="0" style:rotation-align="none" style:shrink-to-fit="false" fo:border-top="0.06pt solid #666666"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36" style:family="table-cell" style:parent-style-name="Default" style:data-style-name="N125">
      <style:table-cell-properties fo:border-bottom="0.06pt solid #666666" fo:background-color="#f3f3f3" style:diagonal-bl-tr="none" style:diagonal-tl-br="none" style:text-align-source="fix" style:repeat-content="false" fo:wrap-option="no-wrap" fo:border-left="0.06pt solid #666666" style:direction="ltr" fo:border-right="0.06pt solid #666666"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37" style:family="table-cell" style:parent-style-name="Default">
      <style:table-cell-properties fo:border-bottom="none" fo:background-color="#bcffff"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138" style:family="table-cell" style:parent-style-name="Default" style:data-style-name="N3">
      <style:table-cell-properties fo:border-bottom="0.06pt solid #666666" fo:background-color="#bcffff" style:diagonal-bl-tr="none" style:diagonal-tl-br="none" style:text-align-source="fix" style:repeat-content="false" fo:wrap-option="no-wrap" fo:border-left="0.06pt solid #666666" style:direction="ltr" fo:border-right="0.06pt solid #666666" style:rotation-angle="0" style:rotation-align="none" style:shrink-to-fit="false" fo:border-top="0.74pt solid #ffffff"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39" style:family="table-cell" style:parent-style-name="Default" style:data-style-name="N3">
      <style:table-cell-properties fo:background-color="#bcffff" style:diagonal-bl-tr="none" style:diagonal-tl-br="none" style:text-align-source="fix" style:repeat-content="false" fo:wrap-option="no-wrap" fo:border="0.06pt solid #666666"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40" style:family="table-cell" style:parent-style-name="Default" style:data-style-name="N3">
      <style:table-cell-properties fo:border-bottom="0.06pt solid #000000" fo:background-color="#bcffff" style:diagonal-bl-tr="none" style:diagonal-tl-br="none" style:text-align-source="fix" style:repeat-content="false" fo:wrap-option="no-wrap" fo:border-left="0.06pt solid #666666" style:direction="ltr" fo:border-right="0.06pt solid #666666" style:rotation-angle="0" style:rotation-align="none" style:shrink-to-fit="false" fo:border-top="0.06pt solid #666666"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41" style:family="table-cell" style:parent-style-name="Default" style:data-style-name="N3">
      <style:table-cell-properties fo:border-bottom="0.06pt solid #666666" fo:background-color="#bcffff" style:diagonal-bl-tr="none" style:diagonal-tl-br="none" style:text-align-source="fix" style:repeat-content="false" fo:wrap-option="no-wrap" fo:border-left="0.06pt solid #666666" style:direction="ltr" fo:border-right="0.06pt solid #666666"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42" style:family="table-cell" style:parent-style-name="Default">
      <style:table-cell-properties fo:border-bottom="none" fo:background-color="#f3f3f3" style:diagonal-bl-tr="none" style:diagonal-tl-br="none" style:text-align-source="fix" style:repeat-content="false" fo:wrap-option="no-wrap" fo:border-left="1.76pt solid #b7b7b7" style:direction="ltr" fo:border-right="0.74pt solid #ffffff" style:rotation-angle="0" style:rotation-align="none" style:shrink-to-fit="false" fo:border-top="0.74pt solid #ffffff"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43" style:family="table-cell" style:parent-style-name="Default">
      <style:table-cell-properties fo:border-bottom="none" fo:background-color="#f3f3f3" style:diagonal-bl-tr="none" style:diagonal-tl-br="none" style:text-align-source="fix" style:repeat-content="false" fo:wrap-option="no-wrap" fo:border-left="1.76pt solid #b7b7b7"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144" style:family="table-cell" style:parent-style-name="Default" style:data-style-name="N3">
      <style:table-cell-properties fo:border-bottom="0.06pt solid #666666" fo:background-color="#bcffff" style:diagonal-bl-tr="none" style:diagonal-tl-br="none" style:text-align-source="fix" style:repeat-content="false" fo:wrap-option="no-wrap" fo:border-left="0.06pt solid #666666"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45" style:family="table-cell" style:parent-style-name="Default" style:data-style-name="N3">
      <style:table-cell-properties fo:border-bottom="0.06pt solid #666666" fo:background-color="#bcffff" style:diagonal-bl-tr="none" style:diagonal-tl-br="none" style:text-align-source="fix" style:repeat-content="false" fo:wrap-option="no-wrap" fo:border-left="0.06pt solid #666666" style:direction="ltr" fo:border-right="none" style:rotation-angle="0" style:rotation-align="none" style:shrink-to-fit="false" fo:border-top="0.06pt solid #666666"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46" style:family="table-cell" style:parent-style-name="Default" style:data-style-name="N3">
      <style:table-cell-properties fo:border-bottom="0.06pt solid #000000" fo:background-color="#bcffff" style:diagonal-bl-tr="none" style:diagonal-tl-br="none" style:text-align-source="fix" style:repeat-content="false" fo:wrap-option="no-wrap" fo:border-left="0.06pt solid #666666" style:direction="ltr" fo:border-right="none" style:rotation-angle="0" style:rotation-align="none" style:shrink-to-fit="false" fo:border-top="0.06pt solid #666666"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47" style:family="table-cell" style:parent-style-name="Default" style:data-style-name="N3">
      <style:table-cell-properties fo:border-bottom="0.06pt solid #666666" fo:background-color="#bcffff" style:diagonal-bl-tr="none" style:diagonal-tl-br="none" style:text-align-source="fix" style:repeat-content="false" fo:wrap-option="no-wrap" fo:border-left="0.06pt solid #666666"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48" style:family="table-cell" style:parent-style-name="Default">
      <style:table-cell-properties fo:background-color="#ffffff"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999999"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149" style:family="table-cell" style:parent-style-name="Default">
      <style:table-cell-properties fo:background-color="#ffffff"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999999"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150" style:family="table-cell" style:parent-style-name="Default" style:data-style-name="N125">
      <style:table-cell-properties fo:border-bottom="0.74pt solid #ffffff" fo:background-color="#ffffff"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999999"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151" style:family="table-cell" style:parent-style-name="Default" style:data-style-name="N125">
      <style:table-cell-properties fo:border-bottom="0.74pt solid #ffffff" fo:background-color="#ffffff"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999999"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52" style:family="table-cell" style:parent-style-name="Default" style:data-style-name="N125">
      <style:table-cell-properties fo:border-bottom="0.06pt solid #000000" fo:background-color="#ffffff"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data-style-name="N125">
      <style:table-cell-properties fo:border-bottom="0.74pt solid #ffffff" fo:background-color="#ffffff" style:diagonal-bl-tr="none" style:diagonal-tl-br="none" style:text-align-source="fix" style:repeat-content="false" fo:wrap-option="no-wrap" fo:border-left="0.74pt solid #ffffff"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999999"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154" style:family="table-cell" style:parent-style-name="Default" style:data-style-name="N125">
      <style:table-cell-properties fo:border-bottom="0.74pt solid #ffffff" fo:background-color="#ffffff"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9999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5" style:family="table-cell" style:parent-style-name="Default" style:data-style-name="N125">
      <style:table-cell-properties fo:border-bottom="0.74pt solid #ffffff" fo:background-color="#ffffff"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ackground-color="#434343"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157" style:family="table-cell" style:parent-style-name="Default">
      <style:table-cell-properties fo:border-bottom="0.74pt solid #ffffff" style:diagonal-bl-tr="none" style:diagonal-tl-br="none" fo:border-left="0.74pt solid #ffffff" fo:border-right="0.74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data-style-name="N3">
      <style:table-cell-properties fo:background-color="#54ddf7"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159" style:family="table-cell" style:parent-style-name="Default">
      <style:table-cell-properties fo:background-color="#434343"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160" style:family="table-cell" style:parent-style-name="Default" style:data-style-name="N125">
      <style:table-cell-properties fo:background-color="#54ddf7"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61" style:family="table-cell" style:parent-style-name="Default" style:data-style-name="N125">
      <style:table-cell-properties fo:border-bottom="0.74pt solid #ffffff" fo:background-color="#ffffff"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middle" loext:vertical-justify="auto"/>
      <style:paragraph-properties fo:text-align="center" css3t:text-justify="auto" fo:margin-left="0pt" style:writing-mode="page"/>
      <style:text-properties fo:color="#999999"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162" style:family="table-cell" style:parent-style-name="Default" style:data-style-name="N125">
      <style:table-cell-properties fo:border-bottom="0.74pt solid #ffffff" fo:background-color="#ffffff"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middle" loext:vertical-justify="auto"/>
      <style:paragraph-properties fo:text-align="center" css3t:text-justify="auto" fo:margin-left="0pt" style:writing-mode="page"/>
      <style:text-properties fo:color="#999999"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63" style:family="table-cell" style:parent-style-name="Default" style:data-style-name="N125">
      <style:table-cell-properties fo:border-bottom="0.74pt solid #ffffff" fo:background-color="#ffffff" style:diagonal-bl-tr="none" style:diagonal-tl-br="none" style:text-align-source="value-type" style:repeat-content="false" fo:wrap-option="no-wrap" fo:border-left="none"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9999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4" style:family="table-cell" style:parent-style-name="Default" style:data-style-name="N125">
      <style:table-cell-properties fo:border-bottom="0.74pt solid #ffffff" fo:background-color="#ffffff" style:diagonal-bl-tr="none" style:diagonal-tl-br="none" style:text-align-source="value-type" style:repeat-content="false" fo:wrap-option="no-wrap" fo:border-left="none"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table-cell-properties fo:background-color="#f3f3f3"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66" style:family="table-cell" style:parent-style-name="Default">
      <style:table-cell-properties fo:border-bottom="0.74pt solid #ffffff" style:diagonal-bl-tr="none" style:diagonal-tl-br="none" fo:border-left="0.74pt solid #ffffff"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ackground-color="#f3f3f3"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68" style:family="table-cell" style:parent-style-name="Default">
      <style:table-cell-properties fo:border-bottom="0.06pt solid #666666" fo:background-color="#f3f3f3" style:diagonal-bl-tr="none" style:diagonal-tl-br="none" style:text-align-source="fix" style:repeat-content="false" fo:wrap-option="no-wrap" fo:border-left="none" style:direction="ltr" fo:border-right="0.06pt solid #666666" style:rotation-angle="0" style:rotation-align="none" style:shrink-to-fit="false" fo:border-top="0.74pt solid #ffffff"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69" style:family="table-cell" style:parent-style-name="Default">
      <style:table-cell-properties fo:border-bottom="0.06pt solid #666666" fo:background-color="#f3f3f3" style:diagonal-bl-tr="none" style:diagonal-tl-br="none" style:text-align-source="fix" style:repeat-content="false" fo:wrap-option="no-wrap" fo:border-left="none" style:direction="ltr" fo:border-right="0.06pt solid #666666" style:rotation-angle="0" style:rotation-align="none" style:shrink-to-fit="false" fo:border-top="0.06pt solid #666666"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70" style:family="table-cell" style:parent-style-name="Default" style:data-style-name="N125">
      <style:table-cell-properties fo:border-bottom="0.06pt solid #000000" fo:background-color="#f3f3f3" style:diagonal-bl-tr="none" style:diagonal-tl-br="none" style:text-align-source="fix" style:repeat-content="false" fo:wrap-option="no-wrap" fo:border-left="none" style:direction="ltr" fo:border-right="0.06pt solid #666666" style:rotation-angle="0" style:rotation-align="none" style:shrink-to-fit="false" fo:border-top="0.06pt solid #666666"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71" style:family="table-cell" style:parent-style-name="Default">
      <style:table-cell-properties fo:border-bottom="0.06pt solid #666666" fo:background-color="#f3f3f3" style:diagonal-bl-tr="none" style:diagonal-tl-br="none" style:text-align-source="fix" style:repeat-content="false" fo:wrap-option="no-wrap" fo:border-left="none" style:direction="ltr" fo:border-right="0.06pt solid #666666" style:rotation-angle="0" style:rotation-align="none" style:shrink-to-fit="false" fo:border-top="non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72" style:family="table-cell" style:parent-style-name="Default" style:data-style-name="N125">
      <style:table-cell-properties fo:border-bottom="0.06pt solid #666666" fo:background-color="#f3f3f3" style:diagonal-bl-tr="none" style:diagonal-tl-br="none" style:text-align-source="fix" style:repeat-content="false" fo:wrap-option="no-wrap" fo:border-left="none" style:direction="ltr" fo:border-right="0.06pt solid #666666" style:rotation-angle="0" style:rotation-align="none" style:shrink-to-fit="false" fo:border-top="0.06pt solid #666666"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73" style:family="table-cell" style:parent-style-name="Default">
      <style:table-cell-properties fo:border-bottom="0.74pt solid #ffffff"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fo:border-bottom="0.06pt solid #666666" fo:background-color="#f3f3f3" style:diagonal-bl-tr="none" style:diagonal-tl-br="none" style:text-align-source="fix" style:repeat-content="false" fo:wrap-option="no-wrap" fo:border-left="0.06pt solid #666666" style:direction="ltr" fo:border-right="0.06pt solid #666666" style:rotation-angle="0" style:rotation-align="none" style:shrink-to-fit="false" fo:border-top="0.74pt solid #ffffff"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75" style:family="table-cell" style:parent-style-name="Default">
      <style:table-cell-properties fo:background-color="#f3f3f3" style:diagonal-bl-tr="none" style:diagonal-tl-br="none" style:text-align-source="fix" style:repeat-content="false" fo:wrap-option="no-wrap" fo:border="0.06pt solid #666666" style:direction="ltr" style:rotation-angle="0" style:rotation-align="none" style:shrink-to-fit="fals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76" style:family="table-cell" style:parent-style-name="Default" style:data-style-name="N125">
      <style:table-cell-properties fo:background-color="#f3f3f3" style:diagonal-bl-tr="none" style:diagonal-tl-br="none" style:text-align-source="fix" style:repeat-content="false" fo:wrap-option="no-wrap" fo:border="0.06pt solid #666666" style:direction="ltr" style:rotation-angle="0" style:rotation-align="none" style:shrink-to-fit="fals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77" style:family="table-cell" style:parent-style-name="Default" style:data-style-name="N125">
      <style:table-cell-properties fo:border-bottom="0.06pt solid #000000" fo:background-color="#f3f3f3" style:diagonal-bl-tr="none" style:diagonal-tl-br="none" style:text-align-source="fix" style:repeat-content="false" fo:wrap-option="no-wrap" fo:border-left="0.06pt solid #666666" style:direction="ltr" fo:border-right="0.06pt solid #666666" style:rotation-angle="0" style:rotation-align="none" style:shrink-to-fit="false" fo:border-top="0.06pt solid #666666"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78" style:family="table-cell" style:parent-style-name="Default">
      <style:table-cell-properties fo:border-bottom="0.06pt solid #666666" fo:background-color="#f3f3f3" style:diagonal-bl-tr="none" style:diagonal-tl-br="none" style:text-align-source="fix" style:repeat-content="false" fo:wrap-option="no-wrap" fo:border-left="0.06pt solid #666666" style:direction="ltr" fo:border-right="0.06pt solid #666666" style:rotation-angle="0" style:rotation-align="none" style:shrink-to-fit="false" fo:border-top="non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79" style:family="table-cell" style:parent-style-name="Default" style:data-style-name="N3">
      <style:table-cell-properties fo:border-bottom="0.06pt solid #000000" fo:background-color="#f3f3f3" style:diagonal-bl-tr="none" style:diagonal-tl-br="none" style:text-align-source="fix" style:repeat-content="false" fo:wrap-option="no-wrap" fo:border-left="0.06pt solid #666666" style:direction="ltr" fo:border-right="0.06pt solid #666666" style:rotation-angle="0" style:rotation-align="none" style:shrink-to-fit="false" fo:border-top="0.06pt solid #666666"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80" style:family="table-cell" style:parent-style-name="Default" style:data-style-name="N3">
      <style:table-cell-properties fo:background-color="#f3f3f3" style:diagonal-bl-tr="none" style:diagonal-tl-br="none" style:text-align-source="fix" style:repeat-content="false" fo:wrap-option="no-wrap" fo:border="0.06pt solid #666666" style:direction="ltr" style:rotation-angle="0" style:rotation-align="none" style:shrink-to-fit="fals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81" style:family="table-cell" style:parent-style-name="Default" style:data-style-name="N3">
      <style:table-cell-properties fo:border-bottom="0.06pt solid #666666" fo:background-color="#f3f3f3" style:diagonal-bl-tr="none" style:diagonal-tl-br="none" style:text-align-source="fix" style:repeat-content="false" fo:wrap-option="no-wrap" fo:border-left="0.06pt solid #666666" style:direction="ltr" fo:border-right="0.06pt solid #666666" style:rotation-angle="0" style:rotation-align="none" style:shrink-to-fit="false" fo:border-top="0.74pt solid #ffffff"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82" style:family="table-cell" style:parent-style-name="Default" style:data-style-name="N3">
      <style:table-cell-properties fo:border-bottom="0.06pt solid #666666" fo:background-color="#f3f3f3" style:diagonal-bl-tr="none" style:diagonal-tl-br="none" style:text-align-source="fix" style:repeat-content="false" fo:wrap-option="no-wrap" fo:border-left="0.06pt solid #666666" style:direction="ltr" fo:border-right="0.06pt solid #666666" style:rotation-angle="0" style:rotation-align="none" style:shrink-to-fit="false" fo:border-top="non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83" style:family="table-cell" style:parent-style-name="Default">
      <style:table-cell-properties fo:border-bottom="0.74pt solid #ffffff" style:diagonal-bl-tr="none" style:diagonal-tl-br="none" fo:border-left="none" fo:border-right="0.74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data-style-name="N3">
      <style:table-cell-properties fo:border-bottom="0.06pt solid #666666" fo:background-color="#f3f3f3" style:diagonal-bl-tr="none" style:diagonal-tl-br="none" style:text-align-source="fix" style:repeat-content="false" fo:wrap-option="no-wrap" fo:border-left="0.06pt solid #666666"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85" style:family="table-cell" style:parent-style-name="Default" style:data-style-name="N3">
      <style:table-cell-properties fo:border-bottom="0.06pt solid #666666" fo:background-color="#f3f3f3" style:diagonal-bl-tr="none" style:diagonal-tl-br="none" style:text-align-source="fix" style:repeat-content="false" fo:wrap-option="no-wrap" fo:border-left="0.06pt solid #666666" style:direction="ltr" fo:border-right="none" style:rotation-angle="0" style:rotation-align="none" style:shrink-to-fit="false" fo:border-top="0.06pt solid #666666"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86" style:family="table-cell" style:parent-style-name="Default" style:data-style-name="N3">
      <style:table-cell-properties fo:border-bottom="0.06pt solid #000000" fo:background-color="#f3f3f3" style:diagonal-bl-tr="none" style:diagonal-tl-br="none" style:text-align-source="fix" style:repeat-content="false" fo:wrap-option="no-wrap" fo:border-left="0.06pt solid #666666" style:direction="ltr" fo:border-right="none" style:rotation-angle="0" style:rotation-align="none" style:shrink-to-fit="false" fo:border-top="0.06pt solid #666666"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87" style:family="table-cell" style:parent-style-name="Default" style:data-style-name="N3">
      <style:table-cell-properties fo:border-bottom="0.06pt solid #666666" fo:background-color="#f3f3f3" style:diagonal-bl-tr="none" style:diagonal-tl-br="none" style:text-align-source="fix" style:repeat-content="false" fo:wrap-option="no-wrap" fo:border-left="0.06pt solid #666666"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88" style:family="table-cell" style:parent-style-name="Default" style:data-style-name="N3">
      <style:table-cell-properties fo:background-color="#f4cccc"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name-complex="Trebuchet MS" style:font-size-complex="9pt" style:font-style-complex="normal" style:font-weight-complex="bold"/>
    </style:style>
    <style:style style:name="ce189" style:family="table-cell" style:parent-style-name="Default" style:data-style-name="N125">
      <style:table-cell-properties fo:background-color="#f4cccc"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190" style:family="table-cell" style:parent-style-name="Default">
      <style:table-cell-properties fo:border-bottom="0.74pt solid #ffffff" fo:background-color="#434343" style:diagonal-bl-tr="none" style:diagonal-tl-br="none" style:text-align-source="fix" style:repeat-content="false" fo:wrap-option="wrap" fo:border-left="0.74pt solid #ffffff"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191" style:family="table-cell" style:parent-style-name="Default">
      <style:table-cell-properties fo:border-bottom="none" style:diagonal-bl-tr="none" style:diagonal-tl-br="none" fo:border-left="0.74pt solid #ffffff"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data-style-name="N3">
      <style:table-cell-properties fo:border-bottom="0.06pt solid #666666" fo:background-color="#f3f3f3" style:diagonal-bl-tr="none" style:diagonal-tl-br="none" style:text-align-source="fix" style:repeat-content="false" fo:wrap-option="no-wrap" fo:border-left="none" style:direction="ltr" fo:border-right="0.06pt solid #666666" style:rotation-angle="0" style:rotation-align="none" style:shrink-to-fit="false" fo:border-top="0.74pt solid #fffff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193" style:family="table-cell" style:parent-style-name="Default" style:data-style-name="N3">
      <style:table-cell-properties fo:border-bottom="0.06pt solid #666666" fo:background-color="#f3f3f3" style:diagonal-bl-tr="none" style:diagonal-tl-br="none" style:text-align-source="fix" style:repeat-content="false" fo:wrap-option="no-wrap" fo:border-left="none" style:direction="ltr" fo:border-right="0.06pt solid #666666" style:rotation-angle="0" style:rotation-align="none" style:shrink-to-fit="false" fo:border-top="0.06pt solid #666666"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194" style:family="table-cell" style:parent-style-name="Default" style:data-style-name="N3">
      <style:table-cell-properties fo:border-bottom="0.06pt solid #000000" fo:background-color="#f3f3f3" style:diagonal-bl-tr="none" style:diagonal-tl-br="none" style:text-align-source="fix" style:repeat-content="false" fo:wrap-option="no-wrap" fo:border-left="none" style:direction="ltr" fo:border-right="0.06pt solid #666666" style:rotation-angle="0" style:rotation-align="none" style:shrink-to-fit="false" fo:border-top="0.06pt solid #666666"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195" style:family="table-cell" style:parent-style-name="Default" style:data-style-name="N3">
      <style:table-cell-properties fo:border-bottom="0.06pt solid #666666" fo:background-color="#f3f3f3" style:diagonal-bl-tr="none" style:diagonal-tl-br="none" style:text-align-source="fix" style:repeat-content="false" fo:wrap-option="no-wrap" fo:border-left="none" style:direction="ltr" fo:border-right="0.06pt solid #666666"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196" style:family="table-cell" style:parent-style-name="Default">
      <style:table-cell-properties fo:border-bottom="0.74pt solid #ffffff" fo:background-color="#434343" style:diagonal-bl-tr="none" style:diagonal-tl-br="none" style:text-align-source="fix" style:repeat-content="false" fo:wrap-option="wrap" fo:border-left="1.76pt double-thin #ffffff" style:border-line-width-left="0.51pt 0.74pt 0.51pt" style:direction="ltr" fo:border-right="0.74pt solid #ffffff"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197" style:family="table-cell" style:parent-style-name="Default">
      <style:table-cell-properties fo:border-bottom="none" style:diagonal-bl-tr="none" style:diagonal-tl-br="none" fo:border-left="1.76pt double-thin #ffffff" style:border-line-width-left="0.51pt 0.74pt 0.51pt" fo:border-right="0.74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0.74pt solid #ffffff" style:diagonal-bl-tr="none" style:diagonal-tl-br="none" fo:border-left="1.76pt double-thin #ffffff" style:border-line-width-left="0.51pt 0.74pt 0.51pt" fo:border-right="0.74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data-style-name="N127">
      <style:table-cell-properties fo:border-bottom="0.06pt solid #666666" fo:background-color="#fce5cd" style:diagonal-bl-tr="none" style:diagonal-tl-br="none" style:text-align-source="fix" style:repeat-content="false" fo:wrap-option="no-wrap" fo:border-left="0.06pt solid #666666" style:direction="ltr" fo:border-right="0.06pt solid #666666" style:rotation-angle="0" style:rotation-align="none" style:shrink-to-fit="false" fo:border-top="0.74pt solid #fffff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00" style:family="table-cell" style:parent-style-name="Default" style:data-style-name="N127">
      <style:table-cell-properties fo:background-color="#fce5cd" style:diagonal-bl-tr="none" style:diagonal-tl-br="none" style:text-align-source="fix" style:repeat-content="false" fo:wrap-option="no-wrap" fo:border="0.06pt solid #66666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01" style:family="table-cell" style:parent-style-name="Default" style:data-style-name="N127">
      <style:table-cell-properties fo:border-bottom="0.06pt solid #000000" fo:background-color="#fce5cd" style:diagonal-bl-tr="none" style:diagonal-tl-br="none" style:text-align-source="fix" style:repeat-content="false" fo:wrap-option="no-wrap" fo:border-left="0.06pt solid #666666" style:direction="ltr" fo:border-right="0.06pt solid #666666" style:rotation-angle="0" style:rotation-align="none" style:shrink-to-fit="false" fo:border-top="0.06pt solid #666666"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02" style:family="table-cell" style:parent-style-name="Default" style:data-style-name="N127">
      <style:table-cell-properties fo:border-bottom="0.06pt solid #666666" fo:background-color="#fce5cd" style:diagonal-bl-tr="none" style:diagonal-tl-br="none" style:text-align-source="fix" style:repeat-content="false" fo:wrap-option="no-wrap" fo:border-left="0.06pt solid #666666" style:direction="ltr" fo:border-right="0.06pt solid #666666"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03" style:family="table-cell" style:parent-style-name="Default" style:data-style-name="N125">
      <style:table-cell-properties fo:border-bottom="0.06pt solid #666666" fo:background-color="#fce5cd" style:diagonal-bl-tr="none" style:diagonal-tl-br="none" style:text-align-source="fix" style:repeat-content="false" fo:wrap-option="no-wrap" fo:border-left="0.06pt solid #666666"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04" style:family="table-cell" style:parent-style-name="Default" style:data-style-name="N125">
      <style:table-cell-properties fo:border-bottom="0.06pt solid #666666" fo:background-color="#fce5cd" style:diagonal-bl-tr="none" style:diagonal-tl-br="none" style:text-align-source="fix" style:repeat-content="false" fo:wrap-option="no-wrap" fo:border-left="0.06pt solid #666666" style:direction="ltr" fo:border-right="none" style:rotation-angle="0" style:rotation-align="none" style:shrink-to-fit="false" fo:border-top="0.06pt solid #666666"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05" style:family="table-cell" style:parent-style-name="Default" style:data-style-name="N125">
      <style:table-cell-properties fo:border-bottom="0.06pt solid #000000" fo:background-color="#fce5cd" style:diagonal-bl-tr="none" style:diagonal-tl-br="none" style:text-align-source="fix" style:repeat-content="false" fo:wrap-option="no-wrap" fo:border-left="0.06pt solid #666666" style:direction="ltr" fo:border-right="none" style:rotation-angle="0" style:rotation-align="none" style:shrink-to-fit="false" fo:border-top="0.06pt solid #666666"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06" style:family="table-cell" style:parent-style-name="Default" style:data-style-name="N125">
      <style:table-cell-properties fo:border-bottom="0.06pt solid #666666" fo:background-color="#fce5cd" style:diagonal-bl-tr="none" style:diagonal-tl-br="none" style:text-align-source="fix" style:repeat-content="false" fo:wrap-option="no-wrap" fo:border-left="0.06pt solid #666666"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07" style:family="table-cell" style:parent-style-name="Default" style:data-style-name="N127">
      <style:table-cell-properties fo:border-bottom="0.06pt solid #666666" fo:background-color="#fce5cd" style:diagonal-bl-tr="none" style:diagonal-tl-br="none" style:text-align-source="fix" style:repeat-content="false" fo:wrap-option="no-wrap" fo:border-left="1.76pt double-thin #ffffff" style:border-line-width-left="0.51pt 0.74pt 0.51pt" style:direction="ltr" fo:border-right="0.06pt solid #666666" style:rotation-angle="0" style:rotation-align="none" style:shrink-to-fit="false" fo:border-top="0.74pt solid #fffff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08" style:family="table-cell" style:parent-style-name="Default" style:data-style-name="N127">
      <style:table-cell-properties fo:border-bottom="0.06pt solid #666666" fo:background-color="#fce5cd" style:diagonal-bl-tr="none" style:diagonal-tl-br="none" style:text-align-source="fix" style:repeat-content="false" fo:wrap-option="no-wrap" fo:border-left="1.76pt double-thin #ffffff" style:border-line-width-left="0.51pt 0.74pt 0.51pt" style:direction="ltr" fo:border-right="0.06pt solid #666666" style:rotation-angle="0" style:rotation-align="none" style:shrink-to-fit="false" fo:border-top="0.06pt solid #666666"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09" style:family="table-cell" style:parent-style-name="Default" style:data-style-name="N127">
      <style:table-cell-properties fo:border-bottom="0.06pt solid #000000" fo:background-color="#fce5cd" style:diagonal-bl-tr="none" style:diagonal-tl-br="none" style:text-align-source="fix" style:repeat-content="false" fo:wrap-option="no-wrap" fo:border-left="1.76pt double-thin #ffffff" style:border-line-width-left="0.51pt 0.74pt 0.51pt" style:direction="ltr" fo:border-right="0.06pt solid #666666" style:rotation-angle="0" style:rotation-align="none" style:shrink-to-fit="false" fo:border-top="0.06pt solid #666666"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10" style:family="table-cell" style:parent-style-name="Default" style:data-style-name="N127">
      <style:table-cell-properties fo:border-bottom="0.06pt solid #666666" fo:background-color="#fce5cd" style:diagonal-bl-tr="none" style:diagonal-tl-br="none" style:text-align-source="fix" style:repeat-content="false" fo:wrap-option="no-wrap" fo:border-left="1.76pt double-thin #ffffff" style:border-line-width-left="0.51pt 0.74pt 0.51pt" style:direction="ltr" fo:border-right="0.06pt solid #666666"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11" style:family="table-cell" style:parent-style-name="Default" style:data-style-name="N125">
      <style:table-cell-properties fo:border-bottom="0.06pt solid #666666" fo:background-color="#fce5cd" style:diagonal-bl-tr="none" style:diagonal-tl-br="none" style:text-align-source="fix" style:repeat-content="false" fo:wrap-option="no-wrap" fo:border-left="0.06pt solid #666666" style:direction="ltr" fo:border-right="0.74pt solid #ffffff" style:rotation-angle="0" style:rotation-align="none" style:shrink-to-fit="false" fo:border-top="0.74pt solid #fffff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12" style:family="table-cell" style:parent-style-name="Default" style:data-style-name="N125">
      <style:table-cell-properties fo:border-bottom="0.06pt solid #666666" fo:background-color="#fce5cd" style:diagonal-bl-tr="none" style:diagonal-tl-br="none" style:text-align-source="fix" style:repeat-content="false" fo:wrap-option="no-wrap" fo:border-left="0.06pt solid #666666" style:direction="ltr" fo:border-right="0.74pt solid #ffffff" style:rotation-angle="0" style:rotation-align="none" style:shrink-to-fit="false" fo:border-top="0.06pt solid #666666"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13" style:family="table-cell" style:parent-style-name="Default" style:data-style-name="N125">
      <style:table-cell-properties fo:border-bottom="0.06pt solid #000000" fo:background-color="#fce5cd" style:diagonal-bl-tr="none" style:diagonal-tl-br="none" style:text-align-source="fix" style:repeat-content="false" fo:wrap-option="no-wrap" fo:border-left="0.06pt solid #666666" style:direction="ltr" fo:border-right="0.74pt solid #ffffff" style:rotation-angle="0" style:rotation-align="none" style:shrink-to-fit="false" fo:border-top="0.06pt solid #666666"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14" style:family="table-cell" style:parent-style-name="Default" style:data-style-name="N125">
      <style:table-cell-properties fo:border-bottom="0.06pt solid #666666" fo:background-color="#fce5cd" style:diagonal-bl-tr="none" style:diagonal-tl-br="none" style:text-align-source="fix" style:repeat-content="false" fo:wrap-option="no-wrap" fo:border-left="0.06pt solid #666666" style:direction="ltr" fo:border-right="0.74pt solid #ffffff"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name-complex="Trebuchet MS" style:font-size-complex="9pt" style:font-style-complex="normal" style:font-weight-complex="normal"/>
    </style:style>
    <style:style style:name="ce21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216" style:family="table-cell" style:parent-style-name="Default">
      <style:table-cell-properties style:rotation-align="non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name-complex="Trebuchet MS" style:font-size-complex="12pt" style:font-style-complex="normal" style:font-weight-complex="normal"/>
    </style:style>
    <style:style style:name="ce21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1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19" style:family="table-cell" style:parent-style-name="Default">
      <style:table-cell-properties fo:border-bottom="1.76pt double-thin #b7b7b7" style:border-line-width-bottom="0.51pt 0.74pt 0.51pt"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20"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2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222" style:family="table-cell" style:parent-style-name="Default" style:data-style-name="N128">
      <style:table-cell-properties fo:background-color="#72ff7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23" style:family="table-cell" style:parent-style-name="Default" style:data-style-name="N129">
      <style:table-cell-properties fo:background-color="#72ff7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24" style:family="table-cell" style:parent-style-name="Default">
      <style:table-cell-properties fo:border-bottom="1.76pt double-thin #b7b7b7" style:border-line-width-bottom="0.51pt 0.74pt 0.51pt" style:diagonal-bl-tr="none" style:diagonal-tl-br="none" fo:border-left="none" fo:border-right="none" style:rotation-align="none" fo:border-top="non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225" style:family="table-cell" style:parent-style-name="Default">
      <style:table-cell-properties style:rotation-align="non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226" style:family="table-cell" style:parent-style-name="Default" style:data-style-name="N128">
      <style:table-cell-properties fo:border-bottom="0.74pt solid #000000" fo:background-color="#72ff7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27" style:family="table-cell" style:parent-style-name="Default" style:data-style-name="N128">
      <style:table-cell-properties fo:border-bottom="0.74pt solid #000000" fo:background-color="#72ff7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exend" fo:font-size="8pt" fo:font-style="normal" fo:text-shadow="none" style:text-underline-style="none" fo:font-weight="normal" style:font-size-asian="8pt" style:font-style-asian="normal" style:font-weight-asian="normal" style:font-name-complex="Lexend" style:font-size-complex="8pt" style:font-style-complex="normal" style:font-weight-complex="normal"/>
    </style:style>
    <style:style style:name="ce228" style:family="table-cell" style:parent-style-name="Default" style:data-style-name="N129">
      <style:table-cell-properties fo:border-bottom="0.74pt solid #000000" fo:background-color="#72ff7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exend" fo:font-size="8pt" fo:font-style="normal" fo:text-shadow="none" style:text-underline-style="none" fo:font-weight="normal" style:font-size-asian="8pt" style:font-style-asian="normal" style:font-weight-asian="normal" style:font-name-complex="Lexend" style:font-size-complex="8pt" style:font-style-complex="normal" style:font-weight-complex="normal"/>
    </style:style>
    <style:style style:name="ce229" style:family="table-cell" style:parent-style-name="Default">
      <style:table-cell-properties fo:border-bottom="0.74pt solid #000000" fo:background-color="#ff99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swald" fo:font-size="10pt" fo:font-style="normal" fo:text-shadow="none" style:text-underline-style="none" fo:font-weight="bold" style:font-size-asian="10pt" style:font-style-asian="normal" style:font-weight-asian="bold" style:font-name-complex="Oswald" style:font-size-complex="10pt" style:font-style-complex="normal" style:font-weight-complex="bold"/>
    </style:style>
    <style:style style:name="ce23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231" style:family="table-cell" style:parent-style-name="Default">
      <style:table-cell-properties fo:border-bottom="0.74pt solid #000000" fo:background-color="#72ff72" style:diagonal-bl-tr="none" style:diagonal-tl-br="none" style:text-align-source="fix" style:repeat-content="false" fo:wrap-option="no-wrap" fo:border-left="0.74pt solid #72ff72"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232"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233" style:family="table-cell" style:parent-style-name="Default">
      <style:table-cell-properties fo:border-bottom="1.76pt double-thin #b7b7b7" style:border-line-width-bottom="0.51pt 0.74pt 0.51pt" style:diagonal-bl-tr="none" style:diagonal-tl-br="none" fo:border-left="none" fo:border-right="none" style:rotation-align="none" fo:border-top="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234" style:family="table-cell" style:parent-style-name="Default">
      <style:table-cell-properties style:rotation-align="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235"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Playfair Display" fo:font-size="12pt" fo:font-style="normal" fo:text-shadow="none" style:text-underline-style="none" fo:font-weight="bold" style:font-size-asian="12pt" style:font-style-asian="normal" style:font-weight-asian="bold" style:font-name-complex="Playfair Display" style:font-size-complex="12pt" style:font-style-complex="normal" style:font-weight-complex="bold"/>
    </style:style>
    <style:style style:name="ce236"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layfair Display" fo:font-size="11pt" fo:font-style="normal" fo:text-shadow="none" style:text-underline-style="solid" style:text-underline-width="auto" style:text-underline-color="font-color" fo:font-weight="bold" style:font-size-asian="11pt" style:font-style-asian="normal" style:font-weight-asian="bold" style:font-name-complex="Playfair Display" style:font-size-complex="11pt" style:font-style-complex="normal" style:font-weight-complex="bold"/>
    </style:style>
    <style:style style:name="ce23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Ubuntu" fo:font-size="12pt" fo:font-style="normal" fo:text-shadow="none" style:text-underline-style="none" fo:font-weight="bold" style:font-size-asian="12pt" style:font-style-asian="normal" style:font-weight-asian="bold" style:font-name-complex="Ubuntu" style:font-size-complex="12pt" style:font-style-complex="normal" style:font-weight-complex="bold"/>
    </style:style>
    <style:style style:name="ce23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23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exend" fo:font-size="12pt" fo:font-style="normal" fo:text-shadow="none" style:text-underline-style="none" fo:font-weight="bold" style:font-size-asian="12pt" style:font-style-asian="normal" style:font-weight-asian="bold" style:font-name-complex="Lexend" style:font-size-complex="12pt" style:font-style-complex="normal" style:font-weight-complex="bold"/>
    </style:style>
    <style:style style:name="ce24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Lexend" fo:font-size="12pt" fo:font-style="normal" fo:text-shadow="none" style:text-underline-style="none" fo:font-weight="bold" style:font-size-asian="12pt" style:font-style-asian="normal" style:font-weight-asian="bold" style:font-name-complex="Lexend" style:font-size-complex="12pt" style:font-style-complex="normal" style:font-weight-complex="bold"/>
    </style:style>
    <style:style style:name="ce241" style:family="table-cell" style:parent-style-name="Default">
      <style:table-cell-properties fo:border-bottom="1.76pt double-thin #b7b7b7" style:border-line-width-bottom="0.51pt 0.74pt 0.51pt" style:diagonal-bl-tr="none" style:diagonal-tl-br="none" fo:border-left="none" fo:border-right="none" style:rotation-align="none" fo:border-top="non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name-complex="Trebuchet MS" style:font-size-complex="12pt" style:font-style-complex="normal" style:font-weight-complex="normal"/>
    </style:style>
    <style:style style:name="ce242" style:family="table-cell" style:parent-style-name="Default">
      <style:table-cell-properties fo:background-color="#3d3dc4"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24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2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8pt" fo:font-style="normal" fo:text-shadow="none" style:text-underline-style="none" fo:font-weight="normal" style:font-size-asian="8pt" style:font-style-asian="normal" style:font-weight-asian="normal" style:font-name-complex="Ubuntu" style:font-size-complex="8pt" style:font-style-complex="normal" style:font-weight-complex="normal"/>
    </style:style>
    <style:style style:name="ce24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99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24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Playfair Display" fo:font-size="11pt" fo:font-style="normal" fo:text-shadow="none" style:text-underline-style="solid" style:text-underline-width="auto" style:text-underline-color="font-color" fo:font-weight="bold" style:font-size-asian="11pt" style:font-style-asian="normal" style:font-weight-asian="bold" style:font-name-complex="Playfair Display" style:font-size-complex="11pt" style:font-style-complex="normal" style:font-weight-complex="bold"/>
    </style:style>
    <style:style style:name="ce248" style:family="table-cell" style:parent-style-name="Default">
      <style:table-cell-properties fo:border-bottom="0.74pt solid #000000" fo:background-color="#ffff73"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249" style:family="table-cell" style:parent-style-name="Default">
      <style:table-cell-properties fo:border-bottom="0.74pt solid #000000" fo:background-color="#72ff72"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250" style:family="table-cell" style:parent-style-name="Default">
      <style:table-cell-properties fo:border-bottom="0.74pt solid #000000" fo:background-color="#ead1dc"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251" style:family="table-cell" style:parent-style-name="Default">
      <style:table-cell-properties fo:border-bottom="0.74pt solid #000000" fo:background-color="#ead1dc"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252" style:family="table-cell" style:parent-style-name="Default">
      <style:table-cell-properties fo:border-bottom="0.74pt solid #000000" fo:background-color="#72ff72"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25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name-complex="Trebuchet MS" style:font-size-complex="8pt" style:font-style-complex="normal" style:font-weight-complex="bold"/>
    </style:style>
    <style:style style:name="ce254"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swald" fo:font-size="10pt" fo:font-style="normal" fo:text-shadow="none" style:text-underline-style="none" fo:font-weight="bold" style:font-size-asian="10pt" style:font-style-asian="normal" style:font-weight-asian="bold" style:font-name-complex="Oswald" style:font-size-complex="10pt" style:font-style-complex="normal" style:font-weight-complex="bold"/>
    </style:style>
    <style:style style:name="ce255" style:family="table-cell" style:parent-style-name="Default" style:data-style-name="N128">
      <style:table-cell-properties fo:border-bottom="0.74pt solid #000000" fo:background-color="#72ff72" style:diagonal-bl-tr="none" style:diagonal-tl-br="none" style:text-align-source="fix" style:repeat-content="false" fo:wrap-option="no-wrap" fo:border-left="0.74pt solid #72ff72"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56" style:family="table-cell" style:parent-style-name="Default">
      <style:table-cell-properties fo:border-bottom="0.74pt solid #000000" fo:background-color="#ff00ff" style:diagonal-bl-tr="none" style:diagonal-tl-br="none" style:text-align-source="fix" style:repeat-content="false" fo:wrap-option="no-wrap" fo:border-left="0.74pt solid #ff00ff"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swald" fo:font-size="10pt" fo:font-style="normal" fo:text-shadow="none" style:text-underline-style="none" fo:font-weight="bold" style:font-size-asian="10pt" style:font-style-asian="normal" style:font-weight-asian="bold" style:font-name-complex="Oswald" style:font-size-complex="10pt" style:font-style-complex="normal" style:font-weight-complex="bold"/>
    </style:style>
    <style:style style:name="ce257" style:family="table-cell" style:parent-style-name="Default">
      <style:table-cell-properties fo:border-bottom="0.74pt solid #000000" fo:background-color="#72ff72" style:diagonal-bl-tr="none" style:diagonal-tl-br="none" style:text-align-source="fix" style:repeat-content="false" fo:wrap-option="no-wrap" fo:border-left="0.74pt solid #72ff72"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name-complex="Trebuchet MS" style:font-size-complex="8pt" style:font-style-complex="normal" style:font-weight-complex="bold"/>
    </style:style>
    <style:style style:name="ce258" style:family="table-cell" style:parent-style-name="Default">
      <style:table-cell-properties fo:border-bottom="1.76pt double-thin #b7b7b7" style:border-line-width-bottom="0.51pt 0.74pt 0.51pt" style:diagonal-bl-tr="none" style:diagonal-tl-br="none" fo:border-left="none" fo:border-right="none" style:rotation-align="none" fo:border-top="none"/>
      <style:text-properties fo:color="#ff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259" style:family="table-cell" style:parent-style-name="Default">
      <style:table-cell-properties style:rotation-align="none"/>
      <style:text-properties fo:color="#ff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260"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261"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swald" fo:font-size="10pt" fo:font-style="normal" fo:text-shadow="none" style:text-underline-style="none" fo:font-weight="bold" style:font-size-asian="10pt" style:font-style-asian="normal" style:font-weight-asian="bold" style:font-name-complex="Oswald" style:font-size-complex="10pt" style:font-style-complex="normal" style:font-weight-complex="bold"/>
    </style:style>
    <style:style style:name="ce262" style:family="table-cell" style:parent-style-name="Default">
      <style:table-cell-properties fo:border-bottom="0.74pt solid #000000" fo:background-color="#ff00ff" style:diagonal-bl-tr="none" style:diagonal-tl-br="none" style:text-align-source="fix" style:repeat-content="false" fo:wrap-option="no-wrap" fo:border-left="0.74pt solid #ff00ff"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swald" fo:font-size="10pt" fo:font-style="normal" fo:text-shadow="none" style:text-underline-style="none" fo:font-weight="bold" style:font-size-asian="10pt" style:font-style-asian="normal" style:font-weight-asian="bold" style:font-name-complex="Oswald" style:font-size-complex="10pt" style:font-style-complex="normal" style:font-weight-complex="bold"/>
    </style:style>
    <style:style style:name="ce263" style:family="table-cell" style:parent-style-name="Default">
      <style:table-cell-properties fo:border-bottom="0.74pt solid #000000" fo:background-color="#ffff7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264" style:family="table-cell" style:parent-style-name="Default">
      <style:table-cell-properties fo:border-bottom="none" fo:background-color="#72ff72" style:diagonal-bl-tr="none" style:diagonal-tl-br="none" style:text-align-source="fix" style:repeat-content="false" fo:wrap-option="no-wrap" fo:border-left="0.74pt solid #72ff72"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265" style:family="table-cell" style:parent-style-name="Default">
      <style:table-cell-properties fo:border-bottom="0.74pt solid #000000" fo:background-color="#ffff73" style:diagonal-bl-tr="none" style:diagonal-tl-br="none" style:text-align-source="fix" style:repeat-content="false" fo:wrap-option="no-wrap" fo:border-left="0.74pt solid #ffff00"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266" style:family="table-cell" style:parent-style-name="Default">
      <style:table-cell-properties fo:border-bottom="0.74pt solid #000000" fo:background-color="#72ff72" style:diagonal-bl-tr="none" style:diagonal-tl-br="none" style:text-align-source="fix" style:repeat-content="false" fo:wrap-option="no-wrap" fo:border-left="0.74pt solid #72ff72" style:direction="ltr" fo:border-right="0.74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267" style:family="table-cell" style:parent-style-name="Default">
      <style:table-cell-properties fo:border-bottom="0.74pt solid #000000" fo:background-color="#ead1dc"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268" style:family="table-cell" style:parent-style-name="Default">
      <style:table-cell-properties fo:border-bottom="none" fo:background-color="#ff0000" style:diagonal-bl-tr="none" style:diagonal-tl-br="none" style:text-align-source="fix" style:repeat-content="false" fo:wrap-option="no-wrap" fo:border-left="1.76pt solid #ffffff" style:direction="ltr" fo:border-right="0.74pt solid #ffffff"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269"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0" style:family="table-cell" style:parent-style-name="Default">
      <style:table-cell-properties fo:border-bottom="none" style:diagonal-bl-tr="none" style:diagonal-tl-br="none" fo:border-left="none" fo:border-right="0.74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name-complex="Trebuchet MS" style:font-size-complex="8pt" style:font-style-complex="normal" style:font-weight-complex="bold"/>
    </style:style>
    <style:style style:name="ce272" style:family="table-cell" style:parent-style-name="Default" style:data-style-name="N11">
      <style:table-cell-properties fo:border-bottom="none" fo:background-color="#ff0000" style:diagonal-bl-tr="none" style:diagonal-tl-br="none" style:text-align-source="fix" style:repeat-content="false" fo:wrap-option="no-wrap" fo:border-left="1.76pt solid #ffffff"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273" style:family="table-cell" style:parent-style-name="Default">
      <style:table-cell-properties fo:border-bottom="0.74pt solid #000000" fo:background-color="#f1c232"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27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5" style:family="table-cell" style:parent-style-name="Default">
      <style:table-cell-properties fo:border-bottom="0.74pt solid #000000" fo:background-color="#ff99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swald" fo:font-size="10pt" fo:font-style="normal" fo:text-shadow="none" style:text-underline-style="none" fo:font-weight="bold" style:font-size-asian="10pt" style:font-style-asian="normal" style:font-weight-asian="bold" style:font-name-complex="Oswald" style:font-size-complex="10pt" style:font-style-complex="normal" style:font-weight-complex="bold"/>
    </style:style>
    <style:style style:name="ce276" style:family="table-cell" style:parent-style-name="Default">
      <style:table-cell-properties fo:background-color="#000000"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277" style:family="table-cell" style:parent-style-name="Default">
      <style:table-cell-properties fo:border-bottom="none" style:diagonal-bl-tr="none" style:diagonal-tl-br="none" style:text-align-source="fix" style:repeat-content="false" fo:wrap-option="no-wrap" fo:border-left="1.76pt double-thin #cccccc" style:border-line-width-left="0.51pt 0.74pt 0.51pt"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278" style:family="table-cell" style:parent-style-name="Default">
      <style:table-cell-properties fo:border-bottom="none" fo:background-color="#ffffff" style:diagonal-bl-tr="none" style:diagonal-tl-br="none" style:text-align-source="fix" style:repeat-content="false" fo:wrap-option="no-wrap" fo:border-left="1.76pt double-thin #cccccc" style:border-line-width-left="0.51pt 0.74pt 0.51pt"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Playfair Display" fo:font-size="11pt" fo:font-style="normal" fo:text-shadow="none" style:text-underline-style="none" fo:font-weight="bold" style:font-size-asian="11pt" style:font-style-asian="normal" style:font-weight-asian="bold" style:font-name-complex="Playfair Display" style:font-size-complex="11pt" style:font-style-complex="normal" style:font-weight-complex="bold"/>
    </style:style>
    <style:style style:name="ce279" style:family="table-cell" style:parent-style-name="Default">
      <style:table-cell-properties fo:border-bottom="none" fo:background-color="#ffffff" style:diagonal-bl-tr="none" style:diagonal-tl-br="none" style:text-align-source="fix" style:repeat-content="false" fo:wrap-option="no-wrap" fo:border-left="1.76pt double-thin #cccccc" style:border-line-width-left="0.51pt 0.74pt 0.51pt"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666666"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280" style:family="table-cell" style:parent-style-name="Default">
      <style:table-cell-properties fo:border-bottom="none" fo:background-color="#ffffff" style:diagonal-bl-tr="none" style:diagonal-tl-br="none" style:text-align-source="fix" style:repeat-content="false" fo:wrap-option="no-wrap" fo:border-left="1.76pt double-thin #cccccc" style:border-line-width-left="0.51pt 0.74pt 0.51pt"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ffffff"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281" style:family="table-cell" style:parent-style-name="Default">
      <style:table-cell-properties fo:border-bottom="none" style:diagonal-bl-tr="none" style:diagonal-tl-br="none" style:text-align-source="fix" style:repeat-content="false" fo:wrap-option="no-wrap" fo:border-left="1.76pt double-thin #cccccc" style:border-line-width-left="0.51pt 0.74pt 0.51pt"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ffffff"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name-complex="Trebuchet MS" style:font-size-complex="12pt" style:font-style-complex="normal" style:font-weight-complex="normal"/>
    </style:style>
    <style:style style:name="ce282" style:family="table-cell" style:parent-style-name="Default">
      <style:table-cell-properties fo:border-bottom="1.76pt double-thin #b7b7b7" style:border-line-width-bottom="0.51pt 0.74pt 0.51pt" style:diagonal-bl-tr="none" style:diagonal-tl-br="none" style:text-align-source="fix" style:repeat-content="false" fo:wrap-option="no-wrap" fo:border-left="1.76pt double-thin #cccccc" style:border-line-width-left="0.51pt 0.74pt 0.51pt"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ffffff"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name-complex="Trebuchet MS" style:font-size-complex="12pt" style:font-style-complex="normal" style:font-weight-complex="normal"/>
    </style:style>
    <style:style style:name="ce28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84"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layfair Display" fo:font-size="11pt" fo:font-style="normal" fo:text-shadow="none" style:text-underline-style="solid" style:text-underline-width="auto" style:text-underline-color="font-color" fo:font-weight="bold" style:font-size-asian="11pt" style:font-style-asian="normal" style:font-weight-asian="bold" style:font-name-complex="Playfair Display" style:font-size-complex="11pt" style:font-style-complex="normal" style:font-weight-complex="bold"/>
    </style:style>
    <style:style style:name="ce285" style:family="table-cell" style:parent-style-name="Default" style:data-style-name="N128">
      <style:table-cell-properties fo:background-color="#cfe2f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86"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8pt" fo:font-style="normal" fo:text-shadow="none" style:text-underline-style="none" fo:font-weight="normal" style:font-size-asian="8pt" style:font-style-asian="normal" style:font-weight-asian="normal" style:font-name-complex="Ubuntu" style:font-size-complex="8pt" style:font-style-complex="normal" style:font-weight-complex="normal"/>
    </style:style>
    <style:style style:name="ce28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8pt" fo:font-style="normal" fo:text-shadow="none" style:text-underline-style="none" fo:font-weight="normal" style:font-size-asian="8pt" style:font-style-asian="normal" style:font-weight-asian="normal" style:font-name-complex="Ubuntu" style:font-size-complex="8pt" style:font-style-complex="normal" style:font-weight-complex="normal"/>
    </style:style>
    <style:style style:name="ce288" style:family="table-cell" style:parent-style-name="Default" style:data-style-name="N128">
      <style:table-cell-properties fo:background-color="#97cd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8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b7b7b7"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9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9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9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name-complex="Trebuchet MS" style:font-size-complex="8pt" style:font-style-complex="normal" style:font-weight-complex="bold"/>
    </style:style>
    <style:style style:name="ce293" style:family="table-cell" style:parent-style-name="Default" style:data-style-name="N128">
      <style:table-cell-properties fo:background-color="#24d3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94" style:family="table-cell" style:parent-style-name="Default">
      <style:table-cell-properties fo:border-bottom="1.76pt double-thin #b7b7b7" style:border-line-width-bottom="0.51pt 0.74pt 0.51pt"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5" style:family="table-cell" style:parent-style-name="Default" style:data-style-name="N128">
      <style:table-cell-properties fo:border-bottom="0.74pt solid #000000" fo:background-color="#cfe2f3"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96" style:family="table-cell" style:parent-style-name="Default" style:data-style-name="N128">
      <style:table-cell-properties fo:border-bottom="0.74pt solid #000000" fo:background-color="#cfe2f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97" style:family="table-cell" style:parent-style-name="Default">
      <style:table-cell-properties fo:border-bottom="0.74pt solid #000000" fo:background-color="#cfe2f3"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8pt" fo:font-style="normal" fo:text-shadow="none" style:text-underline-style="none" fo:font-weight="normal" style:font-size-asian="8pt" style:font-style-asian="normal" style:font-weight-asian="normal" style:font-name-complex="Lexend" style:font-size-complex="8pt" style:font-style-complex="normal" style:font-weight-complex="normal"/>
    </style:style>
    <style:style style:name="ce298" style:family="table-cell" style:parent-style-name="Default">
      <style:table-cell-properties fo:border-bottom="0.74pt solid #000000" fo:background-color="#97cd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299" style:family="table-cell" style:parent-style-name="Default">
      <style:table-cell-properties fo:border-bottom="0.74pt solid #000000" fo:background-color="#24d3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300" style:family="table-cell" style:parent-style-name="Default">
      <style:table-cell-properties fo:border-bottom="0.74pt solid #000000" fo:background-color="#cfe2f3" style:diagonal-bl-tr="none" style:diagonal-tl-br="none" style:text-align-source="fix" style:repeat-content="false" fo:wrap-option="no-wrap" fo:border-left="0.74pt solid #cfe2f3"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301" style:family="table-cell" style:parent-style-name="Default">
      <style:table-cell-properties fo:border-bottom="0.74pt solid #000000" fo:background-color="#cfe2f3" style:diagonal-bl-tr="none" style:diagonal-tl-br="none" style:text-align-source="fix" style:repeat-content="false" fo:wrap-option="no-wrap" fo:border-left="0.74pt solid #cfe2f3" style:direction="ltr" fo:border-right="0.74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302" style:family="table-cell" style:parent-style-name="Default">
      <style:table-cell-properties fo:border-bottom="0.74pt solid #000000" fo:background-color="#cfe2f3" style:diagonal-bl-tr="none" style:diagonal-tl-br="none" style:text-align-source="fix" style:repeat-content="false" fo:wrap-option="no-wrap" fo:border-left="0.74pt solid #d9d2e9"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30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layfair Display" fo:font-size="11pt" fo:font-style="normal" fo:text-shadow="none" style:text-underline-style="solid" style:text-underline-width="auto" style:text-underline-color="font-color" fo:font-weight="bold" style:font-size-asian="11pt" style:font-style-asian="normal" style:font-weight-asian="bold" style:font-name-complex="Playfair Display" style:font-size-complex="11pt" style:font-style-complex="normal" style:font-weight-complex="bold"/>
    </style:style>
    <style:style style:name="ce304" style:family="table-cell" style:parent-style-name="Default">
      <style:table-cell-properties fo:border-bottom="0.74pt solid #000000" fo:background-color="#97cdff" style:diagonal-bl-tr="none" style:diagonal-tl-br="none" style:text-align-source="fix" style:repeat-content="false" fo:wrap-option="no-wrap" fo:border-left="0.74pt solid #97cdff"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30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30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308" style:family="table-cell" style:parent-style-name="Default">
      <style:table-cell-properties fo:border-bottom="0.74pt solid #000000" fo:background-color="#24d3ff" style:diagonal-bl-tr="none" style:diagonal-tl-br="none" style:text-align-source="fix" style:repeat-content="false" fo:wrap-option="no-wrap" fo:border-left="0.74pt solid #24d3ff"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30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310"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layfair Display" fo:font-size="12pt" fo:font-style="normal" fo:text-shadow="none" style:text-underline-style="none" fo:font-weight="bold" style:font-size-asian="12pt" style:font-style-asian="normal" style:font-weight-asian="bold" style:font-name-complex="Playfair Display" style:font-size-complex="12pt" style:font-style-complex="normal" style:font-weight-complex="bold"/>
    </style:style>
    <style:style style:name="ce312" style:family="table-cell" style:parent-style-name="Default">
      <style:table-cell-properties fo:background-color="#24d3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313" style:family="table-cell" style:parent-style-name="Default">
      <style:table-cell-properties fo:border-bottom="0.74pt solid #ffffff" fo:background-color="#ff0000" style:diagonal-bl-tr="none" style:diagonal-tl-br="none" style:text-align-source="fix" style:repeat-content="false" fo:wrap-option="no-wrap" fo:border-left="1.76pt solid #ffffff" style:direction="ltr" fo:border-right="1.76pt solid #ffffff"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314" style:family="table-cell" style:parent-style-name="Default">
      <style:table-cell-properties fo:border-bottom="0.74pt solid #000000" fo:background-color="#cfe2f3"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315" style:family="table-cell" style:parent-style-name="Default">
      <style:table-cell-properties fo:border-bottom="0.74pt solid #000000" fo:background-color="#cfe2f3"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316" style:family="table-cell" style:parent-style-name="Default">
      <style:table-cell-properties fo:border-bottom="0.74pt solid #000000" fo:background-color="#cfe2f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317" style:family="table-cell" style:parent-style-name="Default">
      <style:table-cell-properties fo:border-bottom="0.74pt solid #000000" fo:background-color="#cfe2f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318" style:family="table-cell" style:parent-style-name="Default">
      <style:table-cell-properties fo:border-bottom="0.74pt solid #000000" fo:background-color="#97cd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319" style:family="table-cell" style:parent-style-name="Default">
      <style:table-cell-properties fo:border-bottom="0.74pt solid #000000" fo:background-color="#24d3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320" style:family="table-cell" style:parent-style-name="Default">
      <style:table-cell-properties fo:border-bottom="0.74pt solid #ffffff" style:diagonal-bl-tr="none" style:diagonal-tl-br="none" fo:border-left="none" fo:border-right="1.76pt solid #ffffff"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1" style:family="table-cell" style:parent-style-name="Default" style:data-style-name="N128">
      <style:table-cell-properties fo:border-bottom="0.74pt solid #000000" fo:background-color="#cfe2f3" style:diagonal-bl-tr="none" style:diagonal-tl-br="none" style:text-align-source="fix" style:repeat-content="false" fo:wrap-option="no-wrap" fo:border-left="0.74pt solid #cfe2f3"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322" style:family="table-cell" style:parent-style-name="Default" style:data-style-name="N128">
      <style:table-cell-properties fo:border-bottom="0.74pt solid #000000" fo:background-color="#cfe2f3" style:diagonal-bl-tr="none" style:diagonal-tl-br="none" style:text-align-source="fix" style:repeat-content="false" fo:wrap-option="no-wrap" fo:border-left="0.74pt solid #cfe2f3"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323" style:family="table-cell" style:parent-style-name="Default">
      <style:table-cell-properties fo:border-bottom="0.74pt solid #000000" fo:background-color="#cfe2f3" style:diagonal-bl-tr="none" style:diagonal-tl-br="none" style:text-align-source="fix" style:repeat-content="false" fo:wrap-option="no-wrap" fo:border-left="0.74pt solid #cfe2f3"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name-complex="Trebuchet MS" style:font-size-complex="11pt" style:font-style-complex="normal" style:font-weight-complex="bold"/>
    </style:style>
    <style:style style:name="ce324" style:family="table-cell" style:parent-style-name="Default">
      <style:table-cell-properties fo:border-bottom="0.74pt solid #000000" fo:background-color="#cfe2f3" style:diagonal-bl-tr="none" style:diagonal-tl-br="none" style:text-align-source="fix" style:repeat-content="false" fo:wrap-option="no-wrap" fo:border-left="0.74pt solid #cfe2f3"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name-complex="Trebuchet MS" style:font-size-complex="11pt" style:font-style-complex="normal" style:font-weight-complex="bold"/>
    </style:style>
    <style:style style:name="ce32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ff0000"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name-complex="Trebuchet MS" style:font-size-complex="8pt" style:font-style-complex="normal" style:font-weight-complex="bold"/>
    </style:style>
    <style:style style:name="ce326" style:family="table-cell" style:parent-style-name="Default">
      <style:table-cell-properties fo:border-bottom="0.74pt solid #000000" fo:background-color="#97cdff" style:diagonal-bl-tr="none" style:diagonal-tl-br="none" style:text-align-source="fix" style:repeat-content="false" fo:wrap-option="no-wrap" fo:border-left="0.74pt solid #97cdff"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name-complex="Trebuchet MS" style:font-size-complex="11pt" style:font-style-complex="normal" style:font-weight-complex="bold"/>
    </style:style>
    <style:style style:name="ce327"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cc0000"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name-complex="Trebuchet MS" style:font-size-complex="8pt" style:font-style-complex="normal" style:font-weight-complex="bold"/>
    </style:style>
    <style:style style:name="ce329"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0" style:family="table-cell" style:parent-style-name="Default">
      <style:table-cell-properties fo:border-bottom="0.74pt solid #000000" fo:background-color="#24d3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name-complex="Trebuchet MS" style:font-size-complex="11pt" style:font-style-complex="normal" style:font-weight-complex="bold"/>
    </style:style>
    <style:style style:name="ce331" style:family="table-cell" style:parent-style-name="Default" style:data-style-name="N11">
      <style:table-cell-properties fo:border-bottom="0.74pt solid #ffffff" fo:background-color="#ff0000"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332" style:family="table-cell" style:parent-style-name="Default">
      <style:table-cell-properties fo:background-color="#6666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Playfair Display" fo:font-size="10pt" fo:font-style="normal" fo:text-shadow="none" style:text-underline-style="none" fo:font-weight="bold" style:font-size-asian="10pt" style:font-style-asian="normal" style:font-weight-asian="bold" style:font-name-complex="Playfair Display" style:font-size-complex="10pt" style:font-style-complex="normal" style:font-weight-complex="bold"/>
    </style:style>
    <style:style style:name="ce333" style:family="table-cell" style:parent-style-name="Default">
      <style:table-cell-properties fo:background-color="#f3f3f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3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fo:border-bottom="none" fo:background-color="#000000"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name-complex="Ubuntu" style:font-size-complex="11pt" style:font-style-complex="normal" style:font-weight-complex="bold"/>
    </style:style>
    <style:style style:name="ce336" style:family="table-cell" style:parent-style-name="Default">
      <style:table-cell-properties fo:background-color="#efefef"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337" style:family="table-cell" style:parent-style-name="Default" style:data-style-name="N128">
      <style:table-cell-properties fo:border-bottom="0.74pt solid #000000" fo:background-color="#bbffa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338" style:family="table-cell" style:parent-style-name="Default">
      <style:table-cell-properties fo:border-bottom="0.74pt solid #000000" fo:background-color="#bbffa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339" style:family="table-cell" style:parent-style-name="Default">
      <style:table-cell-properties fo:border-bottom="1.76pt double-thin #b7b7b7" style:border-line-width-bottom="0.51pt 0.74pt 0.51pt"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3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3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Playfair Display" fo:font-size="12pt" fo:font-style="normal" fo:text-shadow="none" style:text-underline-style="none" fo:font-weight="bold" style:font-size-asian="12pt" style:font-style-asian="normal" style:font-weight-asian="bold" style:font-name-complex="Playfair Display" style:font-size-complex="12pt" style:font-style-complex="normal" style:font-weight-complex="bold"/>
    </style:style>
    <style:style style:name="ce342" style:family="table-cell" style:parent-style-name="Default" style:data-style-name="N128">
      <style:table-cell-properties fo:border-bottom="0.74pt solid #000000" fo:background-color="#bbffaf" style:diagonal-bl-tr="none" style:diagonal-tl-br="none" style:text-align-source="fix" style:repeat-content="false" fo:wrap-option="no-wrap" fo:border-left="0.74pt solid #bbffaf"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343" style:family="table-cell" style:parent-style-name="Default" style:data-style-name="N128">
      <style:table-cell-properties fo:border-bottom="0.74pt solid #000000" fo:background-color="#f1c232" style:diagonal-bl-tr="none" style:diagonal-tl-br="none" style:text-align-source="fix" style:repeat-content="false" fo:wrap-option="no-wrap" fo:border-left="0.74pt solid #f1c232"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344" style:family="table-cell" style:parent-style-name="Default">
      <style:table-cell-properties fo:border-bottom="0.74pt solid #000000" fo:background-color="#bbffaf" style:diagonal-bl-tr="none" style:diagonal-tl-br="none" style:text-align-source="fix" style:repeat-content="false" fo:wrap-option="no-wrap" fo:border-left="0.74pt solid #bbffaf"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345" style:family="table-cell" style:parent-style-name="Default" style:data-style-name="N125">
      <style:table-cell-properties fo:background-color="#ff0000"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12pt" fo:font-style="normal" fo:text-shadow="none" style:text-underline-style="none" fo:font-weight="bold" style:font-size-asian="12pt" style:font-style-asian="normal" style:font-weight-asian="bold" style:font-name-complex="Ubuntu" style:font-size-complex="12pt" style:font-style-complex="normal" style:font-weight-complex="bold"/>
    </style:style>
    <style:style style:name="ce34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name-complex="Trebuchet MS" style:font-size-complex="12pt" style:font-style-complex="normal" style:font-weight-complex="normal"/>
    </style:style>
    <style:style style:name="ce347" style:family="table-cell" style:parent-style-name="Default">
      <style:table-cell-properties fo:border-bottom="1.76pt double-thin #b7b7b7" style:border-line-width-bottom="0.51pt 0.74pt 0.51pt"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name-complex="Trebuchet MS" style:font-size-complex="12pt" style:font-style-complex="normal" style:font-weight-complex="normal"/>
    </style:style>
    <style:style style:name="ce348" style:family="table-cell" style:parent-style-name="Default">
      <style:table-cell-properties fo:border-bottom="0.74pt solid #000000" fo:background-color="#ffff73"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349" style:family="table-cell" style:parent-style-name="Default">
      <style:table-cell-properties fo:border-bottom="0.74pt solid #000000" fo:background-color="#bbffa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35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0pt" fo:font-style="normal" fo:text-shadow="none" style:text-underline-style="solid" style:text-underline-width="auto" style:text-underline-color="font-color" fo:font-weight="bold" style:font-size-asian="10pt" style:font-style-asian="normal" style:font-weight-asian="bold" style:font-name-complex="Trebuchet MS" style:font-size-complex="10pt" style:font-style-complex="normal" style:font-weight-complex="bold"/>
    </style:style>
    <style:style style:name="ce351" style:family="table-cell" style:parent-style-name="Default">
      <style:table-cell-properties fo:border-bottom="0.74pt solid #000000" fo:background-color="#bbffaf" style:diagonal-bl-tr="none" style:diagonal-tl-br="none" style:text-align-source="value-type" style:repeat-content="false" fo:wrap-option="no-wrap" fo:border-left="0.74pt solid #000000" style:direction="ltr" fo:border-right="0.74pt solid #bbffaf"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352" style:family="table-cell" style:parent-style-name="Default">
      <style:table-cell-properties fo:border-bottom="0.74pt solid #000000" fo:background-color="#ffff00" style:diagonal-bl-tr="none" style:diagonal-tl-br="none" style:text-align-source="fix" style:repeat-content="false" fo:wrap-option="no-wrap" fo:border-left="0.74pt solid #ffff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swald" fo:font-size="10pt" fo:font-style="normal" fo:text-shadow="none" style:text-underline-style="none" fo:font-weight="bold" style:font-size-asian="10pt" style:font-style-asian="normal" style:font-weight-asian="bold" style:font-name-complex="Oswald" style:font-size-complex="10pt" style:font-style-complex="normal" style:font-weight-complex="bold"/>
    </style:style>
    <style:style style:name="ce353" style:family="table-cell" style:parent-style-name="Default">
      <style:table-cell-properties fo:border-bottom="0.74pt solid #000000" fo:background-color="#bbffaf" style:diagonal-bl-tr="none" style:diagonal-tl-br="none" style:text-align-source="value-type" style:repeat-content="false" fo:wrap-option="no-wrap" fo:border-left="0.74pt solid #bbffaf"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354" style:family="table-cell" style:parent-style-name="Default">
      <style:table-cell-properties fo:border-bottom="0.74pt solid #000000" fo:background-color="#ff00ff" style:diagonal-bl-tr="none" style:diagonal-tl-br="none" style:text-align-source="fix" style:repeat-content="false" fo:wrap-option="no-wrap" fo:border-left="0.74pt solid #ff00ff"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Oswald" fo:font-size="10pt" fo:font-style="normal" fo:text-shadow="none" style:text-underline-style="none" fo:font-weight="bold" style:font-size-asian="10pt" style:font-style-asian="normal" style:font-weight-asian="bold" style:font-name-complex="Oswald" style:font-size-complex="10pt" style:font-style-complex="normal" style:font-weight-complex="bold"/>
    </style:style>
    <style:style style:name="ce355" style:family="table-cell" style:parent-style-name="Default">
      <style:table-cell-properties fo:border-bottom="0.74pt solid #000000" fo:background-color="#bbffa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356" style:family="table-cell" style:parent-style-name="Default">
      <style:table-cell-properties fo:border-bottom="0.74pt solid #000000" fo:background-color="#bbffaf" style:diagonal-bl-tr="none" style:diagonal-tl-br="none" style:text-align-source="fix" style:repeat-content="false" fo:wrap-option="no-wrap" fo:border-left="0.74pt solid #bbffaf"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name-complex="Trebuchet MS" style:font-size-complex="11pt" style:font-style-complex="normal" style:font-weight-complex="bold"/>
    </style:style>
    <style:style style:name="ce35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name-complex="Trebuchet MS" style:font-size-complex="11pt" style:font-style-complex="normal" style:font-weight-complex="bold"/>
    </style:style>
    <style:style style:name="ce35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3434" style:text-outline="false" style:text-line-through-style="none" style:text-line-through-type="none" style:font-name="Trebuchet MS" fo:font-size="8pt" fo:font-style="normal" fo:text-shadow="none" style:text-underline-style="solid" style:text-underline-width="auto" style:text-underline-color="font-color" fo:font-weight="bold" style:font-size-asian="8pt" style:font-style-asian="normal" style:font-weight-asian="bold" style:font-name-complex="Trebuchet MS" style:font-size-complex="8pt" style:font-style-complex="normal" style:font-weight-complex="bold"/>
    </style:style>
    <style:style style:name="ce35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Trebuchet MS" fo:font-size="8pt" fo:font-style="normal" fo:text-shadow="none" style:text-underline-style="solid" style:text-underline-width="auto" style:text-underline-color="font-color" fo:font-weight="bold" style:font-size-asian="8pt" style:font-style-asian="normal" style:font-weight-asian="bold" style:font-name-complex="Trebuchet MS" style:font-size-complex="8pt" style:font-style-complex="normal" style:font-weight-complex="bold"/>
    </style:style>
    <style:style style:name="ce360" style:family="table-cell" style:parent-style-name="Default">
      <style:table-cell-properties fo:border-bottom="1.76pt double-thin #b7b7b7" style:border-line-width-bottom="0.51pt 0.74pt 0.51pt"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ff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3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362" style:family="table-cell" style:parent-style-name="Default" style:data-style-name="N130">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Caveat" fo:font-size="9pt" fo:font-style="normal" fo:text-shadow="none" style:text-underline-style="none" fo:font-weight="bold" style:font-size-asian="9pt" style:font-style-asian="normal" style:font-weight-asian="bold" style:font-name-complex="Caveat" style:font-size-complex="9pt" style:font-style-complex="normal" style:font-weight-complex="bold"/>
    </style:style>
    <style:style style:name="ce363" style:family="table-cell" style:parent-style-name="Default" style:data-style-name="N130">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veat" fo:font-size="9pt" fo:font-style="normal" fo:text-shadow="none" style:text-underline-style="solid" style:text-underline-width="auto" style:text-underline-color="font-color" fo:font-weight="bold" style:font-size-asian="9pt" style:font-style-asian="normal" style:font-weight-asian="bold" style:font-name-complex="Caveat" style:font-size-complex="9pt" style:font-style-complex="normal" style:font-weight-complex="bold"/>
    </style:style>
    <style:style style:name="ce364" style:family="table-cell" style:parent-style-name="Default" style:data-style-name="N130">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3434" style:text-outline="false" style:text-line-through-style="none" style:text-line-through-type="none" style:font-name="Caveat" fo:font-size="9pt" fo:font-style="normal" fo:text-shadow="none" style:text-underline-style="none" fo:font-weight="bold" style:font-size-asian="9pt" style:font-style-asian="normal" style:font-weight-asian="bold" style:font-name-complex="Caveat" style:font-size-complex="9pt" style:font-style-complex="normal" style:font-weight-complex="bold"/>
    </style:style>
    <style:style style:name="ce365" style:family="table-cell" style:parent-style-name="Default" style:data-style-name="N130">
      <style:table-cell-properties fo:border-bottom="1.76pt double-thin #b7b7b7" style:border-line-width-bottom="0.51pt 0.74pt 0.51pt"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9900" style:text-outline="false" style:text-line-through-style="none" style:text-line-through-type="none" style:font-name="Trebuchet MS" fo:font-size="6pt" fo:font-style="normal" fo:text-shadow="none" style:text-underline-style="none" fo:font-weight="bold" style:font-size-asian="6pt" style:font-style-asian="normal" style:font-weight-asian="bold" style:font-name-complex="Trebuchet MS" style:font-size-complex="6pt" style:font-style-complex="normal" style:font-weight-complex="bold"/>
    </style:style>
    <style:style style:name="ce366" style:family="table-cell" style:parent-style-name="Default" style:data-style-name="N130">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9900" style:text-outline="false" style:text-line-through-style="none" style:text-line-through-type="none" style:font-name="Trebuchet MS" fo:font-size="6pt" fo:font-style="normal" fo:text-shadow="none" style:text-underline-style="none" fo:font-weight="bold" style:font-size-asian="6pt" style:font-style-asian="normal" style:font-weight-asian="bold" style:font-name-complex="Trebuchet MS" style:font-size-complex="6pt" style:font-style-complex="normal" style:font-weight-complex="bold"/>
    </style:style>
    <style:style style:name="ce36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Trebuchet MS" fo:font-size="11pt" fo:font-style="italic" fo:text-shadow="none" style:text-underline-style="none" fo:font-weight="normal" style:font-size-asian="11pt" style:font-style-asian="italic" style:font-weight-asian="normal" style:font-name-complex="Trebuchet MS" style:font-size-complex="11pt" style:font-style-complex="italic" style:font-weight-complex="normal"/>
    </style:style>
    <style:style style:name="ce36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name-complex="Trebuchet MS" style:font-size-complex="10pt" style:font-style-complex="normal" style:font-weight-complex="bold"/>
    </style:style>
    <style:style style:name="ce369" style:family="table-cell" style:parent-style-name="Default" style:data-style-name="N128">
      <style:table-cell-properties fo:border-bottom="0.74pt solid #000000" fo:background-color="#bbffa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370" style:family="table-cell" style:parent-style-name="Default">
      <style:table-cell-properties fo:border-bottom="0.74pt solid #000000" fo:background-color="#ff9900" style:diagonal-bl-tr="none" style:diagonal-tl-br="none" style:text-align-source="fix" style:repeat-content="false" fo:wrap-option="no-wrap" fo:border-left="0.74pt solid #000000" style:direction="ltr" fo:border-right="0.74pt solid #ff99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swald" fo:font-size="10pt" fo:font-style="normal" fo:text-shadow="none" style:text-underline-style="none" fo:font-weight="bold" style:font-size-asian="10pt" style:font-style-asian="normal" style:font-weight-asian="bold" style:font-name-complex="Oswald" style:font-size-complex="10pt" style:font-style-complex="normal" style:font-weight-complex="bold"/>
    </style:style>
    <style:style style:name="ce37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rebuchet MS" fo:font-size="8pt" fo:font-style="normal" fo:text-shadow="none" style:text-underline-style="solid" style:text-underline-width="auto" style:text-underline-color="font-color" fo:font-weight="bold" style:font-size-asian="8pt" style:font-style-asian="normal" style:font-weight-asian="bold" style:font-name-complex="Trebuchet MS" style:font-size-complex="8pt" style:font-style-complex="normal" style:font-weight-complex="bold"/>
    </style:style>
    <style:style style:name="ce372" style:family="table-cell" style:parent-style-name="Default">
      <style:table-cell-properties fo:border-bottom="0.74pt solid #000000" fo:background-color="#ff00ff" style:diagonal-bl-tr="none" style:diagonal-tl-br="none" style:text-align-source="fix" style:repeat-content="false" fo:wrap-option="no-wrap" fo:border-left="none" style:direction="ltr" fo:border-right="0.74pt solid #ff00ff"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Oswald" fo:font-size="10pt" fo:font-style="normal" fo:text-shadow="none" style:text-underline-style="none" fo:font-weight="bold" style:font-size-asian="10pt" style:font-style-asian="normal" style:font-weight-asian="bold" style:font-name-complex="Oswald" style:font-size-complex="10pt" style:font-style-complex="normal" style:font-weight-complex="bold"/>
    </style:style>
    <style:style style:name="ce373" style:family="table-cell" style:parent-style-name="Default">
      <style:table-cell-properties fo:border-bottom="1.76pt double-thin #b7b7b7" style:border-line-width-bottom="0.51pt 0.74pt 0.51pt"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37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375" style:family="table-cell" style:parent-style-name="Default">
      <style:table-cell-properties fo:border-bottom="0.74pt solid #ffffff" fo:background-color="#000000"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name-complex="Ubuntu" style:font-size-complex="11pt" style:font-style-complex="normal" style:font-weight-complex="bold"/>
    </style:style>
    <style:style style:name="ce376" style:family="table-cell" style:parent-style-name="Default" style:data-style-name="N128">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377" style:family="table-cell" style:parent-style-name="Default" style:data-style-name="N128">
      <style:table-cell-properties fo:border-bottom="0.74pt solid #000000" fo:background-color="#ead1dc"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378" style:family="table-cell" style:parent-style-name="Default" style:data-style-name="N128">
      <style:table-cell-properties fo:border-bottom="0.74pt solid #000000" fo:background-color="#f1c232" style:diagonal-bl-tr="none" style:diagonal-tl-br="none" style:text-align-source="fix" style:repeat-content="false" fo:wrap-option="no-wrap" fo:border-left="0.74pt solid #ff9900"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0pt" fo:font-style="normal" fo:text-shadow="none" style:text-underline-style="none" fo:font-weight="normal" style:font-size-asian="10pt" style:font-style-asian="normal" style:font-weight-asian="normal" style:font-name-complex="Lexend" style:font-size-complex="10pt" style:font-style-complex="normal" style:font-weight-complex="normal"/>
    </style:style>
    <style:style style:name="ce379" style:family="table-cell" style:parent-style-name="Default">
      <style:table-cell-properties fo:background-color="#046725"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name-complex="Ubuntu" style:font-size-complex="11pt" style:font-style-complex="normal" style:font-weight-complex="bold"/>
    </style:style>
    <style:style style:name="ce380" style:family="table-cell" style:parent-style-name="Default">
      <style:table-cell-properties fo:border-bottom="0.74pt solid #ffffff" fo:background-color="#046725"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name-complex="Ubuntu" style:font-size-complex="11pt" style:font-style-complex="normal" style:font-weight-complex="bold"/>
    </style:style>
    <style:style style:name="ce38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Trebuchet MS" fo:font-size="11pt" fo:font-style="italic" fo:text-shadow="none" style:text-underline-style="none" fo:font-weight="normal" style:font-size-asian="11pt" style:font-style-asian="italic" style:font-weight-asian="normal" style:font-name-complex="Trebuchet MS" style:font-size-complex="11pt" style:font-style-complex="italic" style:font-weight-complex="normal"/>
    </style:style>
    <style:style style:name="ce38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cc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38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cc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name-complex="Trebuchet MS" style:font-size-complex="11pt" style:font-style-complex="normal" style:font-weight-complex="bold"/>
    </style:style>
    <style:style style:name="ce384" style:family="table-cell" style:parent-style-name="Default" style:data-style-name="N130">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c0000" style:text-outline="false" style:text-line-through-style="none" style:text-line-through-type="none" style:font-name="Caveat" fo:font-size="9pt" fo:font-style="normal" fo:text-shadow="none" style:text-underline-style="none" fo:font-weight="bold" style:font-size-asian="9pt" style:font-style-asian="normal" style:font-weight-asian="bold" style:font-name-complex="Caveat" style:font-size-complex="9pt" style:font-style-complex="normal" style:font-weight-complex="bold"/>
    </style:style>
    <style:style style:name="ce385" style:family="table-cell" style:parent-style-name="Default">
      <style:table-cell-properties fo:border-bottom="1.76pt double-thin #b7b7b7" style:border-line-width-bottom="0.51pt 0.74pt 0.51pt"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cc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386" style:family="table-cell" style:parent-style-name="Default">
      <style:table-cell-properties fo:border-bottom="none" style:diagonal-bl-tr="none" style:diagonal-tl-br="none" style:text-align-source="fix" style:repeat-content="false" fo:wrap-option="no-wrap" fo:border-left="1.76pt double-thin #cccccc" style:border-line-width-left="0.51pt 0.74pt 0.51pt"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387" style:family="table-cell" style:parent-style-name="Default">
      <style:table-cell-properties fo:border-bottom="none" fo:background-color="#ffffff" style:diagonal-bl-tr="none" style:diagonal-tl-br="none" style:text-align-source="fix" style:repeat-content="false" fo:wrap-option="no-wrap" fo:border-left="1.76pt double-thin #cccccc" style:border-line-width-left="0.51pt 0.74pt 0.51pt"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Playfair Display" fo:font-size="12pt" fo:font-style="normal" fo:text-shadow="none" style:text-underline-style="none" fo:font-weight="bold" style:font-size-asian="12pt" style:font-style-asian="normal" style:font-weight-asian="bold" style:font-name-complex="Playfair Display" style:font-size-complex="12pt" style:font-style-complex="normal" style:font-weight-complex="bold"/>
    </style:style>
    <style:style style:name="ce388" style:family="table-cell" style:parent-style-name="Default">
      <style:table-cell-properties fo:border-bottom="none" fo:background-color="#ffffff" style:diagonal-bl-tr="none" style:diagonal-tl-br="none" style:text-align-source="fix" style:repeat-content="false" fo:wrap-option="no-wrap" fo:border-left="1.76pt double-thin #cccccc" style:border-line-width-left="0.51pt 0.74pt 0.51pt"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389" style:family="table-cell" style:parent-style-name="Default">
      <style:table-cell-properties fo:border-bottom="none" fo:background-color="#ffffff" style:diagonal-bl-tr="none" style:diagonal-tl-br="none" style:text-align-source="fix" style:repeat-content="false" fo:wrap-option="no-wrap" fo:border-left="1.76pt double-thin #cccccc" style:border-line-width-left="0.51pt 0.74pt 0.51pt"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390" style:family="table-cell" style:parent-style-name="Default">
      <style:table-cell-properties fo:border-bottom="none" style:diagonal-bl-tr="none" style:diagonal-tl-br="none" style:text-align-source="fix" style:repeat-content="false" fo:wrap-option="no-wrap" fo:border-left="1.76pt double-thin #cccccc" style:border-line-width-left="0.51pt 0.74pt 0.51pt"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name-complex="Trebuchet MS" style:font-size-complex="12pt" style:font-style-complex="normal" style:font-weight-complex="normal"/>
    </style:style>
    <style:style style:name="ce391" style:family="table-cell" style:parent-style-name="Default">
      <style:table-cell-properties fo:border-bottom="1.76pt double-thin #b7b7b7" style:border-line-width-bottom="0.51pt 0.74pt 0.51pt" style:diagonal-bl-tr="none" style:diagonal-tl-br="none" style:text-align-source="fix" style:repeat-content="false" fo:wrap-option="no-wrap" fo:border-left="1.76pt double-thin #cccccc" style:border-line-width-left="0.51pt 0.74pt 0.51pt"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name-complex="Trebuchet MS" style:font-size-complex="12pt" style:font-style-complex="normal" style:font-weight-complex="normal"/>
    </style:style>
    <style:style style:name="ce392" style:family="table-cell" style:parent-style-name="Default" style:data-style-name="N128">
      <style:table-cell-properties fo:border-bottom="0.74pt solid #000000" fo:background-color="#cbee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393" style:family="table-cell" style:parent-style-name="Default">
      <style:table-cell-properties fo:border-bottom="0.74pt solid #000000" fo:background-color="#cbee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394" style:family="table-cell" style:parent-style-name="Default">
      <style:table-cell-properties fo:border-bottom="0.74pt solid #000000" fo:background-color="#abe3f1"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395" style:family="table-cell" style:parent-style-name="Default">
      <style:table-cell-properties fo:border-bottom="0.74pt solid #000000" fo:background-color="#00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396" style:family="table-cell" style:parent-style-name="Default">
      <style:table-cell-properties fo:border-bottom="1.76pt double-thin #b7b7b7" style:border-line-width-bottom="0.51pt 0.74pt 0.51pt"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7" style:family="table-cell" style:parent-style-name="Default">
      <style:table-cell-properties fo:border-bottom="0.74pt solid #000000" fo:background-color="#cbeef7" style:diagonal-bl-tr="none" style:diagonal-tl-br="none" style:text-align-source="fix" style:repeat-content="false" fo:wrap-option="no-wrap" fo:border-left="0.74pt solid #cbeef7"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398" style:family="table-cell" style:parent-style-name="Default">
      <style:table-cell-properties fo:border-bottom="0.74pt solid #000000" fo:background-color="#cbeef7"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399" style:family="table-cell" style:parent-style-name="Default">
      <style:table-cell-properties fo:border-bottom="0.74pt solid #000000" fo:background-color="#abe3f1" style:diagonal-bl-tr="none" style:diagonal-tl-br="none" style:text-align-source="fix" style:repeat-content="false" fo:wrap-option="no-wrap" fo:border-left="0.74pt solid #abe3f1"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400" style:family="table-cell" style:parent-style-name="Default">
      <style:table-cell-properties fo:border-bottom="0.74pt solid #000000" fo:background-color="#00ffff" style:diagonal-bl-tr="none" style:diagonal-tl-br="none" style:text-align-source="fix" style:repeat-content="false" fo:wrap-option="no-wrap" fo:border-left="0.74pt solid #00ffff"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401" style:family="table-cell" style:parent-style-name="Default">
      <style:table-cell-properties fo:border-bottom="0.74pt solid #000000" fo:background-color="#3d3dc4"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402"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403" style:family="table-cell" style:parent-style-name="Default">
      <style:table-cell-properties fo:background-color="#abe3f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404"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layfair Display" fo:font-size="11pt" fo:font-style="normal" fo:text-shadow="none" style:text-underline-style="none" fo:font-weight="bold" style:font-size-asian="11pt" style:font-style-asian="normal" style:font-weight-asian="bold" style:font-name-complex="Playfair Display" style:font-size-complex="11pt" style:font-style-complex="normal" style:font-weight-complex="bold"/>
    </style:style>
    <style:style style:name="ce405" style:family="table-cell" style:parent-style-name="Default">
      <style:table-cell-properties fo:border-bottom="0.74pt solid #000000" fo:background-color="#cbee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406" style:family="table-cell" style:parent-style-name="Default">
      <style:table-cell-properties fo:border-bottom="0.74pt solid #000000" fo:background-color="#abe3f1"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407" style:family="table-cell" style:parent-style-name="Default">
      <style:table-cell-properties fo:border-bottom="0.74pt solid #000000" fo:background-color="#00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408" style:family="table-cell" style:parent-style-name="Default" style:data-style-name="N128">
      <style:table-cell-properties fo:border-bottom="0.74pt solid #000000" fo:background-color="#cbeef7" style:diagonal-bl-tr="none" style:diagonal-tl-br="none" style:text-align-source="fix" style:repeat-content="false" fo:wrap-option="no-wrap" fo:border-left="0.74pt solid #cbeef7" style:direction="ltr" fo:border-right="0.74pt solid #ffe5e5"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409" style:family="table-cell" style:parent-style-name="Default">
      <style:table-cell-properties fo:border-bottom="0.74pt solid #000000" fo:background-color="#cbeef7" style:diagonal-bl-tr="none" style:diagonal-tl-br="none" style:text-align-source="fix" style:repeat-content="false" fo:wrap-option="no-wrap" fo:border-left="0.74pt solid #cbeef7" style:direction="ltr" fo:border-right="0.74pt solid #ffe5e5"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410" style:family="table-cell" style:parent-style-name="Default">
      <style:table-cell-properties fo:border-bottom="0.74pt solid #000000" fo:background-color="#abe3f1" style:diagonal-bl-tr="none" style:diagonal-tl-br="none" style:text-align-source="fix" style:repeat-content="false" fo:wrap-option="no-wrap" fo:border-left="0.74pt solid #abe3f1"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4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3" style:family="table-cell" style:parent-style-name="Default">
      <style:table-cell-properties fo:border-bottom="0.74pt solid #000000" fo:background-color="#00ffff" style:diagonal-bl-tr="none" style:diagonal-tl-br="none" style:text-align-source="fix" style:repeat-content="false" fo:wrap-option="no-wrap" fo:border-left="0.74pt solid #00ffff"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name-complex="Trebuchet MS" style:font-size-complex="8pt" style:font-style-complex="normal" style:font-weight-complex="normal"/>
    </style:style>
    <style:style style:name="ce41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name-complex="Trebuchet MS" style:font-size-complex="8pt" style:font-style-complex="normal" style:font-weight-complex="bold"/>
    </style:style>
    <style:style style:name="ce41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cc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name-complex="Trebuchet MS" style:font-size-complex="11pt" style:font-style-complex="normal" style:font-weight-complex="bold"/>
    </style:style>
    <style:style style:name="ce41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1c1c"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4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1c1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1c1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9" style:family="table-cell" style:parent-style-name="Default" style:data-style-name="N130">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1c1c" style:text-outline="false" style:text-line-through-style="none" style:text-line-through-type="none" style:font-name="Caveat" fo:font-size="9pt" fo:font-style="normal" fo:text-shadow="none" style:text-underline-style="none" fo:font-weight="bold" style:font-size-asian="9pt" style:font-style-asian="normal" style:font-weight-asian="bold" style:font-name-complex="Caveat" style:font-size-complex="9pt" style:font-style-complex="normal" style:font-weight-complex="bold"/>
    </style:style>
    <style:style style:name="ce4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ff1c1c" style:text-outline="false" style:text-line-through-style="none" style:text-line-through-type="none" style:font-name="Caveat" fo:font-size="9pt" fo:font-style="normal" fo:text-shadow="none" style:text-underline-style="none" fo:font-weight="bold" style:font-size-asian="9pt" style:font-style-asian="normal" style:font-weight-asian="bold" style:font-name-complex="Caveat" style:font-size-complex="9pt" style:font-style-complex="normal" style:font-weight-complex="bold"/>
    </style:style>
    <style:style style:name="ce421" style:family="table-cell" style:parent-style-name="Default" style:data-style-name="N130">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1c1c" style:text-outline="false" style:text-line-through-style="none" style:text-line-through-type="none" style:font-name="Caveat" fo:font-size="9pt" fo:font-style="normal" fo:text-shadow="none" style:text-underline-style="none" fo:font-weight="bold" style:font-size-asian="9pt" style:font-style-asian="normal" style:font-weight-asian="bold" style:font-name-complex="Caveat" style:font-size-complex="9pt" style:font-style-complex="normal" style:font-weight-complex="bold"/>
    </style:style>
    <style:style style:name="ce4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ff0000" style:text-outline="false" style:text-line-through-style="none" style:text-line-through-type="none" style:font-name="Caveat" fo:font-size="9pt" fo:font-style="normal" fo:text-shadow="none" style:text-underline-style="none" fo:font-weight="bold" style:font-size-asian="9pt" style:font-style-asian="normal" style:font-weight-asian="bold" style:font-name-complex="Caveat" style:font-size-complex="9pt" style:font-style-complex="normal" style:font-weight-complex="bold"/>
    </style:style>
    <style:style style:name="ce42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1c1c" style:text-outline="false" style:text-line-through-style="none" style:text-line-through-type="none" style:font-name="Trebuchet MS" fo:font-size="7pt" fo:font-style="normal" fo:text-shadow="none" style:text-underline-style="none" fo:font-weight="normal" style:font-size-asian="7pt" style:font-style-asian="normal" style:font-weight-asian="normal" style:font-name-complex="Trebuchet MS" style:font-size-complex="7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2.8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5.82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34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2.32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82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85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0.57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0.58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73763" style:font-name="trebuchet ms" fo:font-size="10pt" fo:font-weight="normal" style:text-underline-style="none" style:text-underline-color="font-color" style:text-line-through-type="none" fo:font-style="normal" style:text-outline="false" fo:text-shadow="none" style:text-position="0% 100%" style:font-name-complex="trebuchet ms" style:font-size-asian="10pt" style:font-size-complex="10pt" style:font-weight-asian="normal" style:font-weight-complex="normal" style:font-style-asian="normal" style:font-style-complex="normal"/>
    </style:style>
    <style:style style:name="T2" style:family="text">
      <style:text-properties style:font-style-complex="normal" fo:text-shadow="none" style:font-style-asian="normal" style:font-weight-complex="normal" style:font-weight-asian="normal" style:font-size-complex="10pt" style:font-size-asian="10pt" style:font-name-complex="trebuchet ms" fo:color="#073763" style:text-position="0% 100%" style:text-outline="false" fo:font-style="normal" style:text-line-through-type="none" style:text-underline-style="none" style:text-underline-color="font-color" fo:font-weight="normal" fo:font-size="10pt" style:font-name="trebuchet ms"/>
    </style:style>
    <style:style style:name="T3" style:family="text">
      <style:text-properties style:font-style-complex="normal" fo:text-shadow="none" style:font-style-asian="normal" style:font-size-complex="10pt" style:font-size-asian="10pt" style:font-name-complex="trebuchet ms" fo:color="#073763" style:text-position="0% 100%" style:text-outline="false" fo:font-style="normal" style:text-line-through-type="none" fo:font-size="10pt" style:font-name="trebuchet ms" fo:font-weight="bold" style:text-underline-style="solid" style:text-underline-width="auto" style:text-underline-color="font-color" style:font-weight-asian="bold" style:font-weight-complex="bold"/>
    </style:style>
    <style:style style:name="T4" style:family="text">
      <style:text-properties style:font-style-complex="normal" fo:text-shadow="none" style:font-style-asian="normal" style:font-size-complex="10pt" style:font-size-asian="10pt" style:font-name-complex="trebuchet ms" fo:color="#073763" style:text-position="0% 100%" style:text-outline="false" fo:font-style="normal" style:text-line-through-type="none" fo:font-size="10pt" style:font-name="trebuchet ms" fo:font-weight="bold" style:font-weight-asian="bold" style:font-weight-complex="bold" style:text-underline-style="none" style:text-underline-color="font-color"/>
    </style:style>
    <style:style style:name="T5" style:family="text">
      <style:text-properties style:font-style-complex="normal" fo:text-shadow="none" style:font-style-asian="normal" style:font-size-complex="10pt" style:font-size-asian="10pt" style:font-name-complex="trebuchet ms" fo:color="#073763" style:text-position="0% 100%" style:text-outline="false" fo:font-style="normal" style:text-line-through-type="none" fo:font-size="10pt" style:font-name="trebuchet ms" style:text-underline-style="none" style:text-underline-color="font-color" fo:font-weight="normal" style:font-weight-asian="normal" style:font-weight-complex="normal"/>
    </style:style>
    <style:style style:name="T6" style:family="text">
      <style:text-properties style:font-name-complex="trebuchet ms" fo:font-style="normal" fo:color="#073763" fo:text-shadow="none" style:font-name="trebuchet ms" fo:font-size="10pt" fo:font-weight="normal" style:text-underline-style="none" style:text-underline-color="font-color" style:text-line-through-type="none" style:font-size-complex="10pt" style:font-weight-asian="normal" style:font-weight-complex="normal" style:font-style-asian="normal" style:font-style-complex="normal" style:text-position="0% 100%" style:text-outline="false" style:font-size-asian="10pt"/>
    </style:style>
    <style:style style:name="T7" style:family="text">
      <style:text-properties fo:color="#073763" fo:text-shadow="none" style:font-name="trebuchet ms" fo:font-size="10pt" style:text-underline-style="none" style:text-underline-color="font-color" style:text-line-through-type="none" style:font-size-complex="10pt" style:text-position="0% 100%" style:text-outline="false" style:font-size-asian="10pt" style:font-style-asian="italic" style:font-style-complex="italic" style:font-weight-asian="bold" style:font-weight-complex="bold" fo:font-weight="bold" fo:font-style="italic"/>
    </style:style>
    <style:style style:name="T8" style:family="text">
      <style:text-properties fo:color="#073763" fo:text-shadow="none" style:font-name="trebuchet ms" fo:font-size="10pt" style:text-underline-style="none" style:text-underline-color="font-color" style:text-line-through-type="none" style:font-size-complex="10pt" style:text-position="0% 100%" style:text-outline="false" style:font-size-asian="10pt" fo:font-weight="normal" fo:font-style="normal" style:font-name-complex="trebuchet ms" style:font-weight-asian="normal" style:font-weight-complex="normal" style:font-style-asian="normal" style:font-style-complex="normal"/>
    </style:style>
    <style:style style:name="T9" style:family="text">
      <style:text-properties style:font-style-complex="normal" style:font-name="trebuchet ms" style:font-style-asian="normal" style:font-weight-complex="normal" style:font-weight-asian="normal" style:font-size-complex="10pt" style:font-size-asian="10pt" style:font-name-complex="trebuchet ms" style:text-position="0% 100%" fo:color="#2f5374" style:text-outline="false" fo:font-style="normal" style:text-line-through-type="none" style:text-underline-style="none" style:text-underline-color="font-color" fo:font-weight="normal" fo:font-size="10pt" fo:text-shadow="none"/>
    </style:style>
    <style:style style:name="T10" style:family="text">
      <style:text-properties style:font-style-complex="normal" style:font-name="trebuchet ms" style:font-style-asian="normal" style:font-size-complex="10pt" style:font-size-asian="10pt" style:font-name-complex="trebuchet ms" style:text-position="0% 100%" style:text-outline="false" fo:font-style="normal" style:text-line-through-type="none" style:text-underline-style="none" style:text-underline-color="font-color" fo:font-size="10pt" fo:text-shadow="none" fo:color="#009730" fo:font-weight="bold" style:font-weight-asian="bold" style:font-weight-complex="bold"/>
    </style:style>
    <style:style style:name="T11" style:family="text">
      <style:text-properties fo:text-shadow="none" style:font-style-complex="normal" fo:font-size="10pt" fo:font-weight="normal" style:text-underline-style="none" style:text-underline-color="font-color" style:text-line-through-type="none" fo:font-style="normal" style:text-outline="false" fo:color="#2f5374" style:text-position="0% 100%" style:font-name-complex="trebuchet ms" style:font-size-asian="10pt" style:font-size-complex="10pt" style:font-weight-asian="normal" style:font-weight-complex="normal" style:font-style-asian="normal" style:font-name="trebuchet ms"/>
    </style:style>
    <style:style style:name="T12" style:family="text">
      <style:text-properties fo:text-shadow="none" style:font-style-complex="normal" fo:font-size="10pt" fo:font-weight="normal" style:text-underline-style="none" style:text-underline-color="font-color" style:text-line-through-type="none" fo:font-style="normal" style:text-outline="false" style:text-position="0% 100%" style:font-name-complex="trebuchet ms" style:font-size-asian="10pt" style:font-size-complex="10pt" style:font-weight-asian="normal" style:font-weight-complex="normal" style:font-style-asian="normal" style:font-name="trebuchet ms" fo:color="#000000"/>
    </style:style>
    <style:style style:name="T13" style:family="text">
      <style:text-properties fo:text-shadow="none" style:font-style-complex="normal" fo:font-size="10pt" style:text-underline-style="none" style:text-underline-color="font-color" style:text-line-through-type="none" fo:font-style="normal" style:text-outline="false" style:text-position="0% 100%" style:font-name-complex="trebuchet ms" style:font-size-asian="10pt" style:font-size-complex="10pt" style:font-style-asian="normal" style:font-name="trebuchet ms" fo:color="#009730" fo:font-weight="bold" style:font-weight-asian="bold" style:font-weight-complex="bold"/>
    </style:style>
    <style:style style:name="T14" style:family="text">
      <style:text-properties fo:text-shadow="none" style:font-name="trebuchet ms" fo:font-size="10pt" fo:font-weight="normal" style:text-underline-style="none" style:text-underline-color="font-color" style:text-line-through-type="none" fo:font-style="normal" style:text-outline="false" style:text-position="0% 100%" fo:color="#2f5374" style:font-name-complex="trebuchet ms" style:font-size-asian="10pt" style:font-size-complex="10pt" style:font-weight-asian="normal" style:font-weight-complex="normal" style:font-style-asian="normal" style:font-style-complex="normal"/>
    </style:style>
    <style:style style:name="T15" style:family="text">
      <style:text-properties fo:text-shadow="none" style:font-name="trebuchet ms" fo:font-size="10pt" style:text-underline-style="none" style:text-underline-color="font-color" style:text-line-through-type="none" fo:font-style="normal" style:text-outline="false" style:text-position="0% 100%" fo:color="#2f5374" style:font-name-complex="trebuchet ms" style:font-size-asian="10pt" style:font-size-complex="10pt" style:font-style-asian="normal" style:font-style-complex="normal" fo:font-weight="bold" style:font-weight-asian="bold" style:font-weight-complex="bold"/>
    </style:style>
    <style:style style:name="T16" style:family="text">
      <style:text-properties fo:text-shadow="none" style:font-name="trebuchet ms" fo:font-size="10pt" style:text-underline-style="none" style:text-underline-color="font-color" style:text-line-through-type="none" fo:font-style="normal" style:text-outline="false" style:text-position="0% 100%" style:font-name-complex="trebuchet ms" style:font-size-asian="10pt" style:font-size-complex="10pt" style:font-style-asian="normal" style:font-style-complex="normal" fo:font-weight="bold" style:font-weight-asian="bold" style:font-weight-complex="bold" fo:color="#009730"/>
    </style:style>
    <style:style style:name="T17" style:family="text">
      <style:text-properties style:font-name="trebuchet ms" fo:color="#990000" style:font-style-asian="normal" style:font-weight-complex="bold" style:font-weight-asian="bold" style:font-size-complex="10pt" style:font-size-asian="10pt" style:font-name-complex="trebuchet ms" fo:text-shadow="none" style:text-position="0% 100%" style:text-outline="false" fo:font-style="normal" style:text-line-through-type="none" style:text-underline-style="none" style:text-underline-color="font-color" fo:font-weight="bold" fo:font-size="10pt" style:font-style-complex="normal"/>
    </style:style>
    <style:style style:name="T18" style:family="text">
      <style:text-properties style:font-name="trebuchet ms" fo:color="#990000" style:font-style-asian="normal" style:font-weight-complex="bold" style:font-weight-asian="bold" style:font-name-complex="trebuchet ms" fo:text-shadow="none" style:text-position="0% 100%" style:text-outline="false" fo:font-style="normal" style:text-line-through-type="none" style:text-underline-style="none" style:text-underline-color="font-color" fo:font-weight="bold" style:font-style-complex="normal" fo:font-size="6pt" style:font-size-asian="6pt" style:font-size-complex="6pt"/>
    </style:style>
    <style:style style:name="T19" style:family="text">
      <style:text-properties style:font-name="trebuchet ms" fo:color="#ffffff" style:font-style-asian="normal" style:font-weight-complex="normal" style:font-weight-asian="normal" style:font-size-complex="10pt" style:font-size-asian="10pt" style:font-name-complex="trebuchet ms" fo:text-shadow="none" style:text-position="0% 100%" style:text-outline="false" fo:font-style="normal" style:text-line-through-type="none" style:text-underline-style="none" style:text-underline-color="font-color" fo:font-weight="normal" fo:font-size="10pt" style:font-style-complex="normal"/>
    </style:style>
    <style:style style:name="T20" style:family="text">
      <style:text-properties style:font-name="trebuchet ms" fo:color="#ffffff" style:font-style-asian="normal" style:font-weight-complex="normal" style:font-weight-asian="normal" style:font-name-complex="trebuchet ms" fo:text-shadow="none" style:text-position="0% 100%" style:text-outline="false" fo:font-style="normal" style:text-line-through-type="none" style:text-underline-style="none" style:text-underline-color="font-color" fo:font-weight="normal" style:font-style-complex="normal" fo:font-size="7pt" style:font-size-asian="7pt" style:font-size-complex="7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lionel messi (argentina),vinícius jr. (brasil),mbappé (frança), harry kane (inglaterra),lamine yamal (espanha),haaland (noruega),cristiano ronaldo (portugal),nick woltemade (alemanha),kevin de bruyne (bélgica),memphis depay (holanda),luis díaz (colômbia),darwin núñez (uruguai),qualquer jogador da áfrica do sul,qualquer jogador da alemanha, exceto woltemade,qualquer jogador da arábia saudita,qualquer jogador da argélia,qualquer jogador da argentina, exceto messi,qualquer jogador da austrália,qualquer jogador da bélgica, exceto de bruyne,qualquer jogador da bósnia,qualquer jogador do brasil, exceto vinícius jr.,qualquer jogador do cabo verde,qualquer jogador do canadá,qualquer jogador do catar,qualquer jogador da colômbia, exceto luiz días,qualquer jogador da coréia do sul,qualquer jogador da costa do marfim,qualquer jogador da croácia,qualquer jogador do curaçao,qualquer jogador do egito,qualquer jogador do equador,qualquer jogador da escócia,qualquer jogador da espanha, exceto lamine yamal,qualquer jogador d)" table:allow-empty-cell="true" table:display-list="unsorted" table:base-cell-address="'Resultados Oficiais'.E48">
          <table:error-message table:message-type="stop" table:display="true"/>
        </table:content-validation>
        <table:content-validation table:name="val2" table:condition="of:cell-content-is-in-list(&quot;África do Sul&quot;;&quot;Alemanha&quot;;&quot;Arábia Saudita&quot;;&quot;Argélia&quot;;&quot;Argentina&quot;;&quot;Austrália&quot;;&quot;Bélgica&quot;;&quot;Bósnia&quot;;&quot;Brasil&quot;;&quot;Cabo Verde&quot;;&quot;Canadá&quot;;&quot;Catar&quot;;&quot;Colômbia&quot;;&quot;Coréia do Sul&quot;;&quot;Costa do Marfim&quot;;&quot;Croácia&quot;;&quot;Curaçao&quot;;&quot;Egito&quot;;&quot;Equador&quot;;&quot;Escócia&quot;;&quot;Espanha&quot;;&quot;Estados Unidos&quot;;&quot;França&quot;;&quot;Gana&quot;;&quot;Haiti&quot;;&quot;Holanda&quot;;&quot;Inglaterra&quot;;&quot;Irã&quot;;&quot;Iraque&quot;;&quot;Japão&quot;;&quot;Jordânia&quot;;&quot;Marrocos&quot;;&quot;México&quot;;&quot;Noruega&quot;;&quot;Nova Zelândia&quot;;&quot;Panamá&quot;;&quot;Paraguai&quot;;&quot;Portugal&quot;;&quot;RD do Congo&quot;;&quot;República Tcheca&quot;;&quot;Senegal&quot;;&quot;Suécia&quot;;&quot;Suíça&quot;;&quot;Tunísia&quot;;&quot;Turquia&quot;;&quot;Uruguai&quot;;&quot;Uzbequistão&quot;)" table:allow-empty-cell="true" table:display-list="unsorted" table:base-cell-address="'Resultados Oficiais'.T48">
          <table:error-message table:message-type="stop" table:display="true"/>
        </table:content-validation>
        <table:content-validation table:name="val3" table:condition="of:cell-content-is-in-list([$'Cartão de Apostas'.T3:.W3])" table:allow-empty-cell="true" table:display-list="unsorted" table:base-cell-address="'Resultados Oficiais'.AA3">
          <table:error-message table:message-type="stop" table:display="true"/>
        </table:content-validation>
        <table:content-validation table:name="val4" table:condition="of:cell-content-is-in-list(&quot;lionel messi (argentina),vinícius jr. (brasil),mbappé (frança), harry kane (inglaterra),lamine yamal (espanha),haaland (noruega),cristiano ronaldo (portugal),nick woltemade (alemanha),kevin de bruyne (bélgica),memphis depay (holanda),luis díaz (colômbia),darwin núñez (uruguai),qualquer jogador da áfrica do sul,qualquer jogador da alemanha, exceto woltemade,qualquer jogador da arábia saudita,qualquer jogador da argélia,qualquer jogador da argentina, exceto messi,qualquer jogador da austrália,qualquer jogador da bélgica, exceto de bruyne,qualquer jogador da bósnia,qualquer jogador do brasil, exceto vinícius jr.,qualquer jogador do cabo verde,qualquer jogador do canadá,qualquer jogador do catar,qualquer jogador da colômbia, exceto luiz días,qualquer jogador da coréia do sul,qualquer jogador da costa do marfim,qualquer jogador da croácia,qualquer jogador do curaçao,qualquer jogador do egito,qualquer jogador do equador,qualquer jogador da escócia,qualquer jogador da espanha, exceto lamine yamal,qualquer jogador d)" table:allow-empty-cell="true" table:display-list="unsorted" table:base-cell-address="'Cartão de Apostas'.D48">
          <table:error-message table:message-type="stop" table:display="true"/>
        </table:content-validation>
        <table:content-validation table:name="val5" table:condition="of:cell-content-is-in-list(&quot;África do Sul&quot;;&quot;Alemanha&quot;;&quot;Arábia Saudita&quot;;&quot;Argélia&quot;;&quot;Argentina&quot;;&quot;Austrália&quot;;&quot;Bélgica&quot;;&quot;Bósnia&quot;;&quot;Brasil&quot;;&quot;Cabo Verde&quot;;&quot;Canadá&quot;;&quot;Catar&quot;;&quot;Colômbia&quot;;&quot;Coréia do Sul&quot;;&quot;Costa do Marfim&quot;;&quot;Croácia&quot;;&quot;Curaçao&quot;;&quot;Egito&quot;;&quot;Equador&quot;;&quot;Escócia&quot;;&quot;Espanha&quot;;&quot;Estados Unidos&quot;;&quot;França&quot;;&quot;Gana&quot;;&quot;Haiti&quot;;&quot;Holanda&quot;;&quot;Inglaterra&quot;;&quot;Irã&quot;;&quot;Iraque&quot;;&quot;Japão&quot;;&quot;Jordânia&quot;;&quot;Marrocos&quot;;&quot;México&quot;;&quot;Noruega&quot;;&quot;Nova Zelândia&quot;;&quot;Panamá&quot;;&quot;Paraguai&quot;;&quot;Portugal&quot;;&quot;RD do Congo&quot;;&quot;República Tcheca&quot;;&quot;Senegal&quot;;&quot;Suécia&quot;;&quot;Suíça&quot;;&quot;Tunísia&quot;;&quot;Turquia&quot;;&quot;Uruguai&quot;;&quot;Uzbequistão&quot;)" table:allow-empty-cell="true" table:display-list="unsorted" table:base-cell-address="'Cartão de Apostas'.T48">
          <table:error-message table:message-type="stop" table:display="true"/>
        </table:content-validation>
        <table:content-validation table:name="val6" table:condition="of:cell-content-is-in-list([$'Cartão de Apostas'.T3:.W3])" table:allow-empty-cell="true" table:display-list="unsorted" table:base-cell-address="'Cartão de Apostas'.Z3">
          <table:error-message table:message-type="stop" table:display="true"/>
        </table:content-validation>
      </table:content-validations>
      <table:table table:name="BOLÃO 2026"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column table:style-name="co5"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column table:style-name="co8" table:default-cell-style-name="Default"/>
        <table:table-column table:style-name="co12" table:default-cell-style-name="Default"/>
        <table:table-column table:style-name="co13" table:number-columns-repeated="1008" table:default-cell-style-name="Default"/>
        <table:table-row table:style-name="ro1">
          <table:table-cell table:style-name="ce1" table:number-columns-spanned="1" table:number-rows-spanned="3">
            <draw:frame table:end-cell-address="'BOLÃO 2026'.B19" table:end-x="11pt" table:end-y="6.75pt" draw:z-index="0" draw:name="image1.png" draw:style-name="gr1" draw:text-style-name="P1" svg:width="195.73pt" svg:height="305.97pt" svg:x="0pt" svg:y="0pt">
              <draw:image xlink:href="Pictures/100002010000010500000198B8B5D3CAA3BF4D7A.png" xlink:type="simple" xlink:show="embed" xlink:actuate="onLoad">
                <text:p/>
              </draw:image>
            </draw:frame>
          </table:table-cell>
          <table:table-cell table:style-name="ce5"/>
          <table:table-cell table:style-name="ce12"/>
          <table:table-cell table:style-name="ce14" office:value-type="string" calcext:value-type="string" table:number-columns-spanned="7" table:number-rows-spanned="1">
            <text:p>TOP 20</text:p>
          </table:table-cell>
          <table:covered-table-cell table:number-columns-repeated="6" table:style-name="ce21"/>
          <table:table-cell table:style-name="ce35" table:number-columns-repeated="2"/>
          <table:table-cell table:style-name="ce39" office:value-type="string" calcext:value-type="string" table:number-columns-spanned="3" table:number-rows-spanned="1">
            <office:annotation draw:style-name="gr2" draw:text-style-name="P3" svg:width="239.64pt" svg:height="50.49pt" svg:x="729.5pt" svg:y="15.25pt" draw:caption-point-x="127.42pt" draw:caption-point-y="-14.97pt">
              <dc:date>2026-05-01T00:00:00</dc:date>
              <text:p text:style-name="P2">O Ranking Histórico pontua 20 pontos para o 1º colocado de cada edição, 19 para o 2º, chegando até o 20º colocado, que pontua 1 ponto. Desempate: buchas.</text:p>
            </office:annotation>
            <text:p>RANKING HISTÓRICO</text:p>
          </table:table-cell>
          <table:covered-table-cell table:style-name="ce42"/>
          <table:covered-table-cell table:style-name="ce44"/>
          <table:table-cell table:style-name="ce35"/>
          <table:table-cell table:number-columns-repeated="1008"/>
        </table:table-row>
        <table:table-row table:style-name="ro2">
          <table:covered-table-cell/>
          <table:table-cell table:style-name="ce6"/>
          <table:table-cell table:style-name="ce13"/>
          <table:table-cell table:style-name="ce15" office:value-type="float" office:value="1" calcext:value-type="float">
            <text:p>1º</text:p>
          </table:table-cell>
          <table:table-cell table:style-name="ce22"/>
          <table:table-cell table:style-name="ce26"/>
          <table:table-cell table:style-name="ce31"/>
          <table:table-cell table:style-name="ce16" office:value-type="float" office:value="11" calcext:value-type="float">
            <text:p>11º</text:p>
          </table:table-cell>
          <table:table-cell table:style-name="ce22"/>
          <table:table-cell table:style-name="ce27"/>
          <table:table-cell table:style-name="ce31" table:number-columns-repeated="2"/>
          <table:table-cell table:style-name="ce40" office:value-type="float" office:value="1" calcext:value-type="float">
            <text:p>1º</text:p>
          </table:table-cell>
          <table:table-cell table:style-name="ce43" office:value-type="string" calcext:value-type="string">
            <text:p>MARÍLIA</text:p>
          </table:table-cell>
          <table:table-cell table:style-name="ce45" office:value-type="float" office:value="55" calcext:value-type="float">
            <text:p>55</text:p>
          </table:table-cell>
          <table:table-cell table:style-name="ce31"/>
          <table:table-cell table:number-columns-repeated="1008"/>
        </table:table-row>
        <table:table-row table:style-name="ro2">
          <table:covered-table-cell/>
          <table:table-cell table:style-name="ce7" office:value-type="string" calcext:value-type="string">
            <text:p>Boa Sorte!</text:p>
          </table:table-cell>
          <table:table-cell table:style-name="ce13"/>
          <table:table-cell table:style-name="ce16" office:value-type="float" office:value="2" calcext:value-type="float">
            <text:p>2º</text:p>
          </table:table-cell>
          <table:table-cell table:style-name="ce22"/>
          <table:table-cell table:style-name="ce27"/>
          <table:table-cell table:style-name="ce31"/>
          <table:table-cell table:style-name="ce16" office:value-type="float" office:value="12" calcext:value-type="float">
            <text:p>12º</text:p>
          </table:table-cell>
          <table:table-cell table:style-name="ce22"/>
          <table:table-cell table:style-name="ce27"/>
          <table:table-cell table:style-name="ce31" table:number-columns-repeated="2"/>
          <table:table-cell table:style-name="ce41" office:value-type="float" office:value="2" calcext:value-type="float">
            <text:p>2º</text:p>
          </table:table-cell>
          <table:table-cell table:style-name="ce43" office:value-type="string" calcext:value-type="string">
            <text:p>ARTUR</text:p>
          </table:table-cell>
          <table:table-cell table:style-name="ce45" office:value-type="float" office:value="45" calcext:value-type="float">
            <text:p>45</text:p>
          </table:table-cell>
          <table:table-cell table:style-name="ce31"/>
          <table:table-cell table:number-columns-repeated="1008"/>
        </table:table-row>
        <table:table-row table:style-name="ro2">
          <table:table-cell table:style-name="ce2" table:number-columns-spanned="1" table:number-rows-spanned="12"/>
          <table:table-cell table:style-name="ce7" office:value-type="string" calcext:value-type="string">
            <text:p>удачи! </text:p>
          </table:table-cell>
          <table:table-cell table:style-name="ce13"/>
          <table:table-cell table:style-name="ce16" office:value-type="float" office:value="3" calcext:value-type="float">
            <text:p>3º</text:p>
          </table:table-cell>
          <table:table-cell table:style-name="ce22"/>
          <table:table-cell table:style-name="ce27"/>
          <table:table-cell table:style-name="ce31"/>
          <table:table-cell table:style-name="ce16" office:value-type="float" office:value="13" calcext:value-type="float">
            <text:p>13º</text:p>
          </table:table-cell>
          <table:table-cell table:style-name="ce22"/>
          <table:table-cell table:style-name="ce27"/>
          <table:table-cell table:style-name="ce31" table:number-columns-repeated="2"/>
          <table:table-cell table:style-name="ce41" office:value-type="float" office:value="3" calcext:value-type="float">
            <text:p>3º</text:p>
          </table:table-cell>
          <table:table-cell table:style-name="ce43" office:value-type="string" calcext:value-type="string">
            <text:p>PABLO</text:p>
          </table:table-cell>
          <table:table-cell table:style-name="ce45" office:value-type="float" office:value="39" calcext:value-type="float">
            <text:p>39</text:p>
          </table:table-cell>
          <table:table-cell table:style-name="ce31"/>
          <table:table-cell table:number-columns-repeated="1008"/>
        </table:table-row>
        <table:table-row table:style-name="ro2">
          <table:covered-table-cell/>
          <table:table-cell table:style-name="ce7" office:value-type="string" calcext:value-type="string">
            <text:p>Buona fortuna!</text:p>
          </table:table-cell>
          <table:table-cell table:style-name="ce13"/>
          <table:table-cell table:style-name="ce16" office:value-type="float" office:value="4" calcext:value-type="float">
            <text:p>4º</text:p>
          </table:table-cell>
          <table:table-cell table:style-name="ce22"/>
          <table:table-cell table:style-name="ce27"/>
          <table:table-cell table:style-name="ce31"/>
          <table:table-cell table:style-name="ce16" office:value-type="float" office:value="14" calcext:value-type="float">
            <text:p>14º</text:p>
          </table:table-cell>
          <table:table-cell table:style-name="ce22"/>
          <table:table-cell table:style-name="ce27"/>
          <table:table-cell table:style-name="ce31" table:number-columns-repeated="2"/>
          <table:table-cell table:style-name="ce41" office:value-type="float" office:value="4" calcext:value-type="float">
            <text:p>4º</text:p>
          </table:table-cell>
          <table:table-cell table:style-name="ce43" office:value-type="string" calcext:value-type="string">
            <text:p>LUIZA PETRY</text:p>
          </table:table-cell>
          <table:table-cell table:style-name="ce45" office:value-type="float" office:value="35" calcext:value-type="float">
            <text:p>35</text:p>
          </table:table-cell>
          <table:table-cell table:style-name="ce31"/>
          <table:table-cell table:number-columns-repeated="1008"/>
        </table:table-row>
        <table:table-row table:style-name="ro2">
          <table:covered-table-cell/>
          <table:table-cell table:style-name="ce7" office:value-type="string" calcext:value-type="string">
            <text:p>Viel Glück!</text:p>
          </table:table-cell>
          <table:table-cell table:style-name="ce13"/>
          <table:table-cell table:style-name="ce16" office:value-type="float" office:value="5" calcext:value-type="float">
            <text:p>5º</text:p>
          </table:table-cell>
          <table:table-cell table:style-name="ce22"/>
          <table:table-cell table:style-name="ce27"/>
          <table:table-cell table:style-name="ce31"/>
          <table:table-cell table:style-name="ce17" office:value-type="float" office:value="15" calcext:value-type="float">
            <text:p>15º</text:p>
          </table:table-cell>
          <table:table-cell table:style-name="ce22"/>
          <table:table-cell table:style-name="ce27"/>
          <table:table-cell table:style-name="ce31" table:number-columns-repeated="2"/>
          <table:table-cell table:style-name="ce41" office:value-type="float" office:value="5" calcext:value-type="float">
            <text:p>5º</text:p>
          </table:table-cell>
          <table:table-cell table:style-name="ce43" office:value-type="string" calcext:value-type="string">
            <text:p>GABRIEL</text:p>
          </table:table-cell>
          <table:table-cell table:style-name="ce45" office:value-type="float" office:value="33" calcext:value-type="float">
            <text:p>33</text:p>
          </table:table-cell>
          <table:table-cell table:style-name="ce31"/>
          <table:table-cell table:number-columns-repeated="1008"/>
        </table:table-row>
        <table:table-row table:style-name="ro2">
          <table:covered-table-cell/>
          <table:table-cell table:style-name="ce7" office:value-type="string" calcext:value-type="string">
            <text:p>Srećno!</text:p>
          </table:table-cell>
          <table:table-cell table:style-name="ce13"/>
          <table:table-cell table:style-name="ce16" office:value-type="float" office:value="6" calcext:value-type="float">
            <text:p>6º</text:p>
          </table:table-cell>
          <table:table-cell table:style-name="ce22"/>
          <table:table-cell table:style-name="ce27"/>
          <table:table-cell table:style-name="ce31"/>
          <table:table-cell table:style-name="ce17" office:value-type="float" office:value="16" calcext:value-type="float">
            <text:p>16º</text:p>
          </table:table-cell>
          <table:table-cell table:style-name="ce22"/>
          <table:table-cell table:style-name="ce27"/>
          <table:table-cell table:style-name="ce31" table:number-columns-repeated="2"/>
          <table:table-cell table:style-name="ce41" office:value-type="float" office:value="6" calcext:value-type="float">
            <text:p>6º</text:p>
          </table:table-cell>
          <table:table-cell table:style-name="ce43" office:value-type="string" calcext:value-type="string">
            <text:p>MATHIEU</text:p>
          </table:table-cell>
          <table:table-cell table:style-name="ce45" office:value-type="float" office:value="31" calcext:value-type="float">
            <text:p>31</text:p>
          </table:table-cell>
          <table:table-cell table:style-name="ce31"/>
          <table:table-cell table:number-columns-repeated="1008"/>
        </table:table-row>
        <table:table-row table:style-name="ro2">
          <table:covered-table-cell/>
          <table:table-cell table:style-name="ce7" office:value-type="string" calcext:value-type="string">
            <text:p>Bonne chance!</text:p>
          </table:table-cell>
          <table:table-cell table:style-name="ce13"/>
          <table:table-cell table:style-name="ce17" office:value-type="float" office:value="7" calcext:value-type="float">
            <text:p>7º</text:p>
          </table:table-cell>
          <table:table-cell table:style-name="ce22"/>
          <table:table-cell table:style-name="ce27"/>
          <table:table-cell table:style-name="ce31"/>
          <table:table-cell table:style-name="ce17" office:value-type="float" office:value="17" calcext:value-type="float">
            <text:p>17º</text:p>
          </table:table-cell>
          <table:table-cell table:style-name="ce22"/>
          <table:table-cell table:style-name="ce27"/>
          <table:table-cell table:number-columns-repeated="2"/>
          <table:table-cell table:style-name="ce41" office:value-type="float" office:value="7" calcext:value-type="float">
            <text:p>7º</text:p>
          </table:table-cell>
          <table:table-cell table:style-name="ce43" office:value-type="string" calcext:value-type="string">
            <text:p>ALEXEI</text:p>
          </table:table-cell>
          <table:table-cell table:style-name="ce45" office:value-type="float" office:value="28" calcext:value-type="float">
            <text:p>28</text:p>
          </table:table-cell>
          <table:table-cell table:number-columns-repeated="1009"/>
        </table:table-row>
        <table:table-row table:style-name="ro2">
          <table:covered-table-cell/>
          <table:table-cell table:style-name="ce7" office:value-type="string" calcext:value-type="string">
            <text:p>幸運</text:p>
          </table:table-cell>
          <table:table-cell table:style-name="ce13"/>
          <table:table-cell table:style-name="ce17" office:value-type="float" office:value="8" calcext:value-type="float">
            <text:p>8º</text:p>
          </table:table-cell>
          <table:table-cell table:style-name="ce22"/>
          <table:table-cell table:style-name="ce27"/>
          <table:table-cell table:style-name="ce31"/>
          <table:table-cell table:style-name="ce17" office:value-type="float" office:value="18" calcext:value-type="float">
            <text:p>18º</text:p>
          </table:table-cell>
          <table:table-cell table:style-name="ce22"/>
          <table:table-cell table:style-name="ce27"/>
          <table:table-cell table:style-name="ce36" table:number-columns-repeated="2"/>
          <table:table-cell table:style-name="ce41" office:value-type="float" office:value="8" calcext:value-type="float">
            <text:p>8º</text:p>
          </table:table-cell>
          <table:table-cell table:style-name="ce43" office:value-type="string" calcext:value-type="string">
            <text:p>MATEUS</text:p>
          </table:table-cell>
          <table:table-cell table:style-name="ce45" office:value-type="float" office:value="27" calcext:value-type="float">
            <text:p>27</text:p>
          </table:table-cell>
          <table:table-cell table:style-name="ce36"/>
          <table:table-cell table:number-columns-repeated="1008"/>
        </table:table-row>
        <table:table-row table:style-name="ro2">
          <table:covered-table-cell/>
          <table:table-cell table:style-name="ce7" office:value-type="string" calcext:value-type="string">
            <text:p>Good Luck!</text:p>
          </table:table-cell>
          <table:table-cell table:style-name="ce13"/>
          <table:table-cell table:style-name="ce16" office:value-type="float" office:value="9" calcext:value-type="float">
            <text:p>9º</text:p>
          </table:table-cell>
          <table:table-cell table:style-name="ce22"/>
          <table:table-cell table:style-name="ce27"/>
          <table:table-cell table:style-name="ce31"/>
          <table:table-cell table:style-name="ce17" office:value-type="float" office:value="19" calcext:value-type="float">
            <text:p>19º</text:p>
          </table:table-cell>
          <table:table-cell table:style-name="ce22"/>
          <table:table-cell table:style-name="ce27"/>
          <table:table-cell table:style-name="ce36" table:number-columns-repeated="2"/>
          <table:table-cell table:style-name="ce41" office:value-type="float" office:value="9" calcext:value-type="float">
            <text:p>9º</text:p>
          </table:table-cell>
          <table:table-cell table:style-name="ce43" office:value-type="string" calcext:value-type="string">
            <text:p>LARA</text:p>
          </table:table-cell>
          <table:table-cell table:style-name="ce45" office:value-type="float" office:value="27" calcext:value-type="float">
            <text:p>27</text:p>
          </table:table-cell>
          <table:table-cell table:style-name="ce36"/>
          <table:table-cell table:number-columns-repeated="1008"/>
        </table:table-row>
        <table:table-row table:style-name="ro2">
          <table:covered-table-cell/>
          <table:table-cell table:style-name="ce7" office:value-type="string" calcext:value-type="string">
            <text:p>¡Suerte!</text:p>
          </table:table-cell>
          <table:table-cell table:style-name="ce13"/>
          <table:table-cell table:style-name="ce16" office:value-type="float" office:value="10" calcext:value-type="float">
            <text:p>10º</text:p>
          </table:table-cell>
          <table:table-cell table:style-name="ce22"/>
          <table:table-cell table:style-name="ce27"/>
          <table:table-cell table:style-name="ce31"/>
          <table:table-cell table:style-name="ce17" office:value-type="float" office:value="20" calcext:value-type="float">
            <text:p>20º</text:p>
          </table:table-cell>
          <table:table-cell table:style-name="ce22"/>
          <table:table-cell table:style-name="ce27"/>
          <table:table-cell table:style-name="ce36" table:number-columns-repeated="2"/>
          <table:table-cell table:style-name="ce41" office:value-type="float" office:value="10" calcext:value-type="float">
            <text:p>10º</text:p>
          </table:table-cell>
          <table:table-cell table:style-name="ce43" office:value-type="string" calcext:value-type="string">
            <text:p>ZECA</text:p>
          </table:table-cell>
          <table:table-cell table:style-name="ce45" office:value-type="float" office:value="27" calcext:value-type="float">
            <text:p>27</text:p>
          </table:table-cell>
          <table:table-cell table:style-name="ce36"/>
          <table:table-cell table:number-columns-repeated="1008"/>
        </table:table-row>
        <table:table-row table:style-name="ro2">
          <table:covered-table-cell/>
          <table:table-cell table:style-name="ce6"/>
          <table:table-cell table:style-name="ce13"/>
          <table:table-cell table:number-columns-repeated="12"/>
          <table:table-cell table:style-name="ce36"/>
          <table:table-cell table:number-columns-repeated="1008"/>
        </table:table-row>
        <table:table-row table:style-name="ro2">
          <table:covered-table-cell/>
          <table:table-cell table:style-name="ce8"/>
          <table:table-cell table:style-name="ce13"/>
          <table:table-cell table:style-name="ce18" office:value-type="string" calcext:value-type="string" table:number-columns-spanned="3" table:number-rows-spanned="1">
            <text:p>TOP BUCHAS</text:p>
          </table:table-cell>
          <table:covered-table-cell table:style-name="ce23"/>
          <table:covered-table-cell table:style-name="ce28"/>
          <table:table-cell table:style-name="ce32" office:value-type="string" calcext:value-type="string" table:number-columns-spanned="5" table:number-rows-spanned="1">
            <text:p><text:a xlink:href="#'Ranking Completo'.A1" xlink:type="simple">Ranking Completo</text:a></text:p>
          </table:table-cell>
          <table:covered-table-cell table:number-columns-repeated="4"/>
          <table:table-cell table:style-name="ce37"/>
          <table:table-cell table:style-name="ce39" office:value-type="string" calcext:value-type="string" table:number-columns-spanned="3" table:number-rows-spanned="1">
            <office:annotation draw:style-name="gr2" draw:text-style-name="P3" svg:width="239.64pt" svg:height="39.29pt" svg:x="729.5pt" svg:y="218.86pt" draw:caption-point-x="127.42pt" draw:caption-point-y="-18.34pt">
              <dc:date>2026-05-01T00:00:00</dc:date>
              <text:p text:style-name="P2">Somatório de todas as buchas em todas as edições. Critério de desempate: pior pontuação no ranking geral.</text:p>
            </office:annotation>
            <text:p>BUCHAS FOREVER</text:p>
          </table:table-cell>
          <table:covered-table-cell table:style-name="ce42"/>
          <table:covered-table-cell table:style-name="ce44"/>
          <table:table-cell table:number-columns-repeated="1009"/>
        </table:table-row>
        <table:table-row table:style-name="ro2">
          <table:covered-table-cell/>
          <table:table-cell table:style-name="ce9" office:value-type="string" calcext:value-type="string">
            <text:p>Número de Participantes: </text:p>
          </table:table-cell>
          <table:table-cell table:style-name="ce13"/>
          <table:table-cell table:style-name="ce19" office:value-type="float" office:value="1" calcext:value-type="float">
            <text:p>1º</text:p>
          </table:table-cell>
          <table:table-cell table:style-name="ce24"/>
          <table:table-cell table:style-name="ce29"/>
          <table:table-cell table:style-name="ce32" office:value-type="string" calcext:value-type="string" table:number-columns-spanned="5" table:number-rows-spanned="1">
            <text:p><text:a xlink:href="#'Rk Histórico'.A1" xlink:type="simple">Ranking Histórico</text:a></text:p>
          </table:table-cell>
          <table:covered-table-cell table:number-columns-repeated="4"/>
          <table:table-cell table:style-name="ce37"/>
          <table:table-cell table:style-name="ce40" office:value-type="float" office:value="1" calcext:value-type="float">
            <text:p>1º</text:p>
          </table:table-cell>
          <table:table-cell table:style-name="ce43" office:value-type="string" calcext:value-type="string">
            <text:p>ARTUR</text:p>
          </table:table-cell>
          <table:table-cell table:style-name="ce45" office:value-type="float" office:value="44" calcext:value-type="float">
            <text:p>44</text:p>
          </table:table-cell>
          <table:table-cell table:number-columns-repeated="1009"/>
        </table:table-row>
        <table:table-row table:style-name="ro2">
          <table:covered-table-cell/>
          <table:table-cell table:style-name="ce9" office:value-type="string" calcext:value-type="string">
            <text:p>Valor da Aposta: 50,00</text:p>
          </table:table-cell>
          <table:table-cell table:style-name="ce13"/>
          <table:table-cell table:style-name="ce20" office:value-type="float" office:value="2" calcext:value-type="float">
            <text:p>2º</text:p>
          </table:table-cell>
          <table:table-cell table:style-name="ce25"/>
          <table:table-cell table:style-name="ce30"/>
          <table:table-cell table:style-name="ce32" office:value-type="string" calcext:value-type="string" table:number-columns-spanned="5" table:number-rows-spanned="1">
            <text:p><text:a xlink:href="#Regras.A1" xlink:type="simple">Regras</text:a></text:p>
          </table:table-cell>
          <table:covered-table-cell table:number-columns-repeated="4"/>
          <table:table-cell table:style-name="ce37"/>
          <table:table-cell table:style-name="ce41" office:value-type="float" office:value="2" calcext:value-type="float">
            <text:p>2º</text:p>
          </table:table-cell>
          <table:table-cell table:style-name="ce43" office:value-type="string" calcext:value-type="string">
            <text:p>MARÍLIA</text:p>
          </table:table-cell>
          <table:table-cell table:style-name="ce45" office:value-type="float" office:value="35" calcext:value-type="float">
            <text:p>35</text:p>
          </table:table-cell>
          <table:table-cell table:number-columns-repeated="1009"/>
        </table:table-row>
        <table:table-row table:style-name="ro2">
          <table:table-cell table:style-name="ce3" table:number-columns-spanned="1" table:number-rows-spanned="4"/>
          <table:table-cell table:style-name="ce9" office:value-type="string" calcext:value-type="string">
            <text:p>Total do Bolão:</text:p>
          </table:table-cell>
          <table:table-cell table:style-name="ce13"/>
          <table:table-cell table:style-name="ce20" office:value-type="float" office:value="3" calcext:value-type="float">
            <text:p>3º</text:p>
          </table:table-cell>
          <table:table-cell table:style-name="ce25"/>
          <table:table-cell table:style-name="ce30"/>
          <table:table-cell table:style-name="ce32" office:value-type="string" calcext:value-type="string" table:number-columns-spanned="5" table:number-rows-spanned="1">
            <text:p><text:a xlink:href="#'Resultados Oficiais'.A1" xlink:type="simple">Resultados oficiais</text:a></text:p>
          </table:table-cell>
          <table:covered-table-cell table:number-columns-repeated="4"/>
          <table:table-cell table:style-name="ce37"/>
          <table:table-cell table:style-name="ce41" office:value-type="float" office:value="3" calcext:value-type="float">
            <text:p>3º</text:p>
          </table:table-cell>
          <table:table-cell table:style-name="ce43" office:value-type="string" calcext:value-type="string">
            <text:p>PABLO</text:p>
          </table:table-cell>
          <table:table-cell table:style-name="ce45" office:value-type="float" office:value="33" calcext:value-type="float">
            <text:p>33</text:p>
          </table:table-cell>
          <table:table-cell table:number-columns-repeated="1009"/>
        </table:table-row>
        <table:table-row table:style-name="ro2">
          <table:covered-table-cell/>
          <table:table-cell table:style-name="ce10" office:value-type="string" calcext:value-type="string" table:number-columns-spanned="1" table:number-rows-spanned="2">
            <text:p>Prêmio ao campeão em 2022: R$ 1100</text:p>
          </table:table-cell>
          <table:table-cell table:style-name="ce13"/>
          <table:table-cell table:style-name="ce20" office:value-type="float" office:value="4" calcext:value-type="float">
            <text:p>4º</text:p>
          </table:table-cell>
          <table:table-cell table:style-name="ce25"/>
          <table:table-cell table:style-name="ce30"/>
          <table:table-cell table:style-name="ce33" office:value-type="string" calcext:value-type="string" table:number-columns-spanned="5" table:number-rows-spanned="1">
            <text:p>Palpitômetro</text:p>
          </table:table-cell>
          <table:covered-table-cell table:number-columns-repeated="4"/>
          <table:table-cell table:style-name="ce38"/>
          <table:table-cell table:style-name="ce41" office:value-type="float" office:value="4" calcext:value-type="float">
            <text:p>4º</text:p>
          </table:table-cell>
          <table:table-cell table:style-name="ce43" office:value-type="string" calcext:value-type="string">
            <text:p>MATEUS</text:p>
          </table:table-cell>
          <table:table-cell table:style-name="ce45" office:value-type="float" office:value="32" calcext:value-type="float">
            <text:p>32</text:p>
          </table:table-cell>
          <table:table-cell table:style-name="ce36"/>
          <table:table-cell table:number-columns-repeated="1008"/>
        </table:table-row>
        <table:table-row table:style-name="ro2">
          <table:covered-table-cell table:number-columns-repeated="2"/>
          <table:table-cell table:style-name="ce13"/>
          <table:table-cell table:style-name="ce20" office:value-type="float" office:value="5" calcext:value-type="float">
            <text:p>5º</text:p>
          </table:table-cell>
          <table:table-cell table:style-name="ce25"/>
          <table:table-cell table:style-name="ce30"/>
          <table:table-cell table:style-name="ce33" office:value-type="string" calcext:value-type="string" table:number-columns-spanned="5" table:number-rows-spanned="1">
            <text:p>Crônicas</text:p>
          </table:table-cell>
          <table:covered-table-cell table:number-columns-repeated="4"/>
          <table:table-cell table:style-name="ce38"/>
          <table:table-cell table:style-name="ce41" office:value-type="float" office:value="5" calcext:value-type="float">
            <text:p>5º</text:p>
          </table:table-cell>
          <table:table-cell table:style-name="ce43" office:value-type="string" calcext:value-type="string">
            <text:p>FELIPE LERMEN</text:p>
          </table:table-cell>
          <table:table-cell table:style-name="ce45" office:value-type="float" office:value="31" calcext:value-type="float">
            <text:p>31</text:p>
          </table:table-cell>
          <table:table-cell table:style-name="ce36"/>
          <table:table-cell table:number-columns-repeated="1008"/>
        </table:table-row>
        <table:table-row table:style-name="ro2">
          <table:covered-table-cell>
            <draw:frame table:end-cell-address="'BOLÃO 2026'.B23" table:end-x="11pt" table:end-y="8.96pt" draw:z-index="1" draw:name="image4.png" draw:style-name="gr1" draw:text-style-name="P1" svg:width="195.73pt" svg:height="71.97pt" svg:x="0pt" svg:y="3pt">
              <draw:image xlink:href="Pictures/10000201000001030000005CF078519BCC55B6FB.png" xlink:type="simple" xlink:show="embed" xlink:actuate="onLoad">
                <text:p/>
              </draw:image>
            </draw:frame>
          </table:covered-table-cell>
          <table:table-cell table:style-name="ce11"/>
          <table:table-cell table:style-name="ce13"/>
          <table:table-cell table:style-name="ce20" office:value-type="float" office:value="6" calcext:value-type="float">
            <text:p>6º</text:p>
          </table:table-cell>
          <table:table-cell table:style-name="ce25"/>
          <table:table-cell table:style-name="ce30"/>
          <table:table-cell table:number-columns-repeated="6"/>
          <table:table-cell table:style-name="ce41" office:value-type="float" office:value="6" calcext:value-type="float">
            <text:p>6º</text:p>
          </table:table-cell>
          <table:table-cell table:style-name="ce43" office:value-type="string" calcext:value-type="string">
            <text:p>MAÍRA</text:p>
          </table:table-cell>
          <table:table-cell table:style-name="ce45" office:value-type="float" office:value="31" calcext:value-type="float">
            <text:p>31</text:p>
          </table:table-cell>
          <table:table-cell table:style-name="ce36"/>
          <table:table-cell table:number-columns-repeated="1008"/>
        </table:table-row>
        <table:table-row table:style-name="ro2">
          <table:table-cell table:style-name="ce4"/>
          <table:table-cell table:style-name="ce11"/>
          <table:table-cell table:style-name="ce13"/>
          <table:table-cell table:style-name="ce20" office:value-type="float" office:value="7" calcext:value-type="float">
            <text:p>7º</text:p>
          </table:table-cell>
          <table:table-cell table:style-name="ce25"/>
          <table:table-cell table:style-name="ce30"/>
          <table:table-cell table:number-columns-repeated="2"/>
          <table:table-cell table:style-name="ce34"/>
          <table:table-cell table:number-columns-repeated="3"/>
          <table:table-cell table:style-name="ce41" office:value-type="float" office:value="7" calcext:value-type="float">
            <text:p>7º</text:p>
          </table:table-cell>
          <table:table-cell table:style-name="ce43" office:value-type="string" calcext:value-type="string">
            <text:p>RODRIGO LUCE</text:p>
          </table:table-cell>
          <table:table-cell table:style-name="ce45" office:value-type="float" office:value="31" calcext:value-type="float">
            <text:p>31</text:p>
          </table:table-cell>
          <table:table-cell table:style-name="ce36"/>
          <table:table-cell table:number-columns-repeated="1008"/>
        </table:table-row>
        <table:table-row table:style-name="ro2">
          <table:table-cell table:style-name="ce4"/>
          <table:table-cell table:style-name="ce11"/>
          <table:table-cell table:style-name="ce13"/>
          <table:table-cell table:style-name="ce20" office:value-type="float" office:value="8" calcext:value-type="float">
            <text:p>8º</text:p>
          </table:table-cell>
          <table:table-cell table:style-name="ce25"/>
          <table:table-cell table:style-name="ce30"/>
          <table:table-cell table:number-columns-repeated="2"/>
          <table:table-cell table:style-name="ce34"/>
          <table:table-cell table:number-columns-repeated="3"/>
          <table:table-cell table:style-name="ce41" office:value-type="float" office:value="8" calcext:value-type="float">
            <text:p>8º</text:p>
          </table:table-cell>
          <table:table-cell table:style-name="ce43" office:value-type="string" calcext:value-type="string">
            <text:p>BRUNO E CLARISSA</text:p>
          </table:table-cell>
          <table:table-cell table:style-name="ce45" office:value-type="float" office:value="30" calcext:value-type="float">
            <text:p>30</text:p>
          </table:table-cell>
          <table:table-cell table:style-name="ce36"/>
          <table:table-cell table:number-columns-repeated="1008"/>
        </table:table-row>
        <table:table-row table:style-name="ro2">
          <table:table-cell table:style-name="ce4"/>
          <table:table-cell table:style-name="ce11"/>
          <table:table-cell table:style-name="ce13"/>
          <table:table-cell table:style-name="ce20" office:value-type="float" office:value="9" calcext:value-type="float">
            <text:p>9º</text:p>
          </table:table-cell>
          <table:table-cell table:style-name="ce25"/>
          <table:table-cell table:style-name="ce30"/>
          <table:table-cell table:number-columns-repeated="2"/>
          <table:table-cell table:style-name="ce34"/>
          <table:table-cell table:number-columns-repeated="3"/>
          <table:table-cell table:style-name="ce41" office:value-type="float" office:value="9" calcext:value-type="float">
            <text:p>9º</text:p>
          </table:table-cell>
          <table:table-cell table:style-name="ce43" office:value-type="string" calcext:value-type="string">
            <text:p>IURI</text:p>
          </table:table-cell>
          <table:table-cell table:style-name="ce45" office:value-type="float" office:value="29" calcext:value-type="float">
            <text:p>29</text:p>
          </table:table-cell>
          <table:table-cell table:style-name="ce36"/>
          <table:table-cell table:number-columns-repeated="1008"/>
        </table:table-row>
        <table:table-row table:style-name="ro2">
          <table:table-cell table:style-name="ce4"/>
          <table:table-cell table:style-name="ce11"/>
          <table:table-cell table:style-name="ce13"/>
          <table:table-cell table:style-name="ce20" office:value-type="float" office:value="10" calcext:value-type="float">
            <text:p>10º</text:p>
          </table:table-cell>
          <table:table-cell table:style-name="ce25"/>
          <table:table-cell table:style-name="ce30"/>
          <table:table-cell table:number-columns-repeated="2"/>
          <table:table-cell table:style-name="ce34"/>
          <table:table-cell table:number-columns-repeated="3"/>
          <table:table-cell table:style-name="ce41" office:value-type="float" office:value="10" calcext:value-type="float">
            <text:p>10º</text:p>
          </table:table-cell>
          <table:table-cell table:style-name="ce43" office:value-type="string" calcext:value-type="string">
            <text:p>DENISE</text:p>
          </table:table-cell>
          <table:table-cell table:style-name="ce45" office:value-type="float" office:value="28" calcext:value-type="float">
            <text:p>28</text:p>
          </table:table-cell>
          <table:table-cell table:style-name="ce36"/>
          <table:table-cell table:number-columns-repeated="1008"/>
        </table:table-row>
        <table:table-row table:style-name="ro3" table:number-rows-repeated="1048552">
          <table:table-cell table:number-columns-repeated="1024"/>
        </table:table-row>
        <table:table-row table:style-name="ro3">
          <table:table-cell table:number-columns-repeated="1024"/>
        </table:table-row>
      </table:table>
      <table:table table:name="Regras" table:style-name="ta2">
        <table:table-column table:style-name="co14" table:default-cell-style-name="Default"/>
        <table:table-column table:style-name="co15" table:default-cell-style-name="Default"/>
        <table:table-column table:style-name="co16" table:default-cell-style-name="Default"/>
        <table:table-column table:style-name="co17" table:number-columns-repeated="7" table:default-cell-style-name="Default"/>
        <table:table-column table:style-name="co18" table:default-cell-style-name="Default"/>
        <table:table-column table:style-name="co13" table:number-columns-repeated="1013" table:default-cell-style-name="Default"/>
        <table:table-row table:style-name="ro4">
          <table:table-cell table:style-name="ce46">
            <draw:frame table:end-cell-address="Regras.A15" table:end-x="24.72pt" table:end-y="21.71pt" draw:z-index="1" draw:name="image2.png" draw:style-name="gr1" draw:text-style-name="P1" svg:width="24.72pt" svg:height="226.46pt" svg:x="0pt" svg:y="0pt">
              <draw:image xlink:href="Pictures/100002010000003900000168148968CF9A392033.png" xlink:type="simple" xlink:show="embed" xlink:actuate="onLoad">
                <text:p/>
              </draw:image>
            </draw:frame>
          </table:table-cell>
          <table:table-cell table:style-name="ce50" office:value-type="string" calcext:value-type="string">
            <text:p>REGRAS GERAIS</text:p>
          </table:table-cell>
          <table:table-cell table:style-name="ce59" table:number-columns-repeated="9"/>
          <table:table-cell table:number-columns-repeated="1013"/>
        </table:table-row>
        <table:table-row table:style-name="ro4">
          <table:table-cell table:style-name="ce46"/>
          <table:table-cell table:style-name="ce51" office:value-type="string" calcext:value-type="string" table:number-columns-spanned="10" table:number-rows-spanned="6">
            <text:p><text:span text:style-name="T1">- As apostas poderão ser realizadas nos prazos pré-estabelecidos e somente via esta planilha.</text:span></text:p>
            <text:p><text:span text:style-name="T1">- Cada apostador terá acesso apenas a sua "aba", que será bloqueada para alterações após o prazo final de apostas.</text:span></text:p>
            <text:p><text:span text:style-name="T1">- Critério de desempate para o Ranking Geral: nº de buchas, nº de super buchas, melhor colocação na 1ª fase.</text:span></text:p>
            <text:p><text:span text:style-name="T1">- Critério de desempate para o Ranking de Buchas: número de super buchas, pior colocação no ranking geral.</text:span></text:p>
            <text:p><text:span text:style-name="T2">- Jogos não palpitados ficarão como </text:span><text:span text:style-name="T3">resultado padrão 0x0</text:span><text:span text:style-name="T4">,</text:span><text:span text:style-name="T5"> pontuando conforme as regras normais. </text:span></text:p>
            <text:p><text:span text:style-name="T1">- Nas fases mata-mata (oitavas de final em diante), as apostas se referem aos 90 minutos + eventual prorrogação de 30 min (aos 120 minutos, portanto). </text:span></text:p>
            <text:p><text:span text:style-name="T1">- Todos poderão apostar na disputa de pênaltis, mesmo se apontar um vencedor nos 120 minutos: será uma pontuação EXTRA. </text:span></text:p>
          </table:table-cell>
          <table:covered-table-cell table:number-columns-repeated="9"/>
          <table:table-cell table:number-columns-repeated="1013"/>
        </table:table-row>
        <table:table-row table:style-name="ro4">
          <table:table-cell table:style-name="ce46"/>
          <table:covered-table-cell table:number-columns-repeated="10"/>
          <table:table-cell table:number-columns-repeated="1013"/>
        </table:table-row>
        <table:table-row table:style-name="ro4">
          <table:table-cell table:style-name="ce47"/>
          <table:covered-table-cell table:number-columns-repeated="10"/>
          <table:table-cell table:number-columns-repeated="1013"/>
        </table:table-row>
        <table:table-row table:style-name="ro4">
          <table:table-cell table:style-name="ce47"/>
          <table:covered-table-cell table:number-columns-repeated="10"/>
          <table:table-cell table:number-columns-repeated="1013"/>
        </table:table-row>
        <table:table-row table:style-name="ro4">
          <table:table-cell/>
          <table:covered-table-cell table:number-columns-repeated="10"/>
          <table:table-cell table:number-columns-repeated="1013"/>
        </table:table-row>
        <table:table-row table:style-name="ro4">
          <table:table-cell/>
          <table:covered-table-cell table:number-columns-repeated="10"/>
          <table:table-cell table:number-columns-repeated="1013"/>
        </table:table-row>
        <table:table-row table:style-name="ro5">
          <table:table-cell/>
          <table:table-cell table:style-name="ce52"/>
          <table:table-cell table:style-name="ce46" table:number-columns-repeated="9"/>
          <table:table-cell table:number-columns-repeated="1013"/>
        </table:table-row>
        <table:table-row table:style-name="ro4">
          <table:table-cell/>
          <table:table-cell table:style-name="ce50" office:value-type="string" calcext:value-type="string">
            <text:p>REGRAS ESPECÍFICAS</text:p>
          </table:table-cell>
          <table:table-cell table:style-name="ce60" table:number-columns-repeated="9"/>
          <table:table-cell table:number-columns-repeated="1013"/>
        </table:table-row>
        <table:table-row table:style-name="ro4">
          <table:table-cell/>
          <table:table-cell table:style-name="ce51" office:value-type="string" calcext:value-type="string" table:number-columns-spanned="10" table:number-rows-spanned="6">
            <text:p><text:span text:style-name="T1">- A aposta em QUAL SELEÇÃO SERÁ A CAMPEÃ e QUEM SERÁ O ARTILHEIRO DA COPA deve ser feita antes do primeiro jogo e serão pontuações extras ao final da Copa.</text:span></text:p>
            <text:p><text:span text:style-name="T6"> A ZEBRA indica que haverá pontuação diferenciada (</text:span><text:span text:style-name="T7">2x, 3x e 4x</text:span><text:span text:style-name="T8">) para quem apostar na VITÓRIA do time Zebra e o resultado for VITÓRIA. </text:span></text:p>
            <text:p><text:span text:style-name="T1">- Os pênaltis terão pontuação extra, independente da aposta feita no tempo de jogo. Ou seja: se o jogo for para os pênaltis, quem vence?</text:span></text:p>
            <text:p><text:span text:style-name="T1">- A "Super Bucha" ocorrerá nas situações: 1) Acertar a Bucha + Vencedor dos Pênaltis; 2) Acertar a Bucha + Zebra; 3) Acertar o Campeão do Mundo. Não pontua mais do que pontuaria conforme as regras, mas serve como critério de desempate nos rankings.</text:span></text:p>
            <text:p><text:span text:style-name="T1">- O Campeão de Buchas é um prêmio não cumulativo ao Ranking Geral. No caso de estar nas duas faixas de premiação, receberá o prêmio de maior valor. Se for como "Campeão de Buchas", abre premiação para o 21º colocado geral. Se for no Ranking Geral, o vice-campeão de buchas herdará o prêmio, respeitando as mesmas condições.</text:span></text:p>
          </table:table-cell>
          <table:covered-table-cell table:number-columns-repeated="9"/>
          <table:table-cell table:number-columns-repeated="1013"/>
        </table:table-row>
        <table:table-row table:style-name="ro4">
          <table:table-cell/>
          <table:covered-table-cell table:number-columns-repeated="10"/>
          <table:table-cell table:number-columns-repeated="1013"/>
        </table:table-row>
        <table:table-row table:style-name="ro4">
          <table:table-cell/>
          <table:covered-table-cell table:number-columns-repeated="10"/>
          <table:table-cell table:number-columns-repeated="1013"/>
        </table:table-row>
        <table:table-row table:style-name="ro4">
          <table:table-cell table:style-name="ce48"/>
          <table:covered-table-cell table:number-columns-repeated="10"/>
          <table:table-cell table:number-columns-repeated="1013"/>
        </table:table-row>
        <table:table-row table:style-name="ro4">
          <table:table-cell table:style-name="ce48"/>
          <table:covered-table-cell table:number-columns-repeated="10"/>
          <table:table-cell table:number-columns-repeated="1013"/>
        </table:table-row>
        <table:table-row table:style-name="ro6">
          <table:table-cell/>
          <table:covered-table-cell table:number-columns-repeated="10"/>
          <table:table-cell table:number-columns-repeated="1013"/>
        </table:table-row>
        <table:table-row table:style-name="ro4">
          <table:table-cell table:style-name="ce48">
            <draw:frame table:end-cell-address="Regras.A36" table:end-x="24.72pt" table:end-y="6.72pt" draw:z-index="0" draw:name="image7.png" draw:style-name="gr1" draw:text-style-name="P1" svg:width="24.72pt" svg:height="294.72pt" svg:x="0pt" svg:y="0pt">
              <draw:image xlink:href="Pictures/100002010000004500000126703547D5826A3D39.png" xlink:type="simple" xlink:show="embed" xlink:actuate="onLoad">
                <text:p/>
              </draw:image>
            </draw:frame>
          </table:table-cell>
          <table:table-cell table:style-name="ce53" office:value-type="string" calcext:value-type="string">
            <text:p>PONTUAÇÃO POR PARTIDA</text:p>
          </table:table-cell>
          <table:table-cell table:style-name="ce61" office:value-type="string" calcext:value-type="string">
            <text:p>1ª FASE</text:p>
          </table:table-cell>
          <table:table-cell table:style-name="ce61" office:value-type="string" calcext:value-type="string">
            <text:p><text:span text:style-name="T17">16 </text:span><text:span text:style-name="T18">AVOS</text:span></text:p>
          </table:table-cell>
          <table:table-cell table:style-name="ce61" office:value-type="string" calcext:value-type="string">
            <text:p>8ªs</text:p>
          </table:table-cell>
          <table:table-cell table:style-name="ce61" office:value-type="string" calcext:value-type="string">
            <text:p>4ªs</text:p>
          </table:table-cell>
          <table:table-cell table:style-name="ce61" office:value-type="string" calcext:value-type="string">
            <text:p>SEMI + 3º</text:p>
          </table:table-cell>
          <table:table-cell table:style-name="ce61" office:value-type="string" calcext:value-type="string">
            <text:p>FINAL</text:p>
          </table:table-cell>
          <table:table-cell table:number-columns-repeated="1016"/>
        </table:table-row>
        <table:table-row table:style-name="ro4">
          <table:table-cell table:style-name="ce48"/>
          <table:table-cell table:style-name="ce54" office:value-type="string" calcext:value-type="string">
            <text:p>Bucha! (ex: aposta 2x0, resultado 2x0)</text:p>
          </table:table-cell>
          <table:table-cell table:style-name="ce62" office:value-type="float" office:value="25" calcext:value-type="float">
            <text:p>25</text:p>
          </table:table-cell>
          <table:table-cell table:style-name="ce69" office:value-type="float" office:value="50" calcext:value-type="float">
            <text:p>50</text:p>
          </table:table-cell>
          <table:table-cell table:style-name="ce72" office:value-type="float" office:value="100" calcext:value-type="float">
            <text:p>100</text:p>
          </table:table-cell>
          <table:table-cell table:style-name="ce73" office:value-type="float" office:value="200" calcext:value-type="float">
            <text:p>200</text:p>
          </table:table-cell>
          <table:table-cell table:style-name="ce74" office:value-type="float" office:value="300" calcext:value-type="float">
            <text:p>300</text:p>
          </table:table-cell>
          <table:table-cell table:style-name="ce76" office:value-type="float" office:value="500" calcext:value-type="float">
            <text:p>500</text:p>
          </table:table-cell>
          <table:table-cell table:number-columns-repeated="1016"/>
        </table:table-row>
        <table:table-row table:style-name="ro4">
          <table:table-cell table:style-name="ce48"/>
          <table:table-cell table:style-name="ce54" office:value-type="string" calcext:value-type="string">
            <text:p>O Vencedor + Diferença de gols (ex: aposta 2x0, resultado 3x1) ou Empate sem bucha</text:p>
          </table:table-cell>
          <table:table-cell table:style-name="ce62" office:value-type="float" office:value="18" calcext:value-type="float">
            <text:p>18</text:p>
          </table:table-cell>
          <table:table-cell table:style-name="ce69" table:formula="of:=[.D17]*0.7" office:value-type="float" office:value="35" calcext:value-type="float">
            <text:p>35</text:p>
          </table:table-cell>
          <table:table-cell table:style-name="ce72" table:formula="of:=[.E17]*0.7" office:value-type="float" office:value="70" calcext:value-type="float">
            <text:p>70</text:p>
          </table:table-cell>
          <table:table-cell table:style-name="ce73" table:formula="of:=[.F17]*0.7" office:value-type="float" office:value="140" calcext:value-type="float">
            <text:p>140</text:p>
          </table:table-cell>
          <table:table-cell table:style-name="ce74" table:formula="of:=[.G17]*0.7" office:value-type="float" office:value="210" calcext:value-type="float">
            <text:p>210</text:p>
          </table:table-cell>
          <table:table-cell table:style-name="ce76" table:formula="of:=[.H17]*0.7" office:value-type="float" office:value="350" calcext:value-type="float">
            <text:p>350</text:p>
          </table:table-cell>
          <table:table-cell table:number-columns-repeated="1016"/>
        </table:table-row>
        <table:table-row table:style-name="ro4">
          <table:table-cell table:style-name="ce48"/>
          <table:table-cell table:style-name="ce54" office:value-type="string" calcext:value-type="string">
            <text:p>O Vencedor + Nº de gols de um time (ex: aposta 4x0, resultado 4x1)</text:p>
          </table:table-cell>
          <table:table-cell table:style-name="ce62" table:formula="of:=[.C17]*0.6" office:value-type="float" office:value="15" calcext:value-type="float">
            <text:p>15</text:p>
          </table:table-cell>
          <table:table-cell table:style-name="ce69" table:formula="of:=[.D17]*0.6" office:value-type="float" office:value="30" calcext:value-type="float">
            <text:p>30</text:p>
          </table:table-cell>
          <table:table-cell table:style-name="ce72" table:formula="of:=[.E17]*0.6" office:value-type="float" office:value="60" calcext:value-type="float">
            <text:p>60</text:p>
          </table:table-cell>
          <table:table-cell table:style-name="ce73" table:formula="of:=[.F17]*0.6" office:value-type="float" office:value="120" calcext:value-type="float">
            <text:p>120</text:p>
          </table:table-cell>
          <table:table-cell table:style-name="ce74" table:formula="of:=[.G17]*0.6" office:value-type="float" office:value="180" calcext:value-type="float">
            <text:p>180</text:p>
          </table:table-cell>
          <table:table-cell table:style-name="ce76" table:formula="of:=[.H17]*0.6" office:value-type="float" office:value="300" calcext:value-type="float">
            <text:p>300</text:p>
          </table:table-cell>
          <table:table-cell table:number-columns-repeated="1016"/>
        </table:table-row>
        <table:table-row table:style-name="ro4">
          <table:table-cell table:style-name="ce49"/>
          <table:table-cell table:style-name="ce54" office:value-type="string" calcext:value-type="string">
            <text:p>O Vencedor (ex: aposta 3x1, resultado 1x0)</text:p>
          </table:table-cell>
          <table:table-cell table:style-name="ce62" office:value-type="float" office:value="12" calcext:value-type="float">
            <text:p>12</text:p>
          </table:table-cell>
          <table:table-cell table:style-name="ce69" table:formula="of:=[.D17]*0.5" office:value-type="float" office:value="25" calcext:value-type="float">
            <text:p>25</text:p>
          </table:table-cell>
          <table:table-cell table:style-name="ce72" table:formula="of:=[.E17]*0.5" office:value-type="float" office:value="50" calcext:value-type="float">
            <text:p>50</text:p>
          </table:table-cell>
          <table:table-cell table:style-name="ce73" table:formula="of:=[.F17]*0.5" office:value-type="float" office:value="100" calcext:value-type="float">
            <text:p>100</text:p>
          </table:table-cell>
          <table:table-cell table:style-name="ce74" table:formula="of:=[.G17]*0.5" office:value-type="float" office:value="150" calcext:value-type="float">
            <text:p>150</text:p>
          </table:table-cell>
          <table:table-cell table:style-name="ce76" table:formula="of:=[.H17]*0.5" office:value-type="float" office:value="250" calcext:value-type="float">
            <text:p>250</text:p>
          </table:table-cell>
          <table:table-cell table:number-columns-repeated="1016"/>
        </table:table-row>
        <table:table-row table:style-name="ro4">
          <table:table-cell table:style-name="ce49"/>
          <table:table-cell table:style-name="ce54" office:value-type="string" calcext:value-type="string">
            <text:p>Nº de gols de um time (ex: aposta 2x0, resultado 0x0)</text:p>
          </table:table-cell>
          <table:table-cell table:style-name="ce62" table:formula="of:=[.C17]*0.2" office:value-type="float" office:value="5" calcext:value-type="float">
            <text:p>5</text:p>
          </table:table-cell>
          <table:table-cell table:style-name="ce69" table:formula="of:=[.D17]*0.2" office:value-type="float" office:value="10" calcext:value-type="float">
            <text:p>10</text:p>
          </table:table-cell>
          <table:table-cell table:style-name="ce72" table:formula="of:=[.E17]*0.2" office:value-type="float" office:value="20" calcext:value-type="float">
            <text:p>20</text:p>
          </table:table-cell>
          <table:table-cell table:style-name="ce73" table:formula="of:=[.F17]*0.2" office:value-type="float" office:value="40" calcext:value-type="float">
            <text:p>40</text:p>
          </table:table-cell>
          <table:table-cell table:style-name="ce74" table:formula="of:=[.G17]*0.2" office:value-type="float" office:value="60" calcext:value-type="float">
            <text:p>60</text:p>
          </table:table-cell>
          <table:table-cell table:style-name="ce76" table:formula="of:=[.H17]*0.2" office:value-type="float" office:value="100" calcext:value-type="float">
            <text:p>100</text:p>
          </table:table-cell>
          <table:table-cell table:number-columns-repeated="1016"/>
        </table:table-row>
        <table:table-row table:style-name="ro4">
          <table:table-cell table:style-name="ce49"/>
          <table:table-cell table:style-name="ce54" office:value-type="string" calcext:value-type="string">
            <text:p>Acertar o vencedor dos pênaltis</text:p>
          </table:table-cell>
          <table:table-cell table:style-name="ce62" office:value-type="string" calcext:value-type="string">
            <text:p>-</text:p>
          </table:table-cell>
          <table:table-cell table:style-name="ce69" office:value-type="float" office:value="25" calcext:value-type="float">
            <text:p>25</text:p>
          </table:table-cell>
          <table:table-cell table:style-name="ce72" office:value-type="float" office:value="50" calcext:value-type="float">
            <text:p>50</text:p>
          </table:table-cell>
          <table:table-cell table:style-name="ce73" office:value-type="float" office:value="100" calcext:value-type="float">
            <text:p>100</text:p>
          </table:table-cell>
          <table:table-cell table:style-name="ce74" office:value-type="float" office:value="150" calcext:value-type="float">
            <text:p>150</text:p>
          </table:table-cell>
          <table:table-cell table:style-name="ce76" office:value-type="float" office:value="250" calcext:value-type="float">
            <text:p>250</text:p>
          </table:table-cell>
          <table:table-cell table:style-name="ce77" table:number-columns-spanned="2" table:number-rows-spanned="1"/>
          <table:covered-table-cell/>
          <table:table-cell table:number-columns-repeated="1014"/>
        </table:table-row>
        <table:table-row table:style-name="ro4">
          <table:table-cell table:style-name="ce49"/>
          <table:table-cell table:style-name="ce54" office:value-type="string" calcext:value-type="string">
            <text:p>Acertar o ARTILHEIRO da Copa</text:p>
          </table:table-cell>
          <table:table-cell table:style-name="ce62" office:value-type="string" calcext:value-type="string">
            <text:p>-</text:p>
          </table:table-cell>
          <table:table-cell table:style-name="ce69" office:value-type="string" calcext:value-type="string">
            <text:p>-</text:p>
          </table:table-cell>
          <table:table-cell table:style-name="ce72" office:value-type="string" calcext:value-type="string">
            <text:p>-</text:p>
          </table:table-cell>
          <table:table-cell table:style-name="ce73" office:value-type="string" calcext:value-type="string">
            <text:p>-</text:p>
          </table:table-cell>
          <table:table-cell table:style-name="ce74" office:value-type="string" calcext:value-type="string">
            <text:p>-</text:p>
          </table:table-cell>
          <table:table-cell table:style-name="ce76" office:value-type="float" office:value="150" calcext:value-type="float">
            <text:p>150</text:p>
          </table:table-cell>
          <table:table-cell table:style-name="ce77" office:value-type="string" calcext:value-type="string" table:number-columns-spanned="2" table:number-rows-spanned="1">
            <text:p>PONTUAÇÃO</text:p>
          </table:table-cell>
          <table:covered-table-cell/>
          <table:table-cell table:number-columns-repeated="1014"/>
        </table:table-row>
        <table:table-row table:style-name="ro7">
          <table:table-cell table:style-name="ce49"/>
          <table:table-cell table:style-name="ce54" office:value-type="string" calcext:value-type="string">
            <text:p>Acertar a SELEÇÃO CAMPEÃ DO MUNDO</text:p>
          </table:table-cell>
          <table:table-cell table:style-name="ce62" office:value-type="string" calcext:value-type="string">
            <text:p>-</text:p>
          </table:table-cell>
          <table:table-cell table:style-name="ce69" office:value-type="string" calcext:value-type="string">
            <text:p>-</text:p>
          </table:table-cell>
          <table:table-cell table:style-name="ce72" office:value-type="string" calcext:value-type="string">
            <text:p>-</text:p>
          </table:table-cell>
          <table:table-cell table:style-name="ce73" office:value-type="string" calcext:value-type="string">
            <text:p>-</text:p>
          </table:table-cell>
          <table:table-cell table:style-name="ce74" office:value-type="string" calcext:value-type="string">
            <text:p>-</text:p>
          </table:table-cell>
          <table:table-cell table:style-name="ce76" office:value-type="float" office:value="300" calcext:value-type="float">
            <text:p>300</text:p>
          </table:table-cell>
          <table:table-cell table:style-name="ce77" office:value-type="string" calcext:value-type="string" table:number-columns-spanned="2" table:number-rows-spanned="1">
            <text:p>MÁXIMA</text:p>
          </table:table-cell>
          <table:covered-table-cell/>
          <table:table-cell table:style-name="ce82"/>
          <table:table-cell table:number-columns-repeated="1013"/>
        </table:table-row>
        <table:table-row table:style-name="ro7">
          <table:table-cell table:style-name="ce49"/>
          <table:table-cell table:style-name="ce55" office:value-type="string" calcext:value-type="string">
            <text:p>Máximo da Pontuação Possível</text:p>
          </table:table-cell>
          <table:table-cell table:style-name="ce63" table:formula="of:=[.C17]*72" office:value-type="float" office:value="1800" calcext:value-type="float">
            <text:p>1800</text:p>
          </table:table-cell>
          <table:table-cell table:style-name="ce70" table:formula="of:=([.D17]+[.D22])*16" office:value-type="float" office:value="1200" calcext:value-type="float">
            <text:p>1200</text:p>
          </table:table-cell>
          <table:table-cell table:style-name="ce70" table:formula="of:=([.E17]+[.E22])*8" office:value-type="float" office:value="1200" calcext:value-type="float">
            <text:p>1200</text:p>
          </table:table-cell>
          <table:table-cell table:style-name="ce70" table:formula="of:=([.F17]+[.F22])*4" office:value-type="float" office:value="1200" calcext:value-type="float">
            <text:p>1200</text:p>
          </table:table-cell>
          <table:table-cell table:style-name="ce75" table:formula="of:=([.G17]+[.G22])*3" office:value-type="float" office:value="1350" calcext:value-type="float">
            <text:p>1350</text:p>
          </table:table-cell>
          <table:table-cell table:style-name="ce75" table:formula="of:=([.H17]+[.H22]+[.H23]+[.H24])" office:value-type="float" office:value="1200" calcext:value-type="float">
            <text:p>1200</text:p>
          </table:table-cell>
          <table:table-cell table:style-name="ce78" table:formula="of:=SUM([.C25:.H25])+SUM([.C26:.H26])" office:value-type="float" office:value="8550" calcext:value-type="float" table:number-columns-spanned="2" table:number-rows-spanned="2">
            <text:p>8550</text:p>
          </table:table-cell>
          <table:covered-table-cell table:style-name="ce80"/>
          <table:table-cell table:style-name="ce82"/>
          <table:table-cell table:number-columns-repeated="1013"/>
        </table:table-row>
        <table:table-row table:style-name="ro7">
          <table:table-cell table:style-name="ce49"/>
          <table:table-cell table:style-name="ce55" office:value-type="string" calcext:value-type="string">
            <text:p>Máximo de Pontuação Extra em Zebras </text:p>
          </table:table-cell>
          <table:table-cell table:style-name="ce63" office:value-type="float" office:value="600" calcext:value-type="float">
            <text:p>600</text:p>
          </table:table-cell>
          <table:table-cell table:number-columns-repeated="3" table:style-name="ce70" office:value-type="string" calcext:value-type="string">
            <text:p>?</text:p>
          </table:table-cell>
          <table:table-cell table:number-columns-repeated="2" table:style-name="ce75" office:value-type="string" calcext:value-type="string">
            <text:p>?</text:p>
          </table:table-cell>
          <table:covered-table-cell table:style-name="ce79"/>
          <table:covered-table-cell table:style-name="ce81"/>
          <table:table-cell table:style-name="ce82"/>
          <table:table-cell table:number-columns-repeated="1013"/>
        </table:table-row>
        <table:table-row table:style-name="ro8">
          <table:table-cell table:style-name="ce49"/>
          <table:table-cell table:style-name="ce56" office:value-type="string" calcext:value-type="string">
            <text:p>Porcentagem em disputa (sem zebras)</text:p>
          </table:table-cell>
          <table:table-cell table:style-name="ce64" table:formula="of:=(([.C25])/(SUM([.$C$25:.$H$25])))" office:value-type="percentage" office:value="0.226415094339623" calcext:value-type="percentage">
            <text:p>22.64%</text:p>
          </table:table-cell>
          <table:table-cell table:style-name="ce64" table:formula="of:=(([.D25])/(SUM([.$C$25:.$H$25])))" office:value-type="percentage" office:value="0.150943396226415" calcext:value-type="percentage">
            <text:p>15.09%</text:p>
          </table:table-cell>
          <table:table-cell table:style-name="ce64" table:formula="of:=(([.E25])/(SUM([.$C$25:.$H$25])))" office:value-type="percentage" office:value="0.150943396226415" calcext:value-type="percentage">
            <text:p>15.09%</text:p>
          </table:table-cell>
          <table:table-cell table:style-name="ce64" table:formula="of:=(([.F25])/(SUM([.$C$25:.$H$25])))" office:value-type="percentage" office:value="0.150943396226415" calcext:value-type="percentage">
            <text:p>15.09%</text:p>
          </table:table-cell>
          <table:table-cell table:style-name="ce64" table:formula="of:=(([.G25])/(SUM([.$C$25:.$H$25])))" office:value-type="percentage" office:value="0.169811320754717" calcext:value-type="percentage">
            <text:p>16.98%</text:p>
          </table:table-cell>
          <table:table-cell table:style-name="ce64" table:formula="of:=(([.H25])/(SUM([.$C$25:.$H$25])))" office:value-type="percentage" office:value="0.150943396226415" calcext:value-type="percentage">
            <text:p>15.09%</text:p>
          </table:table-cell>
          <table:table-cell/>
          <table:table-cell table:style-name="ce82" table:number-columns-repeated="2"/>
          <table:table-cell table:number-columns-repeated="1013"/>
        </table:table-row>
        <table:table-row table:style-name="ro4">
          <table:table-cell table:style-name="ce49"/>
          <table:table-cell table:style-name="ce57" office:value-type="string" calcext:value-type="string">
            <text:p>PRAZOS PARA APOSTAS</text:p>
          </table:table-cell>
          <table:table-cell table:style-name="ce65" table:number-columns-repeated="9"/>
          <table:table-cell table:number-columns-repeated="1013"/>
        </table:table-row>
        <table:table-row table:style-name="ro4">
          <table:table-cell table:style-name="ce49"/>
          <table:table-cell table:style-name="ce58" office:value-type="string" calcext:value-type="string">
            <text:p><text:span text:style-name="T9">PRIMEIRA FASE e CAMPEÃO DO MUNDO: até às </text:span><text:span text:style-name="T10">20h do dia 09/06. A copa inicia em 11/06.</text:span></text:p>
          </table:table-cell>
          <table:table-cell table:style-name="ce66"/>
          <table:table-cell/>
          <table:table-cell table:style-name="ce67" table:number-columns-repeated="7"/>
          <table:table-cell table:number-columns-repeated="1013"/>
        </table:table-row>
        <table:table-row table:style-name="ro4">
          <table:table-cell table:style-name="ce49"/>
          <table:table-cell table:style-name="ce58" office:value-type="string" calcext:value-type="string">
            <text:p><text:span text:style-name="T9">DEZESSEIS AVOS DE FINAL: até às </text:span><text:span text:style-name="T10">0h do dia 29/06. A fase inicia em 29/06.</text:span></text:p>
          </table:table-cell>
          <table:table-cell table:style-name="ce67"/>
          <table:table-cell table:number-columns-repeated="2"/>
          <table:table-cell table:style-name="ce67" table:number-columns-repeated="6"/>
          <table:table-cell table:number-columns-repeated="1013"/>
        </table:table-row>
        <table:table-row table:style-name="ro4">
          <table:table-cell table:style-name="ce49"/>
          <table:table-cell table:style-name="ce58" office:value-type="string" calcext:value-type="string">
            <text:p><text:span text:style-name="T9">OITAVAS DE FINAL: até </text:span><text:span text:style-name="T10">0h do dia 04/07. A fase inicia em 04/07.</text:span></text:p>
          </table:table-cell>
          <table:table-cell table:style-name="ce67"/>
          <table:table-cell table:number-columns-repeated="2"/>
          <table:table-cell table:style-name="ce68" table:number-columns-repeated="3"/>
          <table:table-cell table:style-name="ce67" table:number-columns-repeated="3"/>
          <table:table-cell table:number-columns-repeated="1013"/>
        </table:table-row>
        <table:table-row table:style-name="ro4">
          <table:table-cell table:style-name="ce49"/>
          <table:table-cell table:style-name="ce58" office:value-type="string" calcext:value-type="string">
            <text:p><text:span text:style-name="T11">QUARTAS DE FINAL: até às</text:span><text:span text:style-name="T12"> </text:span><text:span text:style-name="T13">20h do dia 08 de julho. A fase inicia em 09/07.</text:span></text:p>
          </table:table-cell>
          <table:table-cell table:style-name="ce68"/>
          <table:table-cell table:style-name="ce71"/>
          <table:table-cell table:style-name="ce68"/>
          <table:table-cell table:style-name="ce67" table:number-columns-repeated="6"/>
          <table:table-cell table:number-columns-repeated="1013"/>
        </table:table-row>
        <table:table-row table:style-name="ro4">
          <table:table-cell table:style-name="ce49"/>
          <table:table-cell table:style-name="ce58" office:value-type="string" calcext:value-type="string">
            <text:p><text:span text:style-name="T14">SEMIFINAIS: até às</text:span><text:span text:style-name="T15"> </text:span><text:span text:style-name="T16">20h do dia 13/07. A fase inicia em 14/07.</text:span></text:p>
          </table:table-cell>
          <table:table-cell table:style-name="ce67" table:number-columns-repeated="9"/>
          <table:table-cell table:number-columns-repeated="1013"/>
        </table:table-row>
        <table:table-row table:style-name="ro4">
          <table:table-cell table:style-name="ce49"/>
          <table:table-cell table:style-name="ce58" office:value-type="string" calcext:value-type="string">
            <text:p><text:span text:style-name="T9">DISPUTA DO TERCEIRO LUGAR E FINAL: até às </text:span><text:span text:style-name="T10">20h do dia 17/07. Fase inicia em 18/07.</text:span></text:p>
          </table:table-cell>
          <table:table-cell table:style-name="ce67"/>
          <table:table-cell table:number-columns-repeated="2"/>
          <table:table-cell table:style-name="ce67" table:number-columns-repeated="6"/>
          <table:table-cell table:number-columns-repeated="1013"/>
        </table:table-row>
        <table:table-row table:style-name="ro3" table:number-rows-repeated="1048541">
          <table:table-cell table:number-columns-repeated="1024"/>
        </table:table-row>
        <table:table-row table:style-name="ro3">
          <table:table-cell table:number-columns-repeated="1024"/>
        </table:table-row>
        <calcext:conditional-formats>
          <calcext:conditional-format calcext:target-range-address="Regras.C1:Regras.K1">
            <calcext:condition calcext:apply-style-name="ConditionalStyle_1" calcext:value="formula-is(LEN(TRIM([.C1]))&gt;0)" calcext:base-cell-address="Regras.C1"/>
          </calcext:conditional-format>
        </calcext:conditional-formats>
      </table:table>
      <table:table table:name="Ranking Completo" table:style-name="ta3">
        <table:table-column table:style-name="co19" table:default-cell-style-name="Default"/>
        <table:table-column table:style-name="co20" table:default-cell-style-name="Default"/>
        <table:table-column table:style-name="co5" table:default-cell-style-name="Default"/>
        <table:table-column table:style-name="co8" table:default-cell-style-name="Default"/>
        <table:table-column table:style-name="co4" table:default-cell-style-name="Default"/>
        <table:table-column table:style-name="co21" table:default-cell-style-name="Default"/>
        <table:table-column table:style-name="co20" table:default-cell-style-name="Default"/>
        <table:table-column table:style-name="co22" table:default-cell-style-name="Default"/>
        <table:table-column table:style-name="co8" table:default-cell-style-name="Default"/>
        <table:table-column table:style-name="co4" table:default-cell-style-name="Default"/>
        <table:table-column table:style-name="co20" table:default-cell-style-name="Default"/>
        <table:table-column table:style-name="co22" table:default-cell-style-name="Default"/>
        <table:table-column table:style-name="co8" table:default-cell-style-name="Default"/>
        <table:table-column table:style-name="co4" table:default-cell-style-name="Default"/>
        <table:table-column table:style-name="co20" table:default-cell-style-name="Default"/>
        <table:table-column table:style-name="co22" table:default-cell-style-name="Default"/>
        <table:table-column table:style-name="co8" table:default-cell-style-name="Default"/>
        <table:table-column table:style-name="co4" table:default-cell-style-name="Default"/>
        <table:table-column table:style-name="co7" table:default-cell-style-name="Default"/>
        <table:table-column table:style-name="co4" table:default-cell-style-name="Default"/>
        <table:table-column table:style-name="co5" table:default-cell-style-name="Default"/>
        <table:table-column table:style-name="co8" table:default-cell-style-name="Default"/>
        <table:table-column table:style-name="co4" table:default-cell-style-name="Default"/>
        <table:table-column table:style-name="co23" table:default-cell-style-name="Default"/>
        <table:table-column table:style-name="co13" table:number-columns-repeated="1000" table:default-cell-style-name="Default"/>
        <table:table-row table:style-name="ro9">
          <table:table-cell table:style-name="ce12"/>
          <table:table-cell table:style-name="ce84" office:value-type="string" calcext:value-type="string" table:number-columns-spanned="2" table:number-rows-spanned="1">
            <text:p><text:s text:c="16"/>TOP 20</text:p>
          </table:table-cell>
          <table:covered-table-cell table:style-name="ce21"/>
          <table:table-cell table:style-name="ce89" office:value-type="string" calcext:value-type="string" table:number-columns-spanned="2" table:number-rows-spanned="1">
            <text:p>pts | buchas</text:p>
          </table:table-cell>
          <table:covered-table-cell table:style-name="ce21"/>
          <table:table-cell table:style-name="ce92" office:value-type="string" calcext:value-type="string">
            <text:p>$$</text:p>
          </table:table-cell>
          <table:table-cell table:style-name="ce94"/>
          <table:table-cell table:style-name="ce96" office:value-type="string" calcext:value-type="string" table:number-columns-spanned="3" table:number-rows-spanned="1">
            <text:p>pts | buchas</text:p>
          </table:table-cell>
          <table:covered-table-cell table:number-columns-repeated="2" table:style-name="ce21"/>
          <table:table-cell table:style-name="ce100"/>
          <table:table-cell table:style-name="ce94" office:value-type="string" calcext:value-type="string">
            <text:p>CENTRÃO</text:p>
          </table:table-cell>
          <table:table-cell table:style-name="ce102" office:value-type="string" calcext:value-type="string" table:number-columns-spanned="3" table:number-rows-spanned="1">
            <text:p>pts | buchas</text:p>
          </table:table-cell>
          <table:covered-table-cell table:number-columns-repeated="2" table:style-name="ce21"/>
          <table:table-cell table:style-name="ce96" office:value-type="string" calcext:value-type="string" table:number-columns-spanned="3" table:number-rows-spanned="1">
            <text:p>pts | buchas</text:p>
          </table:table-cell>
          <table:covered-table-cell table:number-columns-repeated="2" table:style-name="ce21"/>
          <table:table-cell table:style-name="ce35"/>
          <table:table-cell table:style-name="ce104"/>
          <table:table-cell table:style-name="ce104" office:value-type="string" calcext:value-type="string">
            <text:p><text:s text:c="10"/>Z10</text:p>
          </table:table-cell>
          <table:table-cell table:style-name="ce116" office:value-type="string" calcext:value-type="string">
            <text:p>pts | buchas</text:p>
          </table:table-cell>
          <table:table-cell table:style-name="ce120"/>
          <table:table-cell table:number-columns-repeated="1001"/>
        </table:table-row>
        <table:table-row table:style-name="ro2">
          <table:table-cell table:style-name="ce13"/>
          <table:table-cell table:style-name="ce85" office:value-type="float" office:value="1" calcext:value-type="float">
            <text:p>1º</text:p>
          </table:table-cell>
          <table:table-cell table:style-name="ce88"/>
          <table:table-cell table:style-name="ce90" table:number-columns-repeated="2"/>
          <table:table-cell table:style-name="ce31"/>
          <table:table-cell table:style-name="ce95" office:value-type="float" office:value="21" calcext:value-type="float">
            <text:p>21º</text:p>
          </table:table-cell>
          <table:table-cell table:style-name="ce97"/>
          <table:table-cell table:style-name="ce98"/>
          <table:table-cell table:style-name="ce99"/>
          <table:table-cell table:style-name="ce101" office:value-type="float" office:value="45" calcext:value-type="float">
            <text:p>45º</text:p>
          </table:table-cell>
          <table:table-cell table:style-name="ce97"/>
          <table:table-cell table:style-name="ce98"/>
          <table:table-cell table:style-name="ce99"/>
          <table:table-cell table:style-name="ce101" office:value-type="float" office:value="69" calcext:value-type="float">
            <text:p>69º</text:p>
          </table:table-cell>
          <table:table-cell table:style-name="ce97"/>
          <table:table-cell table:style-name="ce103" table:number-columns-repeated="2"/>
          <table:table-cell table:style-name="ce35"/>
          <table:table-cell table:style-name="ce105" table:formula="of:=[.T3]-1" office:value-type="float" office:value="93" calcext:value-type="float">
            <text:p>93º</text:p>
          </table:table-cell>
          <table:table-cell table:style-name="ce111"/>
          <table:table-cell table:style-name="ce117" table:number-columns-repeated="2"/>
          <table:table-cell table:number-columns-repeated="1001"/>
        </table:table-row>
        <table:table-row table:style-name="ro2">
          <table:table-cell table:style-name="ce13"/>
          <table:table-cell table:style-name="ce86" office:value-type="float" office:value="2" calcext:value-type="float">
            <text:p>2º</text:p>
          </table:table-cell>
          <table:table-cell table:style-name="ce88"/>
          <table:table-cell table:style-name="ce91" table:number-columns-repeated="2"/>
          <table:table-cell table:style-name="ce31"/>
          <table:table-cell table:style-name="ce95" table:formula="of:=[.G2]+1" office:value-type="float" office:value="22" calcext:value-type="float">
            <text:p>22º</text:p>
          </table:table-cell>
          <table:table-cell table:style-name="ce97"/>
          <table:table-cell table:style-name="ce98"/>
          <table:table-cell table:style-name="ce99"/>
          <table:table-cell table:style-name="ce101" table:formula="of:=[.K2]+1" office:value-type="float" office:value="46" calcext:value-type="float">
            <text:p>46º</text:p>
          </table:table-cell>
          <table:table-cell table:style-name="ce97"/>
          <table:table-cell table:style-name="ce98"/>
          <table:table-cell table:style-name="ce99"/>
          <table:table-cell table:style-name="ce101" table:formula="of:=[.O2]+1" office:value-type="float" office:value="70" calcext:value-type="float">
            <text:p>70º</text:p>
          </table:table-cell>
          <table:table-cell table:style-name="ce97"/>
          <table:table-cell table:style-name="ce103" table:number-columns-repeated="2"/>
          <table:table-cell table:style-name="ce35"/>
          <table:table-cell table:style-name="ce105" table:formula="of:=[.T4]-1" office:value-type="float" office:value="94" calcext:value-type="float">
            <text:p>94º</text:p>
          </table:table-cell>
          <table:table-cell table:style-name="ce111"/>
          <table:table-cell table:style-name="ce117" table:number-columns-repeated="2"/>
          <table:table-cell table:number-columns-repeated="1001"/>
        </table:table-row>
        <table:table-row table:style-name="ro2">
          <table:table-cell table:style-name="ce13"/>
          <table:table-cell table:style-name="ce86" office:value-type="float" office:value="3" calcext:value-type="float">
            <text:p>3º</text:p>
          </table:table-cell>
          <table:table-cell table:style-name="ce88"/>
          <table:table-cell table:style-name="ce91" table:number-columns-repeated="2"/>
          <table:table-cell table:style-name="ce31"/>
          <table:table-cell table:style-name="ce95" table:formula="of:=[.G3]+1" office:value-type="float" office:value="23" calcext:value-type="float">
            <text:p>23º</text:p>
          </table:table-cell>
          <table:table-cell table:style-name="ce97"/>
          <table:table-cell table:style-name="ce98"/>
          <table:table-cell table:style-name="ce99"/>
          <table:table-cell table:style-name="ce101" table:formula="of:=[.K3]+1" office:value-type="float" office:value="47" calcext:value-type="float">
            <text:p>47º</text:p>
          </table:table-cell>
          <table:table-cell table:style-name="ce97"/>
          <table:table-cell table:style-name="ce98"/>
          <table:table-cell table:style-name="ce99"/>
          <table:table-cell table:style-name="ce101" table:formula="of:=[.O3]+1" office:value-type="float" office:value="71" calcext:value-type="float">
            <text:p>71º</text:p>
          </table:table-cell>
          <table:table-cell table:style-name="ce97"/>
          <table:table-cell table:style-name="ce103" table:number-columns-repeated="2"/>
          <table:table-cell table:style-name="ce35"/>
          <table:table-cell table:style-name="ce105" table:formula="of:=[.T5]-1" office:value-type="float" office:value="95" calcext:value-type="float">
            <text:p>95º</text:p>
          </table:table-cell>
          <table:table-cell table:style-name="ce111"/>
          <table:table-cell table:style-name="ce117" table:number-columns-repeated="2"/>
          <table:table-cell table:number-columns-repeated="1001"/>
        </table:table-row>
        <table:table-row table:style-name="ro2">
          <table:table-cell table:style-name="ce13"/>
          <table:table-cell table:style-name="ce86" office:value-type="float" office:value="4" calcext:value-type="float">
            <text:p>4º</text:p>
          </table:table-cell>
          <table:table-cell table:style-name="ce88"/>
          <table:table-cell table:style-name="ce91" table:number-columns-repeated="2"/>
          <table:table-cell table:style-name="ce31"/>
          <table:table-cell table:style-name="ce95" table:formula="of:=[.G4]+1" office:value-type="float" office:value="24" calcext:value-type="float">
            <text:p>24º</text:p>
          </table:table-cell>
          <table:table-cell table:style-name="ce97"/>
          <table:table-cell table:style-name="ce98"/>
          <table:table-cell table:style-name="ce99"/>
          <table:table-cell table:style-name="ce101" table:formula="of:=[.K4]+1" office:value-type="float" office:value="48" calcext:value-type="float">
            <text:p>48º</text:p>
          </table:table-cell>
          <table:table-cell table:style-name="ce97"/>
          <table:table-cell table:style-name="ce98"/>
          <table:table-cell table:style-name="ce99"/>
          <table:table-cell table:style-name="ce101" table:formula="of:=[.O4]+1" office:value-type="float" office:value="72" calcext:value-type="float">
            <text:p>72º</text:p>
          </table:table-cell>
          <table:table-cell table:style-name="ce97"/>
          <table:table-cell table:style-name="ce103" table:number-columns-repeated="2"/>
          <table:table-cell table:style-name="ce35"/>
          <table:table-cell table:style-name="ce105" table:formula="of:=[.T6]-1" office:value-type="float" office:value="96" calcext:value-type="float">
            <text:p>96º</text:p>
          </table:table-cell>
          <table:table-cell table:style-name="ce111"/>
          <table:table-cell table:style-name="ce117" table:number-columns-repeated="2"/>
          <table:table-cell table:number-columns-repeated="1001"/>
        </table:table-row>
        <table:table-row table:style-name="ro2">
          <table:table-cell table:style-name="ce13"/>
          <table:table-cell table:style-name="ce86" office:value-type="float" office:value="5" calcext:value-type="float">
            <text:p>5º</text:p>
          </table:table-cell>
          <table:table-cell table:style-name="ce88"/>
          <table:table-cell table:style-name="ce91" table:number-columns-repeated="2"/>
          <table:table-cell table:style-name="ce31"/>
          <table:table-cell table:style-name="ce95" table:formula="of:=[.G5]+1" office:value-type="float" office:value="25" calcext:value-type="float">
            <text:p>25º</text:p>
          </table:table-cell>
          <table:table-cell table:style-name="ce97"/>
          <table:table-cell table:style-name="ce98"/>
          <table:table-cell table:style-name="ce99"/>
          <table:table-cell table:style-name="ce101" table:formula="of:=[.K5]+1" office:value-type="float" office:value="49" calcext:value-type="float">
            <text:p>49º</text:p>
          </table:table-cell>
          <table:table-cell table:style-name="ce97"/>
          <table:table-cell table:style-name="ce98"/>
          <table:table-cell table:style-name="ce99"/>
          <table:table-cell table:style-name="ce101" table:formula="of:=[.O5]+1" office:value-type="float" office:value="73" calcext:value-type="float">
            <text:p>73º</text:p>
          </table:table-cell>
          <table:table-cell table:style-name="ce97"/>
          <table:table-cell table:style-name="ce103" table:number-columns-repeated="2"/>
          <table:table-cell table:style-name="ce35"/>
          <table:table-cell table:style-name="ce105" table:formula="of:=[.T7]-1" office:value-type="float" office:value="97" calcext:value-type="float">
            <text:p>97º</text:p>
          </table:table-cell>
          <table:table-cell table:style-name="ce111"/>
          <table:table-cell table:style-name="ce117" table:number-columns-repeated="2"/>
          <table:table-cell table:number-columns-repeated="1001"/>
        </table:table-row>
        <table:table-row table:style-name="ro2">
          <table:table-cell table:style-name="ce13"/>
          <table:table-cell table:style-name="ce86" office:value-type="float" office:value="6" calcext:value-type="float">
            <text:p>6º</text:p>
          </table:table-cell>
          <table:table-cell table:style-name="ce88"/>
          <table:table-cell table:style-name="ce91" table:number-columns-repeated="2"/>
          <table:table-cell table:style-name="ce31"/>
          <table:table-cell table:style-name="ce95" table:formula="of:=[.G6]+1" office:value-type="float" office:value="26" calcext:value-type="float">
            <text:p>26º</text:p>
          </table:table-cell>
          <table:table-cell table:style-name="ce97"/>
          <table:table-cell table:style-name="ce98"/>
          <table:table-cell table:style-name="ce99"/>
          <table:table-cell table:style-name="ce101" table:formula="of:=[.K6]+1" office:value-type="float" office:value="50" calcext:value-type="float">
            <text:p>50º</text:p>
          </table:table-cell>
          <table:table-cell table:style-name="ce97"/>
          <table:table-cell table:style-name="ce98"/>
          <table:table-cell table:style-name="ce99"/>
          <table:table-cell table:style-name="ce101" table:formula="of:=[.O6]+1" office:value-type="float" office:value="74" calcext:value-type="float">
            <text:p>74º</text:p>
          </table:table-cell>
          <table:table-cell table:style-name="ce97"/>
          <table:table-cell table:style-name="ce103" table:number-columns-repeated="2"/>
          <table:table-cell table:style-name="ce35"/>
          <table:table-cell table:style-name="ce105" table:formula="of:=[.T8]-1" office:value-type="float" office:value="98" calcext:value-type="float">
            <text:p>98º</text:p>
          </table:table-cell>
          <table:table-cell table:style-name="ce111"/>
          <table:table-cell table:style-name="ce117" table:number-columns-repeated="2"/>
          <table:table-cell table:number-columns-repeated="1001"/>
        </table:table-row>
        <table:table-row table:style-name="ro2">
          <table:table-cell table:style-name="ce13"/>
          <table:table-cell table:style-name="ce87" office:value-type="float" office:value="7" calcext:value-type="float">
            <text:p>7º</text:p>
          </table:table-cell>
          <table:table-cell table:style-name="ce88"/>
          <table:table-cell table:style-name="ce91" table:number-columns-repeated="2"/>
          <table:table-cell table:style-name="ce31"/>
          <table:table-cell table:style-name="ce95" table:formula="of:=[.G7]+1" office:value-type="float" office:value="27" calcext:value-type="float">
            <text:p>27º</text:p>
          </table:table-cell>
          <table:table-cell table:style-name="ce97"/>
          <table:table-cell table:style-name="ce98"/>
          <table:table-cell table:style-name="ce99"/>
          <table:table-cell table:style-name="ce101" table:formula="of:=[.K7]+1" office:value-type="float" office:value="51" calcext:value-type="float">
            <text:p>51º</text:p>
          </table:table-cell>
          <table:table-cell table:style-name="ce97"/>
          <table:table-cell table:style-name="ce98"/>
          <table:table-cell table:style-name="ce99"/>
          <table:table-cell table:style-name="ce101" table:formula="of:=[.O7]+1" office:value-type="float" office:value="75" calcext:value-type="float">
            <text:p>75º</text:p>
          </table:table-cell>
          <table:table-cell table:style-name="ce97"/>
          <table:table-cell table:style-name="ce103" table:number-columns-repeated="2"/>
          <table:table-cell table:style-name="ce35"/>
          <table:table-cell table:style-name="ce105" table:formula="of:=[.T9]-1" office:value-type="float" office:value="99" calcext:value-type="float">
            <text:p>99º</text:p>
          </table:table-cell>
          <table:table-cell table:style-name="ce111"/>
          <table:table-cell table:style-name="ce117" table:number-columns-repeated="2"/>
          <table:table-cell table:number-columns-repeated="1001"/>
        </table:table-row>
        <table:table-row table:style-name="ro2">
          <table:table-cell table:style-name="ce13"/>
          <table:table-cell table:style-name="ce87" office:value-type="float" office:value="8" calcext:value-type="float">
            <text:p>8º</text:p>
          </table:table-cell>
          <table:table-cell table:style-name="ce88"/>
          <table:table-cell table:style-name="ce91" table:number-columns-repeated="2"/>
          <table:table-cell table:style-name="ce31"/>
          <table:table-cell table:style-name="ce95" table:formula="of:=[.G8]+1" office:value-type="float" office:value="28" calcext:value-type="float">
            <text:p>28º</text:p>
          </table:table-cell>
          <table:table-cell table:style-name="ce97"/>
          <table:table-cell table:style-name="ce98"/>
          <table:table-cell table:style-name="ce99"/>
          <table:table-cell table:style-name="ce101" table:formula="of:=[.K8]+1" office:value-type="float" office:value="52" calcext:value-type="float">
            <text:p>52º</text:p>
          </table:table-cell>
          <table:table-cell table:style-name="ce97"/>
          <table:table-cell table:style-name="ce98"/>
          <table:table-cell table:style-name="ce99"/>
          <table:table-cell table:style-name="ce101" table:formula="of:=[.O8]+1" office:value-type="float" office:value="76" calcext:value-type="float">
            <text:p>76º</text:p>
          </table:table-cell>
          <table:table-cell table:style-name="ce97"/>
          <table:table-cell table:style-name="ce103" table:number-columns-repeated="2"/>
          <table:table-cell table:style-name="ce35"/>
          <table:table-cell table:style-name="ce105" table:formula="of:=[.T10]-1" office:value-type="float" office:value="100" calcext:value-type="float">
            <text:p>100º</text:p>
          </table:table-cell>
          <table:table-cell table:style-name="ce111"/>
          <table:table-cell table:style-name="ce117" table:number-columns-repeated="2"/>
          <table:table-cell table:number-columns-repeated="1001"/>
        </table:table-row>
        <table:table-row table:style-name="ro2">
          <table:table-cell table:style-name="ce13"/>
          <table:table-cell table:style-name="ce86" office:value-type="float" office:value="9" calcext:value-type="float">
            <text:p>9º</text:p>
          </table:table-cell>
          <table:table-cell table:style-name="ce88"/>
          <table:table-cell table:style-name="ce91" table:number-columns-repeated="2"/>
          <table:table-cell table:style-name="ce31"/>
          <table:table-cell table:style-name="ce95" table:formula="of:=[.G9]+1" office:value-type="float" office:value="29" calcext:value-type="float">
            <text:p>29º</text:p>
          </table:table-cell>
          <table:table-cell table:style-name="ce97"/>
          <table:table-cell table:style-name="ce98"/>
          <table:table-cell table:style-name="ce99"/>
          <table:table-cell table:style-name="ce101" table:formula="of:=[.K9]+1" office:value-type="float" office:value="53" calcext:value-type="float">
            <text:p>53º</text:p>
          </table:table-cell>
          <table:table-cell table:style-name="ce97"/>
          <table:table-cell table:style-name="ce98"/>
          <table:table-cell table:style-name="ce99"/>
          <table:table-cell table:style-name="ce101" table:formula="of:=[.O9]+1" office:value-type="float" office:value="77" calcext:value-type="float">
            <text:p>77º</text:p>
          </table:table-cell>
          <table:table-cell table:style-name="ce97"/>
          <table:table-cell table:style-name="ce103" table:number-columns-repeated="2"/>
          <table:table-cell table:style-name="ce35"/>
          <table:table-cell table:style-name="ce105" table:formula="of:=[.T11]-1" office:value-type="float" office:value="101" calcext:value-type="float">
            <text:p>101º</text:p>
          </table:table-cell>
          <table:table-cell table:style-name="ce111"/>
          <table:table-cell table:style-name="ce117" table:number-columns-repeated="2"/>
          <table:table-cell table:number-columns-repeated="1001"/>
        </table:table-row>
        <table:table-row table:style-name="ro2">
          <table:table-cell table:style-name="ce13"/>
          <table:table-cell table:style-name="ce86" office:value-type="float" office:value="10" calcext:value-type="float">
            <text:p>10º</text:p>
          </table:table-cell>
          <table:table-cell table:style-name="ce88"/>
          <table:table-cell table:style-name="ce91" table:number-columns-repeated="2"/>
          <table:table-cell table:style-name="ce31"/>
          <table:table-cell table:style-name="ce95" table:formula="of:=[.G10]+1" office:value-type="float" office:value="30" calcext:value-type="float">
            <text:p>30º</text:p>
          </table:table-cell>
          <table:table-cell table:style-name="ce97"/>
          <table:table-cell table:style-name="ce98"/>
          <table:table-cell table:style-name="ce99"/>
          <table:table-cell table:style-name="ce101" table:formula="of:=[.K10]+1" office:value-type="float" office:value="54" calcext:value-type="float">
            <text:p>54º</text:p>
          </table:table-cell>
          <table:table-cell table:style-name="ce97"/>
          <table:table-cell table:style-name="ce98"/>
          <table:table-cell table:style-name="ce99"/>
          <table:table-cell table:style-name="ce101" table:formula="of:=[.O10]+1" office:value-type="float" office:value="78" calcext:value-type="float">
            <text:p>78º</text:p>
          </table:table-cell>
          <table:table-cell table:style-name="ce97"/>
          <table:table-cell table:style-name="ce103" table:number-columns-repeated="2"/>
          <table:table-cell table:style-name="ce35"/>
          <table:table-cell table:style-name="ce105" office:value-type="float" office:value="102" calcext:value-type="float">
            <text:p>102º</text:p>
          </table:table-cell>
          <table:table-cell table:style-name="ce111"/>
          <table:table-cell table:style-name="ce117" table:number-columns-repeated="2"/>
          <table:table-cell table:number-columns-repeated="1001"/>
        </table:table-row>
        <table:table-row table:style-name="ro2">
          <table:table-cell table:style-name="ce13"/>
          <table:table-cell table:style-name="ce86" office:value-type="float" office:value="11" calcext:value-type="float">
            <text:p>11º</text:p>
          </table:table-cell>
          <table:table-cell table:style-name="ce88"/>
          <table:table-cell table:style-name="ce91" table:number-columns-repeated="2"/>
          <table:table-cell table:style-name="ce31"/>
          <table:table-cell table:style-name="ce95" table:formula="of:=[.G11]+1" office:value-type="float" office:value="31" calcext:value-type="float">
            <text:p>31º</text:p>
          </table:table-cell>
          <table:table-cell table:style-name="ce97"/>
          <table:table-cell table:style-name="ce98"/>
          <table:table-cell table:style-name="ce99"/>
          <table:table-cell table:style-name="ce101" table:formula="of:=[.K11]+1" office:value-type="float" office:value="55" calcext:value-type="float">
            <text:p>55º</text:p>
          </table:table-cell>
          <table:table-cell table:style-name="ce97"/>
          <table:table-cell table:style-name="ce98"/>
          <table:table-cell table:style-name="ce99"/>
          <table:table-cell table:style-name="ce101" table:formula="of:=[.O11]+1" office:value-type="float" office:value="79" calcext:value-type="float">
            <text:p>79º</text:p>
          </table:table-cell>
          <table:table-cell table:style-name="ce97"/>
          <table:table-cell table:style-name="ce103" table:number-columns-repeated="2"/>
          <table:table-cell table:style-name="ce35"/>
          <table:table-cell table:style-name="ce106" table:number-columns-repeated="4"/>
          <table:table-cell table:style-name="ce36"/>
          <table:table-cell table:number-columns-repeated="1000"/>
        </table:table-row>
        <table:table-row table:style-name="ro2">
          <table:table-cell table:style-name="ce13"/>
          <table:table-cell table:style-name="ce86" office:value-type="float" office:value="12" calcext:value-type="float">
            <text:p>12º</text:p>
          </table:table-cell>
          <table:table-cell table:style-name="ce88"/>
          <table:table-cell table:style-name="ce91" table:number-columns-repeated="2"/>
          <table:table-cell table:style-name="ce31"/>
          <table:table-cell table:style-name="ce95" table:formula="of:=[.G12]+1" office:value-type="float" office:value="32" calcext:value-type="float">
            <text:p>32º</text:p>
          </table:table-cell>
          <table:table-cell table:style-name="ce97"/>
          <table:table-cell table:style-name="ce98"/>
          <table:table-cell table:style-name="ce99"/>
          <table:table-cell table:style-name="ce101" table:formula="of:=[.K12]+1" office:value-type="float" office:value="56" calcext:value-type="float">
            <text:p>56º</text:p>
          </table:table-cell>
          <table:table-cell table:style-name="ce97"/>
          <table:table-cell table:style-name="ce98"/>
          <table:table-cell table:style-name="ce99"/>
          <table:table-cell table:style-name="ce101" table:formula="of:=[.O12]+1" office:value-type="float" office:value="80" calcext:value-type="float">
            <text:p>80º</text:p>
          </table:table-cell>
          <table:table-cell table:style-name="ce97"/>
          <table:table-cell table:style-name="ce103" table:number-columns-repeated="2"/>
          <table:table-cell table:style-name="ce35"/>
          <table:table-cell table:style-name="ce107" office:value-type="string" calcext:value-type="string" table:number-columns-spanned="4" table:number-rows-spanned="1">
            <text:p>TOP BUCHAS</text:p>
          </table:table-cell>
          <table:covered-table-cell table:number-columns-repeated="2" table:style-name="ce112"/>
          <table:covered-table-cell table:style-name="ce121"/>
          <table:table-cell table:style-name="ce92" office:value-type="string" calcext:value-type="string">
            <text:p>$$</text:p>
          </table:table-cell>
          <table:table-cell table:number-columns-repeated="1000"/>
        </table:table-row>
        <table:table-row table:style-name="ro2">
          <table:table-cell table:style-name="ce13"/>
          <table:table-cell table:style-name="ce86" office:value-type="float" office:value="13" calcext:value-type="float">
            <text:p>13º</text:p>
          </table:table-cell>
          <table:table-cell table:style-name="ce88"/>
          <table:table-cell table:style-name="ce91" table:number-columns-repeated="2"/>
          <table:table-cell table:style-name="ce31"/>
          <table:table-cell table:style-name="ce95" table:formula="of:=[.G13]+1" office:value-type="float" office:value="33" calcext:value-type="float">
            <text:p>33º</text:p>
          </table:table-cell>
          <table:table-cell table:style-name="ce97"/>
          <table:table-cell table:style-name="ce98"/>
          <table:table-cell table:style-name="ce99"/>
          <table:table-cell table:style-name="ce101" table:formula="of:=[.K13]+1" office:value-type="float" office:value="57" calcext:value-type="float">
            <text:p>57º</text:p>
          </table:table-cell>
          <table:table-cell table:style-name="ce97"/>
          <table:table-cell table:style-name="ce98"/>
          <table:table-cell table:style-name="ce99"/>
          <table:table-cell table:style-name="ce101" table:formula="of:=[.O13]+1" office:value-type="float" office:value="81" calcext:value-type="float">
            <text:p>81º</text:p>
          </table:table-cell>
          <table:table-cell table:style-name="ce97"/>
          <table:table-cell table:style-name="ce103" table:number-columns-repeated="2"/>
          <table:table-cell table:style-name="ce35"/>
          <table:table-cell table:style-name="ce108" office:value-type="float" office:value="1" calcext:value-type="float">
            <text:p>1º</text:p>
          </table:table-cell>
          <table:table-cell table:style-name="ce113"/>
          <table:table-cell table:style-name="ce118" table:number-columns-repeated="2"/>
          <table:table-cell table:style-name="ce31"/>
          <table:table-cell table:number-columns-repeated="1000"/>
        </table:table-row>
        <table:table-row table:style-name="ro2">
          <table:table-cell table:style-name="ce13"/>
          <table:table-cell table:style-name="ce86" office:value-type="float" office:value="14" calcext:value-type="float">
            <text:p>14º</text:p>
          </table:table-cell>
          <table:table-cell table:style-name="ce88"/>
          <table:table-cell table:style-name="ce91" table:number-columns-repeated="2"/>
          <table:table-cell table:style-name="ce31"/>
          <table:table-cell table:style-name="ce95" table:formula="of:=[.G14]+1" office:value-type="float" office:value="34" calcext:value-type="float">
            <text:p>34º</text:p>
          </table:table-cell>
          <table:table-cell table:style-name="ce97"/>
          <table:table-cell table:style-name="ce98"/>
          <table:table-cell table:style-name="ce99"/>
          <table:table-cell table:style-name="ce101" table:formula="of:=[.K14]+1" office:value-type="float" office:value="58" calcext:value-type="float">
            <text:p>58º</text:p>
          </table:table-cell>
          <table:table-cell table:style-name="ce97"/>
          <table:table-cell table:style-name="ce98"/>
          <table:table-cell table:style-name="ce99"/>
          <table:table-cell table:style-name="ce101" table:formula="of:=[.O14]+1" office:value-type="float" office:value="82" calcext:value-type="float">
            <text:p>82º</text:p>
          </table:table-cell>
          <table:table-cell table:style-name="ce97"/>
          <table:table-cell table:style-name="ce103" table:number-columns-repeated="2"/>
          <table:table-cell table:style-name="ce35"/>
          <table:table-cell table:style-name="ce109" office:value-type="float" office:value="2" calcext:value-type="float">
            <text:p>2º</text:p>
          </table:table-cell>
          <table:table-cell table:style-name="ce114"/>
          <table:table-cell table:style-name="ce119" table:number-columns-repeated="2"/>
          <table:table-cell table:style-name="ce31"/>
          <table:table-cell table:number-columns-repeated="1000"/>
        </table:table-row>
        <table:table-row table:style-name="ro2">
          <table:table-cell table:style-name="ce13"/>
          <table:table-cell table:style-name="ce87" office:value-type="float" office:value="15" calcext:value-type="float">
            <text:p>15º</text:p>
          </table:table-cell>
          <table:table-cell table:style-name="ce88"/>
          <table:table-cell table:style-name="ce91" table:number-columns-repeated="2"/>
          <table:table-cell table:style-name="ce31"/>
          <table:table-cell table:style-name="ce95" table:formula="of:=[.G15]+1" office:value-type="float" office:value="35" calcext:value-type="float">
            <text:p>35º</text:p>
          </table:table-cell>
          <table:table-cell table:style-name="ce97"/>
          <table:table-cell table:style-name="ce98"/>
          <table:table-cell table:style-name="ce99"/>
          <table:table-cell table:style-name="ce101" table:formula="of:=[.K15]+1" office:value-type="float" office:value="59" calcext:value-type="float">
            <text:p>59º</text:p>
          </table:table-cell>
          <table:table-cell table:style-name="ce97"/>
          <table:table-cell table:style-name="ce98"/>
          <table:table-cell table:style-name="ce99"/>
          <table:table-cell table:style-name="ce101" table:formula="of:=[.O15]+1" office:value-type="float" office:value="83" calcext:value-type="float">
            <text:p>83º</text:p>
          </table:table-cell>
          <table:table-cell table:style-name="ce97"/>
          <table:table-cell table:style-name="ce103" table:number-columns-repeated="2"/>
          <table:table-cell table:style-name="ce35"/>
          <table:table-cell table:style-name="ce109" office:value-type="float" office:value="3" calcext:value-type="float">
            <text:p>3º</text:p>
          </table:table-cell>
          <table:table-cell table:style-name="ce114"/>
          <table:table-cell table:style-name="ce119" table:number-columns-repeated="2"/>
          <table:table-cell table:style-name="ce36"/>
          <table:table-cell table:number-columns-repeated="1000"/>
        </table:table-row>
        <table:table-row table:style-name="ro2">
          <table:table-cell table:style-name="ce13"/>
          <table:table-cell table:style-name="ce87" office:value-type="float" office:value="16" calcext:value-type="float">
            <text:p>16º</text:p>
          </table:table-cell>
          <table:table-cell table:style-name="ce88"/>
          <table:table-cell table:style-name="ce91" table:number-columns-repeated="2"/>
          <table:table-cell table:style-name="ce31"/>
          <table:table-cell table:style-name="ce95" table:formula="of:=[.G16]+1" office:value-type="float" office:value="36" calcext:value-type="float">
            <text:p>36º</text:p>
          </table:table-cell>
          <table:table-cell table:style-name="ce97"/>
          <table:table-cell table:style-name="ce98"/>
          <table:table-cell table:style-name="ce99"/>
          <table:table-cell table:style-name="ce101" table:formula="of:=[.K16]+1" office:value-type="float" office:value="60" calcext:value-type="float">
            <text:p>60º</text:p>
          </table:table-cell>
          <table:table-cell table:style-name="ce97"/>
          <table:table-cell table:style-name="ce98"/>
          <table:table-cell table:style-name="ce99"/>
          <table:table-cell table:style-name="ce101" table:formula="of:=[.O16]+1" office:value-type="float" office:value="84" calcext:value-type="float">
            <text:p>84º</text:p>
          </table:table-cell>
          <table:table-cell table:style-name="ce97"/>
          <table:table-cell table:style-name="ce103" table:number-columns-repeated="2"/>
          <table:table-cell table:style-name="ce35"/>
          <table:table-cell table:style-name="ce109" office:value-type="float" office:value="4" calcext:value-type="float">
            <text:p>4º</text:p>
          </table:table-cell>
          <table:table-cell table:style-name="ce114"/>
          <table:table-cell table:style-name="ce119" table:number-columns-repeated="2"/>
          <table:table-cell table:style-name="ce36"/>
          <table:table-cell table:number-columns-repeated="1000"/>
        </table:table-row>
        <table:table-row table:style-name="ro2">
          <table:table-cell table:style-name="ce13"/>
          <table:table-cell table:style-name="ce87" office:value-type="float" office:value="17" calcext:value-type="float">
            <text:p>17º</text:p>
          </table:table-cell>
          <table:table-cell table:style-name="ce88"/>
          <table:table-cell table:style-name="ce91" table:number-columns-repeated="2"/>
          <table:table-cell table:style-name="ce31"/>
          <table:table-cell table:style-name="ce95" table:formula="of:=[.G17]+1" office:value-type="float" office:value="37" calcext:value-type="float">
            <text:p>37º</text:p>
          </table:table-cell>
          <table:table-cell table:style-name="ce97"/>
          <table:table-cell table:style-name="ce98"/>
          <table:table-cell table:style-name="ce99"/>
          <table:table-cell table:style-name="ce101" table:formula="of:=[.K17]+1" office:value-type="float" office:value="61" calcext:value-type="float">
            <text:p>61º</text:p>
          </table:table-cell>
          <table:table-cell table:style-name="ce97"/>
          <table:table-cell table:style-name="ce98"/>
          <table:table-cell table:style-name="ce99"/>
          <table:table-cell table:style-name="ce101" table:formula="of:=[.O17]+1" office:value-type="float" office:value="85" calcext:value-type="float">
            <text:p>85º</text:p>
          </table:table-cell>
          <table:table-cell table:style-name="ce97"/>
          <table:table-cell table:style-name="ce103" table:number-columns-repeated="2"/>
          <table:table-cell table:style-name="ce35"/>
          <table:table-cell table:style-name="ce109" office:value-type="float" office:value="5" calcext:value-type="float">
            <text:p>5º</text:p>
          </table:table-cell>
          <table:table-cell table:style-name="ce114"/>
          <table:table-cell table:style-name="ce119" table:number-columns-repeated="2"/>
          <table:table-cell table:style-name="ce36"/>
          <table:table-cell table:number-columns-repeated="1000"/>
        </table:table-row>
        <table:table-row table:style-name="ro2">
          <table:table-cell table:style-name="ce13"/>
          <table:table-cell table:style-name="ce87" office:value-type="float" office:value="18" calcext:value-type="float">
            <text:p>18º</text:p>
          </table:table-cell>
          <table:table-cell table:style-name="ce88"/>
          <table:table-cell table:style-name="ce91" table:number-columns-repeated="2"/>
          <table:table-cell table:style-name="ce31"/>
          <table:table-cell table:style-name="ce95" table:formula="of:=[.G18]+1" office:value-type="float" office:value="38" calcext:value-type="float">
            <text:p>38º</text:p>
          </table:table-cell>
          <table:table-cell table:style-name="ce97"/>
          <table:table-cell table:style-name="ce98"/>
          <table:table-cell table:style-name="ce99"/>
          <table:table-cell table:style-name="ce101" table:formula="of:=[.K18]+1" office:value-type="float" office:value="62" calcext:value-type="float">
            <text:p>62º</text:p>
          </table:table-cell>
          <table:table-cell table:style-name="ce97"/>
          <table:table-cell table:style-name="ce98"/>
          <table:table-cell table:style-name="ce99"/>
          <table:table-cell table:style-name="ce101" table:formula="of:=[.O18]+1" office:value-type="float" office:value="86" calcext:value-type="float">
            <text:p>86º</text:p>
          </table:table-cell>
          <table:table-cell table:style-name="ce97"/>
          <table:table-cell table:style-name="ce103" table:number-columns-repeated="2"/>
          <table:table-cell table:style-name="ce35"/>
          <table:table-cell table:style-name="ce109" office:value-type="float" office:value="6" calcext:value-type="float">
            <text:p>6º</text:p>
          </table:table-cell>
          <table:table-cell table:style-name="ce114"/>
          <table:table-cell table:style-name="ce119" table:number-columns-repeated="2"/>
          <table:table-cell table:style-name="ce36"/>
          <table:table-cell table:number-columns-repeated="1000"/>
        </table:table-row>
        <table:table-row table:style-name="ro2">
          <table:table-cell table:style-name="ce13"/>
          <table:table-cell table:style-name="ce87" office:value-type="float" office:value="19" calcext:value-type="float">
            <text:p>19º</text:p>
          </table:table-cell>
          <table:table-cell table:style-name="ce88"/>
          <table:table-cell table:style-name="ce91" table:number-columns-repeated="2"/>
          <table:table-cell table:style-name="ce31"/>
          <table:table-cell table:style-name="ce95" table:formula="of:=[.G19]+1" office:value-type="float" office:value="39" calcext:value-type="float">
            <text:p>39º</text:p>
          </table:table-cell>
          <table:table-cell table:style-name="ce97"/>
          <table:table-cell table:style-name="ce98"/>
          <table:table-cell table:style-name="ce99"/>
          <table:table-cell table:style-name="ce101" table:formula="of:=[.K19]+1" office:value-type="float" office:value="63" calcext:value-type="float">
            <text:p>63º</text:p>
          </table:table-cell>
          <table:table-cell table:style-name="ce97"/>
          <table:table-cell table:style-name="ce98"/>
          <table:table-cell table:style-name="ce99"/>
          <table:table-cell table:style-name="ce101" table:formula="of:=[.O19]+1" office:value-type="float" office:value="87" calcext:value-type="float">
            <text:p>87º</text:p>
          </table:table-cell>
          <table:table-cell table:style-name="ce97"/>
          <table:table-cell table:style-name="ce103" table:number-columns-repeated="2"/>
          <table:table-cell table:style-name="ce35"/>
          <table:table-cell table:style-name="ce109" office:value-type="float" office:value="7" calcext:value-type="float">
            <text:p>7º</text:p>
          </table:table-cell>
          <table:table-cell table:style-name="ce114"/>
          <table:table-cell table:style-name="ce119" table:number-columns-repeated="2"/>
          <table:table-cell table:style-name="ce36"/>
          <table:table-cell table:number-columns-repeated="1000"/>
        </table:table-row>
        <table:table-row table:style-name="ro2">
          <table:table-cell table:style-name="ce13"/>
          <table:table-cell table:style-name="ce87" office:value-type="float" office:value="20" calcext:value-type="float">
            <text:p>20º</text:p>
          </table:table-cell>
          <table:table-cell table:style-name="ce88"/>
          <table:table-cell table:style-name="ce91" table:number-columns-repeated="2"/>
          <table:table-cell table:style-name="ce31"/>
          <table:table-cell table:style-name="ce95" table:formula="of:=[.G20]+1" office:value-type="float" office:value="40" calcext:value-type="float">
            <text:p>40º</text:p>
          </table:table-cell>
          <table:table-cell table:style-name="ce97"/>
          <table:table-cell table:style-name="ce98"/>
          <table:table-cell table:style-name="ce99"/>
          <table:table-cell table:style-name="ce101" table:formula="of:=[.K20]+1" office:value-type="float" office:value="64" calcext:value-type="float">
            <text:p>64º</text:p>
          </table:table-cell>
          <table:table-cell table:style-name="ce97"/>
          <table:table-cell table:style-name="ce98"/>
          <table:table-cell table:style-name="ce99"/>
          <table:table-cell table:style-name="ce101" table:formula="of:=[.O20]+1" office:value-type="float" office:value="88" calcext:value-type="float">
            <text:p>88º</text:p>
          </table:table-cell>
          <table:table-cell table:style-name="ce97"/>
          <table:table-cell table:style-name="ce103" table:number-columns-repeated="2"/>
          <table:table-cell table:style-name="ce35"/>
          <table:table-cell table:style-name="ce109" office:value-type="float" office:value="8" calcext:value-type="float">
            <text:p>8º</text:p>
          </table:table-cell>
          <table:table-cell table:style-name="ce114"/>
          <table:table-cell table:style-name="ce119" table:number-columns-repeated="2"/>
          <table:table-cell table:style-name="ce36"/>
          <table:table-cell table:number-columns-repeated="1000"/>
        </table:table-row>
        <table:table-row table:style-name="ro2">
          <table:table-cell table:style-name="ce83"/>
          <table:table-cell table:number-columns-repeated="4"/>
          <table:table-cell table:style-name="ce93"/>
          <table:table-cell table:style-name="ce95" table:formula="of:=[.G21]+1" office:value-type="float" office:value="41" calcext:value-type="float">
            <text:p>41º</text:p>
          </table:table-cell>
          <table:table-cell table:style-name="ce97"/>
          <table:table-cell table:style-name="ce98"/>
          <table:table-cell table:style-name="ce99"/>
          <table:table-cell table:style-name="ce101" table:formula="of:=[.K21]+1" office:value-type="float" office:value="65" calcext:value-type="float">
            <text:p>65º</text:p>
          </table:table-cell>
          <table:table-cell table:style-name="ce97"/>
          <table:table-cell table:style-name="ce98"/>
          <table:table-cell table:style-name="ce99"/>
          <table:table-cell table:style-name="ce101" table:formula="of:=[.O21]+1" office:value-type="float" office:value="89" calcext:value-type="float">
            <text:p>89º</text:p>
          </table:table-cell>
          <table:table-cell table:style-name="ce97"/>
          <table:table-cell table:style-name="ce103" table:number-columns-repeated="2"/>
          <table:table-cell table:style-name="ce35"/>
          <table:table-cell table:style-name="ce109" office:value-type="float" office:value="9" calcext:value-type="float">
            <text:p>9º</text:p>
          </table:table-cell>
          <table:table-cell table:style-name="ce114"/>
          <table:table-cell table:style-name="ce119" table:number-columns-repeated="2"/>
          <table:table-cell table:style-name="ce36"/>
          <table:table-cell table:number-columns-repeated="1000"/>
        </table:table-row>
        <table:table-row table:style-name="ro2">
          <table:table-cell table:style-name="ce83"/>
          <table:table-cell table:number-columns-repeated="4"/>
          <table:table-cell table:style-name="ce93"/>
          <table:table-cell table:style-name="ce95" table:formula="of:=[.G22]+1" office:value-type="float" office:value="42" calcext:value-type="float">
            <text:p>42º</text:p>
          </table:table-cell>
          <table:table-cell table:style-name="ce97"/>
          <table:table-cell table:style-name="ce98"/>
          <table:table-cell table:style-name="ce99"/>
          <table:table-cell table:style-name="ce101" table:formula="of:=[.K22]+1" office:value-type="float" office:value="66" calcext:value-type="float">
            <text:p>66º</text:p>
          </table:table-cell>
          <table:table-cell table:style-name="ce97"/>
          <table:table-cell table:style-name="ce98"/>
          <table:table-cell table:style-name="ce99"/>
          <table:table-cell table:style-name="ce101" table:formula="of:=[.O22]+1" office:value-type="float" office:value="90" calcext:value-type="float">
            <text:p>90º</text:p>
          </table:table-cell>
          <table:table-cell table:style-name="ce97"/>
          <table:table-cell table:style-name="ce103" table:number-columns-repeated="2"/>
          <table:table-cell table:style-name="ce35"/>
          <table:table-cell table:style-name="ce109" office:value-type="float" office:value="10" calcext:value-type="float">
            <text:p>10º</text:p>
          </table:table-cell>
          <table:table-cell table:style-name="ce114"/>
          <table:table-cell table:style-name="ce119" table:number-columns-repeated="2"/>
          <table:table-cell table:style-name="ce36"/>
          <table:table-cell table:number-columns-repeated="1000"/>
        </table:table-row>
        <table:table-row table:style-name="ro2">
          <table:table-cell table:style-name="ce83"/>
          <table:table-cell table:number-columns-repeated="4"/>
          <table:table-cell table:style-name="ce93"/>
          <table:table-cell table:style-name="ce95" table:formula="of:=[.G23]+1" office:value-type="float" office:value="43" calcext:value-type="float">
            <text:p>43º</text:p>
          </table:table-cell>
          <table:table-cell table:style-name="ce97"/>
          <table:table-cell table:style-name="ce98"/>
          <table:table-cell table:style-name="ce99"/>
          <table:table-cell table:style-name="ce101" table:formula="of:=[.K23]+1" office:value-type="float" office:value="67" calcext:value-type="float">
            <text:p>67º</text:p>
          </table:table-cell>
          <table:table-cell table:style-name="ce97"/>
          <table:table-cell table:style-name="ce98"/>
          <table:table-cell table:style-name="ce99"/>
          <table:table-cell table:style-name="ce101" table:formula="of:=[.O23]+1" office:value-type="float" office:value="91" calcext:value-type="float">
            <text:p>91º</text:p>
          </table:table-cell>
          <table:table-cell table:style-name="ce97"/>
          <table:table-cell table:style-name="ce103" table:number-columns-repeated="2"/>
          <table:table-cell table:style-name="ce35"/>
          <table:table-cell table:style-name="ce110"/>
          <table:table-cell table:style-name="ce115"/>
          <table:table-cell table:style-name="ce110" table:number-columns-repeated="2"/>
          <table:table-cell table:style-name="ce122"/>
          <table:table-cell table:number-columns-repeated="1000"/>
        </table:table-row>
        <table:table-row table:style-name="ro2">
          <table:table-cell table:style-name="ce83"/>
          <table:table-cell table:number-columns-repeated="4"/>
          <table:table-cell table:style-name="ce93"/>
          <table:table-cell table:style-name="ce95" table:formula="of:=[.G24]+1" office:value-type="float" office:value="44" calcext:value-type="float">
            <text:p>44º</text:p>
          </table:table-cell>
          <table:table-cell table:style-name="ce97"/>
          <table:table-cell table:style-name="ce98"/>
          <table:table-cell table:style-name="ce99"/>
          <table:table-cell table:style-name="ce101" table:formula="of:=[.K24]+1" office:value-type="float" office:value="68" calcext:value-type="float">
            <text:p>68º</text:p>
          </table:table-cell>
          <table:table-cell table:style-name="ce97"/>
          <table:table-cell table:style-name="ce98"/>
          <table:table-cell table:style-name="ce99"/>
          <table:table-cell table:style-name="ce101" table:formula="of:=[.O24]+1" office:value-type="float" office:value="92" calcext:value-type="float">
            <text:p>92º</text:p>
          </table:table-cell>
          <table:table-cell table:style-name="ce97"/>
          <table:table-cell table:style-name="ce103" table:number-columns-repeated="2"/>
          <table:table-cell table:style-name="ce35"/>
          <table:table-cell table:style-name="ce110"/>
          <table:table-cell table:style-name="ce115"/>
          <table:table-cell table:style-name="ce110" table:number-columns-repeated="2"/>
          <table:table-cell table:style-name="ce122"/>
          <table:table-cell table:number-columns-repeated="1000"/>
        </table:table-row>
        <table:table-row table:style-name="ro3" table:number-rows-repeated="1048550">
          <table:table-cell table:number-columns-repeated="1024"/>
        </table:table-row>
        <table:table-row table:style-name="ro3">
          <table:table-cell table:number-columns-repeated="1024"/>
        </table:table-row>
      </table:table>
      <table:table table:name="Rk Histórico" table:style-name="ta4">
        <table:table-column table:style-name="co24" table:default-cell-style-name="Default"/>
        <table:table-column table:style-name="co14" table:default-cell-style-name="Default"/>
        <table:table-column table:style-name="co25" table:default-cell-style-name="Default"/>
        <table:table-column table:style-name="co14" table:default-cell-style-name="Default"/>
        <table:table-column table:style-name="co25" table:default-cell-style-name="Default"/>
        <table:table-column table:style-name="co14" table:default-cell-style-name="Default"/>
        <table:table-column table:style-name="co25" table:default-cell-style-name="Default"/>
        <table:table-column table:style-name="co14" table:default-cell-style-name="Default"/>
        <table:table-column table:style-name="co25" table:default-cell-style-name="Default"/>
        <table:table-column table:style-name="co1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6" table:default-cell-style-name="Default"/>
        <table:table-column table:style-name="co29" table:number-columns-repeated="5" table:default-cell-style-name="Default"/>
        <table:table-column table:style-name="co30" table:default-cell-style-name="Default"/>
        <table:table-column table:style-name="co31" table:default-cell-style-name="Default"/>
        <table:table-column table:style-name="co23" table:default-cell-style-name="Default"/>
        <table:table-column table:style-name="co32" table:default-cell-style-name="Default"/>
        <table:table-column table:style-name="co33" table:default-cell-style-name="Default"/>
        <table:table-column table:style-name="co31" table:default-cell-style-name="Default"/>
        <table:table-column table:style-name="co34" table:default-cell-style-name="Default"/>
        <table:table-column table:style-name="co35" table:default-cell-style-name="Default"/>
        <table:table-column table:style-name="co13" table:number-columns-repeated="996" table:default-cell-style-name="Default"/>
        <table:table-row table:style-name="ro10">
          <table:table-cell table:style-name="ce123" table:number-columns-spanned="1" table:number-rows-spanned="3"/>
          <table:table-cell table:style-name="ce130" office:value-type="string" calcext:value-type="string" table:number-columns-spanned="10" table:number-rows-spanned="1">
            <office:annotation draw:style-name="gr3" draw:text-style-name="P3" svg:width="102.78pt" svg:height="84.08pt" svg:x="134.9pt" svg:y="-0.77pt" draw:caption-point-x="217.64pt" draw:caption-point-y="1.05pt">
              <dc:date>2026-05-01T00:00:00</dc:date>
              <text:p text:style-name="P2">O Ranking Histórico pontua 20 pontos para o 1º colocado de cada edição, 19 para o 2º, chegando até o 20º colocado, que pontua 1 ponto. </text:p>
            </office:annotation>
            <text:p>RANKING HISTÓRICO</text:p>
          </table:table-cell>
          <table:covered-table-cell table:number-columns-repeated="8" table:style-name="ce23"/>
          <table:covered-table-cell table:style-name="ce28"/>
          <table:table-cell table:style-name="ce148"/>
          <table:table-cell table:style-name="ce156" office:value-type="string" calcext:value-type="string" table:number-columns-spanned="1" table:number-rows-spanned="3">
            <text:p>Pontos</text:p>
          </table:table-cell>
          <table:table-cell table:style-name="ce159" office:value-type="string" calcext:value-type="string" table:number-columns-spanned="1" table:number-rows-spanned="3">
            <text:p>Ranking Histórico</text:p>
          </table:table-cell>
          <table:table-cell table:style-name="ce148"/>
          <table:table-cell table:style-name="ce165" office:value-type="string" calcext:value-type="string" table:number-columns-spanned="5" table:number-rows-spanned="2">
            <text:p>BUCHAS </text:p>
            <text:p>(Número por edição)</text:p>
          </table:table-cell>
          <table:covered-table-cell table:number-columns-repeated="3" table:style-name="ce42"/>
          <table:covered-table-cell table:style-name="ce44"/>
          <table:table-cell table:style-name="ce159" office:value-type="string" calcext:value-type="string" table:number-columns-spanned="1" table:number-rows-spanned="3">
            <text:p>Total</text:p>
          </table:table-cell>
          <table:table-cell table:style-name="ce159" office:value-type="string" calcext:value-type="string" table:number-columns-spanned="1" table:number-rows-spanned="3">
            <text:p>Ranking</text:p>
          </table:table-cell>
          <table:table-cell table:style-name="ce148"/>
          <table:table-cell table:style-name="ce190" office:value-type="string" calcext:value-type="string" table:number-columns-spanned="1" table:number-rows-spanned="3">
            <text:p><text:span text:style-name="T19">Participações</text:span><text:span text:style-name="T20"> (Aproveitamento)</text:span></text:p>
          </table:table-cell>
          <table:table-cell table:style-name="ce196" office:value-type="string" calcext:value-type="string" table:number-columns-spanned="1" table:number-rows-spanned="3">
            <text:p>Média de Pontos</text:p>
          </table:table-cell>
          <table:table-cell table:style-name="ce190" office:value-type="string" calcext:value-type="string" table:number-columns-spanned="1" table:number-rows-spanned="3">
            <text:p>Ranking %</text:p>
          </table:table-cell>
          <table:table-cell table:style-name="ce196" office:value-type="string" calcext:value-type="string" table:number-columns-spanned="1" table:number-rows-spanned="3">
            <text:p>Média de Buchas</text:p>
          </table:table-cell>
          <table:table-cell table:style-name="ce159" office:value-type="string" calcext:value-type="string" table:number-columns-spanned="1" table:number-rows-spanned="3">
            <text:p>Ranking %</text:p>
          </table:table-cell>
          <table:table-cell table:number-columns-repeated="996"/>
        </table:table-row>
        <table:table-row table:style-name="ro10">
          <table:covered-table-cell table:style-name="ce124"/>
          <table:table-cell table:style-name="ce131" office:value-type="float" office:value="2010" calcext:value-type="float" table:number-columns-spanned="2" table:number-rows-spanned="1">
            <text:p>2010</text:p>
          </table:table-cell>
          <table:covered-table-cell table:style-name="ce44"/>
          <table:table-cell table:style-name="ce142" office:value-type="float" office:value="2014" calcext:value-type="float" table:number-columns-spanned="2" table:number-rows-spanned="1">
            <text:p>2014</text:p>
          </table:table-cell>
          <table:covered-table-cell table:style-name="ce44"/>
          <table:table-cell table:style-name="ce142" office:value-type="float" office:value="2018" calcext:value-type="float" table:number-columns-spanned="2" table:number-rows-spanned="1">
            <text:p>2018</text:p>
          </table:table-cell>
          <table:covered-table-cell table:style-name="ce44"/>
          <table:table-cell table:style-name="ce142" office:value-type="float" office:value="2022" calcext:value-type="float" table:number-columns-spanned="2" table:number-rows-spanned="1">
            <text:p>2022</text:p>
          </table:table-cell>
          <table:covered-table-cell table:style-name="ce44"/>
          <table:table-cell table:style-name="ce142" office:value-type="float" office:value="2023" calcext:value-type="float" table:number-columns-spanned="2" table:number-rows-spanned="1">
            <text:p>2023</text:p>
          </table:table-cell>
          <table:covered-table-cell table:style-name="ce44"/>
          <table:table-cell table:style-name="ce149"/>
          <table:covered-table-cell table:number-columns-repeated="2" table:style-name="ce124"/>
          <table:table-cell table:style-name="ce149"/>
          <table:covered-table-cell table:style-name="ce166"/>
          <table:covered-table-cell table:number-columns-repeated="3" table:style-name="ce173"/>
          <table:covered-table-cell table:style-name="ce183"/>
          <table:covered-table-cell table:number-columns-repeated="2" table:style-name="ce124"/>
          <table:table-cell table:style-name="ce149"/>
          <table:covered-table-cell table:style-name="ce191"/>
          <table:covered-table-cell table:style-name="ce197"/>
          <table:covered-table-cell table:style-name="ce191"/>
          <table:covered-table-cell table:style-name="ce197"/>
          <table:covered-table-cell table:style-name="ce124"/>
          <table:table-cell table:number-columns-repeated="996"/>
        </table:table-row>
        <table:table-row table:style-name="ro10">
          <table:covered-table-cell table:style-name="ce124"/>
          <table:table-cell table:style-name="ce132" office:value-type="string" calcext:value-type="string">
            <text:p>Posição</text:p>
          </table:table-cell>
          <table:table-cell table:style-name="ce137" office:value-type="string" calcext:value-type="string">
            <text:p>Pontos</text:p>
          </table:table-cell>
          <table:table-cell table:style-name="ce143" office:value-type="string" calcext:value-type="string">
            <text:p>Posição</text:p>
          </table:table-cell>
          <table:table-cell table:style-name="ce137" office:value-type="string" calcext:value-type="string">
            <text:p>Pontos</text:p>
          </table:table-cell>
          <table:table-cell table:style-name="ce143" office:value-type="string" calcext:value-type="string">
            <text:p>Posição</text:p>
          </table:table-cell>
          <table:table-cell table:style-name="ce137" office:value-type="string" calcext:value-type="string">
            <text:p>Pontos</text:p>
          </table:table-cell>
          <table:table-cell table:style-name="ce143" office:value-type="string" calcext:value-type="string">
            <text:p>Posição</text:p>
          </table:table-cell>
          <table:table-cell table:style-name="ce137" office:value-type="string" calcext:value-type="string">
            <text:p>Pontos</text:p>
          </table:table-cell>
          <table:table-cell table:style-name="ce143" office:value-type="string" calcext:value-type="string">
            <text:p>Posição</text:p>
          </table:table-cell>
          <table:table-cell table:style-name="ce137" office:value-type="string" calcext:value-type="string">
            <text:p>Pontos</text:p>
          </table:table-cell>
          <table:table-cell table:style-name="ce149"/>
          <table:covered-table-cell table:number-columns-repeated="2" table:style-name="ce157"/>
          <table:table-cell table:style-name="ce149"/>
          <table:table-cell table:style-name="ce167" office:value-type="float" office:value="2010" calcext:value-type="float">
            <text:p>2010</text:p>
          </table:table-cell>
          <table:table-cell table:style-name="ce167" office:value-type="float" office:value="2014" calcext:value-type="float">
            <text:p>2014</text:p>
          </table:table-cell>
          <table:table-cell table:style-name="ce167" office:value-type="float" office:value="2018" calcext:value-type="float">
            <text:p>2018</text:p>
          </table:table-cell>
          <table:table-cell table:style-name="ce167" office:value-type="float" office:value="2022" calcext:value-type="float">
            <text:p>2022</text:p>
          </table:table-cell>
          <table:table-cell table:style-name="ce167" office:value-type="float" office:value="2023" calcext:value-type="float">
            <text:p>2023</text:p>
          </table:table-cell>
          <table:covered-table-cell table:number-columns-repeated="2" table:style-name="ce157"/>
          <table:table-cell table:style-name="ce149"/>
          <table:covered-table-cell table:style-name="ce166"/>
          <table:covered-table-cell table:style-name="ce198"/>
          <table:covered-table-cell table:style-name="ce166"/>
          <table:covered-table-cell table:style-name="ce198"/>
          <table:covered-table-cell table:style-name="ce157"/>
          <table:table-cell table:number-columns-repeated="996"/>
        </table:table-row>
        <table:table-row table:style-name="ro10">
          <table:table-cell table:style-name="ce125" office:value-type="string" calcext:value-type="string">
            <text:p>ALEXEI</text:p>
          </table:table-cell>
          <table:table-cell table:style-name="ce133" office:value-type="float" office:value="29" calcext:value-type="float">
            <text:p>29º</text:p>
          </table:table-cell>
          <table:table-cell table:style-name="ce138" table:formula="of:=IF([.B4]=20;1;IF([.B4]=19;2;IF([.B4]=19;2;IF([.B4]=18;3;IF([.B4]=17;4;IF([.B4]=16;5;IF([.B4]=15;6;IF([.B4]=14;7;IF([.B4]=13;8;IF([.B4]=12;9;IF([.B4]=11;10;IF([.B4]=10;11;IF([.B4]=9;12;IF([.B4]=8;13;IF([.B4]=7;14;IF([.B4]=6;15;IF([.B4]=5;16;IF([.B4]=4;17;IF([.B4]=3;18;IF([.B4]=2;19;IF([.B4]=1;20;0)))))))))))))))))))))" office:value-type="float" office:value="0" calcext:value-type="float">
            <text:p>0</text:p>
          </table:table-cell>
          <table:table-cell table:style-name="ce133" office:value-type="float" office:value="58" calcext:value-type="float">
            <text:p>58º</text:p>
          </table:table-cell>
          <table:table-cell table:style-name="ce138" table:formula="of:=IF([.D4]=20;1;IF([.D4]=19;2;IF([.D4]=19;2;IF([.D4]=18;3;IF([.D4]=17;4;IF([.D4]=16;5;IF([.D4]=15;6;IF([.D4]=14;7;IF([.D4]=13;8;IF([.D4]=12;9;IF([.D4]=11;10;IF([.D4]=10;11;IF([.D4]=9;12;IF([.D4]=8;13;IF([.D4]=7;14;IF([.D4]=6;15;IF([.D4]=5;16;IF([.D4]=4;17;IF([.D4]=3;18;IF([.D4]=2;19;IF([.D4]=1;20;0)))))))))))))))))))))" office:value-type="float" office:value="0" calcext:value-type="float">
            <text:p>0</text:p>
          </table:table-cell>
          <table:table-cell table:style-name="ce133" office:value-type="float" office:value="31" calcext:value-type="float">
            <text:p>31º</text:p>
          </table:table-cell>
          <table:table-cell table:style-name="ce138" table:formula="of:=IF([.F4]=20;1;IF([.F4]=19;2;IF([.F4]=19;2;IF([.F4]=18;3;IF([.F4]=17;4;IF([.F4]=16;5;IF([.F4]=15;6;IF([.F4]=14;7;IF([.F4]=13;8;IF([.F4]=12;9;IF([.F4]=11;10;IF([.F4]=10;11;IF([.F4]=9;12;IF([.F4]=8;13;IF([.F4]=7;14;IF([.F4]=6;15;IF([.F4]=5;16;IF([.F4]=4;17;IF([.F4]=3;18;IF([.F4]=2;19;IF([.F4]=1;20;0)))))))))))))))))))))" office:value-type="float" office:value="0" calcext:value-type="float">
            <text:p>0</text:p>
          </table:table-cell>
          <table:table-cell table:style-name="ce133" office:value-type="float" office:value="9" calcext:value-type="float">
            <text:p>9º</text:p>
          </table:table-cell>
          <table:table-cell table:style-name="ce138" table:formula="of:=IF([.H4]=20;1;IF([.H4]=19;2;IF([.H4]=19;2;IF([.H4]=18;3;IF([.H4]=17;4;IF([.H4]=16;5;IF([.H4]=15;6;IF([.H4]=14;7;IF([.H4]=13;8;IF([.H4]=12;9;IF([.H4]=11;10;IF([.H4]=10;11;IF([.H4]=9;12;IF([.H4]=8;13;IF([.H4]=7;14;IF([.H4]=6;15;IF([.H4]=5;16;IF([.H4]=4;17;IF([.H4]=3;18;IF([.H4]=2;19;IF([.H4]=1;20;0)))))))))))))))))))))" office:value-type="float" office:value="12" calcext:value-type="float">
            <text:p>12</text:p>
          </table:table-cell>
          <table:table-cell table:style-name="ce133" office:value-type="float" office:value="5" calcext:value-type="float">
            <text:p>5º</text:p>
          </table:table-cell>
          <table:table-cell table:style-name="ce144" table:formula="of:=IF([.J4]=20;1;IF([.J4]=19;2;IF([.J4]=19;2;IF([.J4]=18;3;IF([.J4]=17;4;IF([.J4]=16;5;IF([.J4]=15;6;IF([.J4]=14;7;IF([.J4]=13;8;IF([.J4]=12;9;IF([.J4]=11;10;IF([.J4]=10;11;IF([.J4]=9;12;IF([.J4]=8;13;IF([.J4]=7;14;IF([.J4]=6;15;IF([.J4]=5;16;IF([.J4]=4;17;IF([.J4]=3;18;IF([.J4]=2;19;IF([.J4]=1;20;0)))))))))))))))))))))" office:value-type="float" office:value="16" calcext:value-type="float">
            <text:p>16</text:p>
          </table:table-cell>
          <table:table-cell table:style-name="ce150"/>
          <table:table-cell table:style-name="ce158" table:formula="of:=SUM([.C4];[.E4];[.G4];[.I4];[.K4])" office:value-type="float" office:value="28" calcext:value-type="float">
            <text:p>28</text:p>
          </table:table-cell>
          <table:table-cell table:style-name="ce160" table:formula="of:=RANK([.M4];[.$M$4:.$M$133])" office:value-type="float" office:value="7" calcext:value-type="float">
            <text:p>7º</text:p>
          </table:table-cell>
          <table:table-cell table:style-name="ce161"/>
          <table:table-cell table:style-name="ce168" office:value-type="float" office:value="5" calcext:value-type="float">
            <text:p>5</text:p>
          </table:table-cell>
          <table:table-cell table:style-name="ce174" office:value-type="float" office:value="2" calcext:value-type="float">
            <text:p>2</text:p>
          </table:table-cell>
          <table:table-cell table:style-name="ce174" office:value-type="float" office:value="6" calcext:value-type="float">
            <text:p>6</text:p>
          </table:table-cell>
          <table:table-cell table:style-name="ce181" office:value-type="float" office:value="9" calcext:value-type="float">
            <text:p>9</text:p>
          </table:table-cell>
          <table:table-cell table:style-name="ce184" office:value-type="float" office:value="5" calcext:value-type="float">
            <text:p>5</text:p>
          </table:table-cell>
          <table:table-cell table:style-name="ce188" table:formula="of:=SUM([.P4:.T4])" office:value-type="float" office:value="27" calcext:value-type="float">
            <text:p>27</text:p>
          </table:table-cell>
          <table:table-cell table:style-name="ce189" table:formula="of:=RANK([.U4];[.$U$4:.$U$133])" office:value-type="float" office:value="16" calcext:value-type="float">
            <text:p>16º</text:p>
          </table:table-cell>
          <table:table-cell table:style-name="ce161"/>
          <table:table-cell table:style-name="ce192" table:formula="of:=COUNTIF([.B4];&quot;&gt;0&quot;)+COUNTIF([.D4];&quot;&gt;0&quot;)+COUNTIF([.F4];&quot;&gt;0&quot;)+COUNTIF([.H4];&quot;&gt;0&quot;)+COUNTIF([.J4];&quot;&gt;0&quot;)" office:value-type="float" office:value="5" calcext:value-type="float">
            <text:p>5</text:p>
          </table:table-cell>
          <table:table-cell table:style-name="ce199" table:formula="of:=[.M4]/[.X4]" office:value-type="float" office:value="5.6" calcext:value-type="float">
            <text:p>5.6</text:p>
          </table:table-cell>
          <table:table-cell table:style-name="ce203" table:formula="of:=RANK([.Y4];[.$Y$4:.$Y$133])" office:value-type="float" office:value="19" calcext:value-type="float">
            <text:p>19º</text:p>
          </table:table-cell>
          <table:table-cell table:style-name="ce207" table:formula="of:=[.U4]/[.X4]" office:value-type="float" office:value="5.4" calcext:value-type="float">
            <text:p>5.4</text:p>
          </table:table-cell>
          <table:table-cell table:style-name="ce211" table:formula="of:=RANK([.AA4];[.$AA$4:.$AA$133])" office:value-type="float" office:value="64" calcext:value-type="float">
            <text:p>64º</text:p>
          </table:table-cell>
          <table:table-cell table:number-columns-repeated="996"/>
        </table:table-row>
        <table:table-row table:style-name="ro10">
          <table:table-cell table:style-name="ce126" office:value-type="string" calcext:value-type="string">
            <text:p>ALICE</text:p>
          </table:table-cell>
          <table:table-cell table:style-name="ce134" office:value-type="float" office:value="12" calcext:value-type="float">
            <text:p>12º</text:p>
          </table:table-cell>
          <table:table-cell table:style-name="ce139" table:formula="of:=IF([.B5]=20;1;IF([.B5]=19;2;IF([.B5]=19;2;IF([.B5]=18;3;IF([.B5]=17;4;IF([.B5]=16;5;IF([.B5]=15;6;IF([.B5]=14;7;IF([.B5]=13;8;IF([.B5]=12;9;IF([.B5]=11;10;IF([.B5]=10;11;IF([.B5]=9;12;IF([.B5]=8;13;IF([.B5]=7;14;IF([.B5]=6;15;IF([.B5]=5;16;IF([.B5]=4;17;IF([.B5]=3;18;IF([.B5]=2;19;IF([.B5]=1;20;0)))))))))))))))))))))" office:value-type="float" office:value="9" calcext:value-type="float">
            <text:p>9</text:p>
          </table:table-cell>
          <table:table-cell table:style-name="ce134" office:value-type="float" office:value="42" calcext:value-type="float">
            <text:p>42º</text:p>
          </table:table-cell>
          <table:table-cell table:style-name="ce139" table:formula="of:=IF([.D5]=20;1;IF([.D5]=19;2;IF([.D5]=19;2;IF([.D5]=18;3;IF([.D5]=17;4;IF([.D5]=16;5;IF([.D5]=15;6;IF([.D5]=14;7;IF([.D5]=13;8;IF([.D5]=12;9;IF([.D5]=11;10;IF([.D5]=10;11;IF([.D5]=9;12;IF([.D5]=8;13;IF([.D5]=7;14;IF([.D5]=6;15;IF([.D5]=5;16;IF([.D5]=4;17;IF([.D5]=3;18;IF([.D5]=2;19;IF([.D5]=1;20;0)))))))))))))))))))))" office:value-type="float" office:value="0" calcext:value-type="float">
            <text:p>0</text:p>
          </table:table-cell>
          <table:table-cell table:style-name="ce134" office:value-type="float" office:value="22" calcext:value-type="float">
            <text:p>22º</text:p>
          </table:table-cell>
          <table:table-cell table:style-name="ce139" table:formula="of:=IF([.F5]=20;1;IF([.F5]=19;2;IF([.F5]=19;2;IF([.F5]=18;3;IF([.F5]=17;4;IF([.F5]=16;5;IF([.F5]=15;6;IF([.F5]=14;7;IF([.F5]=13;8;IF([.F5]=12;9;IF([.F5]=11;10;IF([.F5]=10;11;IF([.F5]=9;12;IF([.F5]=8;13;IF([.F5]=7;14;IF([.F5]=6;15;IF([.F5]=5;16;IF([.F5]=4;17;IF([.F5]=3;18;IF([.F5]=2;19;IF([.F5]=1;20;0)))))))))))))))))))))" office:value-type="float" office:value="0" calcext:value-type="float">
            <text:p>0</text:p>
          </table:table-cell>
          <table:table-cell table:style-name="ce134" office:value-type="float" office:value="96" calcext:value-type="float">
            <text:p>96º</text:p>
          </table:table-cell>
          <table:table-cell table:style-name="ce139" table:formula="of:=IF([.H5]=20;1;IF([.H5]=19;2;IF([.H5]=19;2;IF([.H5]=18;3;IF([.H5]=17;4;IF([.H5]=16;5;IF([.H5]=15;6;IF([.H5]=14;7;IF([.H5]=13;8;IF([.H5]=12;9;IF([.H5]=11;10;IF([.H5]=10;11;IF([.H5]=9;12;IF([.H5]=8;13;IF([.H5]=7;14;IF([.H5]=6;15;IF([.H5]=5;16;IF([.H5]=4;17;IF([.H5]=3;18;IF([.H5]=2;19;IF([.H5]=1;20;0)))))))))))))))))))))" office:value-type="float" office:value="0" calcext:value-type="float">
            <text:p>0</text:p>
          </table:table-cell>
          <table:table-cell table:style-name="ce134" office:value-type="float" office:value="25" calcext:value-type="float">
            <text:p>25º</text:p>
          </table:table-cell>
          <table:table-cell table:style-name="ce145" table:formula="of:=IF([.J5]=20;1;IF([.J5]=19;2;IF([.J5]=19;2;IF([.J5]=18;3;IF([.J5]=17;4;IF([.J5]=16;5;IF([.J5]=15;6;IF([.J5]=14;7;IF([.J5]=13;8;IF([.J5]=12;9;IF([.J5]=11;10;IF([.J5]=10;11;IF([.J5]=9;12;IF([.J5]=8;13;IF([.J5]=7;14;IF([.J5]=6;15;IF([.J5]=5;16;IF([.J5]=4;17;IF([.J5]=3;18;IF([.J5]=2;19;IF([.J5]=1;20;0)))))))))))))))))))))" office:value-type="float" office:value="0" calcext:value-type="float">
            <text:p>0</text:p>
          </table:table-cell>
          <table:table-cell table:style-name="ce150"/>
          <table:table-cell table:style-name="ce158" table:formula="of:=SUM([.C5];[.E5];[.G5];[.I5];[.K5])" office:value-type="float" office:value="9" calcext:value-type="float">
            <text:p>9</text:p>
          </table:table-cell>
          <table:table-cell table:style-name="ce160" table:formula="of:=RANK([.M5];[.$M$4:.$M$133])" office:value-type="float" office:value="49" calcext:value-type="float">
            <text:p>49º</text:p>
          </table:table-cell>
          <table:table-cell table:style-name="ce161"/>
          <table:table-cell table:style-name="ce169" office:value-type="float" office:value="9" calcext:value-type="float">
            <text:p>9</text:p>
          </table:table-cell>
          <table:table-cell table:style-name="ce175" office:value-type="float" office:value="3" calcext:value-type="float">
            <text:p>3</text:p>
          </table:table-cell>
          <table:table-cell table:style-name="ce175" office:value-type="float" office:value="5" calcext:value-type="float">
            <text:p>5</text:p>
          </table:table-cell>
          <table:table-cell table:style-name="ce180" office:value-type="float" office:value="0" calcext:value-type="float">
            <text:p>0</text:p>
          </table:table-cell>
          <table:table-cell table:style-name="ce185" office:value-type="float" office:value="3" calcext:value-type="float">
            <text:p>3</text:p>
          </table:table-cell>
          <table:table-cell table:style-name="ce188" table:formula="of:=SUM([.P5:.T5])" office:value-type="float" office:value="20" calcext:value-type="float">
            <text:p>20</text:p>
          </table:table-cell>
          <table:table-cell table:style-name="ce189" table:formula="of:=RANK([.U5];[.$U$4:.$U$133])" office:value-type="float" office:value="29" calcext:value-type="float">
            <text:p>29º</text:p>
          </table:table-cell>
          <table:table-cell table:style-name="ce161"/>
          <table:table-cell table:style-name="ce193" table:formula="of:=COUNTIF([.B5];&quot;&gt;0&quot;)+COUNTIF([.D5];&quot;&gt;0&quot;)+COUNTIF([.F5];&quot;&gt;0&quot;)+COUNTIF([.H5];&quot;&gt;0&quot;)+COUNTIF([.J5];&quot;&gt;0&quot;)" office:value-type="float" office:value="5" calcext:value-type="float">
            <text:p>5</text:p>
          </table:table-cell>
          <table:table-cell table:style-name="ce200" table:formula="of:=[.M5]/[.X5]" office:value-type="float" office:value="1.8" calcext:value-type="float">
            <text:p>1.8</text:p>
          </table:table-cell>
          <table:table-cell table:style-name="ce204" table:formula="of:=RANK([.Y5];[.$Y$4:.$Y$133])" office:value-type="float" office:value="61" calcext:value-type="float">
            <text:p>61º</text:p>
          </table:table-cell>
          <table:table-cell table:style-name="ce208" table:formula="of:=[.U5]/[.X5]" office:value-type="float" office:value="4" calcext:value-type="float">
            <text:p>4.0</text:p>
          </table:table-cell>
          <table:table-cell table:style-name="ce212" table:formula="of:=RANK([.AA5];[.$AA$4:.$AA$133])" office:value-type="float" office:value="98" calcext:value-type="float">
            <text:p>98º</text:p>
          </table:table-cell>
          <table:table-cell table:number-columns-repeated="996"/>
        </table:table-row>
        <table:table-row table:style-name="ro10">
          <table:table-cell table:style-name="ce126" office:value-type="string" calcext:value-type="string">
            <text:p>ANDRÉ BASTOS</text:p>
          </table:table-cell>
          <table:table-cell table:style-name="ce134" office:value-type="string" calcext:value-type="string">
            <text:p>-</text:p>
          </table:table-cell>
          <table:table-cell table:style-name="ce139" table:formula="of:=IF([.B6]=20;1;IF([.B6]=19;2;IF([.B6]=19;2;IF([.B6]=18;3;IF([.B6]=17;4;IF([.B6]=16;5;IF([.B6]=15;6;IF([.B6]=14;7;IF([.B6]=13;8;IF([.B6]=12;9;IF([.B6]=11;10;IF([.B6]=10;11;IF([.B6]=9;12;IF([.B6]=8;13;IF([.B6]=7;14;IF([.B6]=6;15;IF([.B6]=5;16;IF([.B6]=4;17;IF([.B6]=3;18;IF([.B6]=2;19;IF([.B6]=1;20;0)))))))))))))))))))))" office:value-type="float" office:value="0" calcext:value-type="float">
            <text:p>0</text:p>
          </table:table-cell>
          <table:table-cell table:style-name="ce134" office:value-type="string" calcext:value-type="string">
            <text:p>-</text:p>
          </table:table-cell>
          <table:table-cell table:style-name="ce139" table:formula="of:=IF([.D6]=20;1;IF([.D6]=19;2;IF([.D6]=19;2;IF([.D6]=18;3;IF([.D6]=17;4;IF([.D6]=16;5;IF([.D6]=15;6;IF([.D6]=14;7;IF([.D6]=13;8;IF([.D6]=12;9;IF([.D6]=11;10;IF([.D6]=10;11;IF([.D6]=9;12;IF([.D6]=8;13;IF([.D6]=7;14;IF([.D6]=6;15;IF([.D6]=5;16;IF([.D6]=4;17;IF([.D6]=3;18;IF([.D6]=2;19;IF([.D6]=1;20;0)))))))))))))))))))))" office:value-type="float" office:value="0" calcext:value-type="float">
            <text:p>0</text:p>
          </table:table-cell>
          <table:table-cell table:style-name="ce134" office:value-type="string" calcext:value-type="string">
            <text:p>-</text:p>
          </table:table-cell>
          <table:table-cell table:style-name="ce139" table:formula="of:=IF([.F6]=20;1;IF([.F6]=19;2;IF([.F6]=19;2;IF([.F6]=18;3;IF([.F6]=17;4;IF([.F6]=16;5;IF([.F6]=15;6;IF([.F6]=14;7;IF([.F6]=13;8;IF([.F6]=12;9;IF([.F6]=11;10;IF([.F6]=10;11;IF([.F6]=9;12;IF([.F6]=8;13;IF([.F6]=7;14;IF([.F6]=6;15;IF([.F6]=5;16;IF([.F6]=4;17;IF([.F6]=3;18;IF([.F6]=2;19;IF([.F6]=1;20;0)))))))))))))))))))))" office:value-type="float" office:value="0" calcext:value-type="float">
            <text:p>0</text:p>
          </table:table-cell>
          <table:table-cell table:style-name="ce134" office:value-type="float" office:value="62" calcext:value-type="float">
            <text:p>62º</text:p>
          </table:table-cell>
          <table:table-cell table:style-name="ce139" table:formula="of:=IF([.H6]=20;1;IF([.H6]=19;2;IF([.H6]=19;2;IF([.H6]=18;3;IF([.H6]=17;4;IF([.H6]=16;5;IF([.H6]=15;6;IF([.H6]=14;7;IF([.H6]=13;8;IF([.H6]=12;9;IF([.H6]=11;10;IF([.H6]=10;11;IF([.H6]=9;12;IF([.H6]=8;13;IF([.H6]=7;14;IF([.H6]=6;15;IF([.H6]=5;16;IF([.H6]=4;17;IF([.H6]=3;18;IF([.H6]=2;19;IF([.H6]=1;20;0)))))))))))))))))))))" office:value-type="float" office:value="0" calcext:value-type="float">
            <text:p>0</text:p>
          </table:table-cell>
          <table:table-cell table:style-name="ce134" office:value-type="float" office:value="30" calcext:value-type="float">
            <text:p>30º</text:p>
          </table:table-cell>
          <table:table-cell table:style-name="ce145" table:formula="of:=IF([.J6]=20;1;IF([.J6]=19;2;IF([.J6]=19;2;IF([.J6]=18;3;IF([.J6]=17;4;IF([.J6]=16;5;IF([.J6]=15;6;IF([.J6]=14;7;IF([.J6]=13;8;IF([.J6]=12;9;IF([.J6]=11;10;IF([.J6]=10;11;IF([.J6]=9;12;IF([.J6]=8;13;IF([.J6]=7;14;IF([.J6]=6;15;IF([.J6]=5;16;IF([.J6]=4;17;IF([.J6]=3;18;IF([.J6]=2;19;IF([.J6]=1;20;0)))))))))))))))))))))" office:value-type="float" office:value="0" calcext:value-type="float">
            <text:p>0</text:p>
          </table:table-cell>
          <table:table-cell table:style-name="ce150"/>
          <table:table-cell table:style-name="ce158" table:formula="of:=SUM([.C6];[.E6];[.G6];[.I6];[.K6])" office:value-type="float" office:value="0" calcext:value-type="float">
            <text:p>0</text:p>
          </table:table-cell>
          <table:table-cell table:style-name="ce160" table:formula="of:=RANK([.M6];[.$M$4:.$M$133])" office:value-type="float" office:value="71" calcext:value-type="float">
            <text:p>71º</text:p>
          </table:table-cell>
          <table:table-cell table:style-name="ce161"/>
          <table:table-cell table:style-name="ce169" office:value-type="string" calcext:value-type="string">
            <text:p>-</text:p>
          </table:table-cell>
          <table:table-cell table:number-columns-repeated="2" table:style-name="ce176" office:value-type="string" calcext:value-type="string">
            <text:p>-</text:p>
          </table:table-cell>
          <table:table-cell table:style-name="ce180" office:value-type="float" office:value="3" calcext:value-type="float">
            <text:p>3</text:p>
          </table:table-cell>
          <table:table-cell table:style-name="ce185" office:value-type="float" office:value="3" calcext:value-type="float">
            <text:p>3</text:p>
          </table:table-cell>
          <table:table-cell table:style-name="ce188" table:formula="of:=SUM([.P6:.T6])" office:value-type="float" office:value="6" calcext:value-type="float">
            <text:p>6</text:p>
          </table:table-cell>
          <table:table-cell table:style-name="ce189" table:formula="of:=RANK([.U6];[.$U$4:.$U$133])" office:value-type="float" office:value="89" calcext:value-type="float">
            <text:p>89º</text:p>
          </table:table-cell>
          <table:table-cell table:style-name="ce161"/>
          <table:table-cell table:style-name="ce193" table:formula="of:=COUNTIF([.B6];&quot;&gt;0&quot;)+COUNTIF([.D6];&quot;&gt;0&quot;)+COUNTIF([.F6];&quot;&gt;0&quot;)+COUNTIF([.H6];&quot;&gt;0&quot;)+COUNTIF([.J6];&quot;&gt;0&quot;)" office:value-type="float" office:value="2" calcext:value-type="float">
            <text:p>2</text:p>
          </table:table-cell>
          <table:table-cell table:style-name="ce200" table:formula="of:=[.M6]/[.X6]" office:value-type="float" office:value="0" calcext:value-type="float">
            <text:p>0.0</text:p>
          </table:table-cell>
          <table:table-cell table:style-name="ce204" table:formula="of:=RANK([.Y6];[.$Y$4:.$Y$133])" office:value-type="float" office:value="71" calcext:value-type="float">
            <text:p>71º</text:p>
          </table:table-cell>
          <table:table-cell table:style-name="ce208" table:formula="of:=[.U6]/[.X6]" office:value-type="float" office:value="3" calcext:value-type="float">
            <text:p>3.0</text:p>
          </table:table-cell>
          <table:table-cell table:style-name="ce212" table:formula="of:=RANK([.AA6];[.$AA$4:.$AA$133])" office:value-type="float" office:value="113" calcext:value-type="float">
            <text:p>113º</text:p>
          </table:table-cell>
          <table:table-cell table:number-columns-repeated="996"/>
        </table:table-row>
        <table:table-row table:style-name="ro10">
          <table:table-cell table:style-name="ce126" office:value-type="string" calcext:value-type="string">
            <text:p>ANDRÉ CHERRI</text:p>
          </table:table-cell>
          <table:table-cell table:style-name="ce134" office:value-type="string" calcext:value-type="string">
            <text:p>-</text:p>
          </table:table-cell>
          <table:table-cell table:style-name="ce139" table:formula="of:=IF([.B7]=20;1;IF([.B7]=19;2;IF([.B7]=19;2;IF([.B7]=18;3;IF([.B7]=17;4;IF([.B7]=16;5;IF([.B7]=15;6;IF([.B7]=14;7;IF([.B7]=13;8;IF([.B7]=12;9;IF([.B7]=11;10;IF([.B7]=10;11;IF([.B7]=9;12;IF([.B7]=8;13;IF([.B7]=7;14;IF([.B7]=6;15;IF([.B7]=5;16;IF([.B7]=4;17;IF([.B7]=3;18;IF([.B7]=2;19;IF([.B7]=1;20;0)))))))))))))))))))))" office:value-type="float" office:value="0" calcext:value-type="float">
            <text:p>0</text:p>
          </table:table-cell>
          <table:table-cell table:style-name="ce134" office:value-type="string" calcext:value-type="string">
            <text:p>-</text:p>
          </table:table-cell>
          <table:table-cell table:style-name="ce139" table:formula="of:=IF([.D7]=20;1;IF([.D7]=19;2;IF([.D7]=19;2;IF([.D7]=18;3;IF([.D7]=17;4;IF([.D7]=16;5;IF([.D7]=15;6;IF([.D7]=14;7;IF([.D7]=13;8;IF([.D7]=12;9;IF([.D7]=11;10;IF([.D7]=10;11;IF([.D7]=9;12;IF([.D7]=8;13;IF([.D7]=7;14;IF([.D7]=6;15;IF([.D7]=5;16;IF([.D7]=4;17;IF([.D7]=3;18;IF([.D7]=2;19;IF([.D7]=1;20;0)))))))))))))))))))))" office:value-type="float" office:value="0" calcext:value-type="float">
            <text:p>0</text:p>
          </table:table-cell>
          <table:table-cell table:style-name="ce134" office:value-type="string" calcext:value-type="string">
            <text:p>-</text:p>
          </table:table-cell>
          <table:table-cell table:style-name="ce139" table:formula="of:=IF([.F7]=20;1;IF([.F7]=19;2;IF([.F7]=19;2;IF([.F7]=18;3;IF([.F7]=17;4;IF([.F7]=16;5;IF([.F7]=15;6;IF([.F7]=14;7;IF([.F7]=13;8;IF([.F7]=12;9;IF([.F7]=11;10;IF([.F7]=10;11;IF([.F7]=9;12;IF([.F7]=8;13;IF([.F7]=7;14;IF([.F7]=6;15;IF([.F7]=5;16;IF([.F7]=4;17;IF([.F7]=3;18;IF([.F7]=2;19;IF([.F7]=1;20;0)))))))))))))))))))))" office:value-type="float" office:value="0" calcext:value-type="float">
            <text:p>0</text:p>
          </table:table-cell>
          <table:table-cell table:style-name="ce134" office:value-type="float" office:value="41" calcext:value-type="float">
            <text:p>41º</text:p>
          </table:table-cell>
          <table:table-cell table:style-name="ce139" table:formula="of:=IF([.H7]=20;1;IF([.H7]=19;2;IF([.H7]=19;2;IF([.H7]=18;3;IF([.H7]=17;4;IF([.H7]=16;5;IF([.H7]=15;6;IF([.H7]=14;7;IF([.H7]=13;8;IF([.H7]=12;9;IF([.H7]=11;10;IF([.H7]=10;11;IF([.H7]=9;12;IF([.H7]=8;13;IF([.H7]=7;14;IF([.H7]=6;15;IF([.H7]=5;16;IF([.H7]=4;17;IF([.H7]=3;18;IF([.H7]=2;19;IF([.H7]=1;20;0)))))))))))))))))))))" office:value-type="float" office:value="0" calcext:value-type="float">
            <text:p>0</text:p>
          </table:table-cell>
          <table:table-cell table:style-name="ce134" office:value-type="float" office:value="24" calcext:value-type="float">
            <text:p>24º</text:p>
          </table:table-cell>
          <table:table-cell table:style-name="ce145" table:formula="of:=IF([.J7]=20;1;IF([.J7]=19;2;IF([.J7]=19;2;IF([.J7]=18;3;IF([.J7]=17;4;IF([.J7]=16;5;IF([.J7]=15;6;IF([.J7]=14;7;IF([.J7]=13;8;IF([.J7]=12;9;IF([.J7]=11;10;IF([.J7]=10;11;IF([.J7]=9;12;IF([.J7]=8;13;IF([.J7]=7;14;IF([.J7]=6;15;IF([.J7]=5;16;IF([.J7]=4;17;IF([.J7]=3;18;IF([.J7]=2;19;IF([.J7]=1;20;0)))))))))))))))))))))" office:value-type="float" office:value="0" calcext:value-type="float">
            <text:p>0</text:p>
          </table:table-cell>
          <table:table-cell table:style-name="ce150"/>
          <table:table-cell table:style-name="ce158" table:formula="of:=SUM([.C7];[.E7];[.G7];[.I7];[.K7])" office:value-type="float" office:value="0" calcext:value-type="float">
            <text:p>0</text:p>
          </table:table-cell>
          <table:table-cell table:style-name="ce160" table:formula="of:=RANK([.M7];[.$M$4:.$M$133])" office:value-type="float" office:value="71" calcext:value-type="float">
            <text:p>71º</text:p>
          </table:table-cell>
          <table:table-cell table:style-name="ce161"/>
          <table:table-cell table:style-name="ce169" office:value-type="string" calcext:value-type="string">
            <text:p>-</text:p>
          </table:table-cell>
          <table:table-cell table:number-columns-repeated="2" table:style-name="ce176" office:value-type="string" calcext:value-type="string">
            <text:p>-</text:p>
          </table:table-cell>
          <table:table-cell table:style-name="ce180" office:value-type="float" office:value="6" calcext:value-type="float">
            <text:p>6</text:p>
          </table:table-cell>
          <table:table-cell table:style-name="ce185" office:value-type="float" office:value="1" calcext:value-type="float">
            <text:p>1</text:p>
          </table:table-cell>
          <table:table-cell table:style-name="ce188" table:formula="of:=SUM([.P7:.T7])" office:value-type="float" office:value="7" calcext:value-type="float">
            <text:p>7</text:p>
          </table:table-cell>
          <table:table-cell table:style-name="ce189" table:formula="of:=RANK([.U7];[.$U$4:.$U$133])" office:value-type="float" office:value="77" calcext:value-type="float">
            <text:p>77º</text:p>
          </table:table-cell>
          <table:table-cell table:style-name="ce161"/>
          <table:table-cell table:style-name="ce193" table:formula="of:=COUNTIF([.B7];&quot;&gt;0&quot;)+COUNTIF([.D7];&quot;&gt;0&quot;)+COUNTIF([.F7];&quot;&gt;0&quot;)+COUNTIF([.H7];&quot;&gt;0&quot;)+COUNTIF([.J7];&quot;&gt;0&quot;)" office:value-type="float" office:value="2" calcext:value-type="float">
            <text:p>2</text:p>
          </table:table-cell>
          <table:table-cell table:style-name="ce200" table:formula="of:=[.M7]/[.X7]" office:value-type="float" office:value="0" calcext:value-type="float">
            <text:p>0.0</text:p>
          </table:table-cell>
          <table:table-cell table:style-name="ce204" table:formula="of:=RANK([.Y7];[.$Y$4:.$Y$133])" office:value-type="float" office:value="71" calcext:value-type="float">
            <text:p>71º</text:p>
          </table:table-cell>
          <table:table-cell table:style-name="ce208" table:formula="of:=[.U7]/[.X7]" office:value-type="float" office:value="3.5" calcext:value-type="float">
            <text:p>3.5</text:p>
          </table:table-cell>
          <table:table-cell table:style-name="ce212" table:formula="of:=RANK([.AA7];[.$AA$4:.$AA$133])" office:value-type="float" office:value="110" calcext:value-type="float">
            <text:p>110º</text:p>
          </table:table-cell>
          <table:table-cell table:number-columns-repeated="996"/>
        </table:table-row>
        <table:table-row table:style-name="ro10">
          <table:table-cell table:style-name="ce126" office:value-type="string" calcext:value-type="string">
            <text:p>ANDRÉ ANZOLIN</text:p>
          </table:table-cell>
          <table:table-cell table:style-name="ce134" office:value-type="string" calcext:value-type="string">
            <text:p>-</text:p>
          </table:table-cell>
          <table:table-cell table:style-name="ce139" table:formula="of:=IF([.B8]=20;1;IF([.B8]=19;2;IF([.B8]=19;2;IF([.B8]=18;3;IF([.B8]=17;4;IF([.B8]=16;5;IF([.B8]=15;6;IF([.B8]=14;7;IF([.B8]=13;8;IF([.B8]=12;9;IF([.B8]=11;10;IF([.B8]=10;11;IF([.B8]=9;12;IF([.B8]=8;13;IF([.B8]=7;14;IF([.B8]=6;15;IF([.B8]=5;16;IF([.B8]=4;17;IF([.B8]=3;18;IF([.B8]=2;19;IF([.B8]=1;20;0)))))))))))))))))))))" office:value-type="float" office:value="0" calcext:value-type="float">
            <text:p>0</text:p>
          </table:table-cell>
          <table:table-cell table:style-name="ce134" office:value-type="float" office:value="65" calcext:value-type="float">
            <text:p>65º</text:p>
          </table:table-cell>
          <table:table-cell table:style-name="ce139" table:formula="of:=IF([.D8]=20;1;IF([.D8]=19;2;IF([.D8]=19;2;IF([.D8]=18;3;IF([.D8]=17;4;IF([.D8]=16;5;IF([.D8]=15;6;IF([.D8]=14;7;IF([.D8]=13;8;IF([.D8]=12;9;IF([.D8]=11;10;IF([.D8]=10;11;IF([.D8]=9;12;IF([.D8]=8;13;IF([.D8]=7;14;IF([.D8]=6;15;IF([.D8]=5;16;IF([.D8]=4;17;IF([.D8]=3;18;IF([.D8]=2;19;IF([.D8]=1;20;0)))))))))))))))))))))" office:value-type="float" office:value="0" calcext:value-type="float">
            <text:p>0</text:p>
          </table:table-cell>
          <table:table-cell table:style-name="ce134" office:value-type="string" calcext:value-type="string">
            <text:p>-</text:p>
          </table:table-cell>
          <table:table-cell table:style-name="ce139" table:formula="of:=IF([.F8]=20;1;IF([.F8]=19;2;IF([.F8]=19;2;IF([.F8]=18;3;IF([.F8]=17;4;IF([.F8]=16;5;IF([.F8]=15;6;IF([.F8]=14;7;IF([.F8]=13;8;IF([.F8]=12;9;IF([.F8]=11;10;IF([.F8]=10;11;IF([.F8]=9;12;IF([.F8]=8;13;IF([.F8]=7;14;IF([.F8]=6;15;IF([.F8]=5;16;IF([.F8]=4;17;IF([.F8]=3;18;IF([.F8]=2;19;IF([.F8]=1;20;0)))))))))))))))))))))" office:value-type="float" office:value="0" calcext:value-type="float">
            <text:p>0</text:p>
          </table:table-cell>
          <table:table-cell table:style-name="ce134" office:value-type="string" calcext:value-type="string">
            <text:p>-</text:p>
          </table:table-cell>
          <table:table-cell table:style-name="ce139" table:formula="of:=IF([.H8]=20;1;IF([.H8]=19;2;IF([.H8]=19;2;IF([.H8]=18;3;IF([.H8]=17;4;IF([.H8]=16;5;IF([.H8]=15;6;IF([.H8]=14;7;IF([.H8]=13;8;IF([.H8]=12;9;IF([.H8]=11;10;IF([.H8]=10;11;IF([.H8]=9;12;IF([.H8]=8;13;IF([.H8]=7;14;IF([.H8]=6;15;IF([.H8]=5;16;IF([.H8]=4;17;IF([.H8]=3;18;IF([.H8]=2;19;IF([.H8]=1;20;0)))))))))))))))))))))" office:value-type="float" office:value="0" calcext:value-type="float">
            <text:p>0</text:p>
          </table:table-cell>
          <table:table-cell table:style-name="ce134" office:value-type="string" calcext:value-type="string">
            <text:p>-</text:p>
          </table:table-cell>
          <table:table-cell table:style-name="ce145" table:formula="of:=IF([.J8]=20;1;IF([.J8]=19;2;IF([.J8]=19;2;IF([.J8]=18;3;IF([.J8]=17;4;IF([.J8]=16;5;IF([.J8]=15;6;IF([.J8]=14;7;IF([.J8]=13;8;IF([.J8]=12;9;IF([.J8]=11;10;IF([.J8]=10;11;IF([.J8]=9;12;IF([.J8]=8;13;IF([.J8]=7;14;IF([.J8]=6;15;IF([.J8]=5;16;IF([.J8]=4;17;IF([.J8]=3;18;IF([.J8]=2;19;IF([.J8]=1;20;0)))))))))))))))))))))" office:value-type="float" office:value="0" calcext:value-type="float">
            <text:p>0</text:p>
          </table:table-cell>
          <table:table-cell table:style-name="ce150"/>
          <table:table-cell table:style-name="ce158" table:formula="of:=SUM([.C8];[.E8];[.G8];[.I8];[.K8])" office:value-type="float" office:value="0" calcext:value-type="float">
            <text:p>0</text:p>
          </table:table-cell>
          <table:table-cell table:style-name="ce160" table:formula="of:=RANK([.M8];[.$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float" office:value="3" calcext:value-type="float">
            <text:p>3</text:p>
          </table:table-cell>
          <table:table-cell table:style-name="ce175" office:value-type="string" calcext:value-type="string">
            <text:p>-</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8:.T8])" office:value-type="float" office:value="3" calcext:value-type="float">
            <text:p>3</text:p>
          </table:table-cell>
          <table:table-cell table:style-name="ce189" table:formula="of:=RANK([.U8];[.$U$4:.$U$133])" office:value-type="float" office:value="119" calcext:value-type="float">
            <text:p>119º</text:p>
          </table:table-cell>
          <table:table-cell table:style-name="ce161"/>
          <table:table-cell table:style-name="ce193" table:formula="of:=COUNTIF([.B8];&quot;&gt;0&quot;)+COUNTIF([.D8];&quot;&gt;0&quot;)+COUNTIF([.F8];&quot;&gt;0&quot;)+COUNTIF([.H8];&quot;&gt;0&quot;)+COUNTIF([.J8];&quot;&gt;0&quot;)" office:value-type="float" office:value="1" calcext:value-type="float">
            <text:p>1</text:p>
          </table:table-cell>
          <table:table-cell table:style-name="ce200" table:formula="of:=[.M8]/[.X8]" office:value-type="float" office:value="0" calcext:value-type="float">
            <text:p>0.0</text:p>
          </table:table-cell>
          <table:table-cell table:style-name="ce204" table:formula="of:=RANK([.Y8];[.$Y$4:.$Y$133])" office:value-type="float" office:value="71" calcext:value-type="float">
            <text:p>71º</text:p>
          </table:table-cell>
          <table:table-cell table:style-name="ce208" table:formula="of:=[.U8]/[.X8]" office:value-type="float" office:value="3" calcext:value-type="float">
            <text:p>3.0</text:p>
          </table:table-cell>
          <table:table-cell table:style-name="ce212" table:formula="of:=RANK([.AA8];[.$AA$4:.$AA$133])" office:value-type="float" office:value="113" calcext:value-type="float">
            <text:p>113º</text:p>
          </table:table-cell>
          <table:table-cell table:number-columns-repeated="996"/>
        </table:table-row>
        <table:table-row table:style-name="ro10">
          <table:table-cell table:style-name="ce126" office:value-type="string" calcext:value-type="string">
            <text:p>ANDRÉA</text:p>
          </table:table-cell>
          <table:table-cell table:style-name="ce134" office:value-type="string" calcext:value-type="string">
            <text:p>-</text:p>
          </table:table-cell>
          <table:table-cell table:style-name="ce139" table:formula="of:=IF([.B9]=20;1;IF([.B9]=19;2;IF([.B9]=19;2;IF([.B9]=18;3;IF([.B9]=17;4;IF([.B9]=16;5;IF([.B9]=15;6;IF([.B9]=14;7;IF([.B9]=13;8;IF([.B9]=12;9;IF([.B9]=11;10;IF([.B9]=10;11;IF([.B9]=9;12;IF([.B9]=8;13;IF([.B9]=7;14;IF([.B9]=6;15;IF([.B9]=5;16;IF([.B9]=4;17;IF([.B9]=3;18;IF([.B9]=2;19;IF([.B9]=1;20;0)))))))))))))))))))))" office:value-type="float" office:value="0" calcext:value-type="float">
            <text:p>0</text:p>
          </table:table-cell>
          <table:table-cell table:style-name="ce134" office:value-type="float" office:value="42" calcext:value-type="float">
            <text:p>42º</text:p>
          </table:table-cell>
          <table:table-cell table:style-name="ce139" table:formula="of:=IF([.D9]=20;1;IF([.D9]=19;2;IF([.D9]=19;2;IF([.D9]=18;3;IF([.D9]=17;4;IF([.D9]=16;5;IF([.D9]=15;6;IF([.D9]=14;7;IF([.D9]=13;8;IF([.D9]=12;9;IF([.D9]=11;10;IF([.D9]=10;11;IF([.D9]=9;12;IF([.D9]=8;13;IF([.D9]=7;14;IF([.D9]=6;15;IF([.D9]=5;16;IF([.D9]=4;17;IF([.D9]=3;18;IF([.D9]=2;19;IF([.D9]=1;20;0)))))))))))))))))))))" office:value-type="float" office:value="0" calcext:value-type="float">
            <text:p>0</text:p>
          </table:table-cell>
          <table:table-cell table:style-name="ce134" office:value-type="float" office:value="27" calcext:value-type="float">
            <text:p>27º</text:p>
          </table:table-cell>
          <table:table-cell table:style-name="ce139" table:formula="of:=IF([.F9]=20;1;IF([.F9]=19;2;IF([.F9]=19;2;IF([.F9]=18;3;IF([.F9]=17;4;IF([.F9]=16;5;IF([.F9]=15;6;IF([.F9]=14;7;IF([.F9]=13;8;IF([.F9]=12;9;IF([.F9]=11;10;IF([.F9]=10;11;IF([.F9]=9;12;IF([.F9]=8;13;IF([.F9]=7;14;IF([.F9]=6;15;IF([.F9]=5;16;IF([.F9]=4;17;IF([.F9]=3;18;IF([.F9]=2;19;IF([.F9]=1;20;0)))))))))))))))))))))" office:value-type="float" office:value="0" calcext:value-type="float">
            <text:p>0</text:p>
          </table:table-cell>
          <table:table-cell table:style-name="ce134" office:value-type="float" office:value="70" calcext:value-type="float">
            <text:p>70º</text:p>
          </table:table-cell>
          <table:table-cell table:style-name="ce139" table:formula="of:=IF([.H9]=20;1;IF([.H9]=19;2;IF([.H9]=19;2;IF([.H9]=18;3;IF([.H9]=17;4;IF([.H9]=16;5;IF([.H9]=15;6;IF([.H9]=14;7;IF([.H9]=13;8;IF([.H9]=12;9;IF([.H9]=11;10;IF([.H9]=10;11;IF([.H9]=9;12;IF([.H9]=8;13;IF([.H9]=7;14;IF([.H9]=6;15;IF([.H9]=5;16;IF([.H9]=4;17;IF([.H9]=3;18;IF([.H9]=2;19;IF([.H9]=1;20;0)))))))))))))))))))))" office:value-type="float" office:value="0" calcext:value-type="float">
            <text:p>0</text:p>
          </table:table-cell>
          <table:table-cell table:style-name="ce134" office:value-type="string" calcext:value-type="string">
            <text:p>-</text:p>
          </table:table-cell>
          <table:table-cell table:style-name="ce145" table:formula="of:=IF([.J9]=20;1;IF([.J9]=19;2;IF([.J9]=19;2;IF([.J9]=18;3;IF([.J9]=17;4;IF([.J9]=16;5;IF([.J9]=15;6;IF([.J9]=14;7;IF([.J9]=13;8;IF([.J9]=12;9;IF([.J9]=11;10;IF([.J9]=10;11;IF([.J9]=9;12;IF([.J9]=8;13;IF([.J9]=7;14;IF([.J9]=6;15;IF([.J9]=5;16;IF([.J9]=4;17;IF([.J9]=3;18;IF([.J9]=2;19;IF([.J9]=1;20;0)))))))))))))))))))))" office:value-type="float" office:value="0" calcext:value-type="float">
            <text:p>0</text:p>
          </table:table-cell>
          <table:table-cell table:style-name="ce150"/>
          <table:table-cell table:style-name="ce158" table:formula="of:=SUM([.C9];[.E9];[.G9];[.I9];[.K9])" office:value-type="float" office:value="0" calcext:value-type="float">
            <text:p>0</text:p>
          </table:table-cell>
          <table:table-cell table:style-name="ce160" table:formula="of:=RANK([.M9];[.$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float" office:value="4" calcext:value-type="float">
            <text:p>4</text:p>
          </table:table-cell>
          <table:table-cell table:style-name="ce175" office:value-type="float" office:value="7" calcext:value-type="float">
            <text:p>7</text:p>
          </table:table-cell>
          <table:table-cell table:style-name="ce180" office:value-type="float" office:value="5" calcext:value-type="float">
            <text:p>5</text:p>
          </table:table-cell>
          <table:table-cell table:style-name="ce185" office:value-type="string" calcext:value-type="string">
            <text:p>-</text:p>
          </table:table-cell>
          <table:table-cell table:style-name="ce188" table:formula="of:=SUM([.P9:.T9])" office:value-type="float" office:value="16" calcext:value-type="float">
            <text:p>16</text:p>
          </table:table-cell>
          <table:table-cell table:style-name="ce189" table:formula="of:=RANK([.U9];[.$U$4:.$U$133])" office:value-type="float" office:value="44" calcext:value-type="float">
            <text:p>44º</text:p>
          </table:table-cell>
          <table:table-cell table:style-name="ce161"/>
          <table:table-cell table:style-name="ce193" table:formula="of:=COUNTIF([.B9];&quot;&gt;0&quot;)+COUNTIF([.D9];&quot;&gt;0&quot;)+COUNTIF([.F9];&quot;&gt;0&quot;)+COUNTIF([.H9];&quot;&gt;0&quot;)+COUNTIF([.J9];&quot;&gt;0&quot;)" office:value-type="float" office:value="3" calcext:value-type="float">
            <text:p>3</text:p>
          </table:table-cell>
          <table:table-cell table:style-name="ce200" table:formula="of:=[.M9]/[.X9]" office:value-type="float" office:value="0" calcext:value-type="float">
            <text:p>0.0</text:p>
          </table:table-cell>
          <table:table-cell table:style-name="ce204" table:formula="of:=RANK([.Y9];[.$Y$4:.$Y$133])" office:value-type="float" office:value="71" calcext:value-type="float">
            <text:p>71º</text:p>
          </table:table-cell>
          <table:table-cell table:style-name="ce208" table:formula="of:=[.U9]/[.X9]" office:value-type="float" office:value="5.33333333333333" calcext:value-type="float">
            <text:p>5.3</text:p>
          </table:table-cell>
          <table:table-cell table:style-name="ce212" table:formula="of:=RANK([.AA9];[.$AA$4:.$AA$133])" office:value-type="float" office:value="66" calcext:value-type="float">
            <text:p>66º</text:p>
          </table:table-cell>
          <table:table-cell table:number-columns-repeated="996"/>
        </table:table-row>
        <table:table-row table:style-name="ro10">
          <table:table-cell table:style-name="ce126" office:value-type="string" calcext:value-type="string">
            <text:p>ANTOINE</text:p>
          </table:table-cell>
          <table:table-cell table:style-name="ce134" office:value-type="float" office:value="17" calcext:value-type="float">
            <text:p>17º</text:p>
          </table:table-cell>
          <table:table-cell table:style-name="ce139" table:formula="of:=IF([.B10]=20;1;IF([.B10]=19;2;IF([.B10]=19;2;IF([.B10]=18;3;IF([.B10]=17;4;IF([.B10]=16;5;IF([.B10]=15;6;IF([.B10]=14;7;IF([.B10]=13;8;IF([.B10]=12;9;IF([.B10]=11;10;IF([.B10]=10;11;IF([.B10]=9;12;IF([.B10]=8;13;IF([.B10]=7;14;IF([.B10]=6;15;IF([.B10]=5;16;IF([.B10]=4;17;IF([.B10]=3;18;IF([.B10]=2;19;IF([.B10]=1;20;0)))))))))))))))))))))" office:value-type="float" office:value="4" calcext:value-type="float">
            <text:p>4</text:p>
          </table:table-cell>
          <table:table-cell table:style-name="ce134" office:value-type="float" office:value="38" calcext:value-type="float">
            <text:p>38º</text:p>
          </table:table-cell>
          <table:table-cell table:style-name="ce139" table:formula="of:=IF([.D10]=20;1;IF([.D10]=19;2;IF([.D10]=19;2;IF([.D10]=18;3;IF([.D10]=17;4;IF([.D10]=16;5;IF([.D10]=15;6;IF([.D10]=14;7;IF([.D10]=13;8;IF([.D10]=12;9;IF([.D10]=11;10;IF([.D10]=10;11;IF([.D10]=9;12;IF([.D10]=8;13;IF([.D10]=7;14;IF([.D10]=6;15;IF([.D10]=5;16;IF([.D10]=4;17;IF([.D10]=3;18;IF([.D10]=2;19;IF([.D10]=1;20;0)))))))))))))))))))))" office:value-type="float" office:value="0" calcext:value-type="float">
            <text:p>0</text:p>
          </table:table-cell>
          <table:table-cell table:style-name="ce134" office:value-type="string" calcext:value-type="string">
            <text:p>-</text:p>
          </table:table-cell>
          <table:table-cell table:style-name="ce139" table:formula="of:=IF([.F10]=20;1;IF([.F10]=19;2;IF([.F10]=19;2;IF([.F10]=18;3;IF([.F10]=17;4;IF([.F10]=16;5;IF([.F10]=15;6;IF([.F10]=14;7;IF([.F10]=13;8;IF([.F10]=12;9;IF([.F10]=11;10;IF([.F10]=10;11;IF([.F10]=9;12;IF([.F10]=8;13;IF([.F10]=7;14;IF([.F10]=6;15;IF([.F10]=5;16;IF([.F10]=4;17;IF([.F10]=3;18;IF([.F10]=2;19;IF([.F10]=1;20;0)))))))))))))))))))))" office:value-type="float" office:value="0" calcext:value-type="float">
            <text:p>0</text:p>
          </table:table-cell>
          <table:table-cell table:style-name="ce134" office:value-type="float" office:value="31" calcext:value-type="float">
            <text:p>31º</text:p>
          </table:table-cell>
          <table:table-cell table:style-name="ce139" table:formula="of:=IF([.H10]=20;1;IF([.H10]=19;2;IF([.H10]=19;2;IF([.H10]=18;3;IF([.H10]=17;4;IF([.H10]=16;5;IF([.H10]=15;6;IF([.H10]=14;7;IF([.H10]=13;8;IF([.H10]=12;9;IF([.H10]=11;10;IF([.H10]=10;11;IF([.H10]=9;12;IF([.H10]=8;13;IF([.H10]=7;14;IF([.H10]=6;15;IF([.H10]=5;16;IF([.H10]=4;17;IF([.H10]=3;18;IF([.H10]=2;19;IF([.H10]=1;20;0)))))))))))))))))))))" office:value-type="float" office:value="0" calcext:value-type="float">
            <text:p>0</text:p>
          </table:table-cell>
          <table:table-cell table:style-name="ce134" office:value-type="string" calcext:value-type="string">
            <text:p>-</text:p>
          </table:table-cell>
          <table:table-cell table:style-name="ce145" table:formula="of:=IF([.J10]=20;1;IF([.J10]=19;2;IF([.J10]=19;2;IF([.J10]=18;3;IF([.J10]=17;4;IF([.J10]=16;5;IF([.J10]=15;6;IF([.J10]=14;7;IF([.J10]=13;8;IF([.J10]=12;9;IF([.J10]=11;10;IF([.J10]=10;11;IF([.J10]=9;12;IF([.J10]=8;13;IF([.J10]=7;14;IF([.J10]=6;15;IF([.J10]=5;16;IF([.J10]=4;17;IF([.J10]=3;18;IF([.J10]=2;19;IF([.J10]=1;20;0)))))))))))))))))))))" office:value-type="float" office:value="0" calcext:value-type="float">
            <text:p>0</text:p>
          </table:table-cell>
          <table:table-cell table:style-name="ce150"/>
          <table:table-cell table:style-name="ce158" table:formula="of:=SUM([.C10];[.E10];[.G10];[.I10];[.K10])" office:value-type="float" office:value="4" calcext:value-type="float">
            <text:p>4</text:p>
          </table:table-cell>
          <table:table-cell table:style-name="ce160" table:formula="of:=RANK([.M10];[.$M$4:.$M$133])" office:value-type="float" office:value="59" calcext:value-type="float">
            <text:p>59º</text:p>
          </table:table-cell>
          <table:table-cell table:style-name="ce161"/>
          <table:table-cell table:style-name="ce169" office:value-type="float" office:value="4" calcext:value-type="float">
            <text:p>4</text:p>
          </table:table-cell>
          <table:table-cell table:style-name="ce175" office:value-type="float" office:value="6" calcext:value-type="float">
            <text:p>6</text:p>
          </table:table-cell>
          <table:table-cell table:style-name="ce176" office:value-type="string" calcext:value-type="string">
            <text:p>-</text:p>
          </table:table-cell>
          <table:table-cell table:style-name="ce180" office:value-type="float" office:value="7" calcext:value-type="float">
            <text:p>7</text:p>
          </table:table-cell>
          <table:table-cell table:style-name="ce185" office:value-type="string" calcext:value-type="string">
            <text:p>-</text:p>
          </table:table-cell>
          <table:table-cell table:style-name="ce188" table:formula="of:=SUM([.P10:.T10])" office:value-type="float" office:value="17" calcext:value-type="float">
            <text:p>17</text:p>
          </table:table-cell>
          <table:table-cell table:style-name="ce189" table:formula="of:=RANK([.U10];[.$U$4:.$U$133])" office:value-type="float" office:value="38" calcext:value-type="float">
            <text:p>38º</text:p>
          </table:table-cell>
          <table:table-cell table:style-name="ce161"/>
          <table:table-cell table:style-name="ce193" table:formula="of:=COUNTIF([.B10];&quot;&gt;0&quot;)+COUNTIF([.D10];&quot;&gt;0&quot;)+COUNTIF([.F10];&quot;&gt;0&quot;)+COUNTIF([.H10];&quot;&gt;0&quot;)+COUNTIF([.J10];&quot;&gt;0&quot;)" office:value-type="float" office:value="3" calcext:value-type="float">
            <text:p>3</text:p>
          </table:table-cell>
          <table:table-cell table:style-name="ce200" table:formula="of:=[.M10]/[.X10]" office:value-type="float" office:value="1.33333333333333" calcext:value-type="float">
            <text:p>1.3</text:p>
          </table:table-cell>
          <table:table-cell table:style-name="ce204" table:formula="of:=RANK([.Y10];[.$Y$4:.$Y$133])" office:value-type="float" office:value="64" calcext:value-type="float">
            <text:p>64º</text:p>
          </table:table-cell>
          <table:table-cell table:style-name="ce208" table:formula="of:=[.U10]/[.X10]" office:value-type="float" office:value="5.66666666666667" calcext:value-type="float">
            <text:p>5.7</text:p>
          </table:table-cell>
          <table:table-cell table:style-name="ce212" table:formula="of:=RANK([.AA10];[.$AA$4:.$AA$133])" office:value-type="float" office:value="54" calcext:value-type="float">
            <text:p>54º</text:p>
          </table:table-cell>
          <table:table-cell table:number-columns-repeated="996"/>
        </table:table-row>
        <table:table-row table:style-name="ro10">
          <table:table-cell table:style-name="ce126" office:value-type="string" calcext:value-type="string">
            <text:p>ANTÔNIA</text:p>
          </table:table-cell>
          <table:table-cell table:style-name="ce134" office:value-type="string" calcext:value-type="string">
            <text:p>-</text:p>
          </table:table-cell>
          <table:table-cell table:style-name="ce139" table:formula="of:=IF([.B11]=20;1;IF([.B11]=19;2;IF([.B11]=19;2;IF([.B11]=18;3;IF([.B11]=17;4;IF([.B11]=16;5;IF([.B11]=15;6;IF([.B11]=14;7;IF([.B11]=13;8;IF([.B11]=12;9;IF([.B11]=11;10;IF([.B11]=10;11;IF([.B11]=9;12;IF([.B11]=8;13;IF([.B11]=7;14;IF([.B11]=6;15;IF([.B11]=5;16;IF([.B11]=4;17;IF([.B11]=3;18;IF([.B11]=2;19;IF([.B11]=1;20;0)))))))))))))))))))))" office:value-type="float" office:value="0" calcext:value-type="float">
            <text:p>0</text:p>
          </table:table-cell>
          <table:table-cell table:style-name="ce134" office:value-type="float" office:value="15" calcext:value-type="float">
            <text:p>15º</text:p>
          </table:table-cell>
          <table:table-cell table:style-name="ce139" table:formula="of:=IF([.D11]=20;1;IF([.D11]=19;2;IF([.D11]=19;2;IF([.D11]=18;3;IF([.D11]=17;4;IF([.D11]=16;5;IF([.D11]=15;6;IF([.D11]=14;7;IF([.D11]=13;8;IF([.D11]=12;9;IF([.D11]=11;10;IF([.D11]=10;11;IF([.D11]=9;12;IF([.D11]=8;13;IF([.D11]=7;14;IF([.D11]=6;15;IF([.D11]=5;16;IF([.D11]=4;17;IF([.D11]=3;18;IF([.D11]=2;19;IF([.D11]=1;20;0)))))))))))))))))))))" office:value-type="float" office:value="6" calcext:value-type="float">
            <text:p>6</text:p>
          </table:table-cell>
          <table:table-cell table:style-name="ce134" office:value-type="float" office:value="41" calcext:value-type="float">
            <text:p>41º</text:p>
          </table:table-cell>
          <table:table-cell table:style-name="ce139" table:formula="of:=IF([.F11]=20;1;IF([.F11]=19;2;IF([.F11]=19;2;IF([.F11]=18;3;IF([.F11]=17;4;IF([.F11]=16;5;IF([.F11]=15;6;IF([.F11]=14;7;IF([.F11]=13;8;IF([.F11]=12;9;IF([.F11]=11;10;IF([.F11]=10;11;IF([.F11]=9;12;IF([.F11]=8;13;IF([.F11]=7;14;IF([.F11]=6;15;IF([.F11]=5;16;IF([.F11]=4;17;IF([.F11]=3;18;IF([.F11]=2;19;IF([.F11]=1;20;0)))))))))))))))))))))" office:value-type="float" office:value="0" calcext:value-type="float">
            <text:p>0</text:p>
          </table:table-cell>
          <table:table-cell table:style-name="ce134"/>
          <table:table-cell table:style-name="ce139" table:formula="of:=IF([.H11]=20;1;IF([.H11]=19;2;IF([.H11]=19;2;IF([.H11]=18;3;IF([.H11]=17;4;IF([.H11]=16;5;IF([.H11]=15;6;IF([.H11]=14;7;IF([.H11]=13;8;IF([.H11]=12;9;IF([.H11]=11;10;IF([.H11]=10;11;IF([.H11]=9;12;IF([.H11]=8;13;IF([.H11]=7;14;IF([.H11]=6;15;IF([.H11]=5;16;IF([.H11]=4;17;IF([.H11]=3;18;IF([.H11]=2;19;IF([.H11]=1;20;0)))))))))))))))))))))" office:value-type="float" office:value="0" calcext:value-type="float">
            <text:p>0</text:p>
          </table:table-cell>
          <table:table-cell table:style-name="ce134"/>
          <table:table-cell table:style-name="ce145" table:formula="of:=IF([.J11]=20;1;IF([.J11]=19;2;IF([.J11]=19;2;IF([.J11]=18;3;IF([.J11]=17;4;IF([.J11]=16;5;IF([.J11]=15;6;IF([.J11]=14;7;IF([.J11]=13;8;IF([.J11]=12;9;IF([.J11]=11;10;IF([.J11]=10;11;IF([.J11]=9;12;IF([.J11]=8;13;IF([.J11]=7;14;IF([.J11]=6;15;IF([.J11]=5;16;IF([.J11]=4;17;IF([.J11]=3;18;IF([.J11]=2;19;IF([.J11]=1;20;0)))))))))))))))))))))" office:value-type="float" office:value="0" calcext:value-type="float">
            <text:p>0</text:p>
          </table:table-cell>
          <table:table-cell table:style-name="ce151"/>
          <table:table-cell table:style-name="ce158" table:formula="of:=SUM([.C11];[.E11];[.G11];[.I11];[.K11])" office:value-type="float" office:value="6" calcext:value-type="float">
            <text:p>6</text:p>
          </table:table-cell>
          <table:table-cell table:style-name="ce160" table:formula="of:=RANK([.M11];[.$M$4:.$M$133])" office:value-type="float" office:value="56" calcext:value-type="float">
            <text:p>56º</text:p>
          </table:table-cell>
          <table:table-cell table:style-name="ce162"/>
          <table:table-cell table:style-name="ce169" office:value-type="string" calcext:value-type="string">
            <text:p>-</text:p>
          </table:table-cell>
          <table:table-cell table:style-name="ce175" office:value-type="float" office:value="7" calcext:value-type="float">
            <text:p>7</text:p>
          </table:table-cell>
          <table:table-cell table:style-name="ce175" office:value-type="float" office:value="5" calcext:value-type="float">
            <text:p>5</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11:.T11])" office:value-type="float" office:value="12" calcext:value-type="float">
            <text:p>12</text:p>
          </table:table-cell>
          <table:table-cell table:style-name="ce189" table:formula="of:=RANK([.U11];[.$U$4:.$U$133])" office:value-type="float" office:value="56" calcext:value-type="float">
            <text:p>56º</text:p>
          </table:table-cell>
          <table:table-cell table:style-name="ce162"/>
          <table:table-cell table:style-name="ce193" table:formula="of:=COUNTIF([.B11];&quot;&gt;0&quot;)+COUNTIF([.D11];&quot;&gt;0&quot;)+COUNTIF([.F11];&quot;&gt;0&quot;)+COUNTIF([.H11];&quot;&gt;0&quot;)+COUNTIF([.J11];&quot;&gt;0&quot;)" office:value-type="float" office:value="2" calcext:value-type="float">
            <text:p>2</text:p>
          </table:table-cell>
          <table:table-cell table:style-name="ce200" table:formula="of:=[.M11]/[.X11]" office:value-type="float" office:value="3" calcext:value-type="float">
            <text:p>3.0</text:p>
          </table:table-cell>
          <table:table-cell table:style-name="ce204" table:formula="of:=RANK([.Y11];[.$Y$4:.$Y$133])" office:value-type="float" office:value="51" calcext:value-type="float">
            <text:p>51º</text:p>
          </table:table-cell>
          <table:table-cell table:style-name="ce208" table:formula="of:=[.U11]/[.X11]" office:value-type="float" office:value="6" calcext:value-type="float">
            <text:p>6.0</text:p>
          </table:table-cell>
          <table:table-cell table:style-name="ce212" table:formula="of:=RANK([.AA11];[.$AA$4:.$AA$133])" office:value-type="float" office:value="36" calcext:value-type="float">
            <text:p>36º</text:p>
          </table:table-cell>
          <table:table-cell table:number-columns-repeated="996"/>
        </table:table-row>
        <table:table-row table:style-name="ro10">
          <table:table-cell table:style-name="ce126" office:value-type="string" calcext:value-type="string">
            <text:p>AQUILES E BÁRBARA</text:p>
            <draw:frame table:end-cell-address="'Rk Histórico'.A13" table:end-x="72.74pt" table:end-y="13.49pt" draw:z-index="4" draw:name="image3.png" draw:style-name="gr1" draw:text-style-name="P1" svg:width="14.23pt" svg:height="14.23pt" svg:x="58.51pt" svg:y="17.26pt">
              <draw:image xlink:href="Pictures/10000201000002D0000002D03A56A06C9213C946.png" xlink:type="simple" xlink:show="embed" xlink:actuate="onLoad">
                <text:p/>
              </draw:image>
            </draw:frame>
          </table:table-cell>
          <table:table-cell table:style-name="ce134" office:value-type="string" calcext:value-type="string">
            <text:p>-</text:p>
          </table:table-cell>
          <table:table-cell table:style-name="ce139" table:formula="of:=IF([.B12]=20;1;IF([.B12]=19;2;IF([.B12]=19;2;IF([.B12]=18;3;IF([.B12]=17;4;IF([.B12]=16;5;IF([.B12]=15;6;IF([.B12]=14;7;IF([.B12]=13;8;IF([.B12]=12;9;IF([.B12]=11;10;IF([.B12]=10;11;IF([.B12]=9;12;IF([.B12]=8;13;IF([.B12]=7;14;IF([.B12]=6;15;IF([.B12]=5;16;IF([.B12]=4;17;IF([.B12]=3;18;IF([.B12]=2;19;IF([.B12]=1;20;0)))))))))))))))))))))" office:value-type="float" office:value="0" calcext:value-type="float">
            <text:p>0</text:p>
          </table:table-cell>
          <table:table-cell table:style-name="ce134" office:value-type="float" office:value="55" calcext:value-type="float">
            <text:p>55º</text:p>
          </table:table-cell>
          <table:table-cell table:style-name="ce139" table:formula="of:=IF([.D12]=20;1;IF([.D12]=19;2;IF([.D12]=19;2;IF([.D12]=18;3;IF([.D12]=17;4;IF([.D12]=16;5;IF([.D12]=15;6;IF([.D12]=14;7;IF([.D12]=13;8;IF([.D12]=12;9;IF([.D12]=11;10;IF([.D12]=10;11;IF([.D12]=9;12;IF([.D12]=8;13;IF([.D12]=7;14;IF([.D12]=6;15;IF([.D12]=5;16;IF([.D12]=4;17;IF([.D12]=3;18;IF([.D12]=2;19;IF([.D12]=1;20;0)))))))))))))))))))))" office:value-type="float" office:value="0" calcext:value-type="float">
            <text:p>0</text:p>
          </table:table-cell>
          <table:table-cell table:style-name="ce134"/>
          <table:table-cell table:style-name="ce139" table:formula="of:=IF([.F12]=20;1;IF([.F12]=19;2;IF([.F12]=19;2;IF([.F12]=18;3;IF([.F12]=17;4;IF([.F12]=16;5;IF([.F12]=15;6;IF([.F12]=14;7;IF([.F12]=13;8;IF([.F12]=12;9;IF([.F12]=11;10;IF([.F12]=10;11;IF([.F12]=9;12;IF([.F12]=8;13;IF([.F12]=7;14;IF([.F12]=6;15;IF([.F12]=5;16;IF([.F12]=4;17;IF([.F12]=3;18;IF([.F12]=2;19;IF([.F12]=1;20;0)))))))))))))))))))))" office:value-type="float" office:value="0" calcext:value-type="float">
            <text:p>0</text:p>
          </table:table-cell>
          <table:table-cell table:style-name="ce134"/>
          <table:table-cell table:style-name="ce139" table:formula="of:=IF([.H12]=20;1;IF([.H12]=19;2;IF([.H12]=19;2;IF([.H12]=18;3;IF([.H12]=17;4;IF([.H12]=16;5;IF([.H12]=15;6;IF([.H12]=14;7;IF([.H12]=13;8;IF([.H12]=12;9;IF([.H12]=11;10;IF([.H12]=10;11;IF([.H12]=9;12;IF([.H12]=8;13;IF([.H12]=7;14;IF([.H12]=6;15;IF([.H12]=5;16;IF([.H12]=4;17;IF([.H12]=3;18;IF([.H12]=2;19;IF([.H12]=1;20;0)))))))))))))))))))))" office:value-type="float" office:value="0" calcext:value-type="float">
            <text:p>0</text:p>
          </table:table-cell>
          <table:table-cell table:style-name="ce134"/>
          <table:table-cell table:style-name="ce145" table:formula="of:=IF([.J12]=20;1;IF([.J12]=19;2;IF([.J12]=19;2;IF([.J12]=18;3;IF([.J12]=17;4;IF([.J12]=16;5;IF([.J12]=15;6;IF([.J12]=14;7;IF([.J12]=13;8;IF([.J12]=12;9;IF([.J12]=11;10;IF([.J12]=10;11;IF([.J12]=9;12;IF([.J12]=8;13;IF([.J12]=7;14;IF([.J12]=6;15;IF([.J12]=5;16;IF([.J12]=4;17;IF([.J12]=3;18;IF([.J12]=2;19;IF([.J12]=1;20;0)))))))))))))))))))))" office:value-type="float" office:value="0" calcext:value-type="float">
            <text:p>0</text:p>
          </table:table-cell>
          <table:table-cell table:style-name="ce151"/>
          <table:table-cell table:style-name="ce158" table:formula="of:=SUM([.C12];[.E12];[.G12];[.I12];[.K12])" office:value-type="float" office:value="0" calcext:value-type="float">
            <text:p>0</text:p>
          </table:table-cell>
          <table:table-cell table:style-name="ce160" table:formula="of:=RANK([.M12];[.$M$4:.$M$133])" office:value-type="float" office:value="71" calcext:value-type="float">
            <text:p>71º</text:p>
          </table:table-cell>
          <table:table-cell table:style-name="ce162"/>
          <table:table-cell table:style-name="ce169" office:value-type="string" calcext:value-type="string">
            <text:p>-</text:p>
          </table:table-cell>
          <table:table-cell table:style-name="ce175" office:value-type="string" calcext:value-type="string">
            <text:p>*</text:p>
          </table:table-cell>
          <table:table-cell table:style-name="ce175" office:value-type="string" calcext:value-type="string">
            <text:p>-</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12:.T12])" office:value-type="float" office:value="0" calcext:value-type="float">
            <text:p>0</text:p>
          </table:table-cell>
          <table:table-cell table:style-name="ce189" table:formula="of:=RANK([.U12];[.$U$4:.$U$133])" office:value-type="float" office:value="128" calcext:value-type="float">
            <text:p>128º</text:p>
          </table:table-cell>
          <table:table-cell table:style-name="ce162"/>
          <table:table-cell table:style-name="ce193" table:formula="of:=COUNTIF([.B12];&quot;&gt;0&quot;)+COUNTIF([.D12];&quot;&gt;0&quot;)+COUNTIF([.F12];&quot;&gt;0&quot;)+COUNTIF([.H12];&quot;&gt;0&quot;)+COUNTIF([.J12];&quot;&gt;0&quot;)" office:value-type="float" office:value="1" calcext:value-type="float">
            <text:p>1</text:p>
          </table:table-cell>
          <table:table-cell table:style-name="ce200" table:formula="of:=[.M12]/[.X12]" office:value-type="float" office:value="0" calcext:value-type="float">
            <text:p>0.0</text:p>
          </table:table-cell>
          <table:table-cell table:style-name="ce204" table:formula="of:=RANK([.Y12];[.$Y$4:.$Y$133])" office:value-type="float" office:value="71" calcext:value-type="float">
            <text:p>71º</text:p>
          </table:table-cell>
          <table:table-cell table:style-name="ce208" table:formula="of:=[.U12]/[.X12]" office:value-type="float" office:value="0" calcext:value-type="float">
            <text:p>0.0</text:p>
          </table:table-cell>
          <table:table-cell table:style-name="ce212" table:formula="of:=RANK([.AA12];[.$AA$4:.$AA$133])" office:value-type="float" office:value="128" calcext:value-type="float">
            <text:p>128º</text:p>
          </table:table-cell>
          <table:table-cell table:number-columns-repeated="996"/>
        </table:table-row>
        <table:table-row table:style-name="ro10">
          <table:table-cell table:style-name="ce126" office:value-type="string" calcext:value-type="string">
            <text:p>ARTUR</text:p>
          </table:table-cell>
          <table:table-cell table:style-name="ce134" office:value-type="float" office:value="10" calcext:value-type="float">
            <text:p>10º</text:p>
          </table:table-cell>
          <table:table-cell table:style-name="ce139" table:formula="of:=IF([.B13]=20;1;IF([.B13]=19;2;IF([.B13]=19;2;IF([.B13]=18;3;IF([.B13]=17;4;IF([.B13]=16;5;IF([.B13]=15;6;IF([.B13]=14;7;IF([.B13]=13;8;IF([.B13]=12;9;IF([.B13]=11;10;IF([.B13]=10;11;IF([.B13]=9;12;IF([.B13]=8;13;IF([.B13]=7;14;IF([.B13]=6;15;IF([.B13]=5;16;IF([.B13]=4;17;IF([.B13]=3;18;IF([.B13]=2;19;IF([.B13]=1;20;0)))))))))))))))))))))" office:value-type="float" office:value="11" calcext:value-type="float">
            <text:p>11</text:p>
          </table:table-cell>
          <table:table-cell table:style-name="ce134" office:value-type="float" office:value="49" calcext:value-type="float">
            <text:p>49º</text:p>
          </table:table-cell>
          <table:table-cell table:style-name="ce139" table:formula="of:=IF([.D13]=20;1;IF([.D13]=19;2;IF([.D13]=19;2;IF([.D13]=18;3;IF([.D13]=17;4;IF([.D13]=16;5;IF([.D13]=15;6;IF([.D13]=14;7;IF([.D13]=13;8;IF([.D13]=12;9;IF([.D13]=11;10;IF([.D13]=10;11;IF([.D13]=9;12;IF([.D13]=8;13;IF([.D13]=7;14;IF([.D13]=6;15;IF([.D13]=5;16;IF([.D13]=4;17;IF([.D13]=3;18;IF([.D13]=2;19;IF([.D13]=1;20;0)))))))))))))))))))))" office:value-type="float" office:value="0" calcext:value-type="float">
            <text:p>0</text:p>
          </table:table-cell>
          <table:table-cell table:style-name="ce134" office:value-type="float" office:value="7" calcext:value-type="float">
            <text:p>7º</text:p>
          </table:table-cell>
          <table:table-cell table:style-name="ce139" table:formula="of:=IF([.F13]=20;1;IF([.F13]=19;2;IF([.F13]=19;2;IF([.F13]=18;3;IF([.F13]=17;4;IF([.F13]=16;5;IF([.F13]=15;6;IF([.F13]=14;7;IF([.F13]=13;8;IF([.F13]=12;9;IF([.F13]=11;10;IF([.F13]=10;11;IF([.F13]=9;12;IF([.F13]=8;13;IF([.F13]=7;14;IF([.F13]=6;15;IF([.F13]=5;16;IF([.F13]=4;17;IF([.F13]=3;18;IF([.F13]=2;19;IF([.F13]=1;20;0)))))))))))))))))))))" office:value-type="float" office:value="14" calcext:value-type="float">
            <text:p>14</text:p>
          </table:table-cell>
          <table:table-cell table:style-name="ce134" office:value-type="float" office:value="22" calcext:value-type="float">
            <text:p>22º</text:p>
          </table:table-cell>
          <table:table-cell table:style-name="ce139" table:formula="of:=IF([.H13]=20;1;IF([.H13]=19;2;IF([.H13]=19;2;IF([.H13]=18;3;IF([.H13]=17;4;IF([.H13]=16;5;IF([.H13]=15;6;IF([.H13]=14;7;IF([.H13]=13;8;IF([.H13]=12;9;IF([.H13]=11;10;IF([.H13]=10;11;IF([.H13]=9;12;IF([.H13]=8;13;IF([.H13]=7;14;IF([.H13]=6;15;IF([.H13]=5;16;IF([.H13]=4;17;IF([.H13]=3;18;IF([.H13]=2;19;IF([.H13]=1;20;0)))))))))))))))))))))" office:value-type="float" office:value="0" calcext:value-type="float">
            <text:p>0</text:p>
          </table:table-cell>
          <table:table-cell table:style-name="ce134" office:value-type="float" office:value="1" calcext:value-type="float">
            <text:p>1º</text:p>
          </table:table-cell>
          <table:table-cell table:style-name="ce145" table:formula="of:=IF([.J13]=20;1;IF([.J13]=19;2;IF([.J13]=19;2;IF([.J13]=18;3;IF([.J13]=17;4;IF([.J13]=16;5;IF([.J13]=15;6;IF([.J13]=14;7;IF([.J13]=13;8;IF([.J13]=12;9;IF([.J13]=11;10;IF([.J13]=10;11;IF([.J13]=9;12;IF([.J13]=8;13;IF([.J13]=7;14;IF([.J13]=6;15;IF([.J13]=5;16;IF([.J13]=4;17;IF([.J13]=3;18;IF([.J13]=2;19;IF([.J13]=1;20;0)))))))))))))))))))))" office:value-type="float" office:value="20" calcext:value-type="float">
            <text:p>20</text:p>
          </table:table-cell>
          <table:table-cell table:style-name="ce151"/>
          <table:table-cell table:style-name="ce158" table:formula="of:=SUM([.C13];[.E13];[.G13];[.I13];[.K13])" office:value-type="float" office:value="45" calcext:value-type="float">
            <text:p>45</text:p>
          </table:table-cell>
          <table:table-cell table:style-name="ce160" table:formula="of:=RANK([.M13];[.$M$4:.$M$133])" office:value-type="float" office:value="2" calcext:value-type="float">
            <text:p>2º</text:p>
          </table:table-cell>
          <table:table-cell table:style-name="ce162"/>
          <table:table-cell table:style-name="ce169" office:value-type="float" office:value="8" calcext:value-type="float">
            <text:p>8</text:p>
          </table:table-cell>
          <table:table-cell table:style-name="ce175" office:value-type="float" office:value="6" calcext:value-type="float">
            <text:p>6</text:p>
          </table:table-cell>
          <table:table-cell table:style-name="ce175" office:value-type="float" office:value="12" calcext:value-type="float">
            <text:p>12</text:p>
          </table:table-cell>
          <table:table-cell table:style-name="ce180" office:value-type="float" office:value="11" calcext:value-type="float">
            <text:p>11</text:p>
          </table:table-cell>
          <table:table-cell table:style-name="ce185" office:value-type="float" office:value="7" calcext:value-type="float">
            <text:p>7</text:p>
          </table:table-cell>
          <table:table-cell table:style-name="ce188" table:formula="of:=SUM([.P13:.T13])" office:value-type="float" office:value="44" calcext:value-type="float">
            <text:p>44</text:p>
          </table:table-cell>
          <table:table-cell table:style-name="ce189" table:formula="of:=RANK([.U13];[.$U$4:.$U$133])" office:value-type="float" office:value="1" calcext:value-type="float">
            <text:p>1º</text:p>
          </table:table-cell>
          <table:table-cell table:style-name="ce162"/>
          <table:table-cell table:style-name="ce193" table:formula="of:=COUNTIF([.B13];&quot;&gt;0&quot;)+COUNTIF([.D13];&quot;&gt;0&quot;)+COUNTIF([.F13];&quot;&gt;0&quot;)+COUNTIF([.H13];&quot;&gt;0&quot;)+COUNTIF([.J13];&quot;&gt;0&quot;)" office:value-type="float" office:value="5" calcext:value-type="float">
            <text:p>5</text:p>
          </table:table-cell>
          <table:table-cell table:style-name="ce200" table:formula="of:=[.M13]/[.X13]" office:value-type="float" office:value="9" calcext:value-type="float">
            <text:p>9.0</text:p>
          </table:table-cell>
          <table:table-cell table:style-name="ce204" table:formula="of:=RANK([.Y13];[.$Y$4:.$Y$133])" office:value-type="float" office:value="10" calcext:value-type="float">
            <text:p>10º</text:p>
          </table:table-cell>
          <table:table-cell table:style-name="ce208" table:formula="of:=[.U13]/[.X13]" office:value-type="float" office:value="8.8" calcext:value-type="float">
            <text:p>8.8</text:p>
          </table:table-cell>
          <table:table-cell table:style-name="ce212" table:formula="of:=RANK([.AA13];[.$AA$4:.$AA$133])" office:value-type="float" office:value="4" calcext:value-type="float">
            <text:p>4º</text:p>
          </table:table-cell>
          <table:table-cell table:number-columns-repeated="996"/>
        </table:table-row>
        <table:table-row table:style-name="ro10">
          <table:table-cell table:style-name="ce126" office:value-type="string" calcext:value-type="string">
            <text:p>AUGUSTO</text:p>
          </table:table-cell>
          <table:table-cell table:style-name="ce134" office:value-type="float" office:value="31" calcext:value-type="float">
            <text:p>31º</text:p>
          </table:table-cell>
          <table:table-cell table:style-name="ce139" table:formula="of:=IF([.B14]=20;1;IF([.B14]=19;2;IF([.B14]=19;2;IF([.B14]=18;3;IF([.B14]=17;4;IF([.B14]=16;5;IF([.B14]=15;6;IF([.B14]=14;7;IF([.B14]=13;8;IF([.B14]=12;9;IF([.B14]=11;10;IF([.B14]=10;11;IF([.B14]=9;12;IF([.B14]=8;13;IF([.B14]=7;14;IF([.B14]=6;15;IF([.B14]=5;16;IF([.B14]=4;17;IF([.B14]=3;18;IF([.B14]=2;19;IF([.B14]=1;20;0)))))))))))))))))))))" office:value-type="float" office:value="0" calcext:value-type="float">
            <text:p>0</text:p>
          </table:table-cell>
          <table:table-cell table:style-name="ce134" office:value-type="float" office:value="28" calcext:value-type="float">
            <text:p>28º</text:p>
          </table:table-cell>
          <table:table-cell table:style-name="ce139" table:formula="of:=IF([.D14]=20;1;IF([.D14]=19;2;IF([.D14]=19;2;IF([.D14]=18;3;IF([.D14]=17;4;IF([.D14]=16;5;IF([.D14]=15;6;IF([.D14]=14;7;IF([.D14]=13;8;IF([.D14]=12;9;IF([.D14]=11;10;IF([.D14]=10;11;IF([.D14]=9;12;IF([.D14]=8;13;IF([.D14]=7;14;IF([.D14]=6;15;IF([.D14]=5;16;IF([.D14]=4;17;IF([.D14]=3;18;IF([.D14]=2;19;IF([.D14]=1;20;0)))))))))))))))))))))" office:value-type="float" office:value="0" calcext:value-type="float">
            <text:p>0</text:p>
          </table:table-cell>
          <table:table-cell table:style-name="ce134" office:value-type="float" office:value="62" calcext:value-type="float">
            <text:p>62º</text:p>
          </table:table-cell>
          <table:table-cell table:style-name="ce139" table:formula="of:=IF([.F14]=20;1;IF([.F14]=19;2;IF([.F14]=19;2;IF([.F14]=18;3;IF([.F14]=17;4;IF([.F14]=16;5;IF([.F14]=15;6;IF([.F14]=14;7;IF([.F14]=13;8;IF([.F14]=12;9;IF([.F14]=11;10;IF([.F14]=10;11;IF([.F14]=9;12;IF([.F14]=8;13;IF([.F14]=7;14;IF([.F14]=6;15;IF([.F14]=5;16;IF([.F14]=4;17;IF([.F14]=3;18;IF([.F14]=2;19;IF([.F14]=1;20;0)))))))))))))))))))))" office:value-type="float" office:value="0" calcext:value-type="float">
            <text:p>0</text:p>
          </table:table-cell>
          <table:table-cell table:style-name="ce134" office:value-type="float" office:value="64" calcext:value-type="float">
            <text:p>64º</text:p>
          </table:table-cell>
          <table:table-cell table:style-name="ce139" table:formula="of:=IF([.H14]=20;1;IF([.H14]=19;2;IF([.H14]=19;2;IF([.H14]=18;3;IF([.H14]=17;4;IF([.H14]=16;5;IF([.H14]=15;6;IF([.H14]=14;7;IF([.H14]=13;8;IF([.H14]=12;9;IF([.H14]=11;10;IF([.H14]=10;11;IF([.H14]=9;12;IF([.H14]=8;13;IF([.H14]=7;14;IF([.H14]=6;15;IF([.H14]=5;16;IF([.H14]=4;17;IF([.H14]=3;18;IF([.H14]=2;19;IF([.H14]=1;20;0)))))))))))))))))))))" office:value-type="float" office:value="0" calcext:value-type="float">
            <text:p>0</text:p>
          </table:table-cell>
          <table:table-cell table:style-name="ce134" office:value-type="float" office:value="33" calcext:value-type="float">
            <text:p>33º</text:p>
          </table:table-cell>
          <table:table-cell table:style-name="ce145" table:formula="of:=IF([.J14]=20;1;IF([.J14]=19;2;IF([.J14]=19;2;IF([.J14]=18;3;IF([.J14]=17;4;IF([.J14]=16;5;IF([.J14]=15;6;IF([.J14]=14;7;IF([.J14]=13;8;IF([.J14]=12;9;IF([.J14]=11;10;IF([.J14]=10;11;IF([.J14]=9;12;IF([.J14]=8;13;IF([.J14]=7;14;IF([.J14]=6;15;IF([.J14]=5;16;IF([.J14]=4;17;IF([.J14]=3;18;IF([.J14]=2;19;IF([.J14]=1;20;0)))))))))))))))))))))" office:value-type="float" office:value="0" calcext:value-type="float">
            <text:p>0</text:p>
          </table:table-cell>
          <table:table-cell table:style-name="ce150"/>
          <table:table-cell table:style-name="ce158" table:formula="of:=SUM([.C14];[.E14];[.G14];[.I14];[.K14])" office:value-type="float" office:value="0" calcext:value-type="float">
            <text:p>0</text:p>
          </table:table-cell>
          <table:table-cell table:style-name="ce160" table:formula="of:=RANK([.M14];[.$M$4:.$M$133])" office:value-type="float" office:value="71" calcext:value-type="float">
            <text:p>71º</text:p>
          </table:table-cell>
          <table:table-cell table:style-name="ce161"/>
          <table:table-cell table:style-name="ce169" office:value-type="float" office:value="3" calcext:value-type="float">
            <text:p>3</text:p>
          </table:table-cell>
          <table:table-cell table:style-name="ce175" office:value-type="float" office:value="4" calcext:value-type="float">
            <text:p>4</text:p>
          </table:table-cell>
          <table:table-cell table:style-name="ce175" office:value-type="float" office:value="7" calcext:value-type="float">
            <text:p>7</text:p>
          </table:table-cell>
          <table:table-cell table:style-name="ce180" office:value-type="float" office:value="4" calcext:value-type="float">
            <text:p>4</text:p>
          </table:table-cell>
          <table:table-cell table:style-name="ce185" office:value-type="float" office:value="1" calcext:value-type="float">
            <text:p>1</text:p>
          </table:table-cell>
          <table:table-cell table:style-name="ce188" table:formula="of:=SUM([.P14:.T14])" office:value-type="float" office:value="19" calcext:value-type="float">
            <text:p>19</text:p>
          </table:table-cell>
          <table:table-cell table:style-name="ce189" table:formula="of:=RANK([.U14];[.$U$4:.$U$133])" office:value-type="float" office:value="31" calcext:value-type="float">
            <text:p>31º</text:p>
          </table:table-cell>
          <table:table-cell table:style-name="ce161"/>
          <table:table-cell table:style-name="ce193" table:formula="of:=COUNTIF([.B14];&quot;&gt;0&quot;)+COUNTIF([.D14];&quot;&gt;0&quot;)+COUNTIF([.F14];&quot;&gt;0&quot;)+COUNTIF([.H14];&quot;&gt;0&quot;)+COUNTIF([.J14];&quot;&gt;0&quot;)" office:value-type="float" office:value="5" calcext:value-type="float">
            <text:p>5</text:p>
          </table:table-cell>
          <table:table-cell table:style-name="ce200" table:formula="of:=[.M14]/[.X14]" office:value-type="float" office:value="0" calcext:value-type="float">
            <text:p>0.0</text:p>
          </table:table-cell>
          <table:table-cell table:style-name="ce204" table:formula="of:=RANK([.Y14];[.$Y$4:.$Y$133])" office:value-type="float" office:value="71" calcext:value-type="float">
            <text:p>71º</text:p>
          </table:table-cell>
          <table:table-cell table:style-name="ce208" table:formula="of:=[.U14]/[.X14]" office:value-type="float" office:value="3.8" calcext:value-type="float">
            <text:p>3.8</text:p>
          </table:table-cell>
          <table:table-cell table:style-name="ce212" table:formula="of:=RANK([.AA14];[.$AA$4:.$AA$133])" office:value-type="float" office:value="107" calcext:value-type="float">
            <text:p>107º</text:p>
          </table:table-cell>
          <table:table-cell table:number-columns-repeated="996"/>
        </table:table-row>
        <table:table-row table:style-name="ro10">
          <table:table-cell table:style-name="ce126" office:value-type="string" calcext:value-type="string">
            <text:p>BÁRBARA MARIANO</text:p>
          </table:table-cell>
          <table:table-cell table:style-name="ce134" office:value-type="string" calcext:value-type="string">
            <text:p>-</text:p>
          </table:table-cell>
          <table:table-cell table:style-name="ce139" table:formula="of:=IF([.B15]=20;1;IF([.B15]=19;2;IF([.B15]=19;2;IF([.B15]=18;3;IF([.B15]=17;4;IF([.B15]=16;5;IF([.B15]=15;6;IF([.B15]=14;7;IF([.B15]=13;8;IF([.B15]=12;9;IF([.B15]=11;10;IF([.B15]=10;11;IF([.B15]=9;12;IF([.B15]=8;13;IF([.B15]=7;14;IF([.B15]=6;15;IF([.B15]=5;16;IF([.B15]=4;17;IF([.B15]=3;18;IF([.B15]=2;19;IF([.B15]=1;20;0)))))))))))))))))))))" office:value-type="float" office:value="0" calcext:value-type="float">
            <text:p>0</text:p>
          </table:table-cell>
          <table:table-cell table:style-name="ce134" office:value-type="float" office:value="2" calcext:value-type="float">
            <text:p>2º</text:p>
          </table:table-cell>
          <table:table-cell table:style-name="ce139" table:formula="of:=IF([.D15]=20;1;IF([.D15]=19;2;IF([.D15]=19;2;IF([.D15]=18;3;IF([.D15]=17;4;IF([.D15]=16;5;IF([.D15]=15;6;IF([.D15]=14;7;IF([.D15]=13;8;IF([.D15]=12;9;IF([.D15]=11;10;IF([.D15]=10;11;IF([.D15]=9;12;IF([.D15]=8;13;IF([.D15]=7;14;IF([.D15]=6;15;IF([.D15]=5;16;IF([.D15]=4;17;IF([.D15]=3;18;IF([.D15]=2;19;IF([.D15]=1;20;0)))))))))))))))))))))" office:value-type="float" office:value="19" calcext:value-type="float">
            <text:p>19</text:p>
          </table:table-cell>
          <table:table-cell table:style-name="ce134" office:value-type="float" office:value="30" calcext:value-type="float">
            <text:p>30º</text:p>
          </table:table-cell>
          <table:table-cell table:style-name="ce139" table:formula="of:=IF([.F15]=20;1;IF([.F15]=19;2;IF([.F15]=19;2;IF([.F15]=18;3;IF([.F15]=17;4;IF([.F15]=16;5;IF([.F15]=15;6;IF([.F15]=14;7;IF([.F15]=13;8;IF([.F15]=12;9;IF([.F15]=11;10;IF([.F15]=10;11;IF([.F15]=9;12;IF([.F15]=8;13;IF([.F15]=7;14;IF([.F15]=6;15;IF([.F15]=5;16;IF([.F15]=4;17;IF([.F15]=3;18;IF([.F15]=2;19;IF([.F15]=1;20;0)))))))))))))))))))))" office:value-type="float" office:value="0" calcext:value-type="float">
            <text:p>0</text:p>
          </table:table-cell>
          <table:table-cell table:style-name="ce134" office:value-type="float" office:value="48" calcext:value-type="float">
            <text:p>48º</text:p>
          </table:table-cell>
          <table:table-cell table:style-name="ce139" table:formula="of:=IF([.H15]=20;1;IF([.H15]=19;2;IF([.H15]=19;2;IF([.H15]=18;3;IF([.H15]=17;4;IF([.H15]=16;5;IF([.H15]=15;6;IF([.H15]=14;7;IF([.H15]=13;8;IF([.H15]=12;9;IF([.H15]=11;10;IF([.H15]=10;11;IF([.H15]=9;12;IF([.H15]=8;13;IF([.H15]=7;14;IF([.H15]=6;15;IF([.H15]=5;16;IF([.H15]=4;17;IF([.H15]=3;18;IF([.H15]=2;19;IF([.H15]=1;20;0)))))))))))))))))))))" office:value-type="float" office:value="0" calcext:value-type="float">
            <text:p>0</text:p>
          </table:table-cell>
          <table:table-cell table:style-name="ce134" office:value-type="float" office:value="34" calcext:value-type="float">
            <text:p>34º</text:p>
          </table:table-cell>
          <table:table-cell table:style-name="ce145" table:formula="of:=IF([.J15]=20;1;IF([.J15]=19;2;IF([.J15]=19;2;IF([.J15]=18;3;IF([.J15]=17;4;IF([.J15]=16;5;IF([.J15]=15;6;IF([.J15]=14;7;IF([.J15]=13;8;IF([.J15]=12;9;IF([.J15]=11;10;IF([.J15]=10;11;IF([.J15]=9;12;IF([.J15]=8;13;IF([.J15]=7;14;IF([.J15]=6;15;IF([.J15]=5;16;IF([.J15]=4;17;IF([.J15]=3;18;IF([.J15]=2;19;IF([.J15]=1;20;0)))))))))))))))))))))" office:value-type="float" office:value="0" calcext:value-type="float">
            <text:p>0</text:p>
          </table:table-cell>
          <table:table-cell table:style-name="ce150"/>
          <table:table-cell table:style-name="ce158" table:formula="of:=SUM([.C15];[.E15];[.G15];[.I15];[.K15])" office:value-type="float" office:value="19" calcext:value-type="float">
            <text:p>19</text:p>
          </table:table-cell>
          <table:table-cell table:style-name="ce160" table:formula="of:=RANK([.M15];[.$M$4:.$M$133])" office:value-type="float" office:value="20" calcext:value-type="float">
            <text:p>20º</text:p>
          </table:table-cell>
          <table:table-cell table:style-name="ce161"/>
          <table:table-cell table:style-name="ce169" office:value-type="string" calcext:value-type="string">
            <text:p>-</text:p>
          </table:table-cell>
          <table:table-cell table:style-name="ce175" office:value-type="float" office:value="6" calcext:value-type="float">
            <text:p>6</text:p>
          </table:table-cell>
          <table:table-cell table:style-name="ce175" office:value-type="float" office:value="4" calcext:value-type="float">
            <text:p>4</text:p>
          </table:table-cell>
          <table:table-cell table:style-name="ce180" office:value-type="float" office:value="6" calcext:value-type="float">
            <text:p>6</text:p>
          </table:table-cell>
          <table:table-cell table:style-name="ce185" office:value-type="float" office:value="2" calcext:value-type="float">
            <text:p>2</text:p>
          </table:table-cell>
          <table:table-cell table:style-name="ce188" table:formula="of:=SUM([.P15:.T15])" office:value-type="float" office:value="18" calcext:value-type="float">
            <text:p>18</text:p>
          </table:table-cell>
          <table:table-cell table:style-name="ce189" table:formula="of:=RANK([.U15];[.$U$4:.$U$133])" office:value-type="float" office:value="34" calcext:value-type="float">
            <text:p>34º</text:p>
          </table:table-cell>
          <table:table-cell table:style-name="ce161"/>
          <table:table-cell table:style-name="ce193" table:formula="of:=COUNTIF([.B15];&quot;&gt;0&quot;)+COUNTIF([.D15];&quot;&gt;0&quot;)+COUNTIF([.F15];&quot;&gt;0&quot;)+COUNTIF([.H15];&quot;&gt;0&quot;)+COUNTIF([.J15];&quot;&gt;0&quot;)" office:value-type="float" office:value="4" calcext:value-type="float">
            <text:p>4</text:p>
          </table:table-cell>
          <table:table-cell table:style-name="ce200" table:formula="of:=[.M15]/[.X15]" office:value-type="float" office:value="4.75" calcext:value-type="float">
            <text:p>4.8</text:p>
          </table:table-cell>
          <table:table-cell table:style-name="ce204" table:formula="of:=RANK([.Y15];[.$Y$4:.$Y$133])" office:value-type="float" office:value="31" calcext:value-type="float">
            <text:p>31º</text:p>
          </table:table-cell>
          <table:table-cell table:style-name="ce208" table:formula="of:=[.U15]/[.X15]" office:value-type="float" office:value="4.5" calcext:value-type="float">
            <text:p>4.5</text:p>
          </table:table-cell>
          <table:table-cell table:style-name="ce212" table:formula="of:=RANK([.AA15];[.$AA$4:.$AA$133])" office:value-type="float" office:value="91" calcext:value-type="float">
            <text:p>91º</text:p>
          </table:table-cell>
          <table:table-cell table:number-columns-repeated="996"/>
        </table:table-row>
        <table:table-row table:style-name="ro10">
          <table:table-cell table:style-name="ce126" office:value-type="string" calcext:value-type="string">
            <text:p>BÊRA</text:p>
          </table:table-cell>
          <table:table-cell table:style-name="ce134" office:value-type="float" office:value="36" calcext:value-type="float">
            <text:p>36º</text:p>
          </table:table-cell>
          <table:table-cell table:style-name="ce139" table:formula="of:=IF([.B16]=20;1;IF([.B16]=19;2;IF([.B16]=19;2;IF([.B16]=18;3;IF([.B16]=17;4;IF([.B16]=16;5;IF([.B16]=15;6;IF([.B16]=14;7;IF([.B16]=13;8;IF([.B16]=12;9;IF([.B16]=11;10;IF([.B16]=10;11;IF([.B16]=9;12;IF([.B16]=8;13;IF([.B16]=7;14;IF([.B16]=6;15;IF([.B16]=5;16;IF([.B16]=4;17;IF([.B16]=3;18;IF([.B16]=2;19;IF([.B16]=1;20;0)))))))))))))))))))))" office:value-type="float" office:value="0" calcext:value-type="float">
            <text:p>0</text:p>
          </table:table-cell>
          <table:table-cell table:style-name="ce134" office:value-type="float" office:value="5" calcext:value-type="float">
            <text:p>5º</text:p>
          </table:table-cell>
          <table:table-cell table:style-name="ce139" table:formula="of:=IF([.D16]=20;1;IF([.D16]=19;2;IF([.D16]=19;2;IF([.D16]=18;3;IF([.D16]=17;4;IF([.D16]=16;5;IF([.D16]=15;6;IF([.D16]=14;7;IF([.D16]=13;8;IF([.D16]=12;9;IF([.D16]=11;10;IF([.D16]=10;11;IF([.D16]=9;12;IF([.D16]=8;13;IF([.D16]=7;14;IF([.D16]=6;15;IF([.D16]=5;16;IF([.D16]=4;17;IF([.D16]=3;18;IF([.D16]=2;19;IF([.D16]=1;20;0)))))))))))))))))))))" office:value-type="float" office:value="16" calcext:value-type="float">
            <text:p>16</text:p>
          </table:table-cell>
          <table:table-cell table:style-name="ce134" office:value-type="float" office:value="50" calcext:value-type="float">
            <text:p>50º</text:p>
          </table:table-cell>
          <table:table-cell table:style-name="ce139" table:formula="of:=IF([.F16]=20;1;IF([.F16]=19;2;IF([.F16]=19;2;IF([.F16]=18;3;IF([.F16]=17;4;IF([.F16]=16;5;IF([.F16]=15;6;IF([.F16]=14;7;IF([.F16]=13;8;IF([.F16]=12;9;IF([.F16]=11;10;IF([.F16]=10;11;IF([.F16]=9;12;IF([.F16]=8;13;IF([.F16]=7;14;IF([.F16]=6;15;IF([.F16]=5;16;IF([.F16]=4;17;IF([.F16]=3;18;IF([.F16]=2;19;IF([.F16]=1;20;0)))))))))))))))))))))" office:value-type="float" office:value="0" calcext:value-type="float">
            <text:p>0</text:p>
          </table:table-cell>
          <table:table-cell table:style-name="ce134" office:value-type="float" office:value="94" calcext:value-type="float">
            <text:p>94º</text:p>
          </table:table-cell>
          <table:table-cell table:style-name="ce139" table:formula="of:=IF([.H16]=20;1;IF([.H16]=19;2;IF([.H16]=19;2;IF([.H16]=18;3;IF([.H16]=17;4;IF([.H16]=16;5;IF([.H16]=15;6;IF([.H16]=14;7;IF([.H16]=13;8;IF([.H16]=12;9;IF([.H16]=11;10;IF([.H16]=10;11;IF([.H16]=9;12;IF([.H16]=8;13;IF([.H16]=7;14;IF([.H16]=6;15;IF([.H16]=5;16;IF([.H16]=4;17;IF([.H16]=3;18;IF([.H16]=2;19;IF([.H16]=1;20;0)))))))))))))))))))))" office:value-type="float" office:value="0" calcext:value-type="float">
            <text:p>0</text:p>
          </table:table-cell>
          <table:table-cell table:style-name="ce134" office:value-type="string" calcext:value-type="string">
            <text:p>-</text:p>
          </table:table-cell>
          <table:table-cell table:style-name="ce145" table:formula="of:=IF([.J16]=20;1;IF([.J16]=19;2;IF([.J16]=19;2;IF([.J16]=18;3;IF([.J16]=17;4;IF([.J16]=16;5;IF([.J16]=15;6;IF([.J16]=14;7;IF([.J16]=13;8;IF([.J16]=12;9;IF([.J16]=11;10;IF([.J16]=10;11;IF([.J16]=9;12;IF([.J16]=8;13;IF([.J16]=7;14;IF([.J16]=6;15;IF([.J16]=5;16;IF([.J16]=4;17;IF([.J16]=3;18;IF([.J16]=2;19;IF([.J16]=1;20;0)))))))))))))))))))))" office:value-type="float" office:value="0" calcext:value-type="float">
            <text:p>0</text:p>
          </table:table-cell>
          <table:table-cell table:style-name="ce150"/>
          <table:table-cell table:style-name="ce158" table:formula="of:=SUM([.C16];[.E16];[.G16];[.I16];[.K16])" office:value-type="float" office:value="16" calcext:value-type="float">
            <text:p>16</text:p>
          </table:table-cell>
          <table:table-cell table:style-name="ce160" table:formula="of:=RANK([.M16];[.$M$4:.$M$133])" office:value-type="float" office:value="33" calcext:value-type="float">
            <text:p>33º</text:p>
          </table:table-cell>
          <table:table-cell table:style-name="ce161"/>
          <table:table-cell table:style-name="ce169" office:value-type="float" office:value="2" calcext:value-type="float">
            <text:p>2</text:p>
          </table:table-cell>
          <table:table-cell table:number-columns-repeated="2" table:style-name="ce175" office:value-type="float" office:value="8" calcext:value-type="float">
            <text:p>8</text:p>
          </table:table-cell>
          <table:table-cell table:style-name="ce180" office:value-type="float" office:value="7" calcext:value-type="float">
            <text:p>7</text:p>
          </table:table-cell>
          <table:table-cell table:style-name="ce185" office:value-type="string" calcext:value-type="string">
            <text:p>-</text:p>
          </table:table-cell>
          <table:table-cell table:style-name="ce188" table:formula="of:=SUM([.P16:.T16])" office:value-type="float" office:value="25" calcext:value-type="float">
            <text:p>25</text:p>
          </table:table-cell>
          <table:table-cell table:style-name="ce189" table:formula="of:=RANK([.U16];[.$U$4:.$U$133])" office:value-type="float" office:value="21" calcext:value-type="float">
            <text:p>21º</text:p>
          </table:table-cell>
          <table:table-cell table:style-name="ce161"/>
          <table:table-cell table:style-name="ce193" table:formula="of:=COUNTIF([.B16];&quot;&gt;0&quot;)+COUNTIF([.D16];&quot;&gt;0&quot;)+COUNTIF([.F16];&quot;&gt;0&quot;)+COUNTIF([.H16];&quot;&gt;0&quot;)+COUNTIF([.J16];&quot;&gt;0&quot;)" office:value-type="float" office:value="4" calcext:value-type="float">
            <text:p>4</text:p>
          </table:table-cell>
          <table:table-cell table:style-name="ce200" table:formula="of:=[.M16]/[.X16]" office:value-type="float" office:value="4" calcext:value-type="float">
            <text:p>4.0</text:p>
          </table:table-cell>
          <table:table-cell table:style-name="ce204" table:formula="of:=RANK([.Y16];[.$Y$4:.$Y$133])" office:value-type="float" office:value="39" calcext:value-type="float">
            <text:p>39º</text:p>
          </table:table-cell>
          <table:table-cell table:style-name="ce208" table:formula="of:=[.U16]/[.X16]" office:value-type="float" office:value="6.25" calcext:value-type="float">
            <text:p>6.3</text:p>
          </table:table-cell>
          <table:table-cell table:style-name="ce212" table:formula="of:=RANK([.AA16];[.$AA$4:.$AA$133])" office:value-type="float" office:value="32" calcext:value-type="float">
            <text:p>32º</text:p>
          </table:table-cell>
          <table:table-cell table:number-columns-repeated="996"/>
        </table:table-row>
        <table:table-row table:style-name="ro10">
          <table:table-cell table:style-name="ce126" office:value-type="string" calcext:value-type="string">
            <text:p>BERNARDO</text:p>
          </table:table-cell>
          <table:table-cell table:style-name="ce134" office:value-type="string" calcext:value-type="string">
            <text:p>-</text:p>
          </table:table-cell>
          <table:table-cell table:style-name="ce139" table:formula="of:=IF([.B17]=20;1;IF([.B17]=19;2;IF([.B17]=19;2;IF([.B17]=18;3;IF([.B17]=17;4;IF([.B17]=16;5;IF([.B17]=15;6;IF([.B17]=14;7;IF([.B17]=13;8;IF([.B17]=12;9;IF([.B17]=11;10;IF([.B17]=10;11;IF([.B17]=9;12;IF([.B17]=8;13;IF([.B17]=7;14;IF([.B17]=6;15;IF([.B17]=5;16;IF([.B17]=4;17;IF([.B17]=3;18;IF([.B17]=2;19;IF([.B17]=1;20;0)))))))))))))))))))))" office:value-type="float" office:value="0" calcext:value-type="float">
            <text:p>0</text:p>
          </table:table-cell>
          <table:table-cell table:style-name="ce134" office:value-type="string" calcext:value-type="string">
            <text:p>-</text:p>
          </table:table-cell>
          <table:table-cell table:style-name="ce139" table:formula="of:=IF([.D17]=20;1;IF([.D17]=19;2;IF([.D17]=19;2;IF([.D17]=18;3;IF([.D17]=17;4;IF([.D17]=16;5;IF([.D17]=15;6;IF([.D17]=14;7;IF([.D17]=13;8;IF([.D17]=12;9;IF([.D17]=11;10;IF([.D17]=10;11;IF([.D17]=9;12;IF([.D17]=8;13;IF([.D17]=7;14;IF([.D17]=6;15;IF([.D17]=5;16;IF([.D17]=4;17;IF([.D17]=3;18;IF([.D17]=2;19;IF([.D17]=1;20;0)))))))))))))))))))))" office:value-type="float" office:value="0" calcext:value-type="float">
            <text:p>0</text:p>
          </table:table-cell>
          <table:table-cell table:style-name="ce134" office:value-type="string" calcext:value-type="string">
            <text:p>-</text:p>
          </table:table-cell>
          <table:table-cell table:style-name="ce139" table:formula="of:=IF([.F17]=20;1;IF([.F17]=19;2;IF([.F17]=19;2;IF([.F17]=18;3;IF([.F17]=17;4;IF([.F17]=16;5;IF([.F17]=15;6;IF([.F17]=14;7;IF([.F17]=13;8;IF([.F17]=12;9;IF([.F17]=11;10;IF([.F17]=10;11;IF([.F17]=9;12;IF([.F17]=8;13;IF([.F17]=7;14;IF([.F17]=6;15;IF([.F17]=5;16;IF([.F17]=4;17;IF([.F17]=3;18;IF([.F17]=2;19;IF([.F17]=1;20;0)))))))))))))))))))))" office:value-type="float" office:value="0" calcext:value-type="float">
            <text:p>0</text:p>
          </table:table-cell>
          <table:table-cell table:style-name="ce134" office:value-type="float" office:value="18" calcext:value-type="float">
            <text:p>18º</text:p>
          </table:table-cell>
          <table:table-cell table:style-name="ce139" table:formula="of:=IF([.H17]=20;1;IF([.H17]=19;2;IF([.H17]=19;2;IF([.H17]=18;3;IF([.H17]=17;4;IF([.H17]=16;5;IF([.H17]=15;6;IF([.H17]=14;7;IF([.H17]=13;8;IF([.H17]=12;9;IF([.H17]=11;10;IF([.H17]=10;11;IF([.H17]=9;12;IF([.H17]=8;13;IF([.H17]=7;14;IF([.H17]=6;15;IF([.H17]=5;16;IF([.H17]=4;17;IF([.H17]=3;18;IF([.H17]=2;19;IF([.H17]=1;20;0)))))))))))))))))))))" office:value-type="float" office:value="3" calcext:value-type="float">
            <text:p>3</text:p>
          </table:table-cell>
          <table:table-cell table:style-name="ce134" office:value-type="string" calcext:value-type="string">
            <text:p>-</text:p>
          </table:table-cell>
          <table:table-cell table:style-name="ce145" table:formula="of:=IF([.J17]=20;1;IF([.J17]=19;2;IF([.J17]=19;2;IF([.J17]=18;3;IF([.J17]=17;4;IF([.J17]=16;5;IF([.J17]=15;6;IF([.J17]=14;7;IF([.J17]=13;8;IF([.J17]=12;9;IF([.J17]=11;10;IF([.J17]=10;11;IF([.J17]=9;12;IF([.J17]=8;13;IF([.J17]=7;14;IF([.J17]=6;15;IF([.J17]=5;16;IF([.J17]=4;17;IF([.J17]=3;18;IF([.J17]=2;19;IF([.J17]=1;20;0)))))))))))))))))))))" office:value-type="float" office:value="0" calcext:value-type="float">
            <text:p>0</text:p>
          </table:table-cell>
          <table:table-cell table:style-name="ce150"/>
          <table:table-cell table:style-name="ce158" table:formula="of:=SUM([.C17];[.E17];[.G17];[.I17];[.K17])" office:value-type="float" office:value="3" calcext:value-type="float">
            <text:p>3</text:p>
          </table:table-cell>
          <table:table-cell table:style-name="ce160" table:formula="of:=RANK([.M17];[.$M$4:.$M$133])" office:value-type="float" office:value="64" calcext:value-type="float">
            <text:p>64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7" calcext:value-type="float">
            <text:p>7</text:p>
          </table:table-cell>
          <table:table-cell table:style-name="ce185" office:value-type="string" calcext:value-type="string">
            <text:p>-</text:p>
          </table:table-cell>
          <table:table-cell table:style-name="ce188" table:formula="of:=SUM([.P17:.T17])" office:value-type="float" office:value="7" calcext:value-type="float">
            <text:p>7</text:p>
          </table:table-cell>
          <table:table-cell table:style-name="ce189" table:formula="of:=RANK([.U17];[.$U$4:.$U$133])" office:value-type="float" office:value="77" calcext:value-type="float">
            <text:p>77º</text:p>
          </table:table-cell>
          <table:table-cell table:style-name="ce161"/>
          <table:table-cell table:style-name="ce193" table:formula="of:=COUNTIF([.B17];&quot;&gt;0&quot;)+COUNTIF([.D17];&quot;&gt;0&quot;)+COUNTIF([.F17];&quot;&gt;0&quot;)+COUNTIF([.H17];&quot;&gt;0&quot;)+COUNTIF([.J17];&quot;&gt;0&quot;)" office:value-type="float" office:value="1" calcext:value-type="float">
            <text:p>1</text:p>
          </table:table-cell>
          <table:table-cell table:style-name="ce200" table:formula="of:=[.M17]/[.X17]" office:value-type="float" office:value="3" calcext:value-type="float">
            <text:p>3.0</text:p>
          </table:table-cell>
          <table:table-cell table:style-name="ce204" table:formula="of:=RANK([.Y17];[.$Y$4:.$Y$133])" office:value-type="float" office:value="51" calcext:value-type="float">
            <text:p>51º</text:p>
          </table:table-cell>
          <table:table-cell table:style-name="ce208" table:formula="of:=[.U17]/[.X17]" office:value-type="float" office:value="7" calcext:value-type="float">
            <text:p>7.0</text:p>
          </table:table-cell>
          <table:table-cell table:style-name="ce212" table:formula="of:=RANK([.AA17];[.$AA$4:.$AA$133])" office:value-type="float" office:value="11" calcext:value-type="float">
            <text:p>11º</text:p>
          </table:table-cell>
          <table:table-cell table:number-columns-repeated="996"/>
        </table:table-row>
        <table:table-row table:style-name="ro10">
          <table:table-cell table:style-name="ce126" office:value-type="string" calcext:value-type="string">
            <text:p>BIA</text:p>
          </table:table-cell>
          <table:table-cell table:style-name="ce134" office:value-type="string" calcext:value-type="string">
            <text:p>-</text:p>
          </table:table-cell>
          <table:table-cell table:style-name="ce139" table:formula="of:=IF([.B18]=20;1;IF([.B18]=19;2;IF([.B18]=19;2;IF([.B18]=18;3;IF([.B18]=17;4;IF([.B18]=16;5;IF([.B18]=15;6;IF([.B18]=14;7;IF([.B18]=13;8;IF([.B18]=12;9;IF([.B18]=11;10;IF([.B18]=10;11;IF([.B18]=9;12;IF([.B18]=8;13;IF([.B18]=7;14;IF([.B18]=6;15;IF([.B18]=5;16;IF([.B18]=4;17;IF([.B18]=3;18;IF([.B18]=2;19;IF([.B18]=1;20;0)))))))))))))))))))))" office:value-type="float" office:value="0" calcext:value-type="float">
            <text:p>0</text:p>
          </table:table-cell>
          <table:table-cell table:style-name="ce134" office:value-type="string" calcext:value-type="string">
            <text:p>-</text:p>
          </table:table-cell>
          <table:table-cell table:style-name="ce139" table:formula="of:=IF([.D18]=20;1;IF([.D18]=19;2;IF([.D18]=19;2;IF([.D18]=18;3;IF([.D18]=17;4;IF([.D18]=16;5;IF([.D18]=15;6;IF([.D18]=14;7;IF([.D18]=13;8;IF([.D18]=12;9;IF([.D18]=11;10;IF([.D18]=10;11;IF([.D18]=9;12;IF([.D18]=8;13;IF([.D18]=7;14;IF([.D18]=6;15;IF([.D18]=5;16;IF([.D18]=4;17;IF([.D18]=3;18;IF([.D18]=2;19;IF([.D18]=1;20;0)))))))))))))))))))))" office:value-type="float" office:value="0" calcext:value-type="float">
            <text:p>0</text:p>
          </table:table-cell>
          <table:table-cell table:style-name="ce134" office:value-type="float" office:value="72" calcext:value-type="float">
            <text:p>72º</text:p>
          </table:table-cell>
          <table:table-cell table:style-name="ce139" table:formula="of:=IF([.F18]=20;1;IF([.F18]=19;2;IF([.F18]=19;2;IF([.F18]=18;3;IF([.F18]=17;4;IF([.F18]=16;5;IF([.F18]=15;6;IF([.F18]=14;7;IF([.F18]=13;8;IF([.F18]=12;9;IF([.F18]=11;10;IF([.F18]=10;11;IF([.F18]=9;12;IF([.F18]=8;13;IF([.F18]=7;14;IF([.F18]=6;15;IF([.F18]=5;16;IF([.F18]=4;17;IF([.F18]=3;18;IF([.F18]=2;19;IF([.F18]=1;20;0)))))))))))))))))))))" office:value-type="float" office:value="0" calcext:value-type="float">
            <text:p>0</text:p>
          </table:table-cell>
          <table:table-cell table:style-name="ce134" office:value-type="float" office:value="58" calcext:value-type="float">
            <text:p>58º</text:p>
          </table:table-cell>
          <table:table-cell table:style-name="ce139" table:formula="of:=IF([.H18]=20;1;IF([.H18]=19;2;IF([.H18]=19;2;IF([.H18]=18;3;IF([.H18]=17;4;IF([.H18]=16;5;IF([.H18]=15;6;IF([.H18]=14;7;IF([.H18]=13;8;IF([.H18]=12;9;IF([.H18]=11;10;IF([.H18]=10;11;IF([.H18]=9;12;IF([.H18]=8;13;IF([.H18]=7;14;IF([.H18]=6;15;IF([.H18]=5;16;IF([.H18]=4;17;IF([.H18]=3;18;IF([.H18]=2;19;IF([.H18]=1;20;0)))))))))))))))))))))" office:value-type="float" office:value="0" calcext:value-type="float">
            <text:p>0</text:p>
          </table:table-cell>
          <table:table-cell table:style-name="ce134" office:value-type="string" calcext:value-type="string">
            <text:p>-</text:p>
          </table:table-cell>
          <table:table-cell table:style-name="ce145" table:formula="of:=IF([.J18]=20;1;IF([.J18]=19;2;IF([.J18]=19;2;IF([.J18]=18;3;IF([.J18]=17;4;IF([.J18]=16;5;IF([.J18]=15;6;IF([.J18]=14;7;IF([.J18]=13;8;IF([.J18]=12;9;IF([.J18]=11;10;IF([.J18]=10;11;IF([.J18]=9;12;IF([.J18]=8;13;IF([.J18]=7;14;IF([.J18]=6;15;IF([.J18]=5;16;IF([.J18]=4;17;IF([.J18]=3;18;IF([.J18]=2;19;IF([.J18]=1;20;0)))))))))))))))))))))" office:value-type="float" office:value="0" calcext:value-type="float">
            <text:p>0</text:p>
          </table:table-cell>
          <table:table-cell table:style-name="ce150"/>
          <table:table-cell table:style-name="ce158" table:formula="of:=SUM([.C18];[.E18];[.G18];[.I18];[.K18])" office:value-type="float" office:value="0" calcext:value-type="float">
            <text:p>0</text:p>
          </table:table-cell>
          <table:table-cell table:style-name="ce160" table:formula="of:=RANK([.M18];[.$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4" calcext:value-type="float">
            <text:p>4</text:p>
          </table:table-cell>
          <table:table-cell table:style-name="ce180" office:value-type="float" office:value="6" calcext:value-type="float">
            <text:p>6</text:p>
          </table:table-cell>
          <table:table-cell table:style-name="ce185" office:value-type="string" calcext:value-type="string">
            <text:p>-</text:p>
          </table:table-cell>
          <table:table-cell table:style-name="ce188" table:formula="of:=SUM([.P18:.T18])" office:value-type="float" office:value="10" calcext:value-type="float">
            <text:p>10</text:p>
          </table:table-cell>
          <table:table-cell table:style-name="ce189" table:formula="of:=RANK([.U18];[.$U$4:.$U$133])" office:value-type="float" office:value="65" calcext:value-type="float">
            <text:p>65º</text:p>
          </table:table-cell>
          <table:table-cell table:style-name="ce161"/>
          <table:table-cell table:style-name="ce193" table:formula="of:=COUNTIF([.B18];&quot;&gt;0&quot;)+COUNTIF([.D18];&quot;&gt;0&quot;)+COUNTIF([.F18];&quot;&gt;0&quot;)+COUNTIF([.H18];&quot;&gt;0&quot;)+COUNTIF([.J18];&quot;&gt;0&quot;)" office:value-type="float" office:value="2" calcext:value-type="float">
            <text:p>2</text:p>
          </table:table-cell>
          <table:table-cell table:style-name="ce200" table:formula="of:=[.M18]/[.X18]" office:value-type="float" office:value="0" calcext:value-type="float">
            <text:p>0.0</text:p>
          </table:table-cell>
          <table:table-cell table:style-name="ce204" table:formula="of:=RANK([.Y18];[.$Y$4:.$Y$133])" office:value-type="float" office:value="71" calcext:value-type="float">
            <text:p>71º</text:p>
          </table:table-cell>
          <table:table-cell table:style-name="ce208" table:formula="of:=[.U18]/[.X18]" office:value-type="float" office:value="5" calcext:value-type="float">
            <text:p>5.0</text:p>
          </table:table-cell>
          <table:table-cell table:style-name="ce212" table:formula="of:=RANK([.AA18];[.$AA$4:.$AA$133])" office:value-type="float" office:value="68" calcext:value-type="float">
            <text:p>68º</text:p>
          </table:table-cell>
          <table:table-cell table:number-columns-repeated="996"/>
        </table:table-row>
        <table:table-row table:style-name="ro10">
          <table:table-cell table:style-name="ce126" office:value-type="string" calcext:value-type="string">
            <text:p>BRUNO e CLARISSA</text:p>
          </table:table-cell>
          <table:table-cell table:style-name="ce134" office:value-type="string" calcext:value-type="string">
            <text:p>-</text:p>
          </table:table-cell>
          <table:table-cell table:style-name="ce139" table:formula="of:=IF([.B19]=20;1;IF([.B19]=19;2;IF([.B19]=19;2;IF([.B19]=18;3;IF([.B19]=17;4;IF([.B19]=16;5;IF([.B19]=15;6;IF([.B19]=14;7;IF([.B19]=13;8;IF([.B19]=12;9;IF([.B19]=11;10;IF([.B19]=10;11;IF([.B19]=9;12;IF([.B19]=8;13;IF([.B19]=7;14;IF([.B19]=6;15;IF([.B19]=5;16;IF([.B19]=4;17;IF([.B19]=3;18;IF([.B19]=2;19;IF([.B19]=1;20;0)))))))))))))))))))))" office:value-type="float" office:value="0" calcext:value-type="float">
            <text:p>0</text:p>
          </table:table-cell>
          <table:table-cell table:style-name="ce134" office:value-type="float" office:value="19" calcext:value-type="float">
            <text:p>19º</text:p>
          </table:table-cell>
          <table:table-cell table:style-name="ce139" table:formula="of:=IF([.D19]=20;1;IF([.D19]=19;2;IF([.D19]=19;2;IF([.D19]=18;3;IF([.D19]=17;4;IF([.D19]=16;5;IF([.D19]=15;6;IF([.D19]=14;7;IF([.D19]=13;8;IF([.D19]=12;9;IF([.D19]=11;10;IF([.D19]=10;11;IF([.D19]=9;12;IF([.D19]=8;13;IF([.D19]=7;14;IF([.D19]=6;15;IF([.D19]=5;16;IF([.D19]=4;17;IF([.D19]=3;18;IF([.D19]=2;19;IF([.D19]=1;20;0)))))))))))))))))))))" office:value-type="float" office:value="2" calcext:value-type="float">
            <text:p>2</text:p>
          </table:table-cell>
          <table:table-cell table:style-name="ce134" office:value-type="float" office:value="12" calcext:value-type="float">
            <text:p>12º</text:p>
          </table:table-cell>
          <table:table-cell table:style-name="ce139" table:formula="of:=IF([.F19]=20;1;IF([.F19]=19;2;IF([.F19]=19;2;IF([.F19]=18;3;IF([.F19]=17;4;IF([.F19]=16;5;IF([.F19]=15;6;IF([.F19]=14;7;IF([.F19]=13;8;IF([.F19]=12;9;IF([.F19]=11;10;IF([.F19]=10;11;IF([.F19]=9;12;IF([.F19]=8;13;IF([.F19]=7;14;IF([.F19]=6;15;IF([.F19]=5;16;IF([.F19]=4;17;IF([.F19]=3;18;IF([.F19]=2;19;IF([.F19]=1;20;0)))))))))))))))))))))" office:value-type="float" office:value="9" calcext:value-type="float">
            <text:p>9</text:p>
          </table:table-cell>
          <table:table-cell table:style-name="ce134" office:value-type="float" office:value="55" calcext:value-type="float">
            <text:p>55º</text:p>
          </table:table-cell>
          <table:table-cell table:style-name="ce139" table:formula="of:=IF([.H19]=20;1;IF([.H19]=19;2;IF([.H19]=19;2;IF([.H19]=18;3;IF([.H19]=17;4;IF([.H19]=16;5;IF([.H19]=15;6;IF([.H19]=14;7;IF([.H19]=13;8;IF([.H19]=12;9;IF([.H19]=11;10;IF([.H19]=10;11;IF([.H19]=9;12;IF([.H19]=8;13;IF([.H19]=7;14;IF([.H19]=6;15;IF([.H19]=5;16;IF([.H19]=4;17;IF([.H19]=3;18;IF([.H19]=2;19;IF([.H19]=1;20;0)))))))))))))))))))))" office:value-type="float" office:value="0" calcext:value-type="float">
            <text:p>0</text:p>
          </table:table-cell>
          <table:table-cell table:style-name="ce134" office:value-type="float" office:value="11" calcext:value-type="float">
            <text:p>11º</text:p>
          </table:table-cell>
          <table:table-cell table:style-name="ce145" table:formula="of:=IF([.J19]=20;1;IF([.J19]=19;2;IF([.J19]=19;2;IF([.J19]=18;3;IF([.J19]=17;4;IF([.J19]=16;5;IF([.J19]=15;6;IF([.J19]=14;7;IF([.J19]=13;8;IF([.J19]=12;9;IF([.J19]=11;10;IF([.J19]=10;11;IF([.J19]=9;12;IF([.J19]=8;13;IF([.J19]=7;14;IF([.J19]=6;15;IF([.J19]=5;16;IF([.J19]=4;17;IF([.J19]=3;18;IF([.J19]=2;19;IF([.J19]=1;20;0)))))))))))))))))))))" office:value-type="float" office:value="10" calcext:value-type="float">
            <text:p>10</text:p>
          </table:table-cell>
          <table:table-cell table:style-name="ce150"/>
          <table:table-cell table:style-name="ce158" table:formula="of:=SUM([.C19];[.E19];[.G19];[.I19];[.K19])" office:value-type="float" office:value="21" calcext:value-type="float">
            <text:p>21</text:p>
          </table:table-cell>
          <table:table-cell table:style-name="ce160" table:formula="of:=RANK([.M19];[.$M$4:.$M$133])" office:value-type="float" office:value="17" calcext:value-type="float">
            <text:p>17º</text:p>
          </table:table-cell>
          <table:table-cell table:style-name="ce161"/>
          <table:table-cell table:style-name="ce169" office:value-type="string" calcext:value-type="string">
            <text:p>-</text:p>
          </table:table-cell>
          <table:table-cell table:style-name="ce175" office:value-type="float" office:value="9" calcext:value-type="float">
            <text:p>9</text:p>
          </table:table-cell>
          <table:table-cell table:style-name="ce175" office:value-type="float" office:value="7" calcext:value-type="float">
            <text:p>7</text:p>
          </table:table-cell>
          <table:table-cell table:style-name="ce180" office:value-type="float" office:value="7" calcext:value-type="float">
            <text:p>7</text:p>
          </table:table-cell>
          <table:table-cell table:style-name="ce185" office:value-type="float" office:value="7" calcext:value-type="float">
            <text:p>7</text:p>
          </table:table-cell>
          <table:table-cell table:style-name="ce188" table:formula="of:=SUM([.P19:.T19])" office:value-type="float" office:value="30" calcext:value-type="float">
            <text:p>30</text:p>
          </table:table-cell>
          <table:table-cell table:style-name="ce189" table:formula="of:=RANK([.U19];[.$U$4:.$U$133])" office:value-type="float" office:value="8" calcext:value-type="float">
            <text:p>8º</text:p>
          </table:table-cell>
          <table:table-cell table:style-name="ce161"/>
          <table:table-cell table:style-name="ce193" table:formula="of:=COUNTIF([.B19];&quot;&gt;0&quot;)+COUNTIF([.D19];&quot;&gt;0&quot;)+COUNTIF([.F19];&quot;&gt;0&quot;)+COUNTIF([.H19];&quot;&gt;0&quot;)+COUNTIF([.J19];&quot;&gt;0&quot;)" office:value-type="float" office:value="4" calcext:value-type="float">
            <text:p>4</text:p>
          </table:table-cell>
          <table:table-cell table:style-name="ce200" table:formula="of:=[.M19]/[.X19]" office:value-type="float" office:value="5.25" calcext:value-type="float">
            <text:p>5.3</text:p>
          </table:table-cell>
          <table:table-cell table:style-name="ce204" table:formula="of:=RANK([.Y19];[.$Y$4:.$Y$133])" office:value-type="float" office:value="24" calcext:value-type="float">
            <text:p>24º</text:p>
          </table:table-cell>
          <table:table-cell table:style-name="ce208" table:formula="of:=[.U19]/[.X19]" office:value-type="float" office:value="7.5" calcext:value-type="float">
            <text:p>7.5</text:p>
          </table:table-cell>
          <table:table-cell table:style-name="ce212" table:formula="of:=RANK([.AA19];[.$AA$4:.$AA$133])" office:value-type="float" office:value="9" calcext:value-type="float">
            <text:p>9º</text:p>
          </table:table-cell>
          <table:table-cell table:number-columns-repeated="996"/>
        </table:table-row>
        <table:table-row table:style-name="ro10">
          <table:table-cell table:style-name="ce126" office:value-type="string" calcext:value-type="string">
            <text:p>CAMILA NOGUEZ</text:p>
          </table:table-cell>
          <table:table-cell table:style-name="ce134" office:value-type="string" calcext:value-type="string">
            <text:p>-</text:p>
          </table:table-cell>
          <table:table-cell table:style-name="ce139" table:formula="of:=IF([.B20]=20;1;IF([.B20]=19;2;IF([.B20]=19;2;IF([.B20]=18;3;IF([.B20]=17;4;IF([.B20]=16;5;IF([.B20]=15;6;IF([.B20]=14;7;IF([.B20]=13;8;IF([.B20]=12;9;IF([.B20]=11;10;IF([.B20]=10;11;IF([.B20]=9;12;IF([.B20]=8;13;IF([.B20]=7;14;IF([.B20]=6;15;IF([.B20]=5;16;IF([.B20]=4;17;IF([.B20]=3;18;IF([.B20]=2;19;IF([.B20]=1;20;0)))))))))))))))))))))" office:value-type="float" office:value="0" calcext:value-type="float">
            <text:p>0</text:p>
          </table:table-cell>
          <table:table-cell table:style-name="ce134" office:value-type="float" office:value="63" calcext:value-type="float">
            <text:p>63º</text:p>
          </table:table-cell>
          <table:table-cell table:style-name="ce139" table:formula="of:=IF([.D20]=20;1;IF([.D20]=19;2;IF([.D20]=19;2;IF([.D20]=18;3;IF([.D20]=17;4;IF([.D20]=16;5;IF([.D20]=15;6;IF([.D20]=14;7;IF([.D20]=13;8;IF([.D20]=12;9;IF([.D20]=11;10;IF([.D20]=10;11;IF([.D20]=9;12;IF([.D20]=8;13;IF([.D20]=7;14;IF([.D20]=6;15;IF([.D20]=5;16;IF([.D20]=4;17;IF([.D20]=3;18;IF([.D20]=2;19;IF([.D20]=1;20;0)))))))))))))))))))))" office:value-type="float" office:value="0" calcext:value-type="float">
            <text:p>0</text:p>
          </table:table-cell>
          <table:table-cell table:style-name="ce134"/>
          <table:table-cell table:style-name="ce139" table:formula="of:=IF([.F20]=20;1;IF([.F20]=19;2;IF([.F20]=19;2;IF([.F20]=18;3;IF([.F20]=17;4;IF([.F20]=16;5;IF([.F20]=15;6;IF([.F20]=14;7;IF([.F20]=13;8;IF([.F20]=12;9;IF([.F20]=11;10;IF([.F20]=10;11;IF([.F20]=9;12;IF([.F20]=8;13;IF([.F20]=7;14;IF([.F20]=6;15;IF([.F20]=5;16;IF([.F20]=4;17;IF([.F20]=3;18;IF([.F20]=2;19;IF([.F20]=1;20;0)))))))))))))))))))))" office:value-type="float" office:value="0" calcext:value-type="float">
            <text:p>0</text:p>
          </table:table-cell>
          <table:table-cell table:style-name="ce134"/>
          <table:table-cell table:style-name="ce139" table:formula="of:=IF([.H20]=20;1;IF([.H20]=19;2;IF([.H20]=19;2;IF([.H20]=18;3;IF([.H20]=17;4;IF([.H20]=16;5;IF([.H20]=15;6;IF([.H20]=14;7;IF([.H20]=13;8;IF([.H20]=12;9;IF([.H20]=11;10;IF([.H20]=10;11;IF([.H20]=9;12;IF([.H20]=8;13;IF([.H20]=7;14;IF([.H20]=6;15;IF([.H20]=5;16;IF([.H20]=4;17;IF([.H20]=3;18;IF([.H20]=2;19;IF([.H20]=1;20;0)))))))))))))))))))))" office:value-type="float" office:value="0" calcext:value-type="float">
            <text:p>0</text:p>
          </table:table-cell>
          <table:table-cell table:style-name="ce134"/>
          <table:table-cell table:style-name="ce145" table:formula="of:=IF([.J20]=20;1;IF([.J20]=19;2;IF([.J20]=19;2;IF([.J20]=18;3;IF([.J20]=17;4;IF([.J20]=16;5;IF([.J20]=15;6;IF([.J20]=14;7;IF([.J20]=13;8;IF([.J20]=12;9;IF([.J20]=11;10;IF([.J20]=10;11;IF([.J20]=9;12;IF([.J20]=8;13;IF([.J20]=7;14;IF([.J20]=6;15;IF([.J20]=5;16;IF([.J20]=4;17;IF([.J20]=3;18;IF([.J20]=2;19;IF([.J20]=1;20;0)))))))))))))))))))))" office:value-type="float" office:value="0" calcext:value-type="float">
            <text:p>0</text:p>
          </table:table-cell>
          <table:table-cell table:style-name="ce150"/>
          <table:table-cell table:style-name="ce158" table:formula="of:=SUM([.C20];[.E20];[.G20];[.I20];[.K20])" office:value-type="float" office:value="0" calcext:value-type="float">
            <text:p>0</text:p>
          </table:table-cell>
          <table:table-cell table:style-name="ce160" table:formula="of:=RANK([.M20];[.$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float" office:value="2" calcext:value-type="float">
            <text:p>2</text:p>
          </table:table-cell>
          <table:table-cell table:style-name="ce176" office:value-type="string" calcext:value-type="string">
            <text:p>-</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20:.T20])" office:value-type="float" office:value="2" calcext:value-type="float">
            <text:p>2</text:p>
          </table:table-cell>
          <table:table-cell table:style-name="ce189" table:formula="of:=RANK([.U20];[.$U$4:.$U$133])" office:value-type="float" office:value="124" calcext:value-type="float">
            <text:p>124º</text:p>
          </table:table-cell>
          <table:table-cell table:style-name="ce161"/>
          <table:table-cell table:style-name="ce193" table:formula="of:=COUNTIF([.B20];&quot;&gt;0&quot;)+COUNTIF([.D20];&quot;&gt;0&quot;)+COUNTIF([.F20];&quot;&gt;0&quot;)+COUNTIF([.H20];&quot;&gt;0&quot;)+COUNTIF([.J20];&quot;&gt;0&quot;)" office:value-type="float" office:value="1" calcext:value-type="float">
            <text:p>1</text:p>
          </table:table-cell>
          <table:table-cell table:style-name="ce200" table:formula="of:=[.M20]/[.X20]" office:value-type="float" office:value="0" calcext:value-type="float">
            <text:p>0.0</text:p>
          </table:table-cell>
          <table:table-cell table:style-name="ce204" table:formula="of:=RANK([.Y20];[.$Y$4:.$Y$133])" office:value-type="float" office:value="71" calcext:value-type="float">
            <text:p>71º</text:p>
          </table:table-cell>
          <table:table-cell table:style-name="ce208" table:formula="of:=[.U20]/[.X20]" office:value-type="float" office:value="2" calcext:value-type="float">
            <text:p>2.0</text:p>
          </table:table-cell>
          <table:table-cell table:style-name="ce212" table:formula="of:=RANK([.AA20];[.$AA$4:.$AA$133])" office:value-type="float" office:value="121" calcext:value-type="float">
            <text:p>121º</text:p>
          </table:table-cell>
          <table:table-cell table:number-columns-repeated="996"/>
        </table:table-row>
        <table:table-row table:style-name="ro10">
          <table:table-cell table:style-name="ce126" office:value-type="string" calcext:value-type="string">
            <text:p>CARLA</text:p>
          </table:table-cell>
          <table:table-cell table:style-name="ce134" office:value-type="string" calcext:value-type="string">
            <text:p>-</text:p>
          </table:table-cell>
          <table:table-cell table:style-name="ce139" table:formula="of:=IF([.B21]=20;1;IF([.B21]=19;2;IF([.B21]=19;2;IF([.B21]=18;3;IF([.B21]=17;4;IF([.B21]=16;5;IF([.B21]=15;6;IF([.B21]=14;7;IF([.B21]=13;8;IF([.B21]=12;9;IF([.B21]=11;10;IF([.B21]=10;11;IF([.B21]=9;12;IF([.B21]=8;13;IF([.B21]=7;14;IF([.B21]=6;15;IF([.B21]=5;16;IF([.B21]=4;17;IF([.B21]=3;18;IF([.B21]=2;19;IF([.B21]=1;20;0)))))))))))))))))))))" office:value-type="float" office:value="0" calcext:value-type="float">
            <text:p>0</text:p>
          </table:table-cell>
          <table:table-cell table:style-name="ce134" office:value-type="string" calcext:value-type="string">
            <text:p>-</text:p>
          </table:table-cell>
          <table:table-cell table:style-name="ce139" table:formula="of:=IF([.D21]=20;1;IF([.D21]=19;2;IF([.D21]=19;2;IF([.D21]=18;3;IF([.D21]=17;4;IF([.D21]=16;5;IF([.D21]=15;6;IF([.D21]=14;7;IF([.D21]=13;8;IF([.D21]=12;9;IF([.D21]=11;10;IF([.D21]=10;11;IF([.D21]=9;12;IF([.D21]=8;13;IF([.D21]=7;14;IF([.D21]=6;15;IF([.D21]=5;16;IF([.D21]=4;17;IF([.D21]=3;18;IF([.D21]=2;19;IF([.D21]=1;20;0)))))))))))))))))))))" office:value-type="float" office:value="0" calcext:value-type="float">
            <text:p>0</text:p>
          </table:table-cell>
          <table:table-cell table:style-name="ce134" office:value-type="string" calcext:value-type="string">
            <text:p>-</text:p>
          </table:table-cell>
          <table:table-cell table:style-name="ce139" table:formula="of:=IF([.F21]=20;1;IF([.F21]=19;2;IF([.F21]=19;2;IF([.F21]=18;3;IF([.F21]=17;4;IF([.F21]=16;5;IF([.F21]=15;6;IF([.F21]=14;7;IF([.F21]=13;8;IF([.F21]=12;9;IF([.F21]=11;10;IF([.F21]=10;11;IF([.F21]=9;12;IF([.F21]=8;13;IF([.F21]=7;14;IF([.F21]=6;15;IF([.F21]=5;16;IF([.F21]=4;17;IF([.F21]=3;18;IF([.F21]=2;19;IF([.F21]=1;20;0)))))))))))))))))))))" office:value-type="float" office:value="0" calcext:value-type="float">
            <text:p>0</text:p>
          </table:table-cell>
          <table:table-cell table:style-name="ce134" office:value-type="float" office:value="42" calcext:value-type="float">
            <text:p>42º</text:p>
          </table:table-cell>
          <table:table-cell table:style-name="ce139" table:formula="of:=IF([.H21]=20;1;IF([.H21]=19;2;IF([.H21]=19;2;IF([.H21]=18;3;IF([.H21]=17;4;IF([.H21]=16;5;IF([.H21]=15;6;IF([.H21]=14;7;IF([.H21]=13;8;IF([.H21]=12;9;IF([.H21]=11;10;IF([.H21]=10;11;IF([.H21]=9;12;IF([.H21]=8;13;IF([.H21]=7;14;IF([.H21]=6;15;IF([.H21]=5;16;IF([.H21]=4;17;IF([.H21]=3;18;IF([.H21]=2;19;IF([.H21]=1;20;0)))))))))))))))))))))" office:value-type="float" office:value="0" calcext:value-type="float">
            <text:p>0</text:p>
          </table:table-cell>
          <table:table-cell table:style-name="ce134" office:value-type="string" calcext:value-type="string">
            <text:p>-</text:p>
          </table:table-cell>
          <table:table-cell table:style-name="ce145" table:formula="of:=IF([.J21]=20;1;IF([.J21]=19;2;IF([.J21]=19;2;IF([.J21]=18;3;IF([.J21]=17;4;IF([.J21]=16;5;IF([.J21]=15;6;IF([.J21]=14;7;IF([.J21]=13;8;IF([.J21]=12;9;IF([.J21]=11;10;IF([.J21]=10;11;IF([.J21]=9;12;IF([.J21]=8;13;IF([.J21]=7;14;IF([.J21]=6;15;IF([.J21]=5;16;IF([.J21]=4;17;IF([.J21]=3;18;IF([.J21]=2;19;IF([.J21]=1;20;0)))))))))))))))))))))" office:value-type="float" office:value="0" calcext:value-type="float">
            <text:p>0</text:p>
          </table:table-cell>
          <table:table-cell table:style-name="ce150"/>
          <table:table-cell table:style-name="ce158" table:formula="of:=SUM([.C21];[.E21];[.G21];[.I21];[.K21])" office:value-type="float" office:value="0" calcext:value-type="float">
            <text:p>0</text:p>
          </table:table-cell>
          <table:table-cell table:style-name="ce160" table:formula="of:=RANK([.M21];[.$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2" calcext:value-type="float">
            <text:p>2</text:p>
          </table:table-cell>
          <table:table-cell table:style-name="ce185" office:value-type="string" calcext:value-type="string">
            <text:p>-</text:p>
          </table:table-cell>
          <table:table-cell table:style-name="ce188" table:formula="of:=SUM([.P21:.T21])" office:value-type="float" office:value="2" calcext:value-type="float">
            <text:p>2</text:p>
          </table:table-cell>
          <table:table-cell table:style-name="ce189" table:formula="of:=RANK([.U21];[.$U$4:.$U$133])" office:value-type="float" office:value="124" calcext:value-type="float">
            <text:p>124º</text:p>
          </table:table-cell>
          <table:table-cell table:style-name="ce161"/>
          <table:table-cell table:style-name="ce193" table:formula="of:=COUNTIF([.B21];&quot;&gt;0&quot;)+COUNTIF([.D21];&quot;&gt;0&quot;)+COUNTIF([.F21];&quot;&gt;0&quot;)+COUNTIF([.H21];&quot;&gt;0&quot;)+COUNTIF([.J21];&quot;&gt;0&quot;)" office:value-type="float" office:value="1" calcext:value-type="float">
            <text:p>1</text:p>
          </table:table-cell>
          <table:table-cell table:style-name="ce200" table:formula="of:=[.M21]/[.X21]" office:value-type="float" office:value="0" calcext:value-type="float">
            <text:p>0.0</text:p>
          </table:table-cell>
          <table:table-cell table:style-name="ce204" table:formula="of:=RANK([.Y21];[.$Y$4:.$Y$133])" office:value-type="float" office:value="71" calcext:value-type="float">
            <text:p>71º</text:p>
          </table:table-cell>
          <table:table-cell table:style-name="ce208" table:formula="of:=[.U21]/[.X21]" office:value-type="float" office:value="2" calcext:value-type="float">
            <text:p>2.0</text:p>
          </table:table-cell>
          <table:table-cell table:style-name="ce212" table:formula="of:=RANK([.AA21];[.$AA$4:.$AA$133])" office:value-type="float" office:value="121" calcext:value-type="float">
            <text:p>121º</text:p>
          </table:table-cell>
          <table:table-cell table:number-columns-repeated="996"/>
        </table:table-row>
        <table:table-row table:style-name="ro10">
          <table:table-cell table:style-name="ce126" office:value-type="string" calcext:value-type="string">
            <text:p>CARLOS CORDAL</text:p>
          </table:table-cell>
          <table:table-cell table:style-name="ce134" office:value-type="string" calcext:value-type="string">
            <text:p>-</text:p>
          </table:table-cell>
          <table:table-cell table:style-name="ce139" table:formula="of:=IF([.B22]=20;1;IF([.B22]=19;2;IF([.B22]=19;2;IF([.B22]=18;3;IF([.B22]=17;4;IF([.B22]=16;5;IF([.B22]=15;6;IF([.B22]=14;7;IF([.B22]=13;8;IF([.B22]=12;9;IF([.B22]=11;10;IF([.B22]=10;11;IF([.B22]=9;12;IF([.B22]=8;13;IF([.B22]=7;14;IF([.B22]=6;15;IF([.B22]=5;16;IF([.B22]=4;17;IF([.B22]=3;18;IF([.B22]=2;19;IF([.B22]=1;20;0)))))))))))))))))))))" office:value-type="float" office:value="0" calcext:value-type="float">
            <text:p>0</text:p>
          </table:table-cell>
          <table:table-cell table:style-name="ce134" office:value-type="float" office:value="47" calcext:value-type="float">
            <text:p>47º</text:p>
          </table:table-cell>
          <table:table-cell table:style-name="ce139" table:formula="of:=IF([.D22]=20;1;IF([.D22]=19;2;IF([.D22]=19;2;IF([.D22]=18;3;IF([.D22]=17;4;IF([.D22]=16;5;IF([.D22]=15;6;IF([.D22]=14;7;IF([.D22]=13;8;IF([.D22]=12;9;IF([.D22]=11;10;IF([.D22]=10;11;IF([.D22]=9;12;IF([.D22]=8;13;IF([.D22]=7;14;IF([.D22]=6;15;IF([.D22]=5;16;IF([.D22]=4;17;IF([.D22]=3;18;IF([.D22]=2;19;IF([.D22]=1;20;0)))))))))))))))))))))" office:value-type="float" office:value="0" calcext:value-type="float">
            <text:p>0</text:p>
          </table:table-cell>
          <table:table-cell table:style-name="ce134"/>
          <table:table-cell table:style-name="ce139" table:formula="of:=IF([.F22]=20;1;IF([.F22]=19;2;IF([.F22]=19;2;IF([.F22]=18;3;IF([.F22]=17;4;IF([.F22]=16;5;IF([.F22]=15;6;IF([.F22]=14;7;IF([.F22]=13;8;IF([.F22]=12;9;IF([.F22]=11;10;IF([.F22]=10;11;IF([.F22]=9;12;IF([.F22]=8;13;IF([.F22]=7;14;IF([.F22]=6;15;IF([.F22]=5;16;IF([.F22]=4;17;IF([.F22]=3;18;IF([.F22]=2;19;IF([.F22]=1;20;0)))))))))))))))))))))" office:value-type="float" office:value="0" calcext:value-type="float">
            <text:p>0</text:p>
          </table:table-cell>
          <table:table-cell table:style-name="ce134"/>
          <table:table-cell table:style-name="ce139" table:formula="of:=IF([.H22]=20;1;IF([.H22]=19;2;IF([.H22]=19;2;IF([.H22]=18;3;IF([.H22]=17;4;IF([.H22]=16;5;IF([.H22]=15;6;IF([.H22]=14;7;IF([.H22]=13;8;IF([.H22]=12;9;IF([.H22]=11;10;IF([.H22]=10;11;IF([.H22]=9;12;IF([.H22]=8;13;IF([.H22]=7;14;IF([.H22]=6;15;IF([.H22]=5;16;IF([.H22]=4;17;IF([.H22]=3;18;IF([.H22]=2;19;IF([.H22]=1;20;0)))))))))))))))))))))" office:value-type="float" office:value="0" calcext:value-type="float">
            <text:p>0</text:p>
          </table:table-cell>
          <table:table-cell table:style-name="ce134"/>
          <table:table-cell table:style-name="ce145" table:formula="of:=IF([.J22]=20;1;IF([.J22]=19;2;IF([.J22]=19;2;IF([.J22]=18;3;IF([.J22]=17;4;IF([.J22]=16;5;IF([.J22]=15;6;IF([.J22]=14;7;IF([.J22]=13;8;IF([.J22]=12;9;IF([.J22]=11;10;IF([.J22]=10;11;IF([.J22]=9;12;IF([.J22]=8;13;IF([.J22]=7;14;IF([.J22]=6;15;IF([.J22]=5;16;IF([.J22]=4;17;IF([.J22]=3;18;IF([.J22]=2;19;IF([.J22]=1;20;0)))))))))))))))))))))" office:value-type="float" office:value="0" calcext:value-type="float">
            <text:p>0</text:p>
          </table:table-cell>
          <table:table-cell table:style-name="ce150"/>
          <table:table-cell table:style-name="ce158" table:formula="of:=SUM([.C22];[.E22];[.G22];[.I22];[.K22])" office:value-type="float" office:value="0" calcext:value-type="float">
            <text:p>0</text:p>
          </table:table-cell>
          <table:table-cell table:style-name="ce160" table:formula="of:=RANK([.M22];[.$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float" office:value="5" calcext:value-type="float">
            <text:p>5</text:p>
          </table:table-cell>
          <table:table-cell table:style-name="ce176" office:value-type="string" calcext:value-type="string">
            <text:p>-</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22:.T22])" office:value-type="float" office:value="5" calcext:value-type="float">
            <text:p>5</text:p>
          </table:table-cell>
          <table:table-cell table:style-name="ce189" table:formula="of:=RANK([.U22];[.$U$4:.$U$133])" office:value-type="float" office:value="102" calcext:value-type="float">
            <text:p>102º</text:p>
          </table:table-cell>
          <table:table-cell table:style-name="ce161"/>
          <table:table-cell table:style-name="ce193" table:formula="of:=COUNTIF([.B22];&quot;&gt;0&quot;)+COUNTIF([.D22];&quot;&gt;0&quot;)+COUNTIF([.F22];&quot;&gt;0&quot;)+COUNTIF([.H22];&quot;&gt;0&quot;)+COUNTIF([.J22];&quot;&gt;0&quot;)" office:value-type="float" office:value="1" calcext:value-type="float">
            <text:p>1</text:p>
          </table:table-cell>
          <table:table-cell table:style-name="ce200" table:formula="of:=[.M22]/[.X22]" office:value-type="float" office:value="0" calcext:value-type="float">
            <text:p>0.0</text:p>
          </table:table-cell>
          <table:table-cell table:style-name="ce204" table:formula="of:=RANK([.Y22];[.$Y$4:.$Y$133])" office:value-type="float" office:value="71" calcext:value-type="float">
            <text:p>71º</text:p>
          </table:table-cell>
          <table:table-cell table:style-name="ce208" table:formula="of:=[.U22]/[.X22]" office:value-type="float" office:value="5" calcext:value-type="float">
            <text:p>5.0</text:p>
          </table:table-cell>
          <table:table-cell table:style-name="ce212" table:formula="of:=RANK([.AA22];[.$AA$4:.$AA$133])" office:value-type="float" office:value="68" calcext:value-type="float">
            <text:p>68º</text:p>
          </table:table-cell>
          <table:table-cell table:number-columns-repeated="996"/>
        </table:table-row>
        <table:table-row table:style-name="ro10">
          <table:table-cell table:style-name="ce126" office:value-type="string" calcext:value-type="string">
            <text:p>CAROL DE MARCHI</text:p>
          </table:table-cell>
          <table:table-cell table:style-name="ce134" office:value-type="string" calcext:value-type="string">
            <text:p>-</text:p>
          </table:table-cell>
          <table:table-cell table:style-name="ce139" table:formula="of:=IF([.B23]=20;1;IF([.B23]=19;2;IF([.B23]=19;2;IF([.B23]=18;3;IF([.B23]=17;4;IF([.B23]=16;5;IF([.B23]=15;6;IF([.B23]=14;7;IF([.B23]=13;8;IF([.B23]=12;9;IF([.B23]=11;10;IF([.B23]=10;11;IF([.B23]=9;12;IF([.B23]=8;13;IF([.B23]=7;14;IF([.B23]=6;15;IF([.B23]=5;16;IF([.B23]=4;17;IF([.B23]=3;18;IF([.B23]=2;19;IF([.B23]=1;20;0)))))))))))))))))))))" office:value-type="float" office:value="0" calcext:value-type="float">
            <text:p>0</text:p>
          </table:table-cell>
          <table:table-cell table:style-name="ce134" office:value-type="float" office:value="18" calcext:value-type="float">
            <text:p>18º</text:p>
          </table:table-cell>
          <table:table-cell table:style-name="ce139" table:formula="of:=IF([.D23]=20;1;IF([.D23]=19;2;IF([.D23]=19;2;IF([.D23]=18;3;IF([.D23]=17;4;IF([.D23]=16;5;IF([.D23]=15;6;IF([.D23]=14;7;IF([.D23]=13;8;IF([.D23]=12;9;IF([.D23]=11;10;IF([.D23]=10;11;IF([.D23]=9;12;IF([.D23]=8;13;IF([.D23]=7;14;IF([.D23]=6;15;IF([.D23]=5;16;IF([.D23]=4;17;IF([.D23]=3;18;IF([.D23]=2;19;IF([.D23]=1;20;0)))))))))))))))))))))" office:value-type="float" office:value="3" calcext:value-type="float">
            <text:p>3</text:p>
          </table:table-cell>
          <table:table-cell table:style-name="ce134" office:value-type="string" calcext:value-type="string">
            <text:p>-</text:p>
          </table:table-cell>
          <table:table-cell table:style-name="ce139" table:formula="of:=IF([.F23]=20;1;IF([.F23]=19;2;IF([.F23]=19;2;IF([.F23]=18;3;IF([.F23]=17;4;IF([.F23]=16;5;IF([.F23]=15;6;IF([.F23]=14;7;IF([.F23]=13;8;IF([.F23]=12;9;IF([.F23]=11;10;IF([.F23]=10;11;IF([.F23]=9;12;IF([.F23]=8;13;IF([.F23]=7;14;IF([.F23]=6;15;IF([.F23]=5;16;IF([.F23]=4;17;IF([.F23]=3;18;IF([.F23]=2;19;IF([.F23]=1;20;0)))))))))))))))))))))" office:value-type="float" office:value="0" calcext:value-type="float">
            <text:p>0</text:p>
          </table:table-cell>
          <table:table-cell table:style-name="ce134" office:value-type="float" office:value="36" calcext:value-type="float">
            <text:p>36º</text:p>
          </table:table-cell>
          <table:table-cell table:style-name="ce139" table:formula="of:=IF([.H23]=20;1;IF([.H23]=19;2;IF([.H23]=19;2;IF([.H23]=18;3;IF([.H23]=17;4;IF([.H23]=16;5;IF([.H23]=15;6;IF([.H23]=14;7;IF([.H23]=13;8;IF([.H23]=12;9;IF([.H23]=11;10;IF([.H23]=10;11;IF([.H23]=9;12;IF([.H23]=8;13;IF([.H23]=7;14;IF([.H23]=6;15;IF([.H23]=5;16;IF([.H23]=4;17;IF([.H23]=3;18;IF([.H23]=2;19;IF([.H23]=1;20;0)))))))))))))))))))))" office:value-type="float" office:value="0" calcext:value-type="float">
            <text:p>0</text:p>
          </table:table-cell>
          <table:table-cell table:style-name="ce134" office:value-type="string" calcext:value-type="string">
            <text:p>-</text:p>
          </table:table-cell>
          <table:table-cell table:style-name="ce145" table:formula="of:=IF([.J23]=20;1;IF([.J23]=19;2;IF([.J23]=19;2;IF([.J23]=18;3;IF([.J23]=17;4;IF([.J23]=16;5;IF([.J23]=15;6;IF([.J23]=14;7;IF([.J23]=13;8;IF([.J23]=12;9;IF([.J23]=11;10;IF([.J23]=10;11;IF([.J23]=9;12;IF([.J23]=8;13;IF([.J23]=7;14;IF([.J23]=6;15;IF([.J23]=5;16;IF([.J23]=4;17;IF([.J23]=3;18;IF([.J23]=2;19;IF([.J23]=1;20;0)))))))))))))))))))))" office:value-type="float" office:value="0" calcext:value-type="float">
            <text:p>0</text:p>
          </table:table-cell>
          <table:table-cell table:style-name="ce150"/>
          <table:table-cell table:style-name="ce158" table:formula="of:=SUM([.C23];[.E23];[.G23];[.I23];[.K23])" office:value-type="float" office:value="3" calcext:value-type="float">
            <text:p>3</text:p>
          </table:table-cell>
          <table:table-cell table:style-name="ce160" table:formula="of:=RANK([.M23];[.$M$4:.$M$133])" office:value-type="float" office:value="64" calcext:value-type="float">
            <text:p>64º</text:p>
          </table:table-cell>
          <table:table-cell table:style-name="ce161"/>
          <table:table-cell table:style-name="ce169" office:value-type="string" calcext:value-type="string">
            <text:p>-</text:p>
          </table:table-cell>
          <table:table-cell table:style-name="ce175" office:value-type="float" office:value="1" calcext:value-type="float">
            <text:p>1</text:p>
          </table:table-cell>
          <table:table-cell table:style-name="ce176" office:value-type="string" calcext:value-type="string">
            <text:p>-</text:p>
          </table:table-cell>
          <table:table-cell table:style-name="ce180" office:value-type="float" office:value="6" calcext:value-type="float">
            <text:p>6</text:p>
          </table:table-cell>
          <table:table-cell table:style-name="ce185" office:value-type="string" calcext:value-type="string">
            <text:p>-</text:p>
          </table:table-cell>
          <table:table-cell table:style-name="ce188" table:formula="of:=SUM([.P23:.T23])" office:value-type="float" office:value="7" calcext:value-type="float">
            <text:p>7</text:p>
          </table:table-cell>
          <table:table-cell table:style-name="ce189" table:formula="of:=RANK([.U23];[.$U$4:.$U$133])" office:value-type="float" office:value="77" calcext:value-type="float">
            <text:p>77º</text:p>
          </table:table-cell>
          <table:table-cell table:style-name="ce161"/>
          <table:table-cell table:style-name="ce193" table:formula="of:=COUNTIF([.B23];&quot;&gt;0&quot;)+COUNTIF([.D23];&quot;&gt;0&quot;)+COUNTIF([.F23];&quot;&gt;0&quot;)+COUNTIF([.H23];&quot;&gt;0&quot;)+COUNTIF([.J23];&quot;&gt;0&quot;)" office:value-type="float" office:value="2" calcext:value-type="float">
            <text:p>2</text:p>
          </table:table-cell>
          <table:table-cell table:style-name="ce200" table:formula="of:=[.M23]/[.X23]" office:value-type="float" office:value="1.5" calcext:value-type="float">
            <text:p>1.5</text:p>
          </table:table-cell>
          <table:table-cell table:style-name="ce204" table:formula="of:=RANK([.Y23];[.$Y$4:.$Y$133])" office:value-type="float" office:value="63" calcext:value-type="float">
            <text:p>63º</text:p>
          </table:table-cell>
          <table:table-cell table:style-name="ce208" table:formula="of:=[.U23]/[.X23]" office:value-type="float" office:value="3.5" calcext:value-type="float">
            <text:p>3.5</text:p>
          </table:table-cell>
          <table:table-cell table:style-name="ce212" table:formula="of:=RANK([.AA23];[.$AA$4:.$AA$133])" office:value-type="float" office:value="110" calcext:value-type="float">
            <text:p>110º</text:p>
          </table:table-cell>
          <table:table-cell table:number-columns-repeated="996"/>
        </table:table-row>
        <table:table-row table:style-name="ro10">
          <table:table-cell table:style-name="ce126" office:value-type="string" calcext:value-type="string">
            <text:p>CÁSSIO LAMAS</text:p>
          </table:table-cell>
          <table:table-cell table:style-name="ce134" office:value-type="string" calcext:value-type="string">
            <text:p>-</text:p>
          </table:table-cell>
          <table:table-cell table:style-name="ce139" table:formula="of:=IF([.B24]=20;1;IF([.B24]=19;2;IF([.B24]=19;2;IF([.B24]=18;3;IF([.B24]=17;4;IF([.B24]=16;5;IF([.B24]=15;6;IF([.B24]=14;7;IF([.B24]=13;8;IF([.B24]=12;9;IF([.B24]=11;10;IF([.B24]=10;11;IF([.B24]=9;12;IF([.B24]=8;13;IF([.B24]=7;14;IF([.B24]=6;15;IF([.B24]=5;16;IF([.B24]=4;17;IF([.B24]=3;18;IF([.B24]=2;19;IF([.B24]=1;20;0)))))))))))))))))))))" office:value-type="float" office:value="0" calcext:value-type="float">
            <text:p>0</text:p>
          </table:table-cell>
          <table:table-cell table:style-name="ce134" office:value-type="string" calcext:value-type="string">
            <text:p>-</text:p>
          </table:table-cell>
          <table:table-cell table:style-name="ce139" table:formula="of:=IF([.D24]=20;1;IF([.D24]=19;2;IF([.D24]=19;2;IF([.D24]=18;3;IF([.D24]=17;4;IF([.D24]=16;5;IF([.D24]=15;6;IF([.D24]=14;7;IF([.D24]=13;8;IF([.D24]=12;9;IF([.D24]=11;10;IF([.D24]=10;11;IF([.D24]=9;12;IF([.D24]=8;13;IF([.D24]=7;14;IF([.D24]=6;15;IF([.D24]=5;16;IF([.D24]=4;17;IF([.D24]=3;18;IF([.D24]=2;19;IF([.D24]=1;20;0)))))))))))))))))))))" office:value-type="float" office:value="0" calcext:value-type="float">
            <text:p>0</text:p>
          </table:table-cell>
          <table:table-cell table:style-name="ce134" office:value-type="float" office:value="51" calcext:value-type="float">
            <text:p>51º</text:p>
          </table:table-cell>
          <table:table-cell table:style-name="ce139" table:formula="of:=IF([.F24]=20;1;IF([.F24]=19;2;IF([.F24]=19;2;IF([.F24]=18;3;IF([.F24]=17;4;IF([.F24]=16;5;IF([.F24]=15;6;IF([.F24]=14;7;IF([.F24]=13;8;IF([.F24]=12;9;IF([.F24]=11;10;IF([.F24]=10;11;IF([.F24]=9;12;IF([.F24]=8;13;IF([.F24]=7;14;IF([.F24]=6;15;IF([.F24]=5;16;IF([.F24]=4;17;IF([.F24]=3;18;IF([.F24]=2;19;IF([.F24]=1;20;0)))))))))))))))))))))" office:value-type="float" office:value="0" calcext:value-type="float">
            <text:p>0</text:p>
          </table:table-cell>
          <table:table-cell table:style-name="ce134" office:value-type="float" office:value="74" calcext:value-type="float">
            <text:p>74º</text:p>
          </table:table-cell>
          <table:table-cell table:style-name="ce139" table:formula="of:=IF([.H24]=20;1;IF([.H24]=19;2;IF([.H24]=19;2;IF([.H24]=18;3;IF([.H24]=17;4;IF([.H24]=16;5;IF([.H24]=15;6;IF([.H24]=14;7;IF([.H24]=13;8;IF([.H24]=12;9;IF([.H24]=11;10;IF([.H24]=10;11;IF([.H24]=9;12;IF([.H24]=8;13;IF([.H24]=7;14;IF([.H24]=6;15;IF([.H24]=5;16;IF([.H24]=4;17;IF([.H24]=3;18;IF([.H24]=2;19;IF([.H24]=1;20;0)))))))))))))))))))))" office:value-type="float" office:value="0" calcext:value-type="float">
            <text:p>0</text:p>
          </table:table-cell>
          <table:table-cell table:style-name="ce134" office:value-type="float" office:value="4" calcext:value-type="float">
            <text:p>4º</text:p>
          </table:table-cell>
          <table:table-cell table:style-name="ce145" table:formula="of:=IF([.J24]=20;1;IF([.J24]=19;2;IF([.J24]=19;2;IF([.J24]=18;3;IF([.J24]=17;4;IF([.J24]=16;5;IF([.J24]=15;6;IF([.J24]=14;7;IF([.J24]=13;8;IF([.J24]=12;9;IF([.J24]=11;10;IF([.J24]=10;11;IF([.J24]=9;12;IF([.J24]=8;13;IF([.J24]=7;14;IF([.J24]=6;15;IF([.J24]=5;16;IF([.J24]=4;17;IF([.J24]=3;18;IF([.J24]=2;19;IF([.J24]=1;20;0)))))))))))))))))))))" office:value-type="float" office:value="17" calcext:value-type="float">
            <text:p>17</text:p>
          </table:table-cell>
          <table:table-cell table:style-name="ce150"/>
          <table:table-cell table:style-name="ce158" table:formula="of:=SUM([.C24];[.E24];[.G24];[.I24];[.K24])" office:value-type="float" office:value="17" calcext:value-type="float">
            <text:p>17</text:p>
          </table:table-cell>
          <table:table-cell table:style-name="ce160" table:formula="of:=RANK([.M24];[.$M$4:.$M$133])" office:value-type="float" office:value="29" calcext:value-type="float">
            <text:p>29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3" calcext:value-type="float">
            <text:p>3</text:p>
          </table:table-cell>
          <table:table-cell table:style-name="ce180" office:value-type="float" office:value="3" calcext:value-type="float">
            <text:p>3</text:p>
          </table:table-cell>
          <table:table-cell table:style-name="ce185" office:value-type="float" office:value="2" calcext:value-type="float">
            <text:p>2</text:p>
          </table:table-cell>
          <table:table-cell table:style-name="ce188" table:formula="of:=SUM([.P24:.T24])" office:value-type="float" office:value="8" calcext:value-type="float">
            <text:p>8</text:p>
          </table:table-cell>
          <table:table-cell table:style-name="ce189" table:formula="of:=RANK([.U24];[.$U$4:.$U$133])" office:value-type="float" office:value="75" calcext:value-type="float">
            <text:p>75º</text:p>
          </table:table-cell>
          <table:table-cell table:style-name="ce161"/>
          <table:table-cell table:style-name="ce193" table:formula="of:=COUNTIF([.B24];&quot;&gt;0&quot;)+COUNTIF([.D24];&quot;&gt;0&quot;)+COUNTIF([.F24];&quot;&gt;0&quot;)+COUNTIF([.H24];&quot;&gt;0&quot;)+COUNTIF([.J24];&quot;&gt;0&quot;)" office:value-type="float" office:value="3" calcext:value-type="float">
            <text:p>3</text:p>
          </table:table-cell>
          <table:table-cell table:style-name="ce200" table:formula="of:=[.M24]/[.X24]" office:value-type="float" office:value="5.66666666666667" calcext:value-type="float">
            <text:p>5.7</text:p>
          </table:table-cell>
          <table:table-cell table:style-name="ce204" table:formula="of:=RANK([.Y24];[.$Y$4:.$Y$133])" office:value-type="float" office:value="18" calcext:value-type="float">
            <text:p>18º</text:p>
          </table:table-cell>
          <table:table-cell table:style-name="ce208" table:formula="of:=[.U24]/[.X24]" office:value-type="float" office:value="2.66666666666667" calcext:value-type="float">
            <text:p>2.7</text:p>
          </table:table-cell>
          <table:table-cell table:style-name="ce212" table:formula="of:=RANK([.AA24];[.$AA$4:.$AA$133])" office:value-type="float" office:value="119" calcext:value-type="float">
            <text:p>119º</text:p>
          </table:table-cell>
          <table:table-cell table:number-columns-repeated="996"/>
        </table:table-row>
        <table:table-row table:style-name="ro10">
          <table:table-cell table:style-name="ce126" office:value-type="string" calcext:value-type="string">
            <text:p>CÁSSIO MACEDO</text:p>
          </table:table-cell>
          <table:table-cell table:style-name="ce134" office:value-type="string" calcext:value-type="string">
            <text:p>-</text:p>
          </table:table-cell>
          <table:table-cell table:style-name="ce139" table:formula="of:=IF([.B25]=20;1;IF([.B25]=19;2;IF([.B25]=19;2;IF([.B25]=18;3;IF([.B25]=17;4;IF([.B25]=16;5;IF([.B25]=15;6;IF([.B25]=14;7;IF([.B25]=13;8;IF([.B25]=12;9;IF([.B25]=11;10;IF([.B25]=10;11;IF([.B25]=9;12;IF([.B25]=8;13;IF([.B25]=7;14;IF([.B25]=6;15;IF([.B25]=5;16;IF([.B25]=4;17;IF([.B25]=3;18;IF([.B25]=2;19;IF([.B25]=1;20;0)))))))))))))))))))))" office:value-type="float" office:value="0" calcext:value-type="float">
            <text:p>0</text:p>
          </table:table-cell>
          <table:table-cell table:style-name="ce134" office:value-type="string" calcext:value-type="string">
            <text:p>-</text:p>
          </table:table-cell>
          <table:table-cell table:style-name="ce139" table:formula="of:=IF([.D25]=20;1;IF([.D25]=19;2;IF([.D25]=19;2;IF([.D25]=18;3;IF([.D25]=17;4;IF([.D25]=16;5;IF([.D25]=15;6;IF([.D25]=14;7;IF([.D25]=13;8;IF([.D25]=12;9;IF([.D25]=11;10;IF([.D25]=10;11;IF([.D25]=9;12;IF([.D25]=8;13;IF([.D25]=7;14;IF([.D25]=6;15;IF([.D25]=5;16;IF([.D25]=4;17;IF([.D25]=3;18;IF([.D25]=2;19;IF([.D25]=1;20;0)))))))))))))))))))))" office:value-type="float" office:value="0" calcext:value-type="float">
            <text:p>0</text:p>
          </table:table-cell>
          <table:table-cell table:style-name="ce134" office:value-type="string" calcext:value-type="string">
            <text:p>-</text:p>
          </table:table-cell>
          <table:table-cell table:style-name="ce139" table:formula="of:=IF([.F25]=20;1;IF([.F25]=19;2;IF([.F25]=19;2;IF([.F25]=18;3;IF([.F25]=17;4;IF([.F25]=16;5;IF([.F25]=15;6;IF([.F25]=14;7;IF([.F25]=13;8;IF([.F25]=12;9;IF([.F25]=11;10;IF([.F25]=10;11;IF([.F25]=9;12;IF([.F25]=8;13;IF([.F25]=7;14;IF([.F25]=6;15;IF([.F25]=5;16;IF([.F25]=4;17;IF([.F25]=3;18;IF([.F25]=2;19;IF([.F25]=1;20;0)))))))))))))))))))))" office:value-type="float" office:value="0" calcext:value-type="float">
            <text:p>0</text:p>
          </table:table-cell>
          <table:table-cell table:style-name="ce134" office:value-type="float" office:value="56" calcext:value-type="float">
            <text:p>56º</text:p>
          </table:table-cell>
          <table:table-cell table:style-name="ce139" table:formula="of:=IF([.H25]=20;1;IF([.H25]=19;2;IF([.H25]=19;2;IF([.H25]=18;3;IF([.H25]=17;4;IF([.H25]=16;5;IF([.H25]=15;6;IF([.H25]=14;7;IF([.H25]=13;8;IF([.H25]=12;9;IF([.H25]=11;10;IF([.H25]=10;11;IF([.H25]=9;12;IF([.H25]=8;13;IF([.H25]=7;14;IF([.H25]=6;15;IF([.H25]=5;16;IF([.H25]=4;17;IF([.H25]=3;18;IF([.H25]=2;19;IF([.H25]=1;20;0)))))))))))))))))))))" office:value-type="float" office:value="0" calcext:value-type="float">
            <text:p>0</text:p>
          </table:table-cell>
          <table:table-cell table:style-name="ce134" office:value-type="string" calcext:value-type="string">
            <text:p>-</text:p>
          </table:table-cell>
          <table:table-cell table:style-name="ce145" table:formula="of:=IF([.J25]=20;1;IF([.J25]=19;2;IF([.J25]=19;2;IF([.J25]=18;3;IF([.J25]=17;4;IF([.J25]=16;5;IF([.J25]=15;6;IF([.J25]=14;7;IF([.J25]=13;8;IF([.J25]=12;9;IF([.J25]=11;10;IF([.J25]=10;11;IF([.J25]=9;12;IF([.J25]=8;13;IF([.J25]=7;14;IF([.J25]=6;15;IF([.J25]=5;16;IF([.J25]=4;17;IF([.J25]=3;18;IF([.J25]=2;19;IF([.J25]=1;20;0)))))))))))))))))))))" office:value-type="float" office:value="0" calcext:value-type="float">
            <text:p>0</text:p>
          </table:table-cell>
          <table:table-cell table:style-name="ce150"/>
          <table:table-cell table:style-name="ce158" table:formula="of:=SUM([.C25];[.E25];[.G25];[.I25];[.K25])" office:value-type="float" office:value="0" calcext:value-type="float">
            <text:p>0</text:p>
          </table:table-cell>
          <table:table-cell table:style-name="ce160" table:formula="of:=RANK([.M25];[.$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7" calcext:value-type="float">
            <text:p>7</text:p>
          </table:table-cell>
          <table:table-cell table:style-name="ce185" office:value-type="string" calcext:value-type="string">
            <text:p>-</text:p>
          </table:table-cell>
          <table:table-cell table:style-name="ce188" table:formula="of:=SUM([.P25:.T25])" office:value-type="float" office:value="7" calcext:value-type="float">
            <text:p>7</text:p>
          </table:table-cell>
          <table:table-cell table:style-name="ce189" table:formula="of:=RANK([.U25];[.$U$4:.$U$133])" office:value-type="float" office:value="77" calcext:value-type="float">
            <text:p>77º</text:p>
          </table:table-cell>
          <table:table-cell table:style-name="ce161"/>
          <table:table-cell table:style-name="ce193" table:formula="of:=COUNTIF([.B25];&quot;&gt;0&quot;)+COUNTIF([.D25];&quot;&gt;0&quot;)+COUNTIF([.F25];&quot;&gt;0&quot;)+COUNTIF([.H25];&quot;&gt;0&quot;)+COUNTIF([.J25];&quot;&gt;0&quot;)" office:value-type="float" office:value="1" calcext:value-type="float">
            <text:p>1</text:p>
          </table:table-cell>
          <table:table-cell table:style-name="ce200" table:formula="of:=[.M25]/[.X25]" office:value-type="float" office:value="0" calcext:value-type="float">
            <text:p>0.0</text:p>
          </table:table-cell>
          <table:table-cell table:style-name="ce204" table:formula="of:=RANK([.Y25];[.$Y$4:.$Y$133])" office:value-type="float" office:value="71" calcext:value-type="float">
            <text:p>71º</text:p>
          </table:table-cell>
          <table:table-cell table:style-name="ce208" table:formula="of:=[.U25]/[.X25]" office:value-type="float" office:value="7" calcext:value-type="float">
            <text:p>7.0</text:p>
          </table:table-cell>
          <table:table-cell table:style-name="ce212" table:formula="of:=RANK([.AA25];[.$AA$4:.$AA$133])" office:value-type="float" office:value="11" calcext:value-type="float">
            <text:p>11º</text:p>
          </table:table-cell>
          <table:table-cell table:number-columns-repeated="996"/>
        </table:table-row>
        <table:table-row table:style-name="ro10">
          <table:table-cell table:style-name="ce126" office:value-type="string" calcext:value-type="string">
            <text:p>CHARLOTE</text:p>
          </table:table-cell>
          <table:table-cell table:style-name="ce134" office:value-type="float" office:value="30" calcext:value-type="float">
            <text:p>30º</text:p>
          </table:table-cell>
          <table:table-cell table:style-name="ce139" table:formula="of:=IF([.B26]=20;1;IF([.B26]=19;2;IF([.B26]=19;2;IF([.B26]=18;3;IF([.B26]=17;4;IF([.B26]=16;5;IF([.B26]=15;6;IF([.B26]=14;7;IF([.B26]=13;8;IF([.B26]=12;9;IF([.B26]=11;10;IF([.B26]=10;11;IF([.B26]=9;12;IF([.B26]=8;13;IF([.B26]=7;14;IF([.B26]=6;15;IF([.B26]=5;16;IF([.B26]=4;17;IF([.B26]=3;18;IF([.B26]=2;19;IF([.B26]=1;20;0)))))))))))))))))))))" office:value-type="float" office:value="0" calcext:value-type="float">
            <text:p>0</text:p>
          </table:table-cell>
          <table:table-cell table:style-name="ce134"/>
          <table:table-cell table:style-name="ce139" table:formula="of:=IF([.D26]=20;1;IF([.D26]=19;2;IF([.D26]=19;2;IF([.D26]=18;3;IF([.D26]=17;4;IF([.D26]=16;5;IF([.D26]=15;6;IF([.D26]=14;7;IF([.D26]=13;8;IF([.D26]=12;9;IF([.D26]=11;10;IF([.D26]=10;11;IF([.D26]=9;12;IF([.D26]=8;13;IF([.D26]=7;14;IF([.D26]=6;15;IF([.D26]=5;16;IF([.D26]=4;17;IF([.D26]=3;18;IF([.D26]=2;19;IF([.D26]=1;20;0)))))))))))))))))))))" office:value-type="float" office:value="0" calcext:value-type="float">
            <text:p>0</text:p>
          </table:table-cell>
          <table:table-cell table:style-name="ce134"/>
          <table:table-cell table:style-name="ce139" table:formula="of:=IF([.F26]=20;1;IF([.F26]=19;2;IF([.F26]=19;2;IF([.F26]=18;3;IF([.F26]=17;4;IF([.F26]=16;5;IF([.F26]=15;6;IF([.F26]=14;7;IF([.F26]=13;8;IF([.F26]=12;9;IF([.F26]=11;10;IF([.F26]=10;11;IF([.F26]=9;12;IF([.F26]=8;13;IF([.F26]=7;14;IF([.F26]=6;15;IF([.F26]=5;16;IF([.F26]=4;17;IF([.F26]=3;18;IF([.F26]=2;19;IF([.F26]=1;20;0)))))))))))))))))))))" office:value-type="float" office:value="0" calcext:value-type="float">
            <text:p>0</text:p>
          </table:table-cell>
          <table:table-cell table:style-name="ce134"/>
          <table:table-cell table:style-name="ce139" table:formula="of:=IF([.H26]=20;1;IF([.H26]=19;2;IF([.H26]=19;2;IF([.H26]=18;3;IF([.H26]=17;4;IF([.H26]=16;5;IF([.H26]=15;6;IF([.H26]=14;7;IF([.H26]=13;8;IF([.H26]=12;9;IF([.H26]=11;10;IF([.H26]=10;11;IF([.H26]=9;12;IF([.H26]=8;13;IF([.H26]=7;14;IF([.H26]=6;15;IF([.H26]=5;16;IF([.H26]=4;17;IF([.H26]=3;18;IF([.H26]=2;19;IF([.H26]=1;20;0)))))))))))))))))))))" office:value-type="float" office:value="0" calcext:value-type="float">
            <text:p>0</text:p>
          </table:table-cell>
          <table:table-cell table:style-name="ce134"/>
          <table:table-cell table:style-name="ce145" table:formula="of:=IF([.J26]=20;1;IF([.J26]=19;2;IF([.J26]=19;2;IF([.J26]=18;3;IF([.J26]=17;4;IF([.J26]=16;5;IF([.J26]=15;6;IF([.J26]=14;7;IF([.J26]=13;8;IF([.J26]=12;9;IF([.J26]=11;10;IF([.J26]=10;11;IF([.J26]=9;12;IF([.J26]=8;13;IF([.J26]=7;14;IF([.J26]=6;15;IF([.J26]=5;16;IF([.J26]=4;17;IF([.J26]=3;18;IF([.J26]=2;19;IF([.J26]=1;20;0)))))))))))))))))))))" office:value-type="float" office:value="0" calcext:value-type="float">
            <text:p>0</text:p>
          </table:table-cell>
          <table:table-cell table:style-name="ce150"/>
          <table:table-cell table:style-name="ce158" table:formula="of:=SUM([.C26];[.E26];[.G26];[.I26];[.K26])" office:value-type="float" office:value="0" calcext:value-type="float">
            <text:p>0</text:p>
          </table:table-cell>
          <table:table-cell table:style-name="ce160" table:formula="of:=RANK([.M26];[.$M$4:.$M$133])" office:value-type="float" office:value="71" calcext:value-type="float">
            <text:p>71º</text:p>
          </table:table-cell>
          <table:table-cell table:style-name="ce161"/>
          <table:table-cell table:style-name="ce169" office:value-type="float" office:value="4" calcext:value-type="float">
            <text:p>4</text:p>
          </table:table-cell>
          <table:table-cell table:number-columns-repeated="2" table:style-name="ce175" office:value-type="string" calcext:value-type="string">
            <text:p>-</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26:.T26])" office:value-type="float" office:value="4" calcext:value-type="float">
            <text:p>4</text:p>
          </table:table-cell>
          <table:table-cell table:style-name="ce189" table:formula="of:=RANK([.U26];[.$U$4:.$U$133])" office:value-type="float" office:value="113" calcext:value-type="float">
            <text:p>113º</text:p>
          </table:table-cell>
          <table:table-cell table:style-name="ce161"/>
          <table:table-cell table:style-name="ce193" table:formula="of:=COUNTIF([.B26];&quot;&gt;0&quot;)+COUNTIF([.D26];&quot;&gt;0&quot;)+COUNTIF([.F26];&quot;&gt;0&quot;)+COUNTIF([.H26];&quot;&gt;0&quot;)+COUNTIF([.J26];&quot;&gt;0&quot;)" office:value-type="float" office:value="1" calcext:value-type="float">
            <text:p>1</text:p>
          </table:table-cell>
          <table:table-cell table:style-name="ce200" table:formula="of:=[.M26]/[.X26]" office:value-type="float" office:value="0" calcext:value-type="float">
            <text:p>0.0</text:p>
          </table:table-cell>
          <table:table-cell table:style-name="ce204" table:formula="of:=RANK([.Y26];[.$Y$4:.$Y$133])" office:value-type="float" office:value="71" calcext:value-type="float">
            <text:p>71º</text:p>
          </table:table-cell>
          <table:table-cell table:style-name="ce208" table:formula="of:=[.U26]/[.X26]" office:value-type="float" office:value="4" calcext:value-type="float">
            <text:p>4.0</text:p>
          </table:table-cell>
          <table:table-cell table:style-name="ce212" table:formula="of:=RANK([.AA26];[.$AA$4:.$AA$133])" office:value-type="float" office:value="98" calcext:value-type="float">
            <text:p>98º</text:p>
          </table:table-cell>
          <table:table-cell table:number-columns-repeated="996"/>
        </table:table-row>
        <table:table-row table:style-name="ro10">
          <table:table-cell table:style-name="ce126" office:value-type="string" calcext:value-type="string">
            <text:p>GUILHERME e GABRIEL</text:p>
          </table:table-cell>
          <table:table-cell table:style-name="ce134" office:value-type="string" calcext:value-type="string">
            <text:p>-</text:p>
          </table:table-cell>
          <table:table-cell table:style-name="ce139" table:formula="of:=IF([.B27]=20;1;IF([.B27]=19;2;IF([.B27]=19;2;IF([.B27]=18;3;IF([.B27]=17;4;IF([.B27]=16;5;IF([.B27]=15;6;IF([.B27]=14;7;IF([.B27]=13;8;IF([.B27]=12;9;IF([.B27]=11;10;IF([.B27]=10;11;IF([.B27]=9;12;IF([.B27]=8;13;IF([.B27]=7;14;IF([.B27]=6;15;IF([.B27]=5;16;IF([.B27]=4;17;IF([.B27]=3;18;IF([.B27]=2;19;IF([.B27]=1;20;0)))))))))))))))))))))" office:value-type="float" office:value="0" calcext:value-type="float">
            <text:p>0</text:p>
          </table:table-cell>
          <table:table-cell table:style-name="ce134" office:value-type="string" calcext:value-type="string">
            <text:p>-</text:p>
          </table:table-cell>
          <table:table-cell table:style-name="ce139" table:formula="of:=IF([.D27]=20;1;IF([.D27]=19;2;IF([.D27]=19;2;IF([.D27]=18;3;IF([.D27]=17;4;IF([.D27]=16;5;IF([.D27]=15;6;IF([.D27]=14;7;IF([.D27]=13;8;IF([.D27]=12;9;IF([.D27]=11;10;IF([.D27]=10;11;IF([.D27]=9;12;IF([.D27]=8;13;IF([.D27]=7;14;IF([.D27]=6;15;IF([.D27]=5;16;IF([.D27]=4;17;IF([.D27]=3;18;IF([.D27]=2;19;IF([.D27]=1;20;0)))))))))))))))))))))" office:value-type="float" office:value="0" calcext:value-type="float">
            <text:p>0</text:p>
          </table:table-cell>
          <table:table-cell table:style-name="ce134" office:value-type="float" office:value="13" calcext:value-type="float">
            <text:p>13º</text:p>
          </table:table-cell>
          <table:table-cell table:style-name="ce139" table:formula="of:=IF([.F27]=20;1;IF([.F27]=19;2;IF([.F27]=19;2;IF([.F27]=18;3;IF([.F27]=17;4;IF([.F27]=16;5;IF([.F27]=15;6;IF([.F27]=14;7;IF([.F27]=13;8;IF([.F27]=12;9;IF([.F27]=11;10;IF([.F27]=10;11;IF([.F27]=9;12;IF([.F27]=8;13;IF([.F27]=7;14;IF([.F27]=6;15;IF([.F27]=5;16;IF([.F27]=4;17;IF([.F27]=3;18;IF([.F27]=2;19;IF([.F27]=1;20;0)))))))))))))))))))))" office:value-type="float" office:value="8" calcext:value-type="float">
            <text:p>8</text:p>
          </table:table-cell>
          <table:table-cell table:style-name="ce134" office:value-type="float" office:value="54" calcext:value-type="float">
            <text:p>54º</text:p>
          </table:table-cell>
          <table:table-cell table:style-name="ce139" table:formula="of:=IF([.H27]=20;1;IF([.H27]=19;2;IF([.H27]=19;2;IF([.H27]=18;3;IF([.H27]=17;4;IF([.H27]=16;5;IF([.H27]=15;6;IF([.H27]=14;7;IF([.H27]=13;8;IF([.H27]=12;9;IF([.H27]=11;10;IF([.H27]=10;11;IF([.H27]=9;12;IF([.H27]=8;13;IF([.H27]=7;14;IF([.H27]=6;15;IF([.H27]=5;16;IF([.H27]=4;17;IF([.H27]=3;18;IF([.H27]=2;19;IF([.H27]=1;20;0)))))))))))))))))))))" office:value-type="float" office:value="0" calcext:value-type="float">
            <text:p>0</text:p>
          </table:table-cell>
          <table:table-cell table:style-name="ce134" office:value-type="string" calcext:value-type="string">
            <text:p>?</text:p>
          </table:table-cell>
          <table:table-cell table:style-name="ce145" table:formula="of:=IF([.J27]=20;1;IF([.J27]=19;2;IF([.J27]=19;2;IF([.J27]=18;3;IF([.J27]=17;4;IF([.J27]=16;5;IF([.J27]=15;6;IF([.J27]=14;7;IF([.J27]=13;8;IF([.J27]=12;9;IF([.J27]=11;10;IF([.J27]=10;11;IF([.J27]=9;12;IF([.J27]=8;13;IF([.J27]=7;14;IF([.J27]=6;15;IF([.J27]=5;16;IF([.J27]=4;17;IF([.J27]=3;18;IF([.J27]=2;19;IF([.J27]=1;20;0)))))))))))))))))))))" office:value-type="float" office:value="0" calcext:value-type="float">
            <text:p>0</text:p>
          </table:table-cell>
          <table:table-cell table:style-name="ce150"/>
          <table:table-cell table:style-name="ce158" table:formula="of:=SUM([.C27];[.E27];[.G27];[.I27];[.K27])" office:value-type="float" office:value="8" calcext:value-type="float">
            <text:p>8</text:p>
          </table:table-cell>
          <table:table-cell table:style-name="ce160" table:formula="of:=RANK([.M27];[.$M$4:.$M$133])" office:value-type="float" office:value="51" calcext:value-type="float">
            <text:p>5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6" calcext:value-type="float">
            <text:p>6</text:p>
          </table:table-cell>
          <table:table-cell table:style-name="ce180" office:value-type="float" office:value="5" calcext:value-type="float">
            <text:p>5</text:p>
          </table:table-cell>
          <table:table-cell table:style-name="ce185" office:value-type="string" calcext:value-type="string">
            <text:p>?</text:p>
          </table:table-cell>
          <table:table-cell table:style-name="ce188" table:formula="of:=SUM([.P27:.T27])" office:value-type="float" office:value="11" calcext:value-type="float">
            <text:p>11</text:p>
          </table:table-cell>
          <table:table-cell table:style-name="ce189" table:formula="of:=RANK([.U27];[.$U$4:.$U$133])" office:value-type="float" office:value="62" calcext:value-type="float">
            <text:p>62º</text:p>
          </table:table-cell>
          <table:table-cell table:style-name="ce161"/>
          <table:table-cell table:style-name="ce193" table:formula="of:=COUNTIF([.B27];&quot;&gt;0&quot;)+COUNTIF([.D27];&quot;&gt;0&quot;)+COUNTIF([.F27];&quot;&gt;0&quot;)+COUNTIF([.H27];&quot;&gt;0&quot;)+COUNTIF([.J27];&quot;&gt;0&quot;)" office:value-type="float" office:value="2" calcext:value-type="float">
            <text:p>2</text:p>
          </table:table-cell>
          <table:table-cell table:style-name="ce200" table:formula="of:=[.M27]/[.X27]" office:value-type="float" office:value="4" calcext:value-type="float">
            <text:p>4.0</text:p>
          </table:table-cell>
          <table:table-cell table:style-name="ce204" table:formula="of:=RANK([.Y27];[.$Y$4:.$Y$133])" office:value-type="float" office:value="39" calcext:value-type="float">
            <text:p>39º</text:p>
          </table:table-cell>
          <table:table-cell table:style-name="ce208" table:formula="of:=[.U27]/[.X27]" office:value-type="float" office:value="5.5" calcext:value-type="float">
            <text:p>5.5</text:p>
          </table:table-cell>
          <table:table-cell table:style-name="ce212" table:formula="of:=RANK([.AA27];[.$AA$4:.$AA$133])" office:value-type="float" office:value="61" calcext:value-type="float">
            <text:p>61º</text:p>
          </table:table-cell>
          <table:table-cell table:number-columns-repeated="996"/>
        </table:table-row>
        <table:table-row table:style-name="ro10">
          <table:table-cell table:style-name="ce126" office:value-type="string" calcext:value-type="string">
            <text:p>DANICHI</text:p>
          </table:table-cell>
          <table:table-cell table:style-name="ce134" office:value-type="float" office:value="33" calcext:value-type="float">
            <text:p>33º</text:p>
          </table:table-cell>
          <table:table-cell table:style-name="ce139" table:formula="of:=IF([.B28]=20;1;IF([.B28]=19;2;IF([.B28]=19;2;IF([.B28]=18;3;IF([.B28]=17;4;IF([.B28]=16;5;IF([.B28]=15;6;IF([.B28]=14;7;IF([.B28]=13;8;IF([.B28]=12;9;IF([.B28]=11;10;IF([.B28]=10;11;IF([.B28]=9;12;IF([.B28]=8;13;IF([.B28]=7;14;IF([.B28]=6;15;IF([.B28]=5;16;IF([.B28]=4;17;IF([.B28]=3;18;IF([.B28]=2;19;IF([.B28]=1;20;0)))))))))))))))))))))" office:value-type="float" office:value="0" calcext:value-type="float">
            <text:p>0</text:p>
          </table:table-cell>
          <table:table-cell table:style-name="ce134" office:value-type="float" office:value="60" calcext:value-type="float">
            <text:p>60º</text:p>
          </table:table-cell>
          <table:table-cell table:style-name="ce139" table:formula="of:=IF([.D28]=20;1;IF([.D28]=19;2;IF([.D28]=19;2;IF([.D28]=18;3;IF([.D28]=17;4;IF([.D28]=16;5;IF([.D28]=15;6;IF([.D28]=14;7;IF([.D28]=13;8;IF([.D28]=12;9;IF([.D28]=11;10;IF([.D28]=10;11;IF([.D28]=9;12;IF([.D28]=8;13;IF([.D28]=7;14;IF([.D28]=6;15;IF([.D28]=5;16;IF([.D28]=4;17;IF([.D28]=3;18;IF([.D28]=2;19;IF([.D28]=1;20;0)))))))))))))))))))))" office:value-type="float" office:value="0" calcext:value-type="float">
            <text:p>0</text:p>
          </table:table-cell>
          <table:table-cell table:style-name="ce134" office:value-type="float" office:value="36" calcext:value-type="float">
            <text:p>36º</text:p>
          </table:table-cell>
          <table:table-cell table:style-name="ce139" table:formula="of:=IF([.F28]=20;1;IF([.F28]=19;2;IF([.F28]=19;2;IF([.F28]=18;3;IF([.F28]=17;4;IF([.F28]=16;5;IF([.F28]=15;6;IF([.F28]=14;7;IF([.F28]=13;8;IF([.F28]=12;9;IF([.F28]=11;10;IF([.F28]=10;11;IF([.F28]=9;12;IF([.F28]=8;13;IF([.F28]=7;14;IF([.F28]=6;15;IF([.F28]=5;16;IF([.F28]=4;17;IF([.F28]=3;18;IF([.F28]=2;19;IF([.F28]=1;20;0)))))))))))))))))))))" office:value-type="float" office:value="0" calcext:value-type="float">
            <text:p>0</text:p>
          </table:table-cell>
          <table:table-cell table:style-name="ce134" office:value-type="float" office:value="82" calcext:value-type="float">
            <text:p>82º</text:p>
          </table:table-cell>
          <table:table-cell table:style-name="ce139" table:formula="of:=IF([.H28]=20;1;IF([.H28]=19;2;IF([.H28]=19;2;IF([.H28]=18;3;IF([.H28]=17;4;IF([.H28]=16;5;IF([.H28]=15;6;IF([.H28]=14;7;IF([.H28]=13;8;IF([.H28]=12;9;IF([.H28]=11;10;IF([.H28]=10;11;IF([.H28]=9;12;IF([.H28]=8;13;IF([.H28]=7;14;IF([.H28]=6;15;IF([.H28]=5;16;IF([.H28]=4;17;IF([.H28]=3;18;IF([.H28]=2;19;IF([.H28]=1;20;0)))))))))))))))))))))" office:value-type="float" office:value="0" calcext:value-type="float">
            <text:p>0</text:p>
          </table:table-cell>
          <table:table-cell table:style-name="ce134" office:value-type="float" office:value="12" calcext:value-type="float">
            <text:p>12º</text:p>
          </table:table-cell>
          <table:table-cell table:style-name="ce145" table:formula="of:=IF([.J28]=20;1;IF([.J28]=19;2;IF([.J28]=19;2;IF([.J28]=18;3;IF([.J28]=17;4;IF([.J28]=16;5;IF([.J28]=15;6;IF([.J28]=14;7;IF([.J28]=13;8;IF([.J28]=12;9;IF([.J28]=11;10;IF([.J28]=10;11;IF([.J28]=9;12;IF([.J28]=8;13;IF([.J28]=7;14;IF([.J28]=6;15;IF([.J28]=5;16;IF([.J28]=4;17;IF([.J28]=3;18;IF([.J28]=2;19;IF([.J28]=1;20;0)))))))))))))))))))))" office:value-type="float" office:value="9" calcext:value-type="float">
            <text:p>9</text:p>
          </table:table-cell>
          <table:table-cell table:style-name="ce150"/>
          <table:table-cell table:style-name="ce158" table:formula="of:=SUM([.C28];[.E28];[.G28];[.I28];[.K28])" office:value-type="float" office:value="9" calcext:value-type="float">
            <text:p>9</text:p>
          </table:table-cell>
          <table:table-cell table:style-name="ce160" table:formula="of:=RANK([.M28];[.$M$4:.$M$133])" office:value-type="float" office:value="49" calcext:value-type="float">
            <text:p>49º</text:p>
          </table:table-cell>
          <table:table-cell table:style-name="ce161"/>
          <table:table-cell table:style-name="ce169" office:value-type="float" office:value="2" calcext:value-type="float">
            <text:p>2</text:p>
          </table:table-cell>
          <table:table-cell table:style-name="ce175" office:value-type="float" office:value="5" calcext:value-type="float">
            <text:p>5</text:p>
          </table:table-cell>
          <table:table-cell table:style-name="ce175" office:value-type="float" office:value="6" calcext:value-type="float">
            <text:p>6</text:p>
          </table:table-cell>
          <table:table-cell table:style-name="ce180" office:value-type="float" office:value="5" calcext:value-type="float">
            <text:p>5</text:p>
          </table:table-cell>
          <table:table-cell table:style-name="ce185" office:value-type="float" office:value="4" calcext:value-type="float">
            <text:p>4</text:p>
          </table:table-cell>
          <table:table-cell table:style-name="ce188" table:formula="of:=SUM([.P28:.T28])" office:value-type="float" office:value="22" calcext:value-type="float">
            <text:p>22</text:p>
          </table:table-cell>
          <table:table-cell table:style-name="ce189" table:formula="of:=RANK([.U28];[.$U$4:.$U$133])" office:value-type="float" office:value="25" calcext:value-type="float">
            <text:p>25º</text:p>
          </table:table-cell>
          <table:table-cell table:style-name="ce161"/>
          <table:table-cell table:style-name="ce193" table:formula="of:=COUNTIF([.B28];&quot;&gt;0&quot;)+COUNTIF([.D28];&quot;&gt;0&quot;)+COUNTIF([.F28];&quot;&gt;0&quot;)+COUNTIF([.H28];&quot;&gt;0&quot;)+COUNTIF([.J28];&quot;&gt;0&quot;)" office:value-type="float" office:value="5" calcext:value-type="float">
            <text:p>5</text:p>
          </table:table-cell>
          <table:table-cell table:style-name="ce200" table:formula="of:=[.M28]/[.X28]" office:value-type="float" office:value="1.8" calcext:value-type="float">
            <text:p>1.8</text:p>
          </table:table-cell>
          <table:table-cell table:style-name="ce204" table:formula="of:=RANK([.Y28];[.$Y$4:.$Y$133])" office:value-type="float" office:value="61" calcext:value-type="float">
            <text:p>61º</text:p>
          </table:table-cell>
          <table:table-cell table:style-name="ce208" table:formula="of:=[.U28]/[.X28]" office:value-type="float" office:value="4.4" calcext:value-type="float">
            <text:p>4.4</text:p>
          </table:table-cell>
          <table:table-cell table:style-name="ce212" table:formula="of:=RANK([.AA28];[.$AA$4:.$AA$133])" office:value-type="float" office:value="94" calcext:value-type="float">
            <text:p>94º</text:p>
          </table:table-cell>
          <table:table-cell table:number-columns-repeated="996"/>
        </table:table-row>
        <table:table-row table:style-name="ro10">
          <table:table-cell table:style-name="ce127" office:value-type="string" calcext:value-type="string">
            <text:p>DANIEL KVELLER</text:p>
          </table:table-cell>
          <table:table-cell table:style-name="ce135" office:value-type="string" calcext:value-type="string">
            <text:p>-</text:p>
          </table:table-cell>
          <table:table-cell table:style-name="ce140" table:formula="of:=IF([.B29]=20;1;IF([.B29]=19;2;IF([.B29]=19;2;IF([.B29]=18;3;IF([.B29]=17;4;IF([.B29]=16;5;IF([.B29]=15;6;IF([.B29]=14;7;IF([.B29]=13;8;IF([.B29]=12;9;IF([.B29]=11;10;IF([.B29]=10;11;IF([.B29]=9;12;IF([.B29]=8;13;IF([.B29]=7;14;IF([.B29]=6;15;IF([.B29]=5;16;IF([.B29]=4;17;IF([.B29]=3;18;IF([.B29]=2;19;IF([.B29]=1;20;0)))))))))))))))))))))" office:value-type="float" office:value="0" calcext:value-type="float">
            <text:p>0</text:p>
          </table:table-cell>
          <table:table-cell table:style-name="ce135" office:value-type="string" calcext:value-type="string">
            <text:p>-</text:p>
          </table:table-cell>
          <table:table-cell table:style-name="ce140" table:formula="of:=IF([.D29]=20;1;IF([.D29]=19;2;IF([.D29]=19;2;IF([.D29]=18;3;IF([.D29]=17;4;IF([.D29]=16;5;IF([.D29]=15;6;IF([.D29]=14;7;IF([.D29]=13;8;IF([.D29]=12;9;IF([.D29]=11;10;IF([.D29]=10;11;IF([.D29]=9;12;IF([.D29]=8;13;IF([.D29]=7;14;IF([.D29]=6;15;IF([.D29]=5;16;IF([.D29]=4;17;IF([.D29]=3;18;IF([.D29]=2;19;IF([.D29]=1;20;0)))))))))))))))))))))" office:value-type="float" office:value="0" calcext:value-type="float">
            <text:p>0</text:p>
          </table:table-cell>
          <table:table-cell table:style-name="ce135" office:value-type="float" office:value="39" calcext:value-type="float">
            <text:p>39º</text:p>
          </table:table-cell>
          <table:table-cell table:style-name="ce140" table:formula="of:=IF([.F29]=20;1;IF([.F29]=19;2;IF([.F29]=19;2;IF([.F29]=18;3;IF([.F29]=17;4;IF([.F29]=16;5;IF([.F29]=15;6;IF([.F29]=14;7;IF([.F29]=13;8;IF([.F29]=12;9;IF([.F29]=11;10;IF([.F29]=10;11;IF([.F29]=9;12;IF([.F29]=8;13;IF([.F29]=7;14;IF([.F29]=6;15;IF([.F29]=5;16;IF([.F29]=4;17;IF([.F29]=3;18;IF([.F29]=2;19;IF([.F29]=1;20;0)))))))))))))))))))))" office:value-type="float" office:value="0" calcext:value-type="float">
            <text:p>0</text:p>
          </table:table-cell>
          <table:table-cell table:style-name="ce135" office:value-type="float" office:value="25" calcext:value-type="float">
            <text:p>25º</text:p>
          </table:table-cell>
          <table:table-cell table:style-name="ce140" table:formula="of:=IF([.H29]=20;1;IF([.H29]=19;2;IF([.H29]=19;2;IF([.H29]=18;3;IF([.H29]=17;4;IF([.H29]=16;5;IF([.H29]=15;6;IF([.H29]=14;7;IF([.H29]=13;8;IF([.H29]=12;9;IF([.H29]=11;10;IF([.H29]=10;11;IF([.H29]=9;12;IF([.H29]=8;13;IF([.H29]=7;14;IF([.H29]=6;15;IF([.H29]=5;16;IF([.H29]=4;17;IF([.H29]=3;18;IF([.H29]=2;19;IF([.H29]=1;20;0)))))))))))))))))))))" office:value-type="float" office:value="0" calcext:value-type="float">
            <text:p>0</text:p>
          </table:table-cell>
          <table:table-cell table:style-name="ce135" office:value-type="string" calcext:value-type="string">
            <text:p>-</text:p>
          </table:table-cell>
          <table:table-cell table:style-name="ce146" table:formula="of:=IF([.J29]=20;1;IF([.J29]=19;2;IF([.J29]=19;2;IF([.J29]=18;3;IF([.J29]=17;4;IF([.J29]=16;5;IF([.J29]=15;6;IF([.J29]=14;7;IF([.J29]=13;8;IF([.J29]=12;9;IF([.J29]=11;10;IF([.J29]=10;11;IF([.J29]=9;12;IF([.J29]=8;13;IF([.J29]=7;14;IF([.J29]=6;15;IF([.J29]=5;16;IF([.J29]=4;17;IF([.J29]=3;18;IF([.J29]=2;19;IF([.J29]=1;20;0)))))))))))))))))))))" office:value-type="float" office:value="0" calcext:value-type="float">
            <text:p>0</text:p>
          </table:table-cell>
          <table:table-cell table:style-name="ce152"/>
          <table:table-cell table:style-name="ce158" table:formula="of:=SUM([.C29];[.E29];[.G29];[.I29];[.K29])" office:value-type="float" office:value="0" calcext:value-type="float">
            <text:p>0</text:p>
          </table:table-cell>
          <table:table-cell table:style-name="ce160" table:formula="of:=RANK([.M29];[.$M$4:.$M$133])" office:value-type="float" office:value="71" calcext:value-type="float">
            <text:p>71º</text:p>
          </table:table-cell>
          <table:table-cell table:style-name="ce161"/>
          <table:table-cell table:style-name="ce170" office:value-type="string" calcext:value-type="string">
            <text:p>-</text:p>
          </table:table-cell>
          <table:table-cell table:style-name="ce177" office:value-type="string" calcext:value-type="string">
            <text:p>-</text:p>
          </table:table-cell>
          <table:table-cell table:style-name="ce179" office:value-type="float" office:value="8" calcext:value-type="float">
            <text:p>8</text:p>
          </table:table-cell>
          <table:table-cell table:style-name="ce179" office:value-type="float" office:value="2" calcext:value-type="float">
            <text:p>2</text:p>
          </table:table-cell>
          <table:table-cell table:style-name="ce186" office:value-type="string" calcext:value-type="string">
            <text:p>-</text:p>
          </table:table-cell>
          <table:table-cell table:style-name="ce188" table:formula="of:=SUM([.P29:.T29])" office:value-type="float" office:value="10" calcext:value-type="float">
            <text:p>10</text:p>
          </table:table-cell>
          <table:table-cell table:style-name="ce189" table:formula="of:=RANK([.U29];[.$U$4:.$U$133])" office:value-type="float" office:value="65" calcext:value-type="float">
            <text:p>65º</text:p>
          </table:table-cell>
          <table:table-cell table:style-name="ce161"/>
          <table:table-cell table:style-name="ce194" table:formula="of:=COUNTIF([.B29];&quot;&gt;0&quot;)+COUNTIF([.D29];&quot;&gt;0&quot;)+COUNTIF([.F29];&quot;&gt;0&quot;)+COUNTIF([.H29];&quot;&gt;0&quot;)+COUNTIF([.J29];&quot;&gt;0&quot;)" office:value-type="float" office:value="2" calcext:value-type="float">
            <text:p>2</text:p>
          </table:table-cell>
          <table:table-cell table:style-name="ce201" table:formula="of:=[.M29]/[.X29]" office:value-type="float" office:value="0" calcext:value-type="float">
            <text:p>0.0</text:p>
          </table:table-cell>
          <table:table-cell table:style-name="ce205" table:formula="of:=RANK([.Y29];[.$Y$4:.$Y$133])" office:value-type="float" office:value="71" calcext:value-type="float">
            <text:p>71º</text:p>
          </table:table-cell>
          <table:table-cell table:style-name="ce209" table:formula="of:=[.U29]/[.X29]" office:value-type="float" office:value="5" calcext:value-type="float">
            <text:p>5.0</text:p>
          </table:table-cell>
          <table:table-cell table:style-name="ce213" table:formula="of:=RANK([.AA29];[.$AA$4:.$AA$133])" office:value-type="float" office:value="68" calcext:value-type="float">
            <text:p>68º</text:p>
          </table:table-cell>
          <table:table-cell table:number-columns-repeated="996"/>
        </table:table-row>
        <table:table-row table:style-name="ro10">
          <table:table-cell table:style-name="ce128" office:value-type="string" calcext:value-type="string">
            <text:p>DANIEL VITORELLO</text:p>
          </table:table-cell>
          <table:table-cell table:style-name="ce136" office:value-type="string" calcext:value-type="string">
            <text:p>-</text:p>
          </table:table-cell>
          <table:table-cell table:style-name="ce141" table:formula="of:=IF([.B30]=20;1;IF([.B30]=19;2;IF([.B30]=19;2;IF([.B30]=18;3;IF([.B30]=17;4;IF([.B30]=16;5;IF([.B30]=15;6;IF([.B30]=14;7;IF([.B30]=13;8;IF([.B30]=12;9;IF([.B30]=11;10;IF([.B30]=10;11;IF([.B30]=9;12;IF([.B30]=8;13;IF([.B30]=7;14;IF([.B30]=6;15;IF([.B30]=5;16;IF([.B30]=4;17;IF([.B30]=3;18;IF([.B30]=2;19;IF([.B30]=1;20;0)))))))))))))))))))))" office:value-type="float" office:value="0" calcext:value-type="float">
            <text:p>0</text:p>
          </table:table-cell>
          <table:table-cell table:style-name="ce136" office:value-type="float" office:value="52" calcext:value-type="float">
            <text:p>52º</text:p>
          </table:table-cell>
          <table:table-cell table:style-name="ce141" table:formula="of:=IF([.D30]=20;1;IF([.D30]=19;2;IF([.D30]=19;2;IF([.D30]=18;3;IF([.D30]=17;4;IF([.D30]=16;5;IF([.D30]=15;6;IF([.D30]=14;7;IF([.D30]=13;8;IF([.D30]=12;9;IF([.D30]=11;10;IF([.D30]=10;11;IF([.D30]=9;12;IF([.D30]=8;13;IF([.D30]=7;14;IF([.D30]=6;15;IF([.D30]=5;16;IF([.D30]=4;17;IF([.D30]=3;18;IF([.D30]=2;19;IF([.D30]=1;20;0)))))))))))))))))))))" office:value-type="float" office:value="0" calcext:value-type="float">
            <text:p>0</text:p>
          </table:table-cell>
          <table:table-cell table:style-name="ce136" office:value-type="string" calcext:value-type="string">
            <text:p>-</text:p>
          </table:table-cell>
          <table:table-cell table:style-name="ce141" table:formula="of:=IF([.F30]=20;1;IF([.F30]=19;2;IF([.F30]=19;2;IF([.F30]=18;3;IF([.F30]=17;4;IF([.F30]=16;5;IF([.F30]=15;6;IF([.F30]=14;7;IF([.F30]=13;8;IF([.F30]=12;9;IF([.F30]=11;10;IF([.F30]=10;11;IF([.F30]=9;12;IF([.F30]=8;13;IF([.F30]=7;14;IF([.F30]=6;15;IF([.F30]=5;16;IF([.F30]=4;17;IF([.F30]=3;18;IF([.F30]=2;19;IF([.F30]=1;20;0)))))))))))))))))))))" office:value-type="float" office:value="0" calcext:value-type="float">
            <text:p>0</text:p>
          </table:table-cell>
          <table:table-cell table:style-name="ce136" office:value-type="string" calcext:value-type="string">
            <text:p>-</text:p>
          </table:table-cell>
          <table:table-cell table:style-name="ce141" table:formula="of:=IF([.H30]=20;1;IF([.H30]=19;2;IF([.H30]=19;2;IF([.H30]=18;3;IF([.H30]=17;4;IF([.H30]=16;5;IF([.H30]=15;6;IF([.H30]=14;7;IF([.H30]=13;8;IF([.H30]=12;9;IF([.H30]=11;10;IF([.H30]=10;11;IF([.H30]=9;12;IF([.H30]=8;13;IF([.H30]=7;14;IF([.H30]=6;15;IF([.H30]=5;16;IF([.H30]=4;17;IF([.H30]=3;18;IF([.H30]=2;19;IF([.H30]=1;20;0)))))))))))))))))))))" office:value-type="float" office:value="0" calcext:value-type="float">
            <text:p>0</text:p>
          </table:table-cell>
          <table:table-cell table:style-name="ce136" office:value-type="string" calcext:value-type="string">
            <text:p>-</text:p>
          </table:table-cell>
          <table:table-cell table:style-name="ce147" table:formula="of:=IF([.J30]=20;1;IF([.J30]=19;2;IF([.J30]=19;2;IF([.J30]=18;3;IF([.J30]=17;4;IF([.J30]=16;5;IF([.J30]=15;6;IF([.J30]=14;7;IF([.J30]=13;8;IF([.J30]=12;9;IF([.J30]=11;10;IF([.J30]=10;11;IF([.J30]=9;12;IF([.J30]=8;13;IF([.J30]=7;14;IF([.J30]=6;15;IF([.J30]=5;16;IF([.J30]=4;17;IF([.J30]=3;18;IF([.J30]=2;19;IF([.J30]=1;20;0)))))))))))))))))))))" office:value-type="float" office:value="0" calcext:value-type="float">
            <text:p>0</text:p>
          </table:table-cell>
          <table:table-cell table:style-name="ce153"/>
          <table:table-cell table:style-name="ce158" table:formula="of:=SUM([.C30];[.E30];[.G30];[.I30];[.K30])" office:value-type="float" office:value="0" calcext:value-type="float">
            <text:p>0</text:p>
          </table:table-cell>
          <table:table-cell table:style-name="ce160" table:formula="of:=RANK([.M30];[.$M$4:.$M$133])" office:value-type="float" office:value="71" calcext:value-type="float">
            <text:p>71º</text:p>
          </table:table-cell>
          <table:table-cell table:style-name="ce161"/>
          <table:table-cell table:style-name="ce171" office:value-type="string" calcext:value-type="string">
            <text:p>-</text:p>
          </table:table-cell>
          <table:table-cell table:style-name="ce178" office:value-type="float" office:value="3" calcext:value-type="float">
            <text:p>3</text:p>
          </table:table-cell>
          <table:table-cell table:style-name="ce178" office:value-type="string" calcext:value-type="string">
            <text:p>-</text:p>
          </table:table-cell>
          <table:table-cell table:style-name="ce182" office:value-type="string" calcext:value-type="string">
            <text:p>-</text:p>
          </table:table-cell>
          <table:table-cell table:style-name="ce187" office:value-type="string" calcext:value-type="string">
            <text:p>-</text:p>
          </table:table-cell>
          <table:table-cell table:style-name="ce188" table:formula="of:=SUM([.P30:.T30])" office:value-type="float" office:value="3" calcext:value-type="float">
            <text:p>3</text:p>
          </table:table-cell>
          <table:table-cell table:style-name="ce189" table:formula="of:=RANK([.U30];[.$U$4:.$U$133])" office:value-type="float" office:value="119" calcext:value-type="float">
            <text:p>119º</text:p>
          </table:table-cell>
          <table:table-cell table:style-name="ce161"/>
          <table:table-cell table:style-name="ce195" table:formula="of:=COUNTIF([.B30];&quot;&gt;0&quot;)+COUNTIF([.D30];&quot;&gt;0&quot;)+COUNTIF([.F30];&quot;&gt;0&quot;)+COUNTIF([.H30];&quot;&gt;0&quot;)+COUNTIF([.J30];&quot;&gt;0&quot;)" office:value-type="float" office:value="1" calcext:value-type="float">
            <text:p>1</text:p>
          </table:table-cell>
          <table:table-cell table:style-name="ce202" table:formula="of:=[.M30]/[.X30]" office:value-type="float" office:value="0" calcext:value-type="float">
            <text:p>0.0</text:p>
          </table:table-cell>
          <table:table-cell table:style-name="ce206" table:formula="of:=RANK([.Y30];[.$Y$4:.$Y$133])" office:value-type="float" office:value="71" calcext:value-type="float">
            <text:p>71º</text:p>
          </table:table-cell>
          <table:table-cell table:style-name="ce210" table:formula="of:=[.U30]/[.X30]" office:value-type="float" office:value="3" calcext:value-type="float">
            <text:p>3.0</text:p>
          </table:table-cell>
          <table:table-cell table:style-name="ce214" table:formula="of:=RANK([.AA30];[.$AA$4:.$AA$133])" office:value-type="float" office:value="113" calcext:value-type="float">
            <text:p>113º</text:p>
          </table:table-cell>
          <table:table-cell table:number-columns-repeated="996"/>
        </table:table-row>
        <table:table-row table:style-name="ro10">
          <table:table-cell table:style-name="ce126" office:value-type="string" calcext:value-type="string">
            <text:p>DANIELE</text:p>
          </table:table-cell>
          <table:table-cell table:style-name="ce134" office:value-type="string" calcext:value-type="string">
            <text:p>-</text:p>
          </table:table-cell>
          <table:table-cell table:style-name="ce139" table:formula="of:=IF([.B31]=20;1;IF([.B31]=19;2;IF([.B31]=19;2;IF([.B31]=18;3;IF([.B31]=17;4;IF([.B31]=16;5;IF([.B31]=15;6;IF([.B31]=14;7;IF([.B31]=13;8;IF([.B31]=12;9;IF([.B31]=11;10;IF([.B31]=10;11;IF([.B31]=9;12;IF([.B31]=8;13;IF([.B31]=7;14;IF([.B31]=6;15;IF([.B31]=5;16;IF([.B31]=4;17;IF([.B31]=3;18;IF([.B31]=2;19;IF([.B31]=1;20;0)))))))))))))))))))))" office:value-type="float" office:value="0" calcext:value-type="float">
            <text:p>0</text:p>
          </table:table-cell>
          <table:table-cell table:style-name="ce134" office:value-type="string" calcext:value-type="string">
            <text:p>-</text:p>
          </table:table-cell>
          <table:table-cell table:style-name="ce139" table:formula="of:=IF([.D31]=20;1;IF([.D31]=19;2;IF([.D31]=19;2;IF([.D31]=18;3;IF([.D31]=17;4;IF([.D31]=16;5;IF([.D31]=15;6;IF([.D31]=14;7;IF([.D31]=13;8;IF([.D31]=12;9;IF([.D31]=11;10;IF([.D31]=10;11;IF([.D31]=9;12;IF([.D31]=8;13;IF([.D31]=7;14;IF([.D31]=6;15;IF([.D31]=5;16;IF([.D31]=4;17;IF([.D31]=3;18;IF([.D31]=2;19;IF([.D31]=1;20;0)))))))))))))))))))))" office:value-type="float" office:value="0" calcext:value-type="float">
            <text:p>0</text:p>
          </table:table-cell>
          <table:table-cell table:style-name="ce134" office:value-type="float" office:value="10" calcext:value-type="float">
            <text:p>10º</text:p>
          </table:table-cell>
          <table:table-cell table:style-name="ce139" table:formula="of:=IF([.F31]=20;1;IF([.F31]=19;2;IF([.F31]=19;2;IF([.F31]=18;3;IF([.F31]=17;4;IF([.F31]=16;5;IF([.F31]=15;6;IF([.F31]=14;7;IF([.F31]=13;8;IF([.F31]=12;9;IF([.F31]=11;10;IF([.F31]=10;11;IF([.F31]=9;12;IF([.F31]=8;13;IF([.F31]=7;14;IF([.F31]=6;15;IF([.F31]=5;16;IF([.F31]=4;17;IF([.F31]=3;18;IF([.F31]=2;19;IF([.F31]=1;20;0)))))))))))))))))))))" office:value-type="float" office:value="11" calcext:value-type="float">
            <text:p>11</text:p>
          </table:table-cell>
          <table:table-cell table:style-name="ce134" office:value-type="float" office:value="72" calcext:value-type="float">
            <text:p>72º</text:p>
          </table:table-cell>
          <table:table-cell table:style-name="ce139" table:formula="of:=IF([.H31]=20;1;IF([.H31]=19;2;IF([.H31]=19;2;IF([.H31]=18;3;IF([.H31]=17;4;IF([.H31]=16;5;IF([.H31]=15;6;IF([.H31]=14;7;IF([.H31]=13;8;IF([.H31]=12;9;IF([.H31]=11;10;IF([.H31]=10;11;IF([.H31]=9;12;IF([.H31]=8;13;IF([.H31]=7;14;IF([.H31]=6;15;IF([.H31]=5;16;IF([.H31]=4;17;IF([.H31]=3;18;IF([.H31]=2;19;IF([.H31]=1;20;0)))))))))))))))))))))" office:value-type="float" office:value="0" calcext:value-type="float">
            <text:p>0</text:p>
          </table:table-cell>
          <table:table-cell table:style-name="ce134" office:value-type="float" office:value="13" calcext:value-type="float">
            <text:p>13º</text:p>
          </table:table-cell>
          <table:table-cell table:style-name="ce145" table:formula="of:=IF([.J31]=20;1;IF([.J31]=19;2;IF([.J31]=19;2;IF([.J31]=18;3;IF([.J31]=17;4;IF([.J31]=16;5;IF([.J31]=15;6;IF([.J31]=14;7;IF([.J31]=13;8;IF([.J31]=12;9;IF([.J31]=11;10;IF([.J31]=10;11;IF([.J31]=9;12;IF([.J31]=8;13;IF([.J31]=7;14;IF([.J31]=6;15;IF([.J31]=5;16;IF([.J31]=4;17;IF([.J31]=3;18;IF([.J31]=2;19;IF([.J31]=1;20;0)))))))))))))))))))))" office:value-type="float" office:value="8" calcext:value-type="float">
            <text:p>8</text:p>
          </table:table-cell>
          <table:table-cell table:style-name="ce150"/>
          <table:table-cell table:style-name="ce158" table:formula="of:=SUM([.C31];[.E31];[.G31];[.I31];[.K31])" office:value-type="float" office:value="19" calcext:value-type="float">
            <text:p>19</text:p>
          </table:table-cell>
          <table:table-cell table:style-name="ce160" table:formula="of:=RANK([.M31];[.$M$4:.$M$133])" office:value-type="float" office:value="20" calcext:value-type="float">
            <text:p>20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8" calcext:value-type="float">
            <text:p>8</text:p>
          </table:table-cell>
          <table:table-cell table:style-name="ce180" office:value-type="float" office:value="7" calcext:value-type="float">
            <text:p>7</text:p>
          </table:table-cell>
          <table:table-cell table:style-name="ce185" office:value-type="float" office:value="3" calcext:value-type="float">
            <text:p>3</text:p>
          </table:table-cell>
          <table:table-cell table:style-name="ce188" table:formula="of:=SUM([.P31:.T31])" office:value-type="float" office:value="18" calcext:value-type="float">
            <text:p>18</text:p>
          </table:table-cell>
          <table:table-cell table:style-name="ce189" table:formula="of:=RANK([.U31];[.$U$4:.$U$133])" office:value-type="float" office:value="34" calcext:value-type="float">
            <text:p>34º</text:p>
          </table:table-cell>
          <table:table-cell table:style-name="ce161"/>
          <table:table-cell table:style-name="ce193" table:formula="of:=COUNTIF([.B31];&quot;&gt;0&quot;)+COUNTIF([.D31];&quot;&gt;0&quot;)+COUNTIF([.F31];&quot;&gt;0&quot;)+COUNTIF([.H31];&quot;&gt;0&quot;)+COUNTIF([.J31];&quot;&gt;0&quot;)" office:value-type="float" office:value="3" calcext:value-type="float">
            <text:p>3</text:p>
          </table:table-cell>
          <table:table-cell table:style-name="ce200" table:formula="of:=[.M31]/[.X31]" office:value-type="float" office:value="6.33333333333333" calcext:value-type="float">
            <text:p>6.3</text:p>
          </table:table-cell>
          <table:table-cell table:style-name="ce204" table:formula="of:=RANK([.Y31];[.$Y$4:.$Y$133])" office:value-type="float" office:value="17" calcext:value-type="float">
            <text:p>17º</text:p>
          </table:table-cell>
          <table:table-cell table:style-name="ce208" table:formula="of:=[.U31]/[.X31]" office:value-type="float" office:value="6" calcext:value-type="float">
            <text:p>6.0</text:p>
          </table:table-cell>
          <table:table-cell table:style-name="ce212" table:formula="of:=RANK([.AA31];[.$AA$4:.$AA$133])" office:value-type="float" office:value="36" calcext:value-type="float">
            <text:p>36º</text:p>
          </table:table-cell>
          <table:table-cell table:number-columns-repeated="996"/>
        </table:table-row>
        <table:table-row table:style-name="ro10">
          <table:table-cell table:style-name="ce126" office:value-type="string" calcext:value-type="string">
            <text:p>DAVI</text:p>
          </table:table-cell>
          <table:table-cell table:style-name="ce134" office:value-type="string" calcext:value-type="string">
            <text:p>-</text:p>
          </table:table-cell>
          <table:table-cell table:style-name="ce139" table:formula="of:=IF([.B32]=20;1;IF([.B32]=19;2;IF([.B32]=19;2;IF([.B32]=18;3;IF([.B32]=17;4;IF([.B32]=16;5;IF([.B32]=15;6;IF([.B32]=14;7;IF([.B32]=13;8;IF([.B32]=12;9;IF([.B32]=11;10;IF([.B32]=10;11;IF([.B32]=9;12;IF([.B32]=8;13;IF([.B32]=7;14;IF([.B32]=6;15;IF([.B32]=5;16;IF([.B32]=4;17;IF([.B32]=3;18;IF([.B32]=2;19;IF([.B32]=1;20;0)))))))))))))))))))))" office:value-type="float" office:value="0" calcext:value-type="float">
            <text:p>0</text:p>
          </table:table-cell>
          <table:table-cell table:style-name="ce134" office:value-type="float" office:value="17" calcext:value-type="float">
            <text:p>17º</text:p>
          </table:table-cell>
          <table:table-cell table:style-name="ce139" table:formula="of:=IF([.D32]=20;1;IF([.D32]=19;2;IF([.D32]=19;2;IF([.D32]=18;3;IF([.D32]=17;4;IF([.D32]=16;5;IF([.D32]=15;6;IF([.D32]=14;7;IF([.D32]=13;8;IF([.D32]=12;9;IF([.D32]=11;10;IF([.D32]=10;11;IF([.D32]=9;12;IF([.D32]=8;13;IF([.D32]=7;14;IF([.D32]=6;15;IF([.D32]=5;16;IF([.D32]=4;17;IF([.D32]=3;18;IF([.D32]=2;19;IF([.D32]=1;20;0)))))))))))))))))))))" office:value-type="float" office:value="4" calcext:value-type="float">
            <text:p>4</text:p>
          </table:table-cell>
          <table:table-cell table:style-name="ce134" office:value-type="string" calcext:value-type="string">
            <text:p>-</text:p>
          </table:table-cell>
          <table:table-cell table:style-name="ce139" table:formula="of:=IF([.F32]=20;1;IF([.F32]=19;2;IF([.F32]=19;2;IF([.F32]=18;3;IF([.F32]=17;4;IF([.F32]=16;5;IF([.F32]=15;6;IF([.F32]=14;7;IF([.F32]=13;8;IF([.F32]=12;9;IF([.F32]=11;10;IF([.F32]=10;11;IF([.F32]=9;12;IF([.F32]=8;13;IF([.F32]=7;14;IF([.F32]=6;15;IF([.F32]=5;16;IF([.F32]=4;17;IF([.F32]=3;18;IF([.F32]=2;19;IF([.F32]=1;20;0)))))))))))))))))))))" office:value-type="float" office:value="0" calcext:value-type="float">
            <text:p>0</text:p>
          </table:table-cell>
          <table:table-cell table:style-name="ce134" office:value-type="float" office:value="81" calcext:value-type="float">
            <text:p>81º</text:p>
          </table:table-cell>
          <table:table-cell table:style-name="ce139" table:formula="of:=IF([.H32]=20;1;IF([.H32]=19;2;IF([.H32]=19;2;IF([.H32]=18;3;IF([.H32]=17;4;IF([.H32]=16;5;IF([.H32]=15;6;IF([.H32]=14;7;IF([.H32]=13;8;IF([.H32]=12;9;IF([.H32]=11;10;IF([.H32]=10;11;IF([.H32]=9;12;IF([.H32]=8;13;IF([.H32]=7;14;IF([.H32]=6;15;IF([.H32]=5;16;IF([.H32]=4;17;IF([.H32]=3;18;IF([.H32]=2;19;IF([.H32]=1;20;0)))))))))))))))))))))" office:value-type="float" office:value="0" calcext:value-type="float">
            <text:p>0</text:p>
          </table:table-cell>
          <table:table-cell table:style-name="ce134" office:value-type="string" calcext:value-type="string">
            <text:p>-</text:p>
          </table:table-cell>
          <table:table-cell table:style-name="ce145" table:formula="of:=IF([.J32]=20;1;IF([.J32]=19;2;IF([.J32]=19;2;IF([.J32]=18;3;IF([.J32]=17;4;IF([.J32]=16;5;IF([.J32]=15;6;IF([.J32]=14;7;IF([.J32]=13;8;IF([.J32]=12;9;IF([.J32]=11;10;IF([.J32]=10;11;IF([.J32]=9;12;IF([.J32]=8;13;IF([.J32]=7;14;IF([.J32]=6;15;IF([.J32]=5;16;IF([.J32]=4;17;IF([.J32]=3;18;IF([.J32]=2;19;IF([.J32]=1;20;0)))))))))))))))))))))" office:value-type="float" office:value="0" calcext:value-type="float">
            <text:p>0</text:p>
          </table:table-cell>
          <table:table-cell table:style-name="ce150"/>
          <table:table-cell table:style-name="ce158" table:formula="of:=SUM([.C32];[.E32];[.G32];[.I32];[.K32])" office:value-type="float" office:value="4" calcext:value-type="float">
            <text:p>4</text:p>
          </table:table-cell>
          <table:table-cell table:style-name="ce160" table:formula="of:=RANK([.M32];[.$M$4:.$M$133])" office:value-type="float" office:value="59" calcext:value-type="float">
            <text:p>59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3" calcext:value-type="float">
            <text:p>3</text:p>
          </table:table-cell>
          <table:table-cell table:style-name="ce185" office:value-type="string" calcext:value-type="string">
            <text:p>-</text:p>
          </table:table-cell>
          <table:table-cell table:style-name="ce188" table:formula="of:=SUM([.P32:.T32])" office:value-type="float" office:value="3" calcext:value-type="float">
            <text:p>3</text:p>
          </table:table-cell>
          <table:table-cell table:style-name="ce189" table:formula="of:=RANK([.U32];[.$U$4:.$U$133])" office:value-type="float" office:value="119" calcext:value-type="float">
            <text:p>119º</text:p>
          </table:table-cell>
          <table:table-cell table:style-name="ce161"/>
          <table:table-cell table:style-name="ce193" table:formula="of:=COUNTIF([.B32];&quot;&gt;0&quot;)+COUNTIF([.D32];&quot;&gt;0&quot;)+COUNTIF([.F32];&quot;&gt;0&quot;)+COUNTIF([.H32];&quot;&gt;0&quot;)+COUNTIF([.J32];&quot;&gt;0&quot;)" office:value-type="float" office:value="2" calcext:value-type="float">
            <text:p>2</text:p>
          </table:table-cell>
          <table:table-cell table:style-name="ce200" table:formula="of:=[.M32]/[.X32]" office:value-type="float" office:value="2" calcext:value-type="float">
            <text:p>2.0</text:p>
          </table:table-cell>
          <table:table-cell table:style-name="ce204" table:formula="of:=RANK([.Y32];[.$Y$4:.$Y$133])" office:value-type="float" office:value="57" calcext:value-type="float">
            <text:p>57º</text:p>
          </table:table-cell>
          <table:table-cell table:style-name="ce208" table:formula="of:=[.U32]/[.X32]" office:value-type="float" office:value="1.5" calcext:value-type="float">
            <text:p>1.5</text:p>
          </table:table-cell>
          <table:table-cell table:style-name="ce212" table:formula="of:=RANK([.AA32];[.$AA$4:.$AA$133])" office:value-type="float" office:value="127" calcext:value-type="float">
            <text:p>127º</text:p>
          </table:table-cell>
          <table:table-cell table:number-columns-repeated="996"/>
        </table:table-row>
        <table:table-row table:style-name="ro10">
          <table:table-cell table:style-name="ce126" office:value-type="string" calcext:value-type="string">
            <text:p>DENISE</text:p>
          </table:table-cell>
          <table:table-cell table:style-name="ce134" office:value-type="float" office:value="26" calcext:value-type="float">
            <text:p>26º</text:p>
          </table:table-cell>
          <table:table-cell table:style-name="ce139" table:formula="of:=IF([.B33]=20;1;IF([.B33]=19;2;IF([.B33]=19;2;IF([.B33]=18;3;IF([.B33]=17;4;IF([.B33]=16;5;IF([.B33]=15;6;IF([.B33]=14;7;IF([.B33]=13;8;IF([.B33]=12;9;IF([.B33]=11;10;IF([.B33]=10;11;IF([.B33]=9;12;IF([.B33]=8;13;IF([.B33]=7;14;IF([.B33]=6;15;IF([.B33]=5;16;IF([.B33]=4;17;IF([.B33]=3;18;IF([.B33]=2;19;IF([.B33]=1;20;0)))))))))))))))))))))" office:value-type="float" office:value="0" calcext:value-type="float">
            <text:p>0</text:p>
          </table:table-cell>
          <table:table-cell table:style-name="ce134" office:value-type="float" office:value="40" calcext:value-type="float">
            <text:p>40º</text:p>
          </table:table-cell>
          <table:table-cell table:style-name="ce139" table:formula="of:=IF([.D33]=20;1;IF([.D33]=19;2;IF([.D33]=19;2;IF([.D33]=18;3;IF([.D33]=17;4;IF([.D33]=16;5;IF([.D33]=15;6;IF([.D33]=14;7;IF([.D33]=13;8;IF([.D33]=12;9;IF([.D33]=11;10;IF([.D33]=10;11;IF([.D33]=9;12;IF([.D33]=8;13;IF([.D33]=7;14;IF([.D33]=6;15;IF([.D33]=5;16;IF([.D33]=4;17;IF([.D33]=3;18;IF([.D33]=2;19;IF([.D33]=1;20;0)))))))))))))))))))))" office:value-type="float" office:value="0" calcext:value-type="float">
            <text:p>0</text:p>
          </table:table-cell>
          <table:table-cell table:style-name="ce134" office:value-type="float" office:value="44" calcext:value-type="float">
            <text:p>44º</text:p>
          </table:table-cell>
          <table:table-cell table:style-name="ce139" table:formula="of:=IF([.F33]=20;1;IF([.F33]=19;2;IF([.F33]=19;2;IF([.F33]=18;3;IF([.F33]=17;4;IF([.F33]=16;5;IF([.F33]=15;6;IF([.F33]=14;7;IF([.F33]=13;8;IF([.F33]=12;9;IF([.F33]=11;10;IF([.F33]=10;11;IF([.F33]=9;12;IF([.F33]=8;13;IF([.F33]=7;14;IF([.F33]=6;15;IF([.F33]=5;16;IF([.F33]=4;17;IF([.F33]=3;18;IF([.F33]=2;19;IF([.F33]=1;20;0)))))))))))))))))))))" office:value-type="float" office:value="0" calcext:value-type="float">
            <text:p>0</text:p>
          </table:table-cell>
          <table:table-cell table:style-name="ce134" office:value-type="float" office:value="78" calcext:value-type="float">
            <text:p>78º</text:p>
          </table:table-cell>
          <table:table-cell table:style-name="ce139" table:formula="of:=IF([.H33]=20;1;IF([.H33]=19;2;IF([.H33]=19;2;IF([.H33]=18;3;IF([.H33]=17;4;IF([.H33]=16;5;IF([.H33]=15;6;IF([.H33]=14;7;IF([.H33]=13;8;IF([.H33]=12;9;IF([.H33]=11;10;IF([.H33]=10;11;IF([.H33]=9;12;IF([.H33]=8;13;IF([.H33]=7;14;IF([.H33]=6;15;IF([.H33]=5;16;IF([.H33]=4;17;IF([.H33]=3;18;IF([.H33]=2;19;IF([.H33]=1;20;0)))))))))))))))))))))" office:value-type="float" office:value="0" calcext:value-type="float">
            <text:p>0</text:p>
          </table:table-cell>
          <table:table-cell table:style-name="ce134" office:value-type="float" office:value="29" calcext:value-type="float">
            <text:p>29º</text:p>
          </table:table-cell>
          <table:table-cell table:style-name="ce145" table:formula="of:=IF([.J33]=20;1;IF([.J33]=19;2;IF([.J33]=19;2;IF([.J33]=18;3;IF([.J33]=17;4;IF([.J33]=16;5;IF([.J33]=15;6;IF([.J33]=14;7;IF([.J33]=13;8;IF([.J33]=12;9;IF([.J33]=11;10;IF([.J33]=10;11;IF([.J33]=9;12;IF([.J33]=8;13;IF([.J33]=7;14;IF([.J33]=6;15;IF([.J33]=5;16;IF([.J33]=4;17;IF([.J33]=3;18;IF([.J33]=2;19;IF([.J33]=1;20;0)))))))))))))))))))))" office:value-type="float" office:value="0" calcext:value-type="float">
            <text:p>0</text:p>
          </table:table-cell>
          <table:table-cell table:style-name="ce150"/>
          <table:table-cell table:style-name="ce158" table:formula="of:=SUM([.C33];[.E33];[.G33];[.I33];[.K33])" office:value-type="float" office:value="0" calcext:value-type="float">
            <text:p>0</text:p>
          </table:table-cell>
          <table:table-cell table:style-name="ce160" table:formula="of:=RANK([.M33];[.$M$4:.$M$133])" office:value-type="float" office:value="71" calcext:value-type="float">
            <text:p>71º</text:p>
          </table:table-cell>
          <table:table-cell table:style-name="ce161"/>
          <table:table-cell table:style-name="ce169" office:value-type="float" office:value="8" calcext:value-type="float">
            <text:p>8</text:p>
          </table:table-cell>
          <table:table-cell table:number-columns-repeated="2" table:style-name="ce175" office:value-type="float" office:value="7" calcext:value-type="float">
            <text:p>7</text:p>
          </table:table-cell>
          <table:table-cell table:style-name="ce180" office:value-type="float" office:value="4" calcext:value-type="float">
            <text:p>4</text:p>
          </table:table-cell>
          <table:table-cell table:style-name="ce185" office:value-type="float" office:value="2" calcext:value-type="float">
            <text:p>2</text:p>
          </table:table-cell>
          <table:table-cell table:style-name="ce188" table:formula="of:=SUM([.P33:.T33])" office:value-type="float" office:value="28" calcext:value-type="float">
            <text:p>28</text:p>
          </table:table-cell>
          <table:table-cell table:style-name="ce189" table:formula="of:=RANK([.U33];[.$U$4:.$U$133])" office:value-type="float" office:value="10" calcext:value-type="float">
            <text:p>10º</text:p>
          </table:table-cell>
          <table:table-cell table:style-name="ce161"/>
          <table:table-cell table:style-name="ce193" table:formula="of:=COUNTIF([.B33];&quot;&gt;0&quot;)+COUNTIF([.D33];&quot;&gt;0&quot;)+COUNTIF([.F33];&quot;&gt;0&quot;)+COUNTIF([.H33];&quot;&gt;0&quot;)+COUNTIF([.J33];&quot;&gt;0&quot;)" office:value-type="float" office:value="5" calcext:value-type="float">
            <text:p>5</text:p>
          </table:table-cell>
          <table:table-cell table:style-name="ce200" table:formula="of:=[.M33]/[.X33]" office:value-type="float" office:value="0" calcext:value-type="float">
            <text:p>0.0</text:p>
          </table:table-cell>
          <table:table-cell table:style-name="ce204" table:formula="of:=RANK([.Y33];[.$Y$4:.$Y$133])" office:value-type="float" office:value="71" calcext:value-type="float">
            <text:p>71º</text:p>
          </table:table-cell>
          <table:table-cell table:style-name="ce208" table:formula="of:=[.U33]/[.X33]" office:value-type="float" office:value="5.6" calcext:value-type="float">
            <text:p>5.6</text:p>
          </table:table-cell>
          <table:table-cell table:style-name="ce212" table:formula="of:=RANK([.AA33];[.$AA$4:.$AA$133])" office:value-type="float" office:value="57" calcext:value-type="float">
            <text:p>57º</text:p>
          </table:table-cell>
          <table:table-cell table:number-columns-repeated="996"/>
        </table:table-row>
        <table:table-row table:style-name="ro10">
          <table:table-cell table:style-name="ce126" office:value-type="string" calcext:value-type="string">
            <text:p>DIEGO DRESCHER</text:p>
          </table:table-cell>
          <table:table-cell table:style-name="ce134" office:value-type="string" calcext:value-type="string">
            <text:p>-</text:p>
          </table:table-cell>
          <table:table-cell table:style-name="ce139" table:formula="of:=IF([.B34]=20;1;IF([.B34]=19;2;IF([.B34]=19;2;IF([.B34]=18;3;IF([.B34]=17;4;IF([.B34]=16;5;IF([.B34]=15;6;IF([.B34]=14;7;IF([.B34]=13;8;IF([.B34]=12;9;IF([.B34]=11;10;IF([.B34]=10;11;IF([.B34]=9;12;IF([.B34]=8;13;IF([.B34]=7;14;IF([.B34]=6;15;IF([.B34]=5;16;IF([.B34]=4;17;IF([.B34]=3;18;IF([.B34]=2;19;IF([.B34]=1;20;0)))))))))))))))))))))" office:value-type="float" office:value="0" calcext:value-type="float">
            <text:p>0</text:p>
          </table:table-cell>
          <table:table-cell table:style-name="ce134" office:value-type="string" calcext:value-type="string">
            <text:p>-</text:p>
          </table:table-cell>
          <table:table-cell table:style-name="ce139" table:formula="of:=IF([.D34]=20;1;IF([.D34]=19;2;IF([.D34]=19;2;IF([.D34]=18;3;IF([.D34]=17;4;IF([.D34]=16;5;IF([.D34]=15;6;IF([.D34]=14;7;IF([.D34]=13;8;IF([.D34]=12;9;IF([.D34]=11;10;IF([.D34]=10;11;IF([.D34]=9;12;IF([.D34]=8;13;IF([.D34]=7;14;IF([.D34]=6;15;IF([.D34]=5;16;IF([.D34]=4;17;IF([.D34]=3;18;IF([.D34]=2;19;IF([.D34]=1;20;0)))))))))))))))))))))" office:value-type="float" office:value="0" calcext:value-type="float">
            <text:p>0</text:p>
          </table:table-cell>
          <table:table-cell table:style-name="ce134" office:value-type="string" calcext:value-type="string">
            <text:p>-</text:p>
          </table:table-cell>
          <table:table-cell table:style-name="ce139" table:formula="of:=IF([.F34]=20;1;IF([.F34]=19;2;IF([.F34]=19;2;IF([.F34]=18;3;IF([.F34]=17;4;IF([.F34]=16;5;IF([.F34]=15;6;IF([.F34]=14;7;IF([.F34]=13;8;IF([.F34]=12;9;IF([.F34]=11;10;IF([.F34]=10;11;IF([.F34]=9;12;IF([.F34]=8;13;IF([.F34]=7;14;IF([.F34]=6;15;IF([.F34]=5;16;IF([.F34]=4;17;IF([.F34]=3;18;IF([.F34]=2;19;IF([.F34]=1;20;0)))))))))))))))))))))" office:value-type="float" office:value="0" calcext:value-type="float">
            <text:p>0</text:p>
          </table:table-cell>
          <table:table-cell table:style-name="ce134" office:value-type="float" office:value="3" calcext:value-type="float">
            <text:p>3º</text:p>
          </table:table-cell>
          <table:table-cell table:style-name="ce139" table:formula="of:=IF([.H34]=20;1;IF([.H34]=19;2;IF([.H34]=19;2;IF([.H34]=18;3;IF([.H34]=17;4;IF([.H34]=16;5;IF([.H34]=15;6;IF([.H34]=14;7;IF([.H34]=13;8;IF([.H34]=12;9;IF([.H34]=11;10;IF([.H34]=10;11;IF([.H34]=9;12;IF([.H34]=8;13;IF([.H34]=7;14;IF([.H34]=6;15;IF([.H34]=5;16;IF([.H34]=4;17;IF([.H34]=3;18;IF([.H34]=2;19;IF([.H34]=1;20;0)))))))))))))))))))))" office:value-type="float" office:value="18" calcext:value-type="float">
            <text:p>18</text:p>
          </table:table-cell>
          <table:table-cell table:style-name="ce134" office:value-type="string" calcext:value-type="string">
            <text:p>-</text:p>
          </table:table-cell>
          <table:table-cell table:style-name="ce145" table:formula="of:=IF([.J34]=20;1;IF([.J34]=19;2;IF([.J34]=19;2;IF([.J34]=18;3;IF([.J34]=17;4;IF([.J34]=16;5;IF([.J34]=15;6;IF([.J34]=14;7;IF([.J34]=13;8;IF([.J34]=12;9;IF([.J34]=11;10;IF([.J34]=10;11;IF([.J34]=9;12;IF([.J34]=8;13;IF([.J34]=7;14;IF([.J34]=6;15;IF([.J34]=5;16;IF([.J34]=4;17;IF([.J34]=3;18;IF([.J34]=2;19;IF([.J34]=1;20;0)))))))))))))))))))))" office:value-type="float" office:value="0" calcext:value-type="float">
            <text:p>0</text:p>
          </table:table-cell>
          <table:table-cell table:style-name="ce150"/>
          <table:table-cell table:style-name="ce158" table:formula="of:=SUM([.C34];[.E34];[.G34];[.I34];[.K34])" office:value-type="float" office:value="18" calcext:value-type="float">
            <text:p>18</text:p>
          </table:table-cell>
          <table:table-cell table:style-name="ce160" table:formula="of:=RANK([.M34];[.$M$4:.$M$133])" office:value-type="float" office:value="24" calcext:value-type="float">
            <text:p>24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6" calcext:value-type="float">
            <text:p>6</text:p>
          </table:table-cell>
          <table:table-cell table:style-name="ce185" office:value-type="string" calcext:value-type="string">
            <text:p>-</text:p>
          </table:table-cell>
          <table:table-cell table:style-name="ce188" table:formula="of:=SUM([.P34:.T34])" office:value-type="float" office:value="6" calcext:value-type="float">
            <text:p>6</text:p>
          </table:table-cell>
          <table:table-cell table:style-name="ce189" table:formula="of:=RANK([.U34];[.$U$4:.$U$133])" office:value-type="float" office:value="89" calcext:value-type="float">
            <text:p>89º</text:p>
          </table:table-cell>
          <table:table-cell table:style-name="ce161"/>
          <table:table-cell table:style-name="ce193" table:formula="of:=COUNTIF([.B34];&quot;&gt;0&quot;)+COUNTIF([.D34];&quot;&gt;0&quot;)+COUNTIF([.F34];&quot;&gt;0&quot;)+COUNTIF([.H34];&quot;&gt;0&quot;)+COUNTIF([.J34];&quot;&gt;0&quot;)" office:value-type="float" office:value="1" calcext:value-type="float">
            <text:p>1</text:p>
          </table:table-cell>
          <table:table-cell table:style-name="ce200" table:formula="of:=[.M34]/[.X34]" office:value-type="float" office:value="18" calcext:value-type="float">
            <text:p>18.0</text:p>
          </table:table-cell>
          <table:table-cell table:style-name="ce204" table:formula="of:=RANK([.Y34];[.$Y$4:.$Y$133])" office:value-type="float" office:value="1" calcext:value-type="float">
            <text:p>1º</text:p>
          </table:table-cell>
          <table:table-cell table:style-name="ce208" table:formula="of:=[.U34]/[.X34]" office:value-type="float" office:value="6" calcext:value-type="float">
            <text:p>6.0</text:p>
          </table:table-cell>
          <table:table-cell table:style-name="ce212" table:formula="of:=RANK([.AA34];[.$AA$4:.$AA$133])" office:value-type="float" office:value="36" calcext:value-type="float">
            <text:p>36º</text:p>
          </table:table-cell>
          <table:table-cell table:number-columns-repeated="996"/>
        </table:table-row>
        <table:table-row table:style-name="ro10">
          <table:table-cell table:style-name="ce126" office:value-type="string" calcext:value-type="string">
            <text:p>DIEGO GOULARTE</text:p>
          </table:table-cell>
          <table:table-cell table:style-name="ce134" office:value-type="string" calcext:value-type="string">
            <text:p>-</text:p>
          </table:table-cell>
          <table:table-cell table:style-name="ce139" table:formula="of:=IF([.B35]=20;1;IF([.B35]=19;2;IF([.B35]=19;2;IF([.B35]=18;3;IF([.B35]=17;4;IF([.B35]=16;5;IF([.B35]=15;6;IF([.B35]=14;7;IF([.B35]=13;8;IF([.B35]=12;9;IF([.B35]=11;10;IF([.B35]=10;11;IF([.B35]=9;12;IF([.B35]=8;13;IF([.B35]=7;14;IF([.B35]=6;15;IF([.B35]=5;16;IF([.B35]=4;17;IF([.B35]=3;18;IF([.B35]=2;19;IF([.B35]=1;20;0)))))))))))))))))))))" office:value-type="float" office:value="0" calcext:value-type="float">
            <text:p>0</text:p>
          </table:table-cell>
          <table:table-cell table:style-name="ce134" office:value-type="string" calcext:value-type="string">
            <text:p>-</text:p>
          </table:table-cell>
          <table:table-cell table:style-name="ce139" table:formula="of:=IF([.D35]=20;1;IF([.D35]=19;2;IF([.D35]=19;2;IF([.D35]=18;3;IF([.D35]=17;4;IF([.D35]=16;5;IF([.D35]=15;6;IF([.D35]=14;7;IF([.D35]=13;8;IF([.D35]=12;9;IF([.D35]=11;10;IF([.D35]=10;11;IF([.D35]=9;12;IF([.D35]=8;13;IF([.D35]=7;14;IF([.D35]=6;15;IF([.D35]=5;16;IF([.D35]=4;17;IF([.D35]=3;18;IF([.D35]=2;19;IF([.D35]=1;20;0)))))))))))))))))))))" office:value-type="float" office:value="0" calcext:value-type="float">
            <text:p>0</text:p>
          </table:table-cell>
          <table:table-cell table:style-name="ce134" office:value-type="string" calcext:value-type="string">
            <text:p>-</text:p>
          </table:table-cell>
          <table:table-cell table:style-name="ce139" table:formula="of:=IF([.F35]=20;1;IF([.F35]=19;2;IF([.F35]=19;2;IF([.F35]=18;3;IF([.F35]=17;4;IF([.F35]=16;5;IF([.F35]=15;6;IF([.F35]=14;7;IF([.F35]=13;8;IF([.F35]=12;9;IF([.F35]=11;10;IF([.F35]=10;11;IF([.F35]=9;12;IF([.F35]=8;13;IF([.F35]=7;14;IF([.F35]=6;15;IF([.F35]=5;16;IF([.F35]=4;17;IF([.F35]=3;18;IF([.F35]=2;19;IF([.F35]=1;20;0)))))))))))))))))))))" office:value-type="float" office:value="0" calcext:value-type="float">
            <text:p>0</text:p>
          </table:table-cell>
          <table:table-cell table:style-name="ce134" office:value-type="float" office:value="14" calcext:value-type="float">
            <text:p>14º</text:p>
          </table:table-cell>
          <table:table-cell table:style-name="ce139" table:formula="of:=IF([.H35]=20;1;IF([.H35]=19;2;IF([.H35]=19;2;IF([.H35]=18;3;IF([.H35]=17;4;IF([.H35]=16;5;IF([.H35]=15;6;IF([.H35]=14;7;IF([.H35]=13;8;IF([.H35]=12;9;IF([.H35]=11;10;IF([.H35]=10;11;IF([.H35]=9;12;IF([.H35]=8;13;IF([.H35]=7;14;IF([.H35]=6;15;IF([.H35]=5;16;IF([.H35]=4;17;IF([.H35]=3;18;IF([.H35]=2;19;IF([.H35]=1;20;0)))))))))))))))))))))" office:value-type="float" office:value="7" calcext:value-type="float">
            <text:p>7</text:p>
          </table:table-cell>
          <table:table-cell table:style-name="ce134" office:value-type="string" calcext:value-type="string">
            <text:p>-</text:p>
          </table:table-cell>
          <table:table-cell table:style-name="ce145" table:formula="of:=IF([.J35]=20;1;IF([.J35]=19;2;IF([.J35]=19;2;IF([.J35]=18;3;IF([.J35]=17;4;IF([.J35]=16;5;IF([.J35]=15;6;IF([.J35]=14;7;IF([.J35]=13;8;IF([.J35]=12;9;IF([.J35]=11;10;IF([.J35]=10;11;IF([.J35]=9;12;IF([.J35]=8;13;IF([.J35]=7;14;IF([.J35]=6;15;IF([.J35]=5;16;IF([.J35]=4;17;IF([.J35]=3;18;IF([.J35]=2;19;IF([.J35]=1;20;0)))))))))))))))))))))" office:value-type="float" office:value="0" calcext:value-type="float">
            <text:p>0</text:p>
          </table:table-cell>
          <table:table-cell table:style-name="ce150"/>
          <table:table-cell table:style-name="ce158" table:formula="of:=SUM([.C35];[.E35];[.G35];[.I35];[.K35])" office:value-type="float" office:value="7" calcext:value-type="float">
            <text:p>7</text:p>
          </table:table-cell>
          <table:table-cell table:style-name="ce160" table:formula="of:=RANK([.M35];[.$M$4:.$M$133])" office:value-type="float" office:value="54" calcext:value-type="float">
            <text:p>54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6" calcext:value-type="float">
            <text:p>6</text:p>
          </table:table-cell>
          <table:table-cell table:style-name="ce185" office:value-type="string" calcext:value-type="string">
            <text:p>-</text:p>
          </table:table-cell>
          <table:table-cell table:style-name="ce188" table:formula="of:=SUM([.P35:.T35])" office:value-type="float" office:value="6" calcext:value-type="float">
            <text:p>6</text:p>
          </table:table-cell>
          <table:table-cell table:style-name="ce189" table:formula="of:=RANK([.U35];[.$U$4:.$U$133])" office:value-type="float" office:value="89" calcext:value-type="float">
            <text:p>89º</text:p>
          </table:table-cell>
          <table:table-cell table:style-name="ce161"/>
          <table:table-cell table:style-name="ce193" table:formula="of:=COUNTIF([.B35];&quot;&gt;0&quot;)+COUNTIF([.D35];&quot;&gt;0&quot;)+COUNTIF([.F35];&quot;&gt;0&quot;)+COUNTIF([.H35];&quot;&gt;0&quot;)+COUNTIF([.J35];&quot;&gt;0&quot;)" office:value-type="float" office:value="1" calcext:value-type="float">
            <text:p>1</text:p>
          </table:table-cell>
          <table:table-cell table:style-name="ce200" table:formula="of:=[.M35]/[.X35]" office:value-type="float" office:value="7" calcext:value-type="float">
            <text:p>7.0</text:p>
          </table:table-cell>
          <table:table-cell table:style-name="ce204" table:formula="of:=RANK([.Y35];[.$Y$4:.$Y$133])" office:value-type="float" office:value="14" calcext:value-type="float">
            <text:p>14º</text:p>
          </table:table-cell>
          <table:table-cell table:style-name="ce208" table:formula="of:=[.U35]/[.X35]" office:value-type="float" office:value="6" calcext:value-type="float">
            <text:p>6.0</text:p>
          </table:table-cell>
          <table:table-cell table:style-name="ce212" table:formula="of:=RANK([.AA35];[.$AA$4:.$AA$133])" office:value-type="float" office:value="36" calcext:value-type="float">
            <text:p>36º</text:p>
          </table:table-cell>
          <table:table-cell table:number-columns-repeated="996"/>
        </table:table-row>
        <table:table-row table:style-name="ro10">
          <table:table-cell table:style-name="ce126" office:value-type="string" calcext:value-type="string">
            <text:p>EDER</text:p>
          </table:table-cell>
          <table:table-cell table:style-name="ce134" office:value-type="string" calcext:value-type="string">
            <text:p>-</text:p>
          </table:table-cell>
          <table:table-cell table:style-name="ce139" table:formula="of:=IF([.B36]=20;1;IF([.B36]=19;2;IF([.B36]=19;2;IF([.B36]=18;3;IF([.B36]=17;4;IF([.B36]=16;5;IF([.B36]=15;6;IF([.B36]=14;7;IF([.B36]=13;8;IF([.B36]=12;9;IF([.B36]=11;10;IF([.B36]=10;11;IF([.B36]=9;12;IF([.B36]=8;13;IF([.B36]=7;14;IF([.B36]=6;15;IF([.B36]=5;16;IF([.B36]=4;17;IF([.B36]=3;18;IF([.B36]=2;19;IF([.B36]=1;20;0)))))))))))))))))))))" office:value-type="float" office:value="0" calcext:value-type="float">
            <text:p>0</text:p>
          </table:table-cell>
          <table:table-cell table:style-name="ce134" office:value-type="string" calcext:value-type="string">
            <text:p>-</text:p>
          </table:table-cell>
          <table:table-cell table:style-name="ce139" table:formula="of:=IF([.D36]=20;1;IF([.D36]=19;2;IF([.D36]=19;2;IF([.D36]=18;3;IF([.D36]=17;4;IF([.D36]=16;5;IF([.D36]=15;6;IF([.D36]=14;7;IF([.D36]=13;8;IF([.D36]=12;9;IF([.D36]=11;10;IF([.D36]=10;11;IF([.D36]=9;12;IF([.D36]=8;13;IF([.D36]=7;14;IF([.D36]=6;15;IF([.D36]=5;16;IF([.D36]=4;17;IF([.D36]=3;18;IF([.D36]=2;19;IF([.D36]=1;20;0)))))))))))))))))))))" office:value-type="float" office:value="0" calcext:value-type="float">
            <text:p>0</text:p>
          </table:table-cell>
          <table:table-cell table:style-name="ce134" office:value-type="string" calcext:value-type="string">
            <text:p>-</text:p>
          </table:table-cell>
          <table:table-cell table:style-name="ce139" table:formula="of:=IF([.F36]=20;1;IF([.F36]=19;2;IF([.F36]=19;2;IF([.F36]=18;3;IF([.F36]=17;4;IF([.F36]=16;5;IF([.F36]=15;6;IF([.F36]=14;7;IF([.F36]=13;8;IF([.F36]=12;9;IF([.F36]=11;10;IF([.F36]=10;11;IF([.F36]=9;12;IF([.F36]=8;13;IF([.F36]=7;14;IF([.F36]=6;15;IF([.F36]=5;16;IF([.F36]=4;17;IF([.F36]=3;18;IF([.F36]=2;19;IF([.F36]=1;20;0)))))))))))))))))))))" office:value-type="float" office:value="0" calcext:value-type="float">
            <text:p>0</text:p>
          </table:table-cell>
          <table:table-cell table:style-name="ce134" office:value-type="float" office:value="45" calcext:value-type="float">
            <text:p>45º</text:p>
          </table:table-cell>
          <table:table-cell table:style-name="ce139" table:formula="of:=IF([.H36]=20;1;IF([.H36]=19;2;IF([.H36]=19;2;IF([.H36]=18;3;IF([.H36]=17;4;IF([.H36]=16;5;IF([.H36]=15;6;IF([.H36]=14;7;IF([.H36]=13;8;IF([.H36]=12;9;IF([.H36]=11;10;IF([.H36]=10;11;IF([.H36]=9;12;IF([.H36]=8;13;IF([.H36]=7;14;IF([.H36]=6;15;IF([.H36]=5;16;IF([.H36]=4;17;IF([.H36]=3;18;IF([.H36]=2;19;IF([.H36]=1;20;0)))))))))))))))))))))" office:value-type="float" office:value="0" calcext:value-type="float">
            <text:p>0</text:p>
          </table:table-cell>
          <table:table-cell table:style-name="ce134" office:value-type="string" calcext:value-type="string">
            <text:p>-</text:p>
          </table:table-cell>
          <table:table-cell table:style-name="ce145" table:formula="of:=IF([.J36]=20;1;IF([.J36]=19;2;IF([.J36]=19;2;IF([.J36]=18;3;IF([.J36]=17;4;IF([.J36]=16;5;IF([.J36]=15;6;IF([.J36]=14;7;IF([.J36]=13;8;IF([.J36]=12;9;IF([.J36]=11;10;IF([.J36]=10;11;IF([.J36]=9;12;IF([.J36]=8;13;IF([.J36]=7;14;IF([.J36]=6;15;IF([.J36]=5;16;IF([.J36]=4;17;IF([.J36]=3;18;IF([.J36]=2;19;IF([.J36]=1;20;0)))))))))))))))))))))" office:value-type="float" office:value="0" calcext:value-type="float">
            <text:p>0</text:p>
          </table:table-cell>
          <table:table-cell table:style-name="ce150"/>
          <table:table-cell table:style-name="ce158" table:formula="of:=SUM([.C36];[.E36];[.G36];[.I36];[.K36])" office:value-type="float" office:value="0" calcext:value-type="float">
            <text:p>0</text:p>
          </table:table-cell>
          <table:table-cell table:style-name="ce160" table:formula="of:=RANK([.M36];[.$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2" calcext:value-type="float">
            <text:p>2</text:p>
          </table:table-cell>
          <table:table-cell table:style-name="ce185" office:value-type="string" calcext:value-type="string">
            <text:p>-</text:p>
          </table:table-cell>
          <table:table-cell table:style-name="ce188" table:formula="of:=SUM([.P36:.T36])" office:value-type="float" office:value="2" calcext:value-type="float">
            <text:p>2</text:p>
          </table:table-cell>
          <table:table-cell table:style-name="ce189" table:formula="of:=RANK([.U36];[.$U$4:.$U$133])" office:value-type="float" office:value="124" calcext:value-type="float">
            <text:p>124º</text:p>
          </table:table-cell>
          <table:table-cell table:style-name="ce161"/>
          <table:table-cell table:style-name="ce193" table:formula="of:=COUNTIF([.B36];&quot;&gt;0&quot;)+COUNTIF([.D36];&quot;&gt;0&quot;)+COUNTIF([.F36];&quot;&gt;0&quot;)+COUNTIF([.H36];&quot;&gt;0&quot;)+COUNTIF([.J36];&quot;&gt;0&quot;)" office:value-type="float" office:value="1" calcext:value-type="float">
            <text:p>1</text:p>
          </table:table-cell>
          <table:table-cell table:style-name="ce200" table:formula="of:=[.M36]/[.X36]" office:value-type="float" office:value="0" calcext:value-type="float">
            <text:p>0.0</text:p>
          </table:table-cell>
          <table:table-cell table:style-name="ce204" table:formula="of:=RANK([.Y36];[.$Y$4:.$Y$133])" office:value-type="float" office:value="71" calcext:value-type="float">
            <text:p>71º</text:p>
          </table:table-cell>
          <table:table-cell table:style-name="ce208" table:formula="of:=[.U36]/[.X36]" office:value-type="float" office:value="2" calcext:value-type="float">
            <text:p>2.0</text:p>
          </table:table-cell>
          <table:table-cell table:style-name="ce212" table:formula="of:=RANK([.AA36];[.$AA$4:.$AA$133])" office:value-type="float" office:value="121" calcext:value-type="float">
            <text:p>121º</text:p>
          </table:table-cell>
          <table:table-cell table:number-columns-repeated="996"/>
        </table:table-row>
        <table:table-row table:style-name="ro10">
          <table:table-cell table:style-name="ce126" office:value-type="string" calcext:value-type="string">
            <text:p>EDUARDO</text:p>
          </table:table-cell>
          <table:table-cell table:style-name="ce134" office:value-type="string" calcext:value-type="string">
            <text:p>-</text:p>
          </table:table-cell>
          <table:table-cell table:style-name="ce139" table:formula="of:=IF([.B37]=20;1;IF([.B37]=19;2;IF([.B37]=19;2;IF([.B37]=18;3;IF([.B37]=17;4;IF([.B37]=16;5;IF([.B37]=15;6;IF([.B37]=14;7;IF([.B37]=13;8;IF([.B37]=12;9;IF([.B37]=11;10;IF([.B37]=10;11;IF([.B37]=9;12;IF([.B37]=8;13;IF([.B37]=7;14;IF([.B37]=6;15;IF([.B37]=5;16;IF([.B37]=4;17;IF([.B37]=3;18;IF([.B37]=2;19;IF([.B37]=1;20;0)))))))))))))))))))))" office:value-type="float" office:value="0" calcext:value-type="float">
            <text:p>0</text:p>
          </table:table-cell>
          <table:table-cell table:style-name="ce134" office:value-type="string" calcext:value-type="string">
            <text:p>-</text:p>
          </table:table-cell>
          <table:table-cell table:style-name="ce139" table:formula="of:=IF([.D37]=20;1;IF([.D37]=19;2;IF([.D37]=19;2;IF([.D37]=18;3;IF([.D37]=17;4;IF([.D37]=16;5;IF([.D37]=15;6;IF([.D37]=14;7;IF([.D37]=13;8;IF([.D37]=12;9;IF([.D37]=11;10;IF([.D37]=10;11;IF([.D37]=9;12;IF([.D37]=8;13;IF([.D37]=7;14;IF([.D37]=6;15;IF([.D37]=5;16;IF([.D37]=4;17;IF([.D37]=3;18;IF([.D37]=2;19;IF([.D37]=1;20;0)))))))))))))))))))))" office:value-type="float" office:value="0" calcext:value-type="float">
            <text:p>0</text:p>
          </table:table-cell>
          <table:table-cell table:style-name="ce134" office:value-type="float" office:value="45" calcext:value-type="float">
            <text:p>45º</text:p>
          </table:table-cell>
          <table:table-cell table:style-name="ce139" table:formula="of:=IF([.F37]=20;1;IF([.F37]=19;2;IF([.F37]=19;2;IF([.F37]=18;3;IF([.F37]=17;4;IF([.F37]=16;5;IF([.F37]=15;6;IF([.F37]=14;7;IF([.F37]=13;8;IF([.F37]=12;9;IF([.F37]=11;10;IF([.F37]=10;11;IF([.F37]=9;12;IF([.F37]=8;13;IF([.F37]=7;14;IF([.F37]=6;15;IF([.F37]=5;16;IF([.F37]=4;17;IF([.F37]=3;18;IF([.F37]=2;19;IF([.F37]=1;20;0)))))))))))))))))))))" office:value-type="float" office:value="0" calcext:value-type="float">
            <text:p>0</text:p>
          </table:table-cell>
          <table:table-cell table:style-name="ce134" office:value-type="float" office:value="39" calcext:value-type="float">
            <text:p>39º</text:p>
          </table:table-cell>
          <table:table-cell table:style-name="ce139" table:formula="of:=IF([.H37]=20;1;IF([.H37]=19;2;IF([.H37]=19;2;IF([.H37]=18;3;IF([.H37]=17;4;IF([.H37]=16;5;IF([.H37]=15;6;IF([.H37]=14;7;IF([.H37]=13;8;IF([.H37]=12;9;IF([.H37]=11;10;IF([.H37]=10;11;IF([.H37]=9;12;IF([.H37]=8;13;IF([.H37]=7;14;IF([.H37]=6;15;IF([.H37]=5;16;IF([.H37]=4;17;IF([.H37]=3;18;IF([.H37]=2;19;IF([.H37]=1;20;0)))))))))))))))))))))" office:value-type="float" office:value="0" calcext:value-type="float">
            <text:p>0</text:p>
          </table:table-cell>
          <table:table-cell table:style-name="ce134" office:value-type="string" calcext:value-type="string">
            <text:p>-</text:p>
          </table:table-cell>
          <table:table-cell table:style-name="ce145" table:formula="of:=IF([.J37]=20;1;IF([.J37]=19;2;IF([.J37]=19;2;IF([.J37]=18;3;IF([.J37]=17;4;IF([.J37]=16;5;IF([.J37]=15;6;IF([.J37]=14;7;IF([.J37]=13;8;IF([.J37]=12;9;IF([.J37]=11;10;IF([.J37]=10;11;IF([.J37]=9;12;IF([.J37]=8;13;IF([.J37]=7;14;IF([.J37]=6;15;IF([.J37]=5;16;IF([.J37]=4;17;IF([.J37]=3;18;IF([.J37]=2;19;IF([.J37]=1;20;0)))))))))))))))))))))" office:value-type="float" office:value="0" calcext:value-type="float">
            <text:p>0</text:p>
          </table:table-cell>
          <table:table-cell table:style-name="ce150"/>
          <table:table-cell table:style-name="ce158" table:formula="of:=SUM([.C37];[.E37];[.G37];[.I37];[.K37])" office:value-type="float" office:value="0" calcext:value-type="float">
            <text:p>0</text:p>
          </table:table-cell>
          <table:table-cell table:style-name="ce160" table:formula="of:=RANK([.M37];[.$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6" calcext:value-type="float">
            <text:p>6</text:p>
          </table:table-cell>
          <table:table-cell table:style-name="ce180" office:value-type="float" office:value="5" calcext:value-type="float">
            <text:p>5</text:p>
          </table:table-cell>
          <table:table-cell table:style-name="ce185" office:value-type="string" calcext:value-type="string">
            <text:p>-</text:p>
          </table:table-cell>
          <table:table-cell table:style-name="ce188" table:formula="of:=SUM([.P37:.T37])" office:value-type="float" office:value="11" calcext:value-type="float">
            <text:p>11</text:p>
          </table:table-cell>
          <table:table-cell table:style-name="ce189" table:formula="of:=RANK([.U37];[.$U$4:.$U$133])" office:value-type="float" office:value="62" calcext:value-type="float">
            <text:p>62º</text:p>
          </table:table-cell>
          <table:table-cell table:style-name="ce161"/>
          <table:table-cell table:style-name="ce193" table:formula="of:=COUNTIF([.B37];&quot;&gt;0&quot;)+COUNTIF([.D37];&quot;&gt;0&quot;)+COUNTIF([.F37];&quot;&gt;0&quot;)+COUNTIF([.H37];&quot;&gt;0&quot;)+COUNTIF([.J37];&quot;&gt;0&quot;)" office:value-type="float" office:value="2" calcext:value-type="float">
            <text:p>2</text:p>
          </table:table-cell>
          <table:table-cell table:style-name="ce200" table:formula="of:=[.M37]/[.X37]" office:value-type="float" office:value="0" calcext:value-type="float">
            <text:p>0.0</text:p>
          </table:table-cell>
          <table:table-cell table:style-name="ce204" table:formula="of:=RANK([.Y37];[.$Y$4:.$Y$133])" office:value-type="float" office:value="71" calcext:value-type="float">
            <text:p>71º</text:p>
          </table:table-cell>
          <table:table-cell table:style-name="ce208" table:formula="of:=[.U37]/[.X37]" office:value-type="float" office:value="5.5" calcext:value-type="float">
            <text:p>5.5</text:p>
          </table:table-cell>
          <table:table-cell table:style-name="ce212" table:formula="of:=RANK([.AA37];[.$AA$4:.$AA$133])" office:value-type="float" office:value="61" calcext:value-type="float">
            <text:p>61º</text:p>
          </table:table-cell>
          <table:table-cell table:number-columns-repeated="996"/>
        </table:table-row>
        <table:table-row table:style-name="ro10">
          <table:table-cell table:style-name="ce126" office:value-type="string" calcext:value-type="string">
            <text:p>ELAINE</text:p>
          </table:table-cell>
          <table:table-cell table:style-name="ce134" office:value-type="string" calcext:value-type="string">
            <text:p>-</text:p>
          </table:table-cell>
          <table:table-cell table:style-name="ce139" table:formula="of:=IF([.B38]=20;1;IF([.B38]=19;2;IF([.B38]=19;2;IF([.B38]=18;3;IF([.B38]=17;4;IF([.B38]=16;5;IF([.B38]=15;6;IF([.B38]=14;7;IF([.B38]=13;8;IF([.B38]=12;9;IF([.B38]=11;10;IF([.B38]=10;11;IF([.B38]=9;12;IF([.B38]=8;13;IF([.B38]=7;14;IF([.B38]=6;15;IF([.B38]=5;16;IF([.B38]=4;17;IF([.B38]=3;18;IF([.B38]=2;19;IF([.B38]=1;20;0)))))))))))))))))))))" office:value-type="float" office:value="0" calcext:value-type="float">
            <text:p>0</text:p>
          </table:table-cell>
          <table:table-cell table:style-name="ce134" office:value-type="string" calcext:value-type="string">
            <text:p>-</text:p>
          </table:table-cell>
          <table:table-cell table:style-name="ce139" table:formula="of:=IF([.D38]=20;1;IF([.D38]=19;2;IF([.D38]=19;2;IF([.D38]=18;3;IF([.D38]=17;4;IF([.D38]=16;5;IF([.D38]=15;6;IF([.D38]=14;7;IF([.D38]=13;8;IF([.D38]=12;9;IF([.D38]=11;10;IF([.D38]=10;11;IF([.D38]=9;12;IF([.D38]=8;13;IF([.D38]=7;14;IF([.D38]=6;15;IF([.D38]=5;16;IF([.D38]=4;17;IF([.D38]=3;18;IF([.D38]=2;19;IF([.D38]=1;20;0)))))))))))))))))))))" office:value-type="float" office:value="0" calcext:value-type="float">
            <text:p>0</text:p>
          </table:table-cell>
          <table:table-cell table:style-name="ce134" office:value-type="float" office:value="53" calcext:value-type="float">
            <text:p>53º</text:p>
          </table:table-cell>
          <table:table-cell table:style-name="ce139" table:formula="of:=IF([.F38]=20;1;IF([.F38]=19;2;IF([.F38]=19;2;IF([.F38]=18;3;IF([.F38]=17;4;IF([.F38]=16;5;IF([.F38]=15;6;IF([.F38]=14;7;IF([.F38]=13;8;IF([.F38]=12;9;IF([.F38]=11;10;IF([.F38]=10;11;IF([.F38]=9;12;IF([.F38]=8;13;IF([.F38]=7;14;IF([.F38]=6;15;IF([.F38]=5;16;IF([.F38]=4;17;IF([.F38]=3;18;IF([.F38]=2;19;IF([.F38]=1;20;0)))))))))))))))))))))" office:value-type="float" office:value="0" calcext:value-type="float">
            <text:p>0</text:p>
          </table:table-cell>
          <table:table-cell table:style-name="ce134" office:value-type="float" office:value="50" calcext:value-type="float">
            <text:p>50º</text:p>
          </table:table-cell>
          <table:table-cell table:style-name="ce139" table:formula="of:=IF([.H38]=20;1;IF([.H38]=19;2;IF([.H38]=19;2;IF([.H38]=18;3;IF([.H38]=17;4;IF([.H38]=16;5;IF([.H38]=15;6;IF([.H38]=14;7;IF([.H38]=13;8;IF([.H38]=12;9;IF([.H38]=11;10;IF([.H38]=10;11;IF([.H38]=9;12;IF([.H38]=8;13;IF([.H38]=7;14;IF([.H38]=6;15;IF([.H38]=5;16;IF([.H38]=4;17;IF([.H38]=3;18;IF([.H38]=2;19;IF([.H38]=1;20;0)))))))))))))))))))))" office:value-type="float" office:value="0" calcext:value-type="float">
            <text:p>0</text:p>
          </table:table-cell>
          <table:table-cell table:style-name="ce134" office:value-type="string" calcext:value-type="string">
            <text:p>-</text:p>
          </table:table-cell>
          <table:table-cell table:style-name="ce145" table:formula="of:=IF([.J38]=20;1;IF([.J38]=19;2;IF([.J38]=19;2;IF([.J38]=18;3;IF([.J38]=17;4;IF([.J38]=16;5;IF([.J38]=15;6;IF([.J38]=14;7;IF([.J38]=13;8;IF([.J38]=12;9;IF([.J38]=11;10;IF([.J38]=10;11;IF([.J38]=9;12;IF([.J38]=8;13;IF([.J38]=7;14;IF([.J38]=6;15;IF([.J38]=5;16;IF([.J38]=4;17;IF([.J38]=3;18;IF([.J38]=2;19;IF([.J38]=1;20;0)))))))))))))))))))))" office:value-type="float" office:value="0" calcext:value-type="float">
            <text:p>0</text:p>
          </table:table-cell>
          <table:table-cell table:style-name="ce150"/>
          <table:table-cell table:style-name="ce158" table:formula="of:=SUM([.C38];[.E38];[.G38];[.I38];[.K38])" office:value-type="float" office:value="0" calcext:value-type="float">
            <text:p>0</text:p>
          </table:table-cell>
          <table:table-cell table:style-name="ce160" table:formula="of:=RANK([.M38];[.$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6" calcext:value-type="float">
            <text:p>6</text:p>
          </table:table-cell>
          <table:table-cell table:style-name="ce180" office:value-type="float" office:value="6" calcext:value-type="float">
            <text:p>6</text:p>
          </table:table-cell>
          <table:table-cell table:style-name="ce185" office:value-type="string" calcext:value-type="string">
            <text:p>-</text:p>
          </table:table-cell>
          <table:table-cell table:style-name="ce188" table:formula="of:=SUM([.P38:.T38])" office:value-type="float" office:value="12" calcext:value-type="float">
            <text:p>12</text:p>
          </table:table-cell>
          <table:table-cell table:style-name="ce189" table:formula="of:=RANK([.U38];[.$U$4:.$U$133])" office:value-type="float" office:value="56" calcext:value-type="float">
            <text:p>56º</text:p>
          </table:table-cell>
          <table:table-cell table:style-name="ce161"/>
          <table:table-cell table:style-name="ce193" table:formula="of:=COUNTIF([.B38];&quot;&gt;0&quot;)+COUNTIF([.D38];&quot;&gt;0&quot;)+COUNTIF([.F38];&quot;&gt;0&quot;)+COUNTIF([.H38];&quot;&gt;0&quot;)+COUNTIF([.J38];&quot;&gt;0&quot;)" office:value-type="float" office:value="2" calcext:value-type="float">
            <text:p>2</text:p>
          </table:table-cell>
          <table:table-cell table:style-name="ce200" table:formula="of:=[.M38]/[.X38]" office:value-type="float" office:value="0" calcext:value-type="float">
            <text:p>0.0</text:p>
          </table:table-cell>
          <table:table-cell table:style-name="ce204" table:formula="of:=RANK([.Y38];[.$Y$4:.$Y$133])" office:value-type="float" office:value="71" calcext:value-type="float">
            <text:p>71º</text:p>
          </table:table-cell>
          <table:table-cell table:style-name="ce208" table:formula="of:=[.U38]/[.X38]" office:value-type="float" office:value="6" calcext:value-type="float">
            <text:p>6.0</text:p>
          </table:table-cell>
          <table:table-cell table:style-name="ce212" table:formula="of:=RANK([.AA38];[.$AA$4:.$AA$133])" office:value-type="float" office:value="36" calcext:value-type="float">
            <text:p>36º</text:p>
          </table:table-cell>
          <table:table-cell table:number-columns-repeated="996"/>
        </table:table-row>
        <table:table-row table:style-name="ro10">
          <table:table-cell table:style-name="ce126" office:value-type="string" calcext:value-type="string">
            <text:p>ÉMERSON</text:p>
          </table:table-cell>
          <table:table-cell table:style-name="ce134" office:value-type="float" office:value="23" calcext:value-type="float">
            <text:p>23º</text:p>
          </table:table-cell>
          <table:table-cell table:style-name="ce139" table:formula="of:=IF([.B39]=20;1;IF([.B39]=19;2;IF([.B39]=19;2;IF([.B39]=18;3;IF([.B39]=17;4;IF([.B39]=16;5;IF([.B39]=15;6;IF([.B39]=14;7;IF([.B39]=13;8;IF([.B39]=12;9;IF([.B39]=11;10;IF([.B39]=10;11;IF([.B39]=9;12;IF([.B39]=8;13;IF([.B39]=7;14;IF([.B39]=6;15;IF([.B39]=5;16;IF([.B39]=4;17;IF([.B39]=3;18;IF([.B39]=2;19;IF([.B39]=1;20;0)))))))))))))))))))))" office:value-type="float" office:value="0" calcext:value-type="float">
            <text:p>0</text:p>
          </table:table-cell>
          <table:table-cell table:style-name="ce134" office:value-type="float" office:value="35" calcext:value-type="float">
            <text:p>35º</text:p>
          </table:table-cell>
          <table:table-cell table:style-name="ce139" table:formula="of:=IF([.D39]=20;1;IF([.D39]=19;2;IF([.D39]=19;2;IF([.D39]=18;3;IF([.D39]=17;4;IF([.D39]=16;5;IF([.D39]=15;6;IF([.D39]=14;7;IF([.D39]=13;8;IF([.D39]=12;9;IF([.D39]=11;10;IF([.D39]=10;11;IF([.D39]=9;12;IF([.D39]=8;13;IF([.D39]=7;14;IF([.D39]=6;15;IF([.D39]=5;16;IF([.D39]=4;17;IF([.D39]=3;18;IF([.D39]=2;19;IF([.D39]=1;20;0)))))))))))))))))))))" office:value-type="float" office:value="0" calcext:value-type="float">
            <text:p>0</text:p>
          </table:table-cell>
          <table:table-cell table:style-name="ce134" office:value-type="float" office:value="63" calcext:value-type="float">
            <text:p>63º</text:p>
          </table:table-cell>
          <table:table-cell table:style-name="ce139" table:formula="of:=IF([.F39]=20;1;IF([.F39]=19;2;IF([.F39]=19;2;IF([.F39]=18;3;IF([.F39]=17;4;IF([.F39]=16;5;IF([.F39]=15;6;IF([.F39]=14;7;IF([.F39]=13;8;IF([.F39]=12;9;IF([.F39]=11;10;IF([.F39]=10;11;IF([.F39]=9;12;IF([.F39]=8;13;IF([.F39]=7;14;IF([.F39]=6;15;IF([.F39]=5;16;IF([.F39]=4;17;IF([.F39]=3;18;IF([.F39]=2;19;IF([.F39]=1;20;0)))))))))))))))))))))" office:value-type="float" office:value="0" calcext:value-type="float">
            <text:p>0</text:p>
          </table:table-cell>
          <table:table-cell table:style-name="ce134" office:value-type="float" office:value="8" calcext:value-type="float">
            <text:p>8º</text:p>
          </table:table-cell>
          <table:table-cell table:style-name="ce139" table:formula="of:=IF([.H39]=20;1;IF([.H39]=19;2;IF([.H39]=19;2;IF([.H39]=18;3;IF([.H39]=17;4;IF([.H39]=16;5;IF([.H39]=15;6;IF([.H39]=14;7;IF([.H39]=13;8;IF([.H39]=12;9;IF([.H39]=11;10;IF([.H39]=10;11;IF([.H39]=9;12;IF([.H39]=8;13;IF([.H39]=7;14;IF([.H39]=6;15;IF([.H39]=5;16;IF([.H39]=4;17;IF([.H39]=3;18;IF([.H39]=2;19;IF([.H39]=1;20;0)))))))))))))))))))))" office:value-type="float" office:value="13" calcext:value-type="float">
            <text:p>13</text:p>
          </table:table-cell>
          <table:table-cell table:style-name="ce134" office:value-type="float" office:value="16" calcext:value-type="float">
            <text:p>16º</text:p>
          </table:table-cell>
          <table:table-cell table:style-name="ce145" table:formula="of:=IF([.J39]=20;1;IF([.J39]=19;2;IF([.J39]=19;2;IF([.J39]=18;3;IF([.J39]=17;4;IF([.J39]=16;5;IF([.J39]=15;6;IF([.J39]=14;7;IF([.J39]=13;8;IF([.J39]=12;9;IF([.J39]=11;10;IF([.J39]=10;11;IF([.J39]=9;12;IF([.J39]=8;13;IF([.J39]=7;14;IF([.J39]=6;15;IF([.J39]=5;16;IF([.J39]=4;17;IF([.J39]=3;18;IF([.J39]=2;19;IF([.J39]=1;20;0)))))))))))))))))))))" office:value-type="float" office:value="5" calcext:value-type="float">
            <text:p>5</text:p>
          </table:table-cell>
          <table:table-cell table:style-name="ce150"/>
          <table:table-cell table:style-name="ce158" table:formula="of:=SUM([.C39];[.E39];[.G39];[.I39];[.K39])" office:value-type="float" office:value="18" calcext:value-type="float">
            <text:p>18</text:p>
          </table:table-cell>
          <table:table-cell table:style-name="ce160" table:formula="of:=RANK([.M39];[.$M$4:.$M$133])" office:value-type="float" office:value="24" calcext:value-type="float">
            <text:p>24º</text:p>
          </table:table-cell>
          <table:table-cell table:style-name="ce161"/>
          <table:table-cell table:style-name="ce169" office:value-type="float" office:value="2" calcext:value-type="float">
            <text:p>2</text:p>
          </table:table-cell>
          <table:table-cell table:style-name="ce175" office:value-type="float" office:value="6" calcext:value-type="float">
            <text:p>6</text:p>
          </table:table-cell>
          <table:table-cell table:style-name="ce175" office:value-type="float" office:value="7" calcext:value-type="float">
            <text:p>7</text:p>
          </table:table-cell>
          <table:table-cell table:style-name="ce180" office:value-type="float" office:value="8" calcext:value-type="float">
            <text:p>8</text:p>
          </table:table-cell>
          <table:table-cell table:style-name="ce185" office:value-type="string" calcext:value-type="string">
            <text:p>-</text:p>
          </table:table-cell>
          <table:table-cell table:style-name="ce188" table:formula="of:=SUM([.P39:.T39])" office:value-type="float" office:value="23" calcext:value-type="float">
            <text:p>23</text:p>
          </table:table-cell>
          <table:table-cell table:style-name="ce189" table:formula="of:=RANK([.U39];[.$U$4:.$U$133])" office:value-type="float" office:value="22" calcext:value-type="float">
            <text:p>22º</text:p>
          </table:table-cell>
          <table:table-cell table:style-name="ce161"/>
          <table:table-cell table:style-name="ce193" table:formula="of:=COUNTIF([.B39];&quot;&gt;0&quot;)+COUNTIF([.D39];&quot;&gt;0&quot;)+COUNTIF([.F39];&quot;&gt;0&quot;)+COUNTIF([.H39];&quot;&gt;0&quot;)+COUNTIF([.J39];&quot;&gt;0&quot;)" office:value-type="float" office:value="5" calcext:value-type="float">
            <text:p>5</text:p>
          </table:table-cell>
          <table:table-cell table:style-name="ce200" table:formula="of:=[.M39]/[.X39]" office:value-type="float" office:value="3.6" calcext:value-type="float">
            <text:p>3.6</text:p>
          </table:table-cell>
          <table:table-cell table:style-name="ce204" table:formula="of:=RANK([.Y39];[.$Y$4:.$Y$133])" office:value-type="float" office:value="49" calcext:value-type="float">
            <text:p>49º</text:p>
          </table:table-cell>
          <table:table-cell table:style-name="ce208" table:formula="of:=[.U39]/[.X39]" office:value-type="float" office:value="4.6" calcext:value-type="float">
            <text:p>4.6</text:p>
          </table:table-cell>
          <table:table-cell table:style-name="ce212" table:formula="of:=RANK([.AA39];[.$AA$4:.$AA$133])" office:value-type="float" office:value="90" calcext:value-type="float">
            <text:p>90º</text:p>
          </table:table-cell>
          <table:table-cell table:number-columns-repeated="996"/>
        </table:table-row>
        <table:table-row table:style-name="ro10">
          <table:table-cell table:style-name="ce126" office:value-type="string" calcext:value-type="string">
            <text:p>ETIENNE</text:p>
          </table:table-cell>
          <table:table-cell table:style-name="ce134" office:value-type="string" calcext:value-type="string">
            <text:p>-</text:p>
          </table:table-cell>
          <table:table-cell table:style-name="ce139" table:formula="of:=IF([.B40]=20;1;IF([.B40]=19;2;IF([.B40]=19;2;IF([.B40]=18;3;IF([.B40]=17;4;IF([.B40]=16;5;IF([.B40]=15;6;IF([.B40]=14;7;IF([.B40]=13;8;IF([.B40]=12;9;IF([.B40]=11;10;IF([.B40]=10;11;IF([.B40]=9;12;IF([.B40]=8;13;IF([.B40]=7;14;IF([.B40]=6;15;IF([.B40]=5;16;IF([.B40]=4;17;IF([.B40]=3;18;IF([.B40]=2;19;IF([.B40]=1;20;0)))))))))))))))))))))" office:value-type="float" office:value="0" calcext:value-type="float">
            <text:p>0</text:p>
          </table:table-cell>
          <table:table-cell table:style-name="ce134" office:value-type="string" calcext:value-type="string">
            <text:p>-</text:p>
          </table:table-cell>
          <table:table-cell table:style-name="ce139" table:formula="of:=IF([.D40]=20;1;IF([.D40]=19;2;IF([.D40]=19;2;IF([.D40]=18;3;IF([.D40]=17;4;IF([.D40]=16;5;IF([.D40]=15;6;IF([.D40]=14;7;IF([.D40]=13;8;IF([.D40]=12;9;IF([.D40]=11;10;IF([.D40]=10;11;IF([.D40]=9;12;IF([.D40]=8;13;IF([.D40]=7;14;IF([.D40]=6;15;IF([.D40]=5;16;IF([.D40]=4;17;IF([.D40]=3;18;IF([.D40]=2;19;IF([.D40]=1;20;0)))))))))))))))))))))" office:value-type="float" office:value="0" calcext:value-type="float">
            <text:p>0</text:p>
          </table:table-cell>
          <table:table-cell table:style-name="ce134" office:value-type="float" office:value="74" calcext:value-type="float">
            <text:p>74º</text:p>
          </table:table-cell>
          <table:table-cell table:style-name="ce139" table:formula="of:=IF([.F40]=20;1;IF([.F40]=19;2;IF([.F40]=19;2;IF([.F40]=18;3;IF([.F40]=17;4;IF([.F40]=16;5;IF([.F40]=15;6;IF([.F40]=14;7;IF([.F40]=13;8;IF([.F40]=12;9;IF([.F40]=11;10;IF([.F40]=10;11;IF([.F40]=9;12;IF([.F40]=8;13;IF([.F40]=7;14;IF([.F40]=6;15;IF([.F40]=5;16;IF([.F40]=4;17;IF([.F40]=3;18;IF([.F40]=2;19;IF([.F40]=1;20;0)))))))))))))))))))))" office:value-type="float" office:value="0" calcext:value-type="float">
            <text:p>0</text:p>
          </table:table-cell>
          <table:table-cell table:style-name="ce134" office:value-type="string" calcext:value-type="string">
            <text:p>-</text:p>
          </table:table-cell>
          <table:table-cell table:style-name="ce139" table:formula="of:=IF([.H40]=20;1;IF([.H40]=19;2;IF([.H40]=19;2;IF([.H40]=18;3;IF([.H40]=17;4;IF([.H40]=16;5;IF([.H40]=15;6;IF([.H40]=14;7;IF([.H40]=13;8;IF([.H40]=12;9;IF([.H40]=11;10;IF([.H40]=10;11;IF([.H40]=9;12;IF([.H40]=8;13;IF([.H40]=7;14;IF([.H40]=6;15;IF([.H40]=5;16;IF([.H40]=4;17;IF([.H40]=3;18;IF([.H40]=2;19;IF([.H40]=1;20;0)))))))))))))))))))))" office:value-type="float" office:value="0" calcext:value-type="float">
            <text:p>0</text:p>
          </table:table-cell>
          <table:table-cell table:style-name="ce134" office:value-type="string" calcext:value-type="string">
            <text:p>-</text:p>
          </table:table-cell>
          <table:table-cell table:style-name="ce145" table:formula="of:=IF([.J40]=20;1;IF([.J40]=19;2;IF([.J40]=19;2;IF([.J40]=18;3;IF([.J40]=17;4;IF([.J40]=16;5;IF([.J40]=15;6;IF([.J40]=14;7;IF([.J40]=13;8;IF([.J40]=12;9;IF([.J40]=11;10;IF([.J40]=10;11;IF([.J40]=9;12;IF([.J40]=8;13;IF([.J40]=7;14;IF([.J40]=6;15;IF([.J40]=5;16;IF([.J40]=4;17;IF([.J40]=3;18;IF([.J40]=2;19;IF([.J40]=1;20;0)))))))))))))))))))))" office:value-type="float" office:value="0" calcext:value-type="float">
            <text:p>0</text:p>
          </table:table-cell>
          <table:table-cell table:style-name="ce150"/>
          <table:table-cell table:style-name="ce158" table:formula="of:=SUM([.C40];[.E40];[.G40];[.I40];[.K40])" office:value-type="float" office:value="0" calcext:value-type="float">
            <text:p>0</text:p>
          </table:table-cell>
          <table:table-cell table:style-name="ce160" table:formula="of:=RANK([.M40];[.$M$4:.$M$133])" office:value-type="float" office:value="71" calcext:value-type="float">
            <text:p>71º</text:p>
          </table:table-cell>
          <table:table-cell table:style-name="ce161"/>
          <table:table-cell table:style-name="ce169"/>
          <table:table-cell table:style-name="ce175"/>
          <table:table-cell table:style-name="ce175" office:value-type="float" office:value="2" calcext:value-type="float">
            <text:p>2</text:p>
          </table:table-cell>
          <table:table-cell table:style-name="ce180"/>
          <table:table-cell table:style-name="ce185" office:value-type="string" calcext:value-type="string">
            <text:p>-</text:p>
          </table:table-cell>
          <table:table-cell table:style-name="ce188" table:formula="of:=SUM([.P40:.T40])" office:value-type="float" office:value="2" calcext:value-type="float">
            <text:p>2</text:p>
          </table:table-cell>
          <table:table-cell table:style-name="ce189" table:formula="of:=RANK([.U40];[.$U$4:.$U$133])" office:value-type="float" office:value="124" calcext:value-type="float">
            <text:p>124º</text:p>
          </table:table-cell>
          <table:table-cell table:style-name="ce161"/>
          <table:table-cell table:style-name="ce193" table:formula="of:=COUNTIF([.B40];&quot;&gt;0&quot;)+COUNTIF([.D40];&quot;&gt;0&quot;)+COUNTIF([.F40];&quot;&gt;0&quot;)+COUNTIF([.H40];&quot;&gt;0&quot;)+COUNTIF([.J40];&quot;&gt;0&quot;)" office:value-type="float" office:value="1" calcext:value-type="float">
            <text:p>1</text:p>
          </table:table-cell>
          <table:table-cell table:style-name="ce200" table:formula="of:=[.M40]/[.X40]" office:value-type="float" office:value="0" calcext:value-type="float">
            <text:p>0.0</text:p>
          </table:table-cell>
          <table:table-cell table:style-name="ce204" table:formula="of:=RANK([.Y40];[.$Y$4:.$Y$133])" office:value-type="float" office:value="71" calcext:value-type="float">
            <text:p>71º</text:p>
          </table:table-cell>
          <table:table-cell table:style-name="ce208" table:formula="of:=[.U40]/[.X40]" office:value-type="float" office:value="2" calcext:value-type="float">
            <text:p>2.0</text:p>
          </table:table-cell>
          <table:table-cell table:style-name="ce212" table:formula="of:=RANK([.AA40];[.$AA$4:.$AA$133])" office:value-type="float" office:value="121" calcext:value-type="float">
            <text:p>121º</text:p>
          </table:table-cell>
          <table:table-cell table:number-columns-repeated="996"/>
        </table:table-row>
        <table:table-row table:style-name="ro10">
          <table:table-cell table:style-name="ce126" office:value-type="string" calcext:value-type="string">
            <text:p>FELIPE LERMEN</text:p>
          </table:table-cell>
          <table:table-cell table:style-name="ce134" office:value-type="float" office:value="19" calcext:value-type="float">
            <text:p>19º</text:p>
          </table:table-cell>
          <table:table-cell table:style-name="ce139" table:formula="of:=IF([.B41]=20;1;IF([.B41]=19;2;IF([.B41]=19;2;IF([.B41]=18;3;IF([.B41]=17;4;IF([.B41]=16;5;IF([.B41]=15;6;IF([.B41]=14;7;IF([.B41]=13;8;IF([.B41]=12;9;IF([.B41]=11;10;IF([.B41]=10;11;IF([.B41]=9;12;IF([.B41]=8;13;IF([.B41]=7;14;IF([.B41]=6;15;IF([.B41]=5;16;IF([.B41]=4;17;IF([.B41]=3;18;IF([.B41]=2;19;IF([.B41]=1;20;0)))))))))))))))))))))" office:value-type="float" office:value="2" calcext:value-type="float">
            <text:p>2</text:p>
          </table:table-cell>
          <table:table-cell table:style-name="ce134" office:value-type="float" office:value="30" calcext:value-type="float">
            <text:p>30º</text:p>
          </table:table-cell>
          <table:table-cell table:style-name="ce139" table:formula="of:=IF([.D41]=20;1;IF([.D41]=19;2;IF([.D41]=19;2;IF([.D41]=18;3;IF([.D41]=17;4;IF([.D41]=16;5;IF([.D41]=15;6;IF([.D41]=14;7;IF([.D41]=13;8;IF([.D41]=12;9;IF([.D41]=11;10;IF([.D41]=10;11;IF([.D41]=9;12;IF([.D41]=8;13;IF([.D41]=7;14;IF([.D41]=6;15;IF([.D41]=5;16;IF([.D41]=4;17;IF([.D41]=3;18;IF([.D41]=2;19;IF([.D41]=1;20;0)))))))))))))))))))))" office:value-type="float" office:value="0" calcext:value-type="float">
            <text:p>0</text:p>
          </table:table-cell>
          <table:table-cell table:style-name="ce134" office:value-type="float" office:value="28" calcext:value-type="float">
            <text:p>28º</text:p>
          </table:table-cell>
          <table:table-cell table:style-name="ce139" table:formula="of:=IF([.F41]=20;1;IF([.F41]=19;2;IF([.F41]=19;2;IF([.F41]=18;3;IF([.F41]=17;4;IF([.F41]=16;5;IF([.F41]=15;6;IF([.F41]=14;7;IF([.F41]=13;8;IF([.F41]=12;9;IF([.F41]=11;10;IF([.F41]=10;11;IF([.F41]=9;12;IF([.F41]=8;13;IF([.F41]=7;14;IF([.F41]=6;15;IF([.F41]=5;16;IF([.F41]=4;17;IF([.F41]=3;18;IF([.F41]=2;19;IF([.F41]=1;20;0)))))))))))))))))))))" office:value-type="float" office:value="0" calcext:value-type="float">
            <text:p>0</text:p>
          </table:table-cell>
          <table:table-cell table:style-name="ce134" office:value-type="float" office:value="88" calcext:value-type="float">
            <text:p>88º</text:p>
          </table:table-cell>
          <table:table-cell table:style-name="ce139" table:formula="of:=IF([.H41]=20;1;IF([.H41]=19;2;IF([.H41]=19;2;IF([.H41]=18;3;IF([.H41]=17;4;IF([.H41]=16;5;IF([.H41]=15;6;IF([.H41]=14;7;IF([.H41]=13;8;IF([.H41]=12;9;IF([.H41]=11;10;IF([.H41]=10;11;IF([.H41]=9;12;IF([.H41]=8;13;IF([.H41]=7;14;IF([.H41]=6;15;IF([.H41]=5;16;IF([.H41]=4;17;IF([.H41]=3;18;IF([.H41]=2;19;IF([.H41]=1;20;0)))))))))))))))))))))" office:value-type="float" office:value="0" calcext:value-type="float">
            <text:p>0</text:p>
          </table:table-cell>
          <table:table-cell table:style-name="ce134" office:value-type="float" office:value="8" calcext:value-type="float">
            <text:p>8º</text:p>
          </table:table-cell>
          <table:table-cell table:style-name="ce145" table:formula="of:=IF([.J41]=20;1;IF([.J41]=19;2;IF([.J41]=19;2;IF([.J41]=18;3;IF([.J41]=17;4;IF([.J41]=16;5;IF([.J41]=15;6;IF([.J41]=14;7;IF([.J41]=13;8;IF([.J41]=12;9;IF([.J41]=11;10;IF([.J41]=10;11;IF([.J41]=9;12;IF([.J41]=8;13;IF([.J41]=7;14;IF([.J41]=6;15;IF([.J41]=5;16;IF([.J41]=4;17;IF([.J41]=3;18;IF([.J41]=2;19;IF([.J41]=1;20;0)))))))))))))))))))))" office:value-type="float" office:value="13" calcext:value-type="float">
            <text:p>13</text:p>
          </table:table-cell>
          <table:table-cell table:style-name="ce150"/>
          <table:table-cell table:style-name="ce158" table:formula="of:=SUM([.C41];[.E41];[.G41];[.I41];[.K41])" office:value-type="float" office:value="15" calcext:value-type="float">
            <text:p>15</text:p>
          </table:table-cell>
          <table:table-cell table:style-name="ce160" table:formula="of:=RANK([.M41];[.$M$4:.$M$133])" office:value-type="float" office:value="35" calcext:value-type="float">
            <text:p>35º</text:p>
          </table:table-cell>
          <table:table-cell table:style-name="ce161"/>
          <table:table-cell table:style-name="ce169" office:value-type="float" office:value="4" calcext:value-type="float">
            <text:p>4</text:p>
          </table:table-cell>
          <table:table-cell table:style-name="ce175" office:value-type="float" office:value="4" calcext:value-type="float">
            <text:p>4</text:p>
          </table:table-cell>
          <table:table-cell table:style-name="ce175" office:value-type="float" office:value="9" calcext:value-type="float">
            <text:p>9</text:p>
          </table:table-cell>
          <table:table-cell table:style-name="ce180" office:value-type="float" office:value="7" calcext:value-type="float">
            <text:p>7</text:p>
          </table:table-cell>
          <table:table-cell table:style-name="ce185" office:value-type="float" office:value="7" calcext:value-type="float">
            <text:p>7</text:p>
          </table:table-cell>
          <table:table-cell table:style-name="ce188" table:formula="of:=SUM([.P41:.T41])" office:value-type="float" office:value="31" calcext:value-type="float">
            <text:p>31</text:p>
          </table:table-cell>
          <table:table-cell table:style-name="ce189" table:formula="of:=RANK([.U41];[.$U$4:.$U$133])" office:value-type="float" office:value="5" calcext:value-type="float">
            <text:p>5º</text:p>
          </table:table-cell>
          <table:table-cell table:style-name="ce161"/>
          <table:table-cell table:style-name="ce193" table:formula="of:=COUNTIF([.B41];&quot;&gt;0&quot;)+COUNTIF([.D41];&quot;&gt;0&quot;)+COUNTIF([.F41];&quot;&gt;0&quot;)+COUNTIF([.H41];&quot;&gt;0&quot;)+COUNTIF([.J41];&quot;&gt;0&quot;)" office:value-type="float" office:value="5" calcext:value-type="float">
            <text:p>5</text:p>
          </table:table-cell>
          <table:table-cell table:style-name="ce200" table:formula="of:=[.M41]/[.X41]" office:value-type="float" office:value="3" calcext:value-type="float">
            <text:p>3.0</text:p>
          </table:table-cell>
          <table:table-cell table:style-name="ce204" table:formula="of:=RANK([.Y41];[.$Y$4:.$Y$133])" office:value-type="float" office:value="51" calcext:value-type="float">
            <text:p>51º</text:p>
          </table:table-cell>
          <table:table-cell table:style-name="ce208" table:formula="of:=[.U41]/[.X41]" office:value-type="float" office:value="6.2" calcext:value-type="float">
            <text:p>6.2</text:p>
          </table:table-cell>
          <table:table-cell table:style-name="ce212" table:formula="of:=RANK([.AA41];[.$AA$4:.$AA$133])" office:value-type="float" office:value="33" calcext:value-type="float">
            <text:p>33º</text:p>
          </table:table-cell>
          <table:table-cell table:number-columns-repeated="996"/>
        </table:table-row>
        <table:table-row table:style-name="ro10">
          <table:table-cell table:style-name="ce126" office:value-type="string" calcext:value-type="string">
            <text:p>FERNANDA</text:p>
          </table:table-cell>
          <table:table-cell table:style-name="ce134" office:value-type="string" calcext:value-type="string">
            <text:p>-</text:p>
          </table:table-cell>
          <table:table-cell table:style-name="ce139" table:formula="of:=IF([.B42]=20;1;IF([.B42]=19;2;IF([.B42]=19;2;IF([.B42]=18;3;IF([.B42]=17;4;IF([.B42]=16;5;IF([.B42]=15;6;IF([.B42]=14;7;IF([.B42]=13;8;IF([.B42]=12;9;IF([.B42]=11;10;IF([.B42]=10;11;IF([.B42]=9;12;IF([.B42]=8;13;IF([.B42]=7;14;IF([.B42]=6;15;IF([.B42]=5;16;IF([.B42]=4;17;IF([.B42]=3;18;IF([.B42]=2;19;IF([.B42]=1;20;0)))))))))))))))))))))" office:value-type="float" office:value="0" calcext:value-type="float">
            <text:p>0</text:p>
          </table:table-cell>
          <table:table-cell table:style-name="ce134" office:value-type="string" calcext:value-type="string">
            <text:p>-</text:p>
          </table:table-cell>
          <table:table-cell table:style-name="ce139" table:formula="of:=IF([.D42]=20;1;IF([.D42]=19;2;IF([.D42]=19;2;IF([.D42]=18;3;IF([.D42]=17;4;IF([.D42]=16;5;IF([.D42]=15;6;IF([.D42]=14;7;IF([.D42]=13;8;IF([.D42]=12;9;IF([.D42]=11;10;IF([.D42]=10;11;IF([.D42]=9;12;IF([.D42]=8;13;IF([.D42]=7;14;IF([.D42]=6;15;IF([.D42]=5;16;IF([.D42]=4;17;IF([.D42]=3;18;IF([.D42]=2;19;IF([.D42]=1;20;0)))))))))))))))))))))" office:value-type="float" office:value="0" calcext:value-type="float">
            <text:p>0</text:p>
          </table:table-cell>
          <table:table-cell table:style-name="ce134" office:value-type="float" office:value="29" calcext:value-type="float">
            <text:p>29º</text:p>
          </table:table-cell>
          <table:table-cell table:style-name="ce139" table:formula="of:=IF([.F42]=20;1;IF([.F42]=19;2;IF([.F42]=19;2;IF([.F42]=18;3;IF([.F42]=17;4;IF([.F42]=16;5;IF([.F42]=15;6;IF([.F42]=14;7;IF([.F42]=13;8;IF([.F42]=12;9;IF([.F42]=11;10;IF([.F42]=10;11;IF([.F42]=9;12;IF([.F42]=8;13;IF([.F42]=7;14;IF([.F42]=6;15;IF([.F42]=5;16;IF([.F42]=4;17;IF([.F42]=3;18;IF([.F42]=2;19;IF([.F42]=1;20;0)))))))))))))))))))))" office:value-type="float" office:value="0" calcext:value-type="float">
            <text:p>0</text:p>
          </table:table-cell>
          <table:table-cell table:style-name="ce134"/>
          <table:table-cell table:style-name="ce139" table:formula="of:=IF([.H42]=20;1;IF([.H42]=19;2;IF([.H42]=19;2;IF([.H42]=18;3;IF([.H42]=17;4;IF([.H42]=16;5;IF([.H42]=15;6;IF([.H42]=14;7;IF([.H42]=13;8;IF([.H42]=12;9;IF([.H42]=11;10;IF([.H42]=10;11;IF([.H42]=9;12;IF([.H42]=8;13;IF([.H42]=7;14;IF([.H42]=6;15;IF([.H42]=5;16;IF([.H42]=4;17;IF([.H42]=3;18;IF([.H42]=2;19;IF([.H42]=1;20;0)))))))))))))))))))))" office:value-type="float" office:value="0" calcext:value-type="float">
            <text:p>0</text:p>
          </table:table-cell>
          <table:table-cell table:style-name="ce134"/>
          <table:table-cell table:style-name="ce145" table:formula="of:=IF([.J42]=20;1;IF([.J42]=19;2;IF([.J42]=19;2;IF([.J42]=18;3;IF([.J42]=17;4;IF([.J42]=16;5;IF([.J42]=15;6;IF([.J42]=14;7;IF([.J42]=13;8;IF([.J42]=12;9;IF([.J42]=11;10;IF([.J42]=10;11;IF([.J42]=9;12;IF([.J42]=8;13;IF([.J42]=7;14;IF([.J42]=6;15;IF([.J42]=5;16;IF([.J42]=4;17;IF([.J42]=3;18;IF([.J42]=2;19;IF([.J42]=1;20;0)))))))))))))))))))))" office:value-type="float" office:value="0" calcext:value-type="float">
            <text:p>0</text:p>
          </table:table-cell>
          <table:table-cell table:style-name="ce150"/>
          <table:table-cell table:style-name="ce158" table:formula="of:=SUM([.C42];[.E42];[.G42];[.I42];[.K42])" office:value-type="float" office:value="0" calcext:value-type="float">
            <text:p>0</text:p>
          </table:table-cell>
          <table:table-cell table:style-name="ce160" table:formula="of:=RANK([.M42];[.$M$4:.$M$133])" office:value-type="float" office:value="71" calcext:value-type="float">
            <text:p>71º</text:p>
          </table:table-cell>
          <table:table-cell table:style-name="ce161"/>
          <table:table-cell table:style-name="ce169"/>
          <table:table-cell table:style-name="ce175"/>
          <table:table-cell table:style-name="ce175" office:value-type="float" office:value="3" calcext:value-type="float">
            <text:p>3</text:p>
          </table:table-cell>
          <table:table-cell table:style-name="ce180"/>
          <table:table-cell table:style-name="ce185" office:value-type="string" calcext:value-type="string">
            <text:p>-</text:p>
          </table:table-cell>
          <table:table-cell table:style-name="ce188" table:formula="of:=SUM([.P42:.T42])" office:value-type="float" office:value="3" calcext:value-type="float">
            <text:p>3</text:p>
          </table:table-cell>
          <table:table-cell table:style-name="ce189" table:formula="of:=RANK([.U42];[.$U$4:.$U$133])" office:value-type="float" office:value="119" calcext:value-type="float">
            <text:p>119º</text:p>
          </table:table-cell>
          <table:table-cell table:style-name="ce161"/>
          <table:table-cell table:style-name="ce193" table:formula="of:=COUNTIF([.B42];&quot;&gt;0&quot;)+COUNTIF([.D42];&quot;&gt;0&quot;)+COUNTIF([.F42];&quot;&gt;0&quot;)+COUNTIF([.H42];&quot;&gt;0&quot;)+COUNTIF([.J42];&quot;&gt;0&quot;)" office:value-type="float" office:value="1" calcext:value-type="float">
            <text:p>1</text:p>
          </table:table-cell>
          <table:table-cell table:style-name="ce200" table:formula="of:=[.M42]/[.X42]" office:value-type="float" office:value="0" calcext:value-type="float">
            <text:p>0.0</text:p>
          </table:table-cell>
          <table:table-cell table:style-name="ce204" table:formula="of:=RANK([.Y42];[.$Y$4:.$Y$133])" office:value-type="float" office:value="71" calcext:value-type="float">
            <text:p>71º</text:p>
          </table:table-cell>
          <table:table-cell table:style-name="ce208" table:formula="of:=[.U42]/[.X42]" office:value-type="float" office:value="3" calcext:value-type="float">
            <text:p>3.0</text:p>
          </table:table-cell>
          <table:table-cell table:style-name="ce212" table:formula="of:=RANK([.AA42];[.$AA$4:.$AA$133])" office:value-type="float" office:value="113" calcext:value-type="float">
            <text:p>113º</text:p>
          </table:table-cell>
          <table:table-cell table:number-columns-repeated="996"/>
        </table:table-row>
        <table:table-row table:style-name="ro10">
          <table:table-cell table:style-name="ce126" office:value-type="string" calcext:value-type="string">
            <text:p>FERNANDO DEL PAPA</text:p>
          </table:table-cell>
          <table:table-cell table:style-name="ce134" office:value-type="string" calcext:value-type="string">
            <text:p>-</text:p>
          </table:table-cell>
          <table:table-cell table:style-name="ce139" table:formula="of:=IF([.B43]=20;1;IF([.B43]=19;2;IF([.B43]=19;2;IF([.B43]=18;3;IF([.B43]=17;4;IF([.B43]=16;5;IF([.B43]=15;6;IF([.B43]=14;7;IF([.B43]=13;8;IF([.B43]=12;9;IF([.B43]=11;10;IF([.B43]=10;11;IF([.B43]=9;12;IF([.B43]=8;13;IF([.B43]=7;14;IF([.B43]=6;15;IF([.B43]=5;16;IF([.B43]=4;17;IF([.B43]=3;18;IF([.B43]=2;19;IF([.B43]=1;20;0)))))))))))))))))))))" office:value-type="float" office:value="0" calcext:value-type="float">
            <text:p>0</text:p>
          </table:table-cell>
          <table:table-cell table:style-name="ce134" office:value-type="string" calcext:value-type="string">
            <text:p>-</text:p>
          </table:table-cell>
          <table:table-cell table:style-name="ce139" table:formula="of:=IF([.D43]=20;1;IF([.D43]=19;2;IF([.D43]=19;2;IF([.D43]=18;3;IF([.D43]=17;4;IF([.D43]=16;5;IF([.D43]=15;6;IF([.D43]=14;7;IF([.D43]=13;8;IF([.D43]=12;9;IF([.D43]=11;10;IF([.D43]=10;11;IF([.D43]=9;12;IF([.D43]=8;13;IF([.D43]=7;14;IF([.D43]=6;15;IF([.D43]=5;16;IF([.D43]=4;17;IF([.D43]=3;18;IF([.D43]=2;19;IF([.D43]=1;20;0)))))))))))))))))))))" office:value-type="float" office:value="0" calcext:value-type="float">
            <text:p>0</text:p>
          </table:table-cell>
          <table:table-cell table:style-name="ce134" office:value-type="float" office:value="9" calcext:value-type="float">
            <text:p>9º</text:p>
          </table:table-cell>
          <table:table-cell table:style-name="ce139" table:formula="of:=IF([.F43]=20;1;IF([.F43]=19;2;IF([.F43]=19;2;IF([.F43]=18;3;IF([.F43]=17;4;IF([.F43]=16;5;IF([.F43]=15;6;IF([.F43]=14;7;IF([.F43]=13;8;IF([.F43]=12;9;IF([.F43]=11;10;IF([.F43]=10;11;IF([.F43]=9;12;IF([.F43]=8;13;IF([.F43]=7;14;IF([.F43]=6;15;IF([.F43]=5;16;IF([.F43]=4;17;IF([.F43]=3;18;IF([.F43]=2;19;IF([.F43]=1;20;0)))))))))))))))))))))" office:value-type="float" office:value="12" calcext:value-type="float">
            <text:p>12</text:p>
          </table:table-cell>
          <table:table-cell table:style-name="ce134" office:value-type="float" office:value="7" calcext:value-type="float">
            <text:p>7º</text:p>
          </table:table-cell>
          <table:table-cell table:style-name="ce139" table:formula="of:=IF([.H43]=20;1;IF([.H43]=19;2;IF([.H43]=19;2;IF([.H43]=18;3;IF([.H43]=17;4;IF([.H43]=16;5;IF([.H43]=15;6;IF([.H43]=14;7;IF([.H43]=13;8;IF([.H43]=12;9;IF([.H43]=11;10;IF([.H43]=10;11;IF([.H43]=9;12;IF([.H43]=8;13;IF([.H43]=7;14;IF([.H43]=6;15;IF([.H43]=5;16;IF([.H43]=4;17;IF([.H43]=3;18;IF([.H43]=2;19;IF([.H43]=1;20;0)))))))))))))))))))))" office:value-type="float" office:value="14" calcext:value-type="float">
            <text:p>14</text:p>
          </table:table-cell>
          <table:table-cell table:style-name="ce134" office:value-type="string" calcext:value-type="string">
            <text:p>-</text:p>
          </table:table-cell>
          <table:table-cell table:style-name="ce145" table:formula="of:=IF([.J43]=20;1;IF([.J43]=19;2;IF([.J43]=19;2;IF([.J43]=18;3;IF([.J43]=17;4;IF([.J43]=16;5;IF([.J43]=15;6;IF([.J43]=14;7;IF([.J43]=13;8;IF([.J43]=12;9;IF([.J43]=11;10;IF([.J43]=10;11;IF([.J43]=9;12;IF([.J43]=8;13;IF([.J43]=7;14;IF([.J43]=6;15;IF([.J43]=5;16;IF([.J43]=4;17;IF([.J43]=3;18;IF([.J43]=2;19;IF([.J43]=1;20;0)))))))))))))))))))))" office:value-type="float" office:value="0" calcext:value-type="float">
            <text:p>0</text:p>
          </table:table-cell>
          <table:table-cell table:style-name="ce150"/>
          <table:table-cell table:style-name="ce158" table:formula="of:=SUM([.C43];[.E43];[.G43];[.I43];[.K43])" office:value-type="float" office:value="26" calcext:value-type="float">
            <text:p>26</text:p>
          </table:table-cell>
          <table:table-cell table:style-name="ce160" table:formula="of:=RANK([.M43];[.$M$4:.$M$133])" office:value-type="float" office:value="11" calcext:value-type="float">
            <text:p>1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8" calcext:value-type="float">
            <text:p>8</text:p>
          </table:table-cell>
          <table:table-cell table:style-name="ce180" office:value-type="float" office:value="5" calcext:value-type="float">
            <text:p>5</text:p>
          </table:table-cell>
          <table:table-cell table:style-name="ce185" office:value-type="string" calcext:value-type="string">
            <text:p>-</text:p>
          </table:table-cell>
          <table:table-cell table:style-name="ce188" table:formula="of:=SUM([.P43:.T43])" office:value-type="float" office:value="13" calcext:value-type="float">
            <text:p>13</text:p>
          </table:table-cell>
          <table:table-cell table:style-name="ce189" table:formula="of:=RANK([.U43];[.$U$4:.$U$133])" office:value-type="float" office:value="53" calcext:value-type="float">
            <text:p>53º</text:p>
          </table:table-cell>
          <table:table-cell table:style-name="ce161"/>
          <table:table-cell table:style-name="ce193" table:formula="of:=COUNTIF([.B43];&quot;&gt;0&quot;)+COUNTIF([.D43];&quot;&gt;0&quot;)+COUNTIF([.F43];&quot;&gt;0&quot;)+COUNTIF([.H43];&quot;&gt;0&quot;)+COUNTIF([.J43];&quot;&gt;0&quot;)" office:value-type="float" office:value="2" calcext:value-type="float">
            <text:p>2</text:p>
          </table:table-cell>
          <table:table-cell table:style-name="ce200" table:formula="of:=[.M43]/[.X43]" office:value-type="float" office:value="13" calcext:value-type="float">
            <text:p>13.0</text:p>
          </table:table-cell>
          <table:table-cell table:style-name="ce204" table:formula="of:=RANK([.Y43];[.$Y$4:.$Y$133])" office:value-type="float" office:value="6" calcext:value-type="float">
            <text:p>6º</text:p>
          </table:table-cell>
          <table:table-cell table:style-name="ce208" table:formula="of:=[.U43]/[.X43]" office:value-type="float" office:value="6.5" calcext:value-type="float">
            <text:p>6.5</text:p>
          </table:table-cell>
          <table:table-cell table:style-name="ce212" table:formula="of:=RANK([.AA43];[.$AA$4:.$AA$133])" office:value-type="float" office:value="26" calcext:value-type="float">
            <text:p>26º</text:p>
          </table:table-cell>
          <table:table-cell table:number-columns-repeated="996"/>
        </table:table-row>
        <table:table-row table:style-name="ro10">
          <table:table-cell table:style-name="ce126" office:value-type="string" calcext:value-type="string">
            <text:p>FERNANDO LANZER</text:p>
          </table:table-cell>
          <table:table-cell table:style-name="ce134" office:value-type="string" calcext:value-type="string">
            <text:p>-</text:p>
          </table:table-cell>
          <table:table-cell table:style-name="ce139" table:formula="of:=IF([.B44]=20;1;IF([.B44]=19;2;IF([.B44]=19;2;IF([.B44]=18;3;IF([.B44]=17;4;IF([.B44]=16;5;IF([.B44]=15;6;IF([.B44]=14;7;IF([.B44]=13;8;IF([.B44]=12;9;IF([.B44]=11;10;IF([.B44]=10;11;IF([.B44]=9;12;IF([.B44]=8;13;IF([.B44]=7;14;IF([.B44]=6;15;IF([.B44]=5;16;IF([.B44]=4;17;IF([.B44]=3;18;IF([.B44]=2;19;IF([.B44]=1;20;0)))))))))))))))))))))" office:value-type="float" office:value="0" calcext:value-type="float">
            <text:p>0</text:p>
          </table:table-cell>
          <table:table-cell table:style-name="ce134" office:value-type="float" office:value="53" calcext:value-type="float">
            <text:p>53º</text:p>
          </table:table-cell>
          <table:table-cell table:style-name="ce139" table:formula="of:=IF([.D44]=20;1;IF([.D44]=19;2;IF([.D44]=19;2;IF([.D44]=18;3;IF([.D44]=17;4;IF([.D44]=16;5;IF([.D44]=15;6;IF([.D44]=14;7;IF([.D44]=13;8;IF([.D44]=12;9;IF([.D44]=11;10;IF([.D44]=10;11;IF([.D44]=9;12;IF([.D44]=8;13;IF([.D44]=7;14;IF([.D44]=6;15;IF([.D44]=5;16;IF([.D44]=4;17;IF([.D44]=3;18;IF([.D44]=2;19;IF([.D44]=1;20;0)))))))))))))))))))))" office:value-type="float" office:value="0" calcext:value-type="float">
            <text:p>0</text:p>
          </table:table-cell>
          <table:table-cell table:style-name="ce134" office:value-type="float" office:value="15" calcext:value-type="float">
            <text:p>15º</text:p>
          </table:table-cell>
          <table:table-cell table:style-name="ce139" table:formula="of:=IF([.F44]=20;1;IF([.F44]=19;2;IF([.F44]=19;2;IF([.F44]=18;3;IF([.F44]=17;4;IF([.F44]=16;5;IF([.F44]=15;6;IF([.F44]=14;7;IF([.F44]=13;8;IF([.F44]=12;9;IF([.F44]=11;10;IF([.F44]=10;11;IF([.F44]=9;12;IF([.F44]=8;13;IF([.F44]=7;14;IF([.F44]=6;15;IF([.F44]=5;16;IF([.F44]=4;17;IF([.F44]=3;18;IF([.F44]=2;19;IF([.F44]=1;20;0)))))))))))))))))))))" office:value-type="float" office:value="6" calcext:value-type="float">
            <text:p>6</text:p>
          </table:table-cell>
          <table:table-cell table:style-name="ce134" office:value-type="float" office:value="28" calcext:value-type="float">
            <text:p>28º</text:p>
          </table:table-cell>
          <table:table-cell table:style-name="ce139" table:formula="of:=IF([.H44]=20;1;IF([.H44]=19;2;IF([.H44]=19;2;IF([.H44]=18;3;IF([.H44]=17;4;IF([.H44]=16;5;IF([.H44]=15;6;IF([.H44]=14;7;IF([.H44]=13;8;IF([.H44]=12;9;IF([.H44]=11;10;IF([.H44]=10;11;IF([.H44]=9;12;IF([.H44]=8;13;IF([.H44]=7;14;IF([.H44]=6;15;IF([.H44]=5;16;IF([.H44]=4;17;IF([.H44]=3;18;IF([.H44]=2;19;IF([.H44]=1;20;0)))))))))))))))))))))" office:value-type="float" office:value="0" calcext:value-type="float">
            <text:p>0</text:p>
          </table:table-cell>
          <table:table-cell table:style-name="ce134" office:value-type="float" office:value="9" calcext:value-type="float">
            <text:p>9º</text:p>
          </table:table-cell>
          <table:table-cell table:style-name="ce145" table:formula="of:=IF([.J44]=20;1;IF([.J44]=19;2;IF([.J44]=19;2;IF([.J44]=18;3;IF([.J44]=17;4;IF([.J44]=16;5;IF([.J44]=15;6;IF([.J44]=14;7;IF([.J44]=13;8;IF([.J44]=12;9;IF([.J44]=11;10;IF([.J44]=10;11;IF([.J44]=9;12;IF([.J44]=8;13;IF([.J44]=7;14;IF([.J44]=6;15;IF([.J44]=5;16;IF([.J44]=4;17;IF([.J44]=3;18;IF([.J44]=2;19;IF([.J44]=1;20;0)))))))))))))))))))))" office:value-type="float" office:value="12" calcext:value-type="float">
            <text:p>12</text:p>
          </table:table-cell>
          <table:table-cell table:style-name="ce150"/>
          <table:table-cell table:style-name="ce158" table:formula="of:=SUM([.C44];[.E44];[.G44];[.I44];[.K44])" office:value-type="float" office:value="18" calcext:value-type="float">
            <text:p>18</text:p>
          </table:table-cell>
          <table:table-cell table:style-name="ce160" table:formula="of:=RANK([.M44];[.$M$4:.$M$133])" office:value-type="float" office:value="24" calcext:value-type="float">
            <text:p>24º</text:p>
          </table:table-cell>
          <table:table-cell table:style-name="ce161"/>
          <table:table-cell table:style-name="ce169" office:value-type="string" calcext:value-type="string">
            <text:p>-</text:p>
          </table:table-cell>
          <table:table-cell table:style-name="ce175" office:value-type="float" office:value="6" calcext:value-type="float">
            <text:p>6</text:p>
          </table:table-cell>
          <table:table-cell table:style-name="ce175" office:value-type="float" office:value="9" calcext:value-type="float">
            <text:p>9</text:p>
          </table:table-cell>
          <table:table-cell table:style-name="ce180" office:value-type="float" office:value="8" calcext:value-type="float">
            <text:p>8</text:p>
          </table:table-cell>
          <table:table-cell table:style-name="ce185" office:value-type="float" office:value="5" calcext:value-type="float">
            <text:p>5</text:p>
          </table:table-cell>
          <table:table-cell table:style-name="ce188" table:formula="of:=SUM([.P44:.T44])" office:value-type="float" office:value="28" calcext:value-type="float">
            <text:p>28</text:p>
          </table:table-cell>
          <table:table-cell table:style-name="ce189" table:formula="of:=RANK([.U44];[.$U$4:.$U$133])" office:value-type="float" office:value="10" calcext:value-type="float">
            <text:p>10º</text:p>
          </table:table-cell>
          <table:table-cell table:style-name="ce161"/>
          <table:table-cell table:style-name="ce193" table:formula="of:=COUNTIF([.B44];&quot;&gt;0&quot;)+COUNTIF([.D44];&quot;&gt;0&quot;)+COUNTIF([.F44];&quot;&gt;0&quot;)+COUNTIF([.H44];&quot;&gt;0&quot;)+COUNTIF([.J44];&quot;&gt;0&quot;)" office:value-type="float" office:value="4" calcext:value-type="float">
            <text:p>4</text:p>
          </table:table-cell>
          <table:table-cell table:style-name="ce200" table:formula="of:=[.M44]/[.X44]" office:value-type="float" office:value="4.5" calcext:value-type="float">
            <text:p>4.5</text:p>
          </table:table-cell>
          <table:table-cell table:style-name="ce204" table:formula="of:=RANK([.Y44];[.$Y$4:.$Y$133])" office:value-type="float" office:value="35" calcext:value-type="float">
            <text:p>35º</text:p>
          </table:table-cell>
          <table:table-cell table:style-name="ce208" table:formula="of:=[.U44]/[.X44]" office:value-type="float" office:value="7" calcext:value-type="float">
            <text:p>7.0</text:p>
          </table:table-cell>
          <table:table-cell table:style-name="ce212" table:formula="of:=RANK([.AA44];[.$AA$4:.$AA$133])" office:value-type="float" office:value="11" calcext:value-type="float">
            <text:p>11º</text:p>
          </table:table-cell>
          <table:table-cell table:number-columns-repeated="996"/>
        </table:table-row>
        <table:table-row table:style-name="ro10">
          <table:table-cell table:style-name="ce126" office:value-type="string" calcext:value-type="string">
            <text:p>FERNANDO SARTORI</text:p>
          </table:table-cell>
          <table:table-cell table:style-name="ce134" office:value-type="string" calcext:value-type="string">
            <text:p>-</text:p>
          </table:table-cell>
          <table:table-cell table:style-name="ce139" table:formula="of:=IF([.B45]=20;1;IF([.B45]=19;2;IF([.B45]=19;2;IF([.B45]=18;3;IF([.B45]=17;4;IF([.B45]=16;5;IF([.B45]=15;6;IF([.B45]=14;7;IF([.B45]=13;8;IF([.B45]=12;9;IF([.B45]=11;10;IF([.B45]=10;11;IF([.B45]=9;12;IF([.B45]=8;13;IF([.B45]=7;14;IF([.B45]=6;15;IF([.B45]=5;16;IF([.B45]=4;17;IF([.B45]=3;18;IF([.B45]=2;19;IF([.B45]=1;20;0)))))))))))))))))))))" office:value-type="float" office:value="0" calcext:value-type="float">
            <text:p>0</text:p>
          </table:table-cell>
          <table:table-cell table:style-name="ce134" office:value-type="string" calcext:value-type="string">
            <text:p>-</text:p>
          </table:table-cell>
          <table:table-cell table:style-name="ce139" table:formula="of:=IF([.D45]=20;1;IF([.D45]=19;2;IF([.D45]=19;2;IF([.D45]=18;3;IF([.D45]=17;4;IF([.D45]=16;5;IF([.D45]=15;6;IF([.D45]=14;7;IF([.D45]=13;8;IF([.D45]=12;9;IF([.D45]=11;10;IF([.D45]=10;11;IF([.D45]=9;12;IF([.D45]=8;13;IF([.D45]=7;14;IF([.D45]=6;15;IF([.D45]=5;16;IF([.D45]=4;17;IF([.D45]=3;18;IF([.D45]=2;19;IF([.D45]=1;20;0)))))))))))))))))))))" office:value-type="float" office:value="0" calcext:value-type="float">
            <text:p>0</text:p>
          </table:table-cell>
          <table:table-cell table:style-name="ce134" office:value-type="string" calcext:value-type="string">
            <text:p>-</text:p>
          </table:table-cell>
          <table:table-cell table:style-name="ce139" table:formula="of:=IF([.F45]=20;1;IF([.F45]=19;2;IF([.F45]=19;2;IF([.F45]=18;3;IF([.F45]=17;4;IF([.F45]=16;5;IF([.F45]=15;6;IF([.F45]=14;7;IF([.F45]=13;8;IF([.F45]=12;9;IF([.F45]=11;10;IF([.F45]=10;11;IF([.F45]=9;12;IF([.F45]=8;13;IF([.F45]=7;14;IF([.F45]=6;15;IF([.F45]=5;16;IF([.F45]=4;17;IF([.F45]=3;18;IF([.F45]=2;19;IF([.F45]=1;20;0)))))))))))))))))))))" office:value-type="float" office:value="0" calcext:value-type="float">
            <text:p>0</text:p>
          </table:table-cell>
          <table:table-cell table:style-name="ce134" office:value-type="float" office:value="17" calcext:value-type="float">
            <text:p>17º</text:p>
          </table:table-cell>
          <table:table-cell table:style-name="ce139" table:formula="of:=IF([.H45]=20;1;IF([.H45]=19;2;IF([.H45]=19;2;IF([.H45]=18;3;IF([.H45]=17;4;IF([.H45]=16;5;IF([.H45]=15;6;IF([.H45]=14;7;IF([.H45]=13;8;IF([.H45]=12;9;IF([.H45]=11;10;IF([.H45]=10;11;IF([.H45]=9;12;IF([.H45]=8;13;IF([.H45]=7;14;IF([.H45]=6;15;IF([.H45]=5;16;IF([.H45]=4;17;IF([.H45]=3;18;IF([.H45]=2;19;IF([.H45]=1;20;0)))))))))))))))))))))" office:value-type="float" office:value="4" calcext:value-type="float">
            <text:p>4</text:p>
          </table:table-cell>
          <table:table-cell table:style-name="ce134" office:value-type="string" calcext:value-type="string">
            <text:p>-</text:p>
          </table:table-cell>
          <table:table-cell table:style-name="ce145" table:formula="of:=IF([.J45]=20;1;IF([.J45]=19;2;IF([.J45]=19;2;IF([.J45]=18;3;IF([.J45]=17;4;IF([.J45]=16;5;IF([.J45]=15;6;IF([.J45]=14;7;IF([.J45]=13;8;IF([.J45]=12;9;IF([.J45]=11;10;IF([.J45]=10;11;IF([.J45]=9;12;IF([.J45]=8;13;IF([.J45]=7;14;IF([.J45]=6;15;IF([.J45]=5;16;IF([.J45]=4;17;IF([.J45]=3;18;IF([.J45]=2;19;IF([.J45]=1;20;0)))))))))))))))))))))" office:value-type="float" office:value="0" calcext:value-type="float">
            <text:p>0</text:p>
          </table:table-cell>
          <table:table-cell table:style-name="ce150"/>
          <table:table-cell table:style-name="ce158" table:formula="of:=SUM([.C45];[.E45];[.G45];[.I45];[.K45])" office:value-type="float" office:value="4" calcext:value-type="float">
            <text:p>4</text:p>
          </table:table-cell>
          <table:table-cell table:style-name="ce160" table:formula="of:=RANK([.M45];[.$M$4:.$M$133])" office:value-type="float" office:value="59" calcext:value-type="float">
            <text:p>59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6" calcext:value-type="float">
            <text:p>6</text:p>
          </table:table-cell>
          <table:table-cell table:style-name="ce185" office:value-type="string" calcext:value-type="string">
            <text:p>-</text:p>
          </table:table-cell>
          <table:table-cell table:style-name="ce188" table:formula="of:=SUM([.P45:.T45])" office:value-type="float" office:value="6" calcext:value-type="float">
            <text:p>6</text:p>
          </table:table-cell>
          <table:table-cell table:style-name="ce189" table:formula="of:=RANK([.U45];[.$U$4:.$U$133])" office:value-type="float" office:value="89" calcext:value-type="float">
            <text:p>89º</text:p>
          </table:table-cell>
          <table:table-cell table:style-name="ce161"/>
          <table:table-cell table:style-name="ce193" table:formula="of:=COUNTIF([.B45];&quot;&gt;0&quot;)+COUNTIF([.D45];&quot;&gt;0&quot;)+COUNTIF([.F45];&quot;&gt;0&quot;)+COUNTIF([.H45];&quot;&gt;0&quot;)+COUNTIF([.J45];&quot;&gt;0&quot;)" office:value-type="float" office:value="1" calcext:value-type="float">
            <text:p>1</text:p>
          </table:table-cell>
          <table:table-cell table:style-name="ce200" table:formula="of:=[.M45]/[.X45]" office:value-type="float" office:value="4" calcext:value-type="float">
            <text:p>4.0</text:p>
          </table:table-cell>
          <table:table-cell table:style-name="ce204" table:formula="of:=RANK([.Y45];[.$Y$4:.$Y$133])" office:value-type="float" office:value="39" calcext:value-type="float">
            <text:p>39º</text:p>
          </table:table-cell>
          <table:table-cell table:style-name="ce208" table:formula="of:=[.U45]/[.X45]" office:value-type="float" office:value="6" calcext:value-type="float">
            <text:p>6.0</text:p>
          </table:table-cell>
          <table:table-cell table:style-name="ce212" table:formula="of:=RANK([.AA45];[.$AA$4:.$AA$133])" office:value-type="float" office:value="36" calcext:value-type="float">
            <text:p>36º</text:p>
          </table:table-cell>
          <table:table-cell table:number-columns-repeated="996"/>
        </table:table-row>
        <table:table-row table:style-name="ro10">
          <table:table-cell table:style-name="ce126" office:value-type="string" calcext:value-type="string">
            <text:p>FLÁVIO</text:p>
          </table:table-cell>
          <table:table-cell table:style-name="ce134" office:value-type="string" calcext:value-type="string">
            <text:p>-</text:p>
          </table:table-cell>
          <table:table-cell table:style-name="ce139" table:formula="of:=IF([.B46]=20;1;IF([.B46]=19;2;IF([.B46]=19;2;IF([.B46]=18;3;IF([.B46]=17;4;IF([.B46]=16;5;IF([.B46]=15;6;IF([.B46]=14;7;IF([.B46]=13;8;IF([.B46]=12;9;IF([.B46]=11;10;IF([.B46]=10;11;IF([.B46]=9;12;IF([.B46]=8;13;IF([.B46]=7;14;IF([.B46]=6;15;IF([.B46]=5;16;IF([.B46]=4;17;IF([.B46]=3;18;IF([.B46]=2;19;IF([.B46]=1;20;0)))))))))))))))))))))" office:value-type="float" office:value="0" calcext:value-type="float">
            <text:p>0</text:p>
          </table:table-cell>
          <table:table-cell table:style-name="ce134" office:value-type="float" office:value="10" calcext:value-type="float">
            <text:p>10º</text:p>
          </table:table-cell>
          <table:table-cell table:style-name="ce139" table:formula="of:=IF([.D46]=20;1;IF([.D46]=19;2;IF([.D46]=19;2;IF([.D46]=18;3;IF([.D46]=17;4;IF([.D46]=16;5;IF([.D46]=15;6;IF([.D46]=14;7;IF([.D46]=13;8;IF([.D46]=12;9;IF([.D46]=11;10;IF([.D46]=10;11;IF([.D46]=9;12;IF([.D46]=8;13;IF([.D46]=7;14;IF([.D46]=6;15;IF([.D46]=5;16;IF([.D46]=4;17;IF([.D46]=3;18;IF([.D46]=2;19;IF([.D46]=1;20;0)))))))))))))))))))))" office:value-type="float" office:value="11" calcext:value-type="float">
            <text:p>11</text:p>
          </table:table-cell>
          <table:table-cell table:style-name="ce134" office:value-type="float" office:value="25" calcext:value-type="float">
            <text:p>25º</text:p>
          </table:table-cell>
          <table:table-cell table:style-name="ce139" table:formula="of:=IF([.F46]=20;1;IF([.F46]=19;2;IF([.F46]=19;2;IF([.F46]=18;3;IF([.F46]=17;4;IF([.F46]=16;5;IF([.F46]=15;6;IF([.F46]=14;7;IF([.F46]=13;8;IF([.F46]=12;9;IF([.F46]=11;10;IF([.F46]=10;11;IF([.F46]=9;12;IF([.F46]=8;13;IF([.F46]=7;14;IF([.F46]=6;15;IF([.F46]=5;16;IF([.F46]=4;17;IF([.F46]=3;18;IF([.F46]=2;19;IF([.F46]=1;20;0)))))))))))))))))))))" office:value-type="float" office:value="0" calcext:value-type="float">
            <text:p>0</text:p>
          </table:table-cell>
          <table:table-cell table:style-name="ce134" office:value-type="float" office:value="84" calcext:value-type="float">
            <text:p>84º</text:p>
          </table:table-cell>
          <table:table-cell table:style-name="ce139" table:formula="of:=IF([.H46]=20;1;IF([.H46]=19;2;IF([.H46]=19;2;IF([.H46]=18;3;IF([.H46]=17;4;IF([.H46]=16;5;IF([.H46]=15;6;IF([.H46]=14;7;IF([.H46]=13;8;IF([.H46]=12;9;IF([.H46]=11;10;IF([.H46]=10;11;IF([.H46]=9;12;IF([.H46]=8;13;IF([.H46]=7;14;IF([.H46]=6;15;IF([.H46]=5;16;IF([.H46]=4;17;IF([.H46]=3;18;IF([.H46]=2;19;IF([.H46]=1;20;0)))))))))))))))))))))" office:value-type="float" office:value="0" calcext:value-type="float">
            <text:p>0</text:p>
          </table:table-cell>
          <table:table-cell table:style-name="ce134" office:value-type="string" calcext:value-type="string">
            <text:p>-</text:p>
          </table:table-cell>
          <table:table-cell table:style-name="ce145" table:formula="of:=IF([.J46]=20;1;IF([.J46]=19;2;IF([.J46]=19;2;IF([.J46]=18;3;IF([.J46]=17;4;IF([.J46]=16;5;IF([.J46]=15;6;IF([.J46]=14;7;IF([.J46]=13;8;IF([.J46]=12;9;IF([.J46]=11;10;IF([.J46]=10;11;IF([.J46]=9;12;IF([.J46]=8;13;IF([.J46]=7;14;IF([.J46]=6;15;IF([.J46]=5;16;IF([.J46]=4;17;IF([.J46]=3;18;IF([.J46]=2;19;IF([.J46]=1;20;0)))))))))))))))))))))" office:value-type="float" office:value="0" calcext:value-type="float">
            <text:p>0</text:p>
          </table:table-cell>
          <table:table-cell table:style-name="ce150"/>
          <table:table-cell table:style-name="ce158" table:formula="of:=SUM([.C46];[.E46];[.G46];[.I46];[.K46])" office:value-type="float" office:value="11" calcext:value-type="float">
            <text:p>11</text:p>
          </table:table-cell>
          <table:table-cell table:style-name="ce160" table:formula="of:=RANK([.M46];[.$M$4:.$M$133])" office:value-type="float" office:value="43" calcext:value-type="float">
            <text:p>43º</text:p>
          </table:table-cell>
          <table:table-cell table:style-name="ce161"/>
          <table:table-cell table:style-name="ce169" office:value-type="string" calcext:value-type="string">
            <text:p>-</text:p>
          </table:table-cell>
          <table:table-cell table:style-name="ce175" office:value-type="float" office:value="4" calcext:value-type="float">
            <text:p>4</text:p>
          </table:table-cell>
          <table:table-cell table:style-name="ce175" office:value-type="float" office:value="9" calcext:value-type="float">
            <text:p>9</text:p>
          </table:table-cell>
          <table:table-cell table:style-name="ce180" office:value-type="float" office:value="4" calcext:value-type="float">
            <text:p>4</text:p>
          </table:table-cell>
          <table:table-cell table:style-name="ce185" office:value-type="string" calcext:value-type="string">
            <text:p>-</text:p>
          </table:table-cell>
          <table:table-cell table:style-name="ce188" table:formula="of:=SUM([.P46:.T46])" office:value-type="float" office:value="17" calcext:value-type="float">
            <text:p>17</text:p>
          </table:table-cell>
          <table:table-cell table:style-name="ce189" table:formula="of:=RANK([.U46];[.$U$4:.$U$133])" office:value-type="float" office:value="38" calcext:value-type="float">
            <text:p>38º</text:p>
          </table:table-cell>
          <table:table-cell table:style-name="ce161"/>
          <table:table-cell table:style-name="ce193" table:formula="of:=COUNTIF([.B46];&quot;&gt;0&quot;)+COUNTIF([.D46];&quot;&gt;0&quot;)+COUNTIF([.F46];&quot;&gt;0&quot;)+COUNTIF([.H46];&quot;&gt;0&quot;)+COUNTIF([.J46];&quot;&gt;0&quot;)" office:value-type="float" office:value="3" calcext:value-type="float">
            <text:p>3</text:p>
          </table:table-cell>
          <table:table-cell table:style-name="ce200" table:formula="of:=[.M46]/[.X46]" office:value-type="float" office:value="3.66666666666667" calcext:value-type="float">
            <text:p>3.7</text:p>
          </table:table-cell>
          <table:table-cell table:style-name="ce204" table:formula="of:=RANK([.Y46];[.$Y$4:.$Y$133])" office:value-type="float" office:value="47" calcext:value-type="float">
            <text:p>47º</text:p>
          </table:table-cell>
          <table:table-cell table:style-name="ce208" table:formula="of:=[.U46]/[.X46]" office:value-type="float" office:value="5.66666666666667" calcext:value-type="float">
            <text:p>5.7</text:p>
          </table:table-cell>
          <table:table-cell table:style-name="ce212" table:formula="of:=RANK([.AA46];[.$AA$4:.$AA$133])" office:value-type="float" office:value="54" calcext:value-type="float">
            <text:p>54º</text:p>
          </table:table-cell>
          <table:table-cell table:number-columns-repeated="996"/>
        </table:table-row>
        <table:table-row table:style-name="ro10">
          <table:table-cell table:style-name="ce126" office:value-type="string" calcext:value-type="string">
            <text:p>FRANCE</text:p>
          </table:table-cell>
          <table:table-cell table:style-name="ce134" office:value-type="float" office:value="16" calcext:value-type="float">
            <text:p>16º</text:p>
          </table:table-cell>
          <table:table-cell table:style-name="ce139" table:formula="of:=IF([.B47]=20;1;IF([.B47]=19;2;IF([.B47]=19;2;IF([.B47]=18;3;IF([.B47]=17;4;IF([.B47]=16;5;IF([.B47]=15;6;IF([.B47]=14;7;IF([.B47]=13;8;IF([.B47]=12;9;IF([.B47]=11;10;IF([.B47]=10;11;IF([.B47]=9;12;IF([.B47]=8;13;IF([.B47]=7;14;IF([.B47]=6;15;IF([.B47]=5;16;IF([.B47]=4;17;IF([.B47]=3;18;IF([.B47]=2;19;IF([.B47]=1;20;0)))))))))))))))))))))" office:value-type="float" office:value="5" calcext:value-type="float">
            <text:p>5</text:p>
          </table:table-cell>
          <table:table-cell table:style-name="ce134" office:value-type="float" office:value="12" calcext:value-type="float">
            <text:p>12º</text:p>
          </table:table-cell>
          <table:table-cell table:style-name="ce139" table:formula="of:=IF([.D47]=20;1;IF([.D47]=19;2;IF([.D47]=19;2;IF([.D47]=18;3;IF([.D47]=17;4;IF([.D47]=16;5;IF([.D47]=15;6;IF([.D47]=14;7;IF([.D47]=13;8;IF([.D47]=12;9;IF([.D47]=11;10;IF([.D47]=10;11;IF([.D47]=9;12;IF([.D47]=8;13;IF([.D47]=7;14;IF([.D47]=6;15;IF([.D47]=5;16;IF([.D47]=4;17;IF([.D47]=3;18;IF([.D47]=2;19;IF([.D47]=1;20;0)))))))))))))))))))))" office:value-type="float" office:value="9" calcext:value-type="float">
            <text:p>9</text:p>
          </table:table-cell>
          <table:table-cell table:style-name="ce134"/>
          <table:table-cell table:style-name="ce139" table:formula="of:=IF([.F47]=20;1;IF([.F47]=19;2;IF([.F47]=19;2;IF([.F47]=18;3;IF([.F47]=17;4;IF([.F47]=16;5;IF([.F47]=15;6;IF([.F47]=14;7;IF([.F47]=13;8;IF([.F47]=12;9;IF([.F47]=11;10;IF([.F47]=10;11;IF([.F47]=9;12;IF([.F47]=8;13;IF([.F47]=7;14;IF([.F47]=6;15;IF([.F47]=5;16;IF([.F47]=4;17;IF([.F47]=3;18;IF([.F47]=2;19;IF([.F47]=1;20;0)))))))))))))))))))))" office:value-type="float" office:value="0" calcext:value-type="float">
            <text:p>0</text:p>
          </table:table-cell>
          <table:table-cell table:style-name="ce134"/>
          <table:table-cell table:style-name="ce139" table:formula="of:=IF([.H47]=20;1;IF([.H47]=19;2;IF([.H47]=19;2;IF([.H47]=18;3;IF([.H47]=17;4;IF([.H47]=16;5;IF([.H47]=15;6;IF([.H47]=14;7;IF([.H47]=13;8;IF([.H47]=12;9;IF([.H47]=11;10;IF([.H47]=10;11;IF([.H47]=9;12;IF([.H47]=8;13;IF([.H47]=7;14;IF([.H47]=6;15;IF([.H47]=5;16;IF([.H47]=4;17;IF([.H47]=3;18;IF([.H47]=2;19;IF([.H47]=1;20;0)))))))))))))))))))))" office:value-type="float" office:value="0" calcext:value-type="float">
            <text:p>0</text:p>
          </table:table-cell>
          <table:table-cell table:style-name="ce134"/>
          <table:table-cell table:style-name="ce145" table:formula="of:=IF([.J47]=20;1;IF([.J47]=19;2;IF([.J47]=19;2;IF([.J47]=18;3;IF([.J47]=17;4;IF([.J47]=16;5;IF([.J47]=15;6;IF([.J47]=14;7;IF([.J47]=13;8;IF([.J47]=12;9;IF([.J47]=11;10;IF([.J47]=10;11;IF([.J47]=9;12;IF([.J47]=8;13;IF([.J47]=7;14;IF([.J47]=6;15;IF([.J47]=5;16;IF([.J47]=4;17;IF([.J47]=3;18;IF([.J47]=2;19;IF([.J47]=1;20;0)))))))))))))))))))))" office:value-type="float" office:value="0" calcext:value-type="float">
            <text:p>0</text:p>
          </table:table-cell>
          <table:table-cell table:style-name="ce150"/>
          <table:table-cell table:style-name="ce158" table:formula="of:=SUM([.C47];[.E47];[.G47];[.I47];[.K47])" office:value-type="float" office:value="14" calcext:value-type="float">
            <text:p>14</text:p>
          </table:table-cell>
          <table:table-cell table:style-name="ce160" table:formula="of:=RANK([.M47];[.$M$4:.$M$133])" office:value-type="float" office:value="37" calcext:value-type="float">
            <text:p>37º</text:p>
          </table:table-cell>
          <table:table-cell table:style-name="ce161"/>
          <table:table-cell table:style-name="ce169" office:value-type="float" office:value="7" calcext:value-type="float">
            <text:p>7</text:p>
          </table:table-cell>
          <table:table-cell table:style-name="ce175" office:value-type="float" office:value="6" calcext:value-type="float">
            <text:p>6</text:p>
          </table:table-cell>
          <table:table-cell table:style-name="ce175" office:value-type="string" calcext:value-type="string">
            <text:p>-</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47:.T47])" office:value-type="float" office:value="13" calcext:value-type="float">
            <text:p>13</text:p>
          </table:table-cell>
          <table:table-cell table:style-name="ce189" table:formula="of:=RANK([.U47];[.$U$4:.$U$133])" office:value-type="float" office:value="53" calcext:value-type="float">
            <text:p>53º</text:p>
          </table:table-cell>
          <table:table-cell table:style-name="ce161"/>
          <table:table-cell table:style-name="ce193" table:formula="of:=COUNTIF([.B47];&quot;&gt;0&quot;)+COUNTIF([.D47];&quot;&gt;0&quot;)+COUNTIF([.F47];&quot;&gt;0&quot;)+COUNTIF([.H47];&quot;&gt;0&quot;)+COUNTIF([.J47];&quot;&gt;0&quot;)" office:value-type="float" office:value="2" calcext:value-type="float">
            <text:p>2</text:p>
          </table:table-cell>
          <table:table-cell table:style-name="ce200" table:formula="of:=[.M47]/[.X47]" office:value-type="float" office:value="7" calcext:value-type="float">
            <text:p>7.0</text:p>
          </table:table-cell>
          <table:table-cell table:style-name="ce204" table:formula="of:=RANK([.Y47];[.$Y$4:.$Y$133])" office:value-type="float" office:value="14" calcext:value-type="float">
            <text:p>14º</text:p>
          </table:table-cell>
          <table:table-cell table:style-name="ce208" table:formula="of:=[.U47]/[.X47]" office:value-type="float" office:value="6.5" calcext:value-type="float">
            <text:p>6.5</text:p>
          </table:table-cell>
          <table:table-cell table:style-name="ce212" table:formula="of:=RANK([.AA47];[.$AA$4:.$AA$133])" office:value-type="float" office:value="26" calcext:value-type="float">
            <text:p>26º</text:p>
          </table:table-cell>
          <table:table-cell table:number-columns-repeated="996"/>
        </table:table-row>
        <table:table-row table:style-name="ro10">
          <table:table-cell table:style-name="ce126" office:value-type="string" calcext:value-type="string">
            <text:p>GABRIEL</text:p>
          </table:table-cell>
          <table:table-cell table:style-name="ce134" office:value-type="float" office:value="9" calcext:value-type="float">
            <text:p>9º</text:p>
          </table:table-cell>
          <table:table-cell table:style-name="ce139" table:formula="of:=IF([.B48]=20;1;IF([.B48]=19;2;IF([.B48]=19;2;IF([.B48]=18;3;IF([.B48]=17;4;IF([.B48]=16;5;IF([.B48]=15;6;IF([.B48]=14;7;IF([.B48]=13;8;IF([.B48]=12;9;IF([.B48]=11;10;IF([.B48]=10;11;IF([.B48]=9;12;IF([.B48]=8;13;IF([.B48]=7;14;IF([.B48]=6;15;IF([.B48]=5;16;IF([.B48]=4;17;IF([.B48]=3;18;IF([.B48]=2;19;IF([.B48]=1;20;0)))))))))))))))))))))" office:value-type="float" office:value="12" calcext:value-type="float">
            <text:p>12</text:p>
          </table:table-cell>
          <table:table-cell table:style-name="ce134" office:value-type="float" office:value="54" calcext:value-type="float">
            <text:p>54º</text:p>
          </table:table-cell>
          <table:table-cell table:style-name="ce139" table:formula="of:=IF([.D48]=20;1;IF([.D48]=19;2;IF([.D48]=19;2;IF([.D48]=18;3;IF([.D48]=17;4;IF([.D48]=16;5;IF([.D48]=15;6;IF([.D48]=14;7;IF([.D48]=13;8;IF([.D48]=12;9;IF([.D48]=11;10;IF([.D48]=10;11;IF([.D48]=9;12;IF([.D48]=8;13;IF([.D48]=7;14;IF([.D48]=6;15;IF([.D48]=5;16;IF([.D48]=4;17;IF([.D48]=3;18;IF([.D48]=2;19;IF([.D48]=1;20;0)))))))))))))))))))))" office:value-type="float" office:value="0" calcext:value-type="float">
            <text:p>0</text:p>
          </table:table-cell>
          <table:table-cell table:style-name="ce134" office:value-type="float" office:value="2" calcext:value-type="float">
            <text:p>2º</text:p>
          </table:table-cell>
          <table:table-cell table:style-name="ce139" table:formula="of:=IF([.F48]=20;1;IF([.F48]=19;2;IF([.F48]=19;2;IF([.F48]=18;3;IF([.F48]=17;4;IF([.F48]=16;5;IF([.F48]=15;6;IF([.F48]=14;7;IF([.F48]=13;8;IF([.F48]=12;9;IF([.F48]=11;10;IF([.F48]=10;11;IF([.F48]=9;12;IF([.F48]=8;13;IF([.F48]=7;14;IF([.F48]=6;15;IF([.F48]=5;16;IF([.F48]=4;17;IF([.F48]=3;18;IF([.F48]=2;19;IF([.F48]=1;20;0)))))))))))))))))))))" office:value-type="float" office:value="19" calcext:value-type="float">
            <text:p>19</text:p>
          </table:table-cell>
          <table:table-cell table:style-name="ce134" office:value-type="float" office:value="92" calcext:value-type="float">
            <text:p>92º</text:p>
          </table:table-cell>
          <table:table-cell table:style-name="ce139" table:formula="of:=IF([.H48]=20;1;IF([.H48]=19;2;IF([.H48]=19;2;IF([.H48]=18;3;IF([.H48]=17;4;IF([.H48]=16;5;IF([.H48]=15;6;IF([.H48]=14;7;IF([.H48]=13;8;IF([.H48]=12;9;IF([.H48]=11;10;IF([.H48]=10;11;IF([.H48]=9;12;IF([.H48]=8;13;IF([.H48]=7;14;IF([.H48]=6;15;IF([.H48]=5;16;IF([.H48]=4;17;IF([.H48]=3;18;IF([.H48]=2;19;IF([.H48]=1;20;0)))))))))))))))))))))" office:value-type="float" office:value="0" calcext:value-type="float">
            <text:p>0</text:p>
          </table:table-cell>
          <table:table-cell table:style-name="ce134" office:value-type="float" office:value="19" calcext:value-type="float">
            <text:p>19º</text:p>
          </table:table-cell>
          <table:table-cell table:style-name="ce145" table:formula="of:=IF([.J48]=20;1;IF([.J48]=19;2;IF([.J48]=19;2;IF([.J48]=18;3;IF([.J48]=17;4;IF([.J48]=16;5;IF([.J48]=15;6;IF([.J48]=14;7;IF([.J48]=13;8;IF([.J48]=12;9;IF([.J48]=11;10;IF([.J48]=10;11;IF([.J48]=9;12;IF([.J48]=8;13;IF([.J48]=7;14;IF([.J48]=6;15;IF([.J48]=5;16;IF([.J48]=4;17;IF([.J48]=3;18;IF([.J48]=2;19;IF([.J48]=1;20;0)))))))))))))))))))))" office:value-type="float" office:value="2" calcext:value-type="float">
            <text:p>2</text:p>
          </table:table-cell>
          <table:table-cell table:style-name="ce150"/>
          <table:table-cell table:style-name="ce158" table:formula="of:=SUM([.C48];[.E48];[.G48];[.I48];[.K48])" office:value-type="float" office:value="33" calcext:value-type="float">
            <text:p>33</text:p>
          </table:table-cell>
          <table:table-cell table:style-name="ce160" table:formula="of:=RANK([.M48];[.$M$4:.$M$133])" office:value-type="float" office:value="5" calcext:value-type="float">
            <text:p>5º</text:p>
          </table:table-cell>
          <table:table-cell table:style-name="ce161"/>
          <table:table-cell table:style-name="ce169" office:value-type="float" office:value="6" calcext:value-type="float">
            <text:p>6</text:p>
          </table:table-cell>
          <table:table-cell table:style-name="ce175" office:value-type="float" office:value="3" calcext:value-type="float">
            <text:p>3</text:p>
          </table:table-cell>
          <table:table-cell table:style-name="ce175" office:value-type="float" office:value="12" calcext:value-type="float">
            <text:p>12</text:p>
          </table:table-cell>
          <table:table-cell table:style-name="ce180" office:value-type="float" office:value="3" calcext:value-type="float">
            <text:p>3</text:p>
          </table:table-cell>
          <table:table-cell table:style-name="ce185" office:value-type="float" office:value="4" calcext:value-type="float">
            <text:p>4</text:p>
          </table:table-cell>
          <table:table-cell table:style-name="ce188" table:formula="of:=SUM([.P48:.T48])" office:value-type="float" office:value="28" calcext:value-type="float">
            <text:p>28</text:p>
          </table:table-cell>
          <table:table-cell table:style-name="ce189" table:formula="of:=RANK([.U48];[.$U$4:.$U$133])" office:value-type="float" office:value="10" calcext:value-type="float">
            <text:p>10º</text:p>
          </table:table-cell>
          <table:table-cell table:style-name="ce161"/>
          <table:table-cell table:style-name="ce193" table:formula="of:=COUNTIF([.B48];&quot;&gt;0&quot;)+COUNTIF([.D48];&quot;&gt;0&quot;)+COUNTIF([.F48];&quot;&gt;0&quot;)+COUNTIF([.H48];&quot;&gt;0&quot;)+COUNTIF([.J48];&quot;&gt;0&quot;)" office:value-type="float" office:value="5" calcext:value-type="float">
            <text:p>5</text:p>
          </table:table-cell>
          <table:table-cell table:style-name="ce200" table:formula="of:=[.M48]/[.X48]" office:value-type="float" office:value="6.6" calcext:value-type="float">
            <text:p>6.6</text:p>
          </table:table-cell>
          <table:table-cell table:style-name="ce204" table:formula="of:=RANK([.Y48];[.$Y$4:.$Y$133])" office:value-type="float" office:value="16" calcext:value-type="float">
            <text:p>16º</text:p>
          </table:table-cell>
          <table:table-cell table:style-name="ce208" table:formula="of:=[.U48]/[.X48]" office:value-type="float" office:value="5.6" calcext:value-type="float">
            <text:p>5.6</text:p>
          </table:table-cell>
          <table:table-cell table:style-name="ce212" table:formula="of:=RANK([.AA48];[.$AA$4:.$AA$133])" office:value-type="float" office:value="57" calcext:value-type="float">
            <text:p>57º</text:p>
          </table:table-cell>
          <table:table-cell table:number-columns-repeated="996"/>
        </table:table-row>
        <table:table-row table:style-name="ro10">
          <table:table-cell table:style-name="ce126" office:value-type="string" calcext:value-type="string">
            <text:p>GUILHERME e GABRIEL</text:p>
          </table:table-cell>
          <table:table-cell table:style-name="ce134" office:value-type="string" calcext:value-type="string">
            <text:p>-</text:p>
          </table:table-cell>
          <table:table-cell table:style-name="ce139" table:formula="of:=IF([.B49]=20;1;IF([.B49]=19;2;IF([.B49]=19;2;IF([.B49]=18;3;IF([.B49]=17;4;IF([.B49]=16;5;IF([.B49]=15;6;IF([.B49]=14;7;IF([.B49]=13;8;IF([.B49]=12;9;IF([.B49]=11;10;IF([.B49]=10;11;IF([.B49]=9;12;IF([.B49]=8;13;IF([.B49]=7;14;IF([.B49]=6;15;IF([.B49]=5;16;IF([.B49]=4;17;IF([.B49]=3;18;IF([.B49]=2;19;IF([.B49]=1;20;0)))))))))))))))))))))" office:value-type="float" office:value="0" calcext:value-type="float">
            <text:p>0</text:p>
          </table:table-cell>
          <table:table-cell table:style-name="ce134" office:value-type="string" calcext:value-type="string">
            <text:p>-</text:p>
          </table:table-cell>
          <table:table-cell table:style-name="ce139" table:formula="of:=IF([.D49]=20;1;IF([.D49]=19;2;IF([.D49]=19;2;IF([.D49]=18;3;IF([.D49]=17;4;IF([.D49]=16;5;IF([.D49]=15;6;IF([.D49]=14;7;IF([.D49]=13;8;IF([.D49]=12;9;IF([.D49]=11;10;IF([.D49]=10;11;IF([.D49]=9;12;IF([.D49]=8;13;IF([.D49]=7;14;IF([.D49]=6;15;IF([.D49]=5;16;IF([.D49]=4;17;IF([.D49]=3;18;IF([.D49]=2;19;IF([.D49]=1;20;0)))))))))))))))))))))" office:value-type="float" office:value="0" calcext:value-type="float">
            <text:p>0</text:p>
          </table:table-cell>
          <table:table-cell table:style-name="ce134" office:value-type="float" office:value="13" calcext:value-type="float">
            <text:p>13º</text:p>
          </table:table-cell>
          <table:table-cell table:style-name="ce139" table:formula="of:=IF([.F49]=20;1;IF([.F49]=19;2;IF([.F49]=19;2;IF([.F49]=18;3;IF([.F49]=17;4;IF([.F49]=16;5;IF([.F49]=15;6;IF([.F49]=14;7;IF([.F49]=13;8;IF([.F49]=12;9;IF([.F49]=11;10;IF([.F49]=10;11;IF([.F49]=9;12;IF([.F49]=8;13;IF([.F49]=7;14;IF([.F49]=6;15;IF([.F49]=5;16;IF([.F49]=4;17;IF([.F49]=3;18;IF([.F49]=2;19;IF([.F49]=1;20;0)))))))))))))))))))))" office:value-type="float" office:value="8" calcext:value-type="float">
            <text:p>8</text:p>
          </table:table-cell>
          <table:table-cell table:style-name="ce134" office:value-type="float" office:value="65" calcext:value-type="float">
            <text:p>65º</text:p>
          </table:table-cell>
          <table:table-cell table:style-name="ce139" table:formula="of:=IF([.H49]=20;1;IF([.H49]=19;2;IF([.H49]=19;2;IF([.H49]=18;3;IF([.H49]=17;4;IF([.H49]=16;5;IF([.H49]=15;6;IF([.H49]=14;7;IF([.H49]=13;8;IF([.H49]=12;9;IF([.H49]=11;10;IF([.H49]=10;11;IF([.H49]=9;12;IF([.H49]=8;13;IF([.H49]=7;14;IF([.H49]=6;15;IF([.H49]=5;16;IF([.H49]=4;17;IF([.H49]=3;18;IF([.H49]=2;19;IF([.H49]=1;20;0)))))))))))))))))))))" office:value-type="float" office:value="0" calcext:value-type="float">
            <text:p>0</text:p>
          </table:table-cell>
          <table:table-cell table:style-name="ce134" office:value-type="string" calcext:value-type="string">
            <text:p>?</text:p>
          </table:table-cell>
          <table:table-cell table:style-name="ce145" table:formula="of:=IF([.J49]=20;1;IF([.J49]=19;2;IF([.J49]=19;2;IF([.J49]=18;3;IF([.J49]=17;4;IF([.J49]=16;5;IF([.J49]=15;6;IF([.J49]=14;7;IF([.J49]=13;8;IF([.J49]=12;9;IF([.J49]=11;10;IF([.J49]=10;11;IF([.J49]=9;12;IF([.J49]=8;13;IF([.J49]=7;14;IF([.J49]=6;15;IF([.J49]=5;16;IF([.J49]=4;17;IF([.J49]=3;18;IF([.J49]=2;19;IF([.J49]=1;20;0)))))))))))))))))))))" office:value-type="float" office:value="0" calcext:value-type="float">
            <text:p>0</text:p>
          </table:table-cell>
          <table:table-cell table:style-name="ce154"/>
          <table:table-cell table:style-name="ce158" table:formula="of:=SUM([.C49];[.E49];[.G49];[.I49];[.K49])" office:value-type="float" office:value="8" calcext:value-type="float">
            <text:p>8</text:p>
          </table:table-cell>
          <table:table-cell table:style-name="ce160" table:formula="of:=RANK([.M49];[.$M$4:.$M$133])" office:value-type="float" office:value="51" calcext:value-type="float">
            <text:p>51º</text:p>
          </table:table-cell>
          <table:table-cell table:style-name="ce163"/>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6" calcext:value-type="float">
            <text:p>6</text:p>
          </table:table-cell>
          <table:table-cell table:style-name="ce180" office:value-type="float" office:value="11" calcext:value-type="float">
            <text:p>11</text:p>
          </table:table-cell>
          <table:table-cell table:style-name="ce185" office:value-type="string" calcext:value-type="string">
            <text:p>?</text:p>
          </table:table-cell>
          <table:table-cell table:style-name="ce188" table:formula="of:=SUM([.P49:.T49])" office:value-type="float" office:value="17" calcext:value-type="float">
            <text:p>17</text:p>
          </table:table-cell>
          <table:table-cell table:style-name="ce189" table:formula="of:=RANK([.U49];[.$U$4:.$U$133])" office:value-type="float" office:value="38" calcext:value-type="float">
            <text:p>38º</text:p>
          </table:table-cell>
          <table:table-cell table:style-name="ce163"/>
          <table:table-cell table:style-name="ce193" table:formula="of:=COUNTIF([.B49];&quot;&gt;0&quot;)+COUNTIF([.D49];&quot;&gt;0&quot;)+COUNTIF([.F49];&quot;&gt;0&quot;)+COUNTIF([.H49];&quot;&gt;0&quot;)+COUNTIF([.J49];&quot;&gt;0&quot;)" office:value-type="float" office:value="2" calcext:value-type="float">
            <text:p>2</text:p>
          </table:table-cell>
          <table:table-cell table:style-name="ce200" table:formula="of:=[.M49]/[.X49]" office:value-type="float" office:value="4" calcext:value-type="float">
            <text:p>4.0</text:p>
          </table:table-cell>
          <table:table-cell table:style-name="ce204" table:formula="of:=RANK([.Y49];[.$Y$4:.$Y$133])" office:value-type="float" office:value="39" calcext:value-type="float">
            <text:p>39º</text:p>
          </table:table-cell>
          <table:table-cell table:style-name="ce208" table:formula="of:=[.U49]/[.X49]" office:value-type="float" office:value="8.5" calcext:value-type="float">
            <text:p>8.5</text:p>
          </table:table-cell>
          <table:table-cell table:style-name="ce212" table:formula="of:=RANK([.AA49];[.$AA$4:.$AA$133])" office:value-type="float" office:value="5" calcext:value-type="float">
            <text:p>5º</text:p>
          </table:table-cell>
          <table:table-cell table:number-columns-repeated="996"/>
        </table:table-row>
        <table:table-row table:style-name="ro10">
          <table:table-cell table:style-name="ce126" office:value-type="string" calcext:value-type="string">
            <text:p>GABRIELILA</text:p>
          </table:table-cell>
          <table:table-cell table:style-name="ce134" office:value-type="string" calcext:value-type="string">
            <text:p>-</text:p>
          </table:table-cell>
          <table:table-cell table:style-name="ce139" table:formula="of:=IF([.B50]=20;1;IF([.B50]=19;2;IF([.B50]=19;2;IF([.B50]=18;3;IF([.B50]=17;4;IF([.B50]=16;5;IF([.B50]=15;6;IF([.B50]=14;7;IF([.B50]=13;8;IF([.B50]=12;9;IF([.B50]=11;10;IF([.B50]=10;11;IF([.B50]=9;12;IF([.B50]=8;13;IF([.B50]=7;14;IF([.B50]=6;15;IF([.B50]=5;16;IF([.B50]=4;17;IF([.B50]=3;18;IF([.B50]=2;19;IF([.B50]=1;20;0)))))))))))))))))))))" office:value-type="float" office:value="0" calcext:value-type="float">
            <text:p>0</text:p>
          </table:table-cell>
          <table:table-cell table:style-name="ce134" office:value-type="string" calcext:value-type="string">
            <text:p>-</text:p>
          </table:table-cell>
          <table:table-cell table:style-name="ce139" table:formula="of:=IF([.D50]=20;1;IF([.D50]=19;2;IF([.D50]=19;2;IF([.D50]=18;3;IF([.D50]=17;4;IF([.D50]=16;5;IF([.D50]=15;6;IF([.D50]=14;7;IF([.D50]=13;8;IF([.D50]=12;9;IF([.D50]=11;10;IF([.D50]=10;11;IF([.D50]=9;12;IF([.D50]=8;13;IF([.D50]=7;14;IF([.D50]=6;15;IF([.D50]=5;16;IF([.D50]=4;17;IF([.D50]=3;18;IF([.D50]=2;19;IF([.D50]=1;20;0)))))))))))))))))))))" office:value-type="float" office:value="0" calcext:value-type="float">
            <text:p>0</text:p>
          </table:table-cell>
          <table:table-cell table:style-name="ce134" office:value-type="string" calcext:value-type="string">
            <text:p>-</text:p>
          </table:table-cell>
          <table:table-cell table:style-name="ce139" table:formula="of:=IF([.F50]=20;1;IF([.F50]=19;2;IF([.F50]=19;2;IF([.F50]=18;3;IF([.F50]=17;4;IF([.F50]=16;5;IF([.F50]=15;6;IF([.F50]=14;7;IF([.F50]=13;8;IF([.F50]=12;9;IF([.F50]=11;10;IF([.F50]=10;11;IF([.F50]=9;12;IF([.F50]=8;13;IF([.F50]=7;14;IF([.F50]=6;15;IF([.F50]=5;16;IF([.F50]=4;17;IF([.F50]=3;18;IF([.F50]=2;19;IF([.F50]=1;20;0)))))))))))))))))))))" office:value-type="float" office:value="0" calcext:value-type="float">
            <text:p>0</text:p>
          </table:table-cell>
          <table:table-cell table:style-name="ce134" office:value-type="float" office:value="53" calcext:value-type="float">
            <text:p>53º</text:p>
          </table:table-cell>
          <table:table-cell table:style-name="ce139" table:formula="of:=IF([.H50]=20;1;IF([.H50]=19;2;IF([.H50]=19;2;IF([.H50]=18;3;IF([.H50]=17;4;IF([.H50]=16;5;IF([.H50]=15;6;IF([.H50]=14;7;IF([.H50]=13;8;IF([.H50]=12;9;IF([.H50]=11;10;IF([.H50]=10;11;IF([.H50]=9;12;IF([.H50]=8;13;IF([.H50]=7;14;IF([.H50]=6;15;IF([.H50]=5;16;IF([.H50]=4;17;IF([.H50]=3;18;IF([.H50]=2;19;IF([.H50]=1;20;0)))))))))))))))))))))" office:value-type="float" office:value="0" calcext:value-type="float">
            <text:p>0</text:p>
          </table:table-cell>
          <table:table-cell table:style-name="ce134" office:value-type="string" calcext:value-type="string">
            <text:p>-</text:p>
          </table:table-cell>
          <table:table-cell table:style-name="ce145" table:formula="of:=IF([.J50]=20;1;IF([.J50]=19;2;IF([.J50]=19;2;IF([.J50]=18;3;IF([.J50]=17;4;IF([.J50]=16;5;IF([.J50]=15;6;IF([.J50]=14;7;IF([.J50]=13;8;IF([.J50]=12;9;IF([.J50]=11;10;IF([.J50]=10;11;IF([.J50]=9;12;IF([.J50]=8;13;IF([.J50]=7;14;IF([.J50]=6;15;IF([.J50]=5;16;IF([.J50]=4;17;IF([.J50]=3;18;IF([.J50]=2;19;IF([.J50]=1;20;0)))))))))))))))))))))" office:value-type="float" office:value="0" calcext:value-type="float">
            <text:p>0</text:p>
          </table:table-cell>
          <table:table-cell table:style-name="ce150"/>
          <table:table-cell table:style-name="ce158" table:formula="of:=SUM([.C50];[.E50];[.G50];[.I50];[.K50])" office:value-type="float" office:value="0" calcext:value-type="float">
            <text:p>0</text:p>
          </table:table-cell>
          <table:table-cell table:style-name="ce160" table:formula="of:=RANK([.M50];[.$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5" calcext:value-type="float">
            <text:p>5</text:p>
          </table:table-cell>
          <table:table-cell table:style-name="ce185" office:value-type="string" calcext:value-type="string">
            <text:p>-</text:p>
          </table:table-cell>
          <table:table-cell table:style-name="ce188" table:formula="of:=SUM([.P50:.T50])" office:value-type="float" office:value="5" calcext:value-type="float">
            <text:p>5</text:p>
          </table:table-cell>
          <table:table-cell table:style-name="ce189" table:formula="of:=RANK([.U50];[.$U$4:.$U$133])" office:value-type="float" office:value="102" calcext:value-type="float">
            <text:p>102º</text:p>
          </table:table-cell>
          <table:table-cell table:style-name="ce161"/>
          <table:table-cell table:style-name="ce193" table:formula="of:=COUNTIF([.B50];&quot;&gt;0&quot;)+COUNTIF([.D50];&quot;&gt;0&quot;)+COUNTIF([.F50];&quot;&gt;0&quot;)+COUNTIF([.H50];&quot;&gt;0&quot;)+COUNTIF([.J50];&quot;&gt;0&quot;)" office:value-type="float" office:value="1" calcext:value-type="float">
            <text:p>1</text:p>
          </table:table-cell>
          <table:table-cell table:style-name="ce200" table:formula="of:=[.M50]/[.X50]" office:value-type="float" office:value="0" calcext:value-type="float">
            <text:p>0.0</text:p>
          </table:table-cell>
          <table:table-cell table:style-name="ce204" table:formula="of:=RANK([.Y50];[.$Y$4:.$Y$133])" office:value-type="float" office:value="71" calcext:value-type="float">
            <text:p>71º</text:p>
          </table:table-cell>
          <table:table-cell table:style-name="ce208" table:formula="of:=[.U50]/[.X50]" office:value-type="float" office:value="5" calcext:value-type="float">
            <text:p>5.0</text:p>
          </table:table-cell>
          <table:table-cell table:style-name="ce212" table:formula="of:=RANK([.AA50];[.$AA$4:.$AA$133])" office:value-type="float" office:value="68" calcext:value-type="float">
            <text:p>68º</text:p>
          </table:table-cell>
          <table:table-cell table:number-columns-repeated="996"/>
        </table:table-row>
        <table:table-row table:style-name="ro10">
          <table:table-cell table:style-name="ce126" office:value-type="string" calcext:value-type="string">
            <text:p>GÉRSON</text:p>
          </table:table-cell>
          <table:table-cell table:style-name="ce134" office:value-type="string" calcext:value-type="string">
            <text:p>-</text:p>
          </table:table-cell>
          <table:table-cell table:style-name="ce139" table:formula="of:=IF([.B51]=20;1;IF([.B51]=19;2;IF([.B51]=19;2;IF([.B51]=18;3;IF([.B51]=17;4;IF([.B51]=16;5;IF([.B51]=15;6;IF([.B51]=14;7;IF([.B51]=13;8;IF([.B51]=12;9;IF([.B51]=11;10;IF([.B51]=10;11;IF([.B51]=9;12;IF([.B51]=8;13;IF([.B51]=7;14;IF([.B51]=6;15;IF([.B51]=5;16;IF([.B51]=4;17;IF([.B51]=3;18;IF([.B51]=2;19;IF([.B51]=1;20;0)))))))))))))))))))))" office:value-type="float" office:value="0" calcext:value-type="float">
            <text:p>0</text:p>
          </table:table-cell>
          <table:table-cell table:style-name="ce134" office:value-type="string" calcext:value-type="string">
            <text:p>-</text:p>
          </table:table-cell>
          <table:table-cell table:style-name="ce139" table:formula="of:=IF([.D51]=20;1;IF([.D51]=19;2;IF([.D51]=19;2;IF([.D51]=18;3;IF([.D51]=17;4;IF([.D51]=16;5;IF([.D51]=15;6;IF([.D51]=14;7;IF([.D51]=13;8;IF([.D51]=12;9;IF([.D51]=11;10;IF([.D51]=10;11;IF([.D51]=9;12;IF([.D51]=8;13;IF([.D51]=7;14;IF([.D51]=6;15;IF([.D51]=5;16;IF([.D51]=4;17;IF([.D51]=3;18;IF([.D51]=2;19;IF([.D51]=1;20;0)))))))))))))))))))))" office:value-type="float" office:value="0" calcext:value-type="float">
            <text:p>0</text:p>
          </table:table-cell>
          <table:table-cell table:style-name="ce134" office:value-type="float" office:value="53" calcext:value-type="float">
            <text:p>53º</text:p>
          </table:table-cell>
          <table:table-cell table:style-name="ce139" table:formula="of:=IF([.F51]=20;1;IF([.F51]=19;2;IF([.F51]=19;2;IF([.F51]=18;3;IF([.F51]=17;4;IF([.F51]=16;5;IF([.F51]=15;6;IF([.F51]=14;7;IF([.F51]=13;8;IF([.F51]=12;9;IF([.F51]=11;10;IF([.F51]=10;11;IF([.F51]=9;12;IF([.F51]=8;13;IF([.F51]=7;14;IF([.F51]=6;15;IF([.F51]=5;16;IF([.F51]=4;17;IF([.F51]=3;18;IF([.F51]=2;19;IF([.F51]=1;20;0)))))))))))))))))))))" office:value-type="float" office:value="0" calcext:value-type="float">
            <text:p>0</text:p>
          </table:table-cell>
          <table:table-cell table:style-name="ce134" office:value-type="float" office:value="49" calcext:value-type="float">
            <text:p>49º</text:p>
          </table:table-cell>
          <table:table-cell table:style-name="ce139" table:formula="of:=IF([.H51]=20;1;IF([.H51]=19;2;IF([.H51]=19;2;IF([.H51]=18;3;IF([.H51]=17;4;IF([.H51]=16;5;IF([.H51]=15;6;IF([.H51]=14;7;IF([.H51]=13;8;IF([.H51]=12;9;IF([.H51]=11;10;IF([.H51]=10;11;IF([.H51]=9;12;IF([.H51]=8;13;IF([.H51]=7;14;IF([.H51]=6;15;IF([.H51]=5;16;IF([.H51]=4;17;IF([.H51]=3;18;IF([.H51]=2;19;IF([.H51]=1;20;0)))))))))))))))))))))" office:value-type="float" office:value="0" calcext:value-type="float">
            <text:p>0</text:p>
          </table:table-cell>
          <table:table-cell table:style-name="ce134" office:value-type="float" office:value="26" calcext:value-type="float">
            <text:p>26º</text:p>
          </table:table-cell>
          <table:table-cell table:style-name="ce145" table:formula="of:=IF([.J51]=20;1;IF([.J51]=19;2;IF([.J51]=19;2;IF([.J51]=18;3;IF([.J51]=17;4;IF([.J51]=16;5;IF([.J51]=15;6;IF([.J51]=14;7;IF([.J51]=13;8;IF([.J51]=12;9;IF([.J51]=11;10;IF([.J51]=10;11;IF([.J51]=9;12;IF([.J51]=8;13;IF([.J51]=7;14;IF([.J51]=6;15;IF([.J51]=5;16;IF([.J51]=4;17;IF([.J51]=3;18;IF([.J51]=2;19;IF([.J51]=1;20;0)))))))))))))))))))))" office:value-type="float" office:value="0" calcext:value-type="float">
            <text:p>0</text:p>
          </table:table-cell>
          <table:table-cell table:style-name="ce150"/>
          <table:table-cell table:style-name="ce158" table:formula="of:=SUM([.C51];[.E51];[.G51];[.I51];[.K51])" office:value-type="float" office:value="0" calcext:value-type="float">
            <text:p>0</text:p>
          </table:table-cell>
          <table:table-cell table:style-name="ce160" table:formula="of:=RANK([.M51];[.$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6" calcext:value-type="float">
            <text:p>6</text:p>
          </table:table-cell>
          <table:table-cell table:style-name="ce180" office:value-type="float" office:value="6" calcext:value-type="float">
            <text:p>6</text:p>
          </table:table-cell>
          <table:table-cell table:style-name="ce185" office:value-type="float" office:value="3" calcext:value-type="float">
            <text:p>3</text:p>
          </table:table-cell>
          <table:table-cell table:style-name="ce188" table:formula="of:=SUM([.P51:.T51])" office:value-type="float" office:value="15" calcext:value-type="float">
            <text:p>15</text:p>
          </table:table-cell>
          <table:table-cell table:style-name="ce189" table:formula="of:=RANK([.U51];[.$U$4:.$U$133])" office:value-type="float" office:value="48" calcext:value-type="float">
            <text:p>48º</text:p>
          </table:table-cell>
          <table:table-cell table:style-name="ce161"/>
          <table:table-cell table:style-name="ce193" table:formula="of:=COUNTIF([.B51];&quot;&gt;0&quot;)+COUNTIF([.D51];&quot;&gt;0&quot;)+COUNTIF([.F51];&quot;&gt;0&quot;)+COUNTIF([.H51];&quot;&gt;0&quot;)+COUNTIF([.J51];&quot;&gt;0&quot;)" office:value-type="float" office:value="3" calcext:value-type="float">
            <text:p>3</text:p>
          </table:table-cell>
          <table:table-cell table:style-name="ce200" table:formula="of:=[.M51]/[.X51]" office:value-type="float" office:value="0" calcext:value-type="float">
            <text:p>0.0</text:p>
          </table:table-cell>
          <table:table-cell table:style-name="ce204" table:formula="of:=RANK([.Y51];[.$Y$4:.$Y$133])" office:value-type="float" office:value="71" calcext:value-type="float">
            <text:p>71º</text:p>
          </table:table-cell>
          <table:table-cell table:style-name="ce208" table:formula="of:=[.U51]/[.X51]" office:value-type="float" office:value="5" calcext:value-type="float">
            <text:p>5.0</text:p>
          </table:table-cell>
          <table:table-cell table:style-name="ce212" table:formula="of:=RANK([.AA51];[.$AA$4:.$AA$133])" office:value-type="float" office:value="68" calcext:value-type="float">
            <text:p>68º</text:p>
          </table:table-cell>
          <table:table-cell table:number-columns-repeated="996"/>
        </table:table-row>
        <table:table-row table:style-name="ro10">
          <table:table-cell table:style-name="ce126" office:value-type="string" calcext:value-type="string">
            <text:p>GIORDANNA</text:p>
          </table:table-cell>
          <table:table-cell table:style-name="ce134" office:value-type="float" office:value="22" calcext:value-type="float">
            <text:p>22º</text:p>
          </table:table-cell>
          <table:table-cell table:style-name="ce139" table:formula="of:=IF([.B52]=20;1;IF([.B52]=19;2;IF([.B52]=19;2;IF([.B52]=18;3;IF([.B52]=17;4;IF([.B52]=16;5;IF([.B52]=15;6;IF([.B52]=14;7;IF([.B52]=13;8;IF([.B52]=12;9;IF([.B52]=11;10;IF([.B52]=10;11;IF([.B52]=9;12;IF([.B52]=8;13;IF([.B52]=7;14;IF([.B52]=6;15;IF([.B52]=5;16;IF([.B52]=4;17;IF([.B52]=3;18;IF([.B52]=2;19;IF([.B52]=1;20;0)))))))))))))))))))))" office:value-type="float" office:value="0" calcext:value-type="float">
            <text:p>0</text:p>
          </table:table-cell>
          <table:table-cell table:style-name="ce134" office:value-type="float" office:value="62" calcext:value-type="float">
            <text:p>62º</text:p>
          </table:table-cell>
          <table:table-cell table:style-name="ce139" table:formula="of:=IF([.D52]=20;1;IF([.D52]=19;2;IF([.D52]=19;2;IF([.D52]=18;3;IF([.D52]=17;4;IF([.D52]=16;5;IF([.D52]=15;6;IF([.D52]=14;7;IF([.D52]=13;8;IF([.D52]=12;9;IF([.D52]=11;10;IF([.D52]=10;11;IF([.D52]=9;12;IF([.D52]=8;13;IF([.D52]=7;14;IF([.D52]=6;15;IF([.D52]=5;16;IF([.D52]=4;17;IF([.D52]=3;18;IF([.D52]=2;19;IF([.D52]=1;20;0)))))))))))))))))))))" office:value-type="float" office:value="0" calcext:value-type="float">
            <text:p>0</text:p>
          </table:table-cell>
          <table:table-cell table:style-name="ce134" office:value-type="float" office:value="23" calcext:value-type="float">
            <text:p>23º</text:p>
          </table:table-cell>
          <table:table-cell table:style-name="ce139" table:formula="of:=IF([.F52]=20;1;IF([.F52]=19;2;IF([.F52]=19;2;IF([.F52]=18;3;IF([.F52]=17;4;IF([.F52]=16;5;IF([.F52]=15;6;IF([.F52]=14;7;IF([.F52]=13;8;IF([.F52]=12;9;IF([.F52]=11;10;IF([.F52]=10;11;IF([.F52]=9;12;IF([.F52]=8;13;IF([.F52]=7;14;IF([.F52]=6;15;IF([.F52]=5;16;IF([.F52]=4;17;IF([.F52]=3;18;IF([.F52]=2;19;IF([.F52]=1;20;0)))))))))))))))))))))" office:value-type="float" office:value="0" calcext:value-type="float">
            <text:p>0</text:p>
          </table:table-cell>
          <table:table-cell table:style-name="ce134" office:value-type="float" office:value="23" calcext:value-type="float">
            <text:p>23º</text:p>
          </table:table-cell>
          <table:table-cell table:style-name="ce139" table:formula="of:=IF([.H52]=20;1;IF([.H52]=19;2;IF([.H52]=19;2;IF([.H52]=18;3;IF([.H52]=17;4;IF([.H52]=16;5;IF([.H52]=15;6;IF([.H52]=14;7;IF([.H52]=13;8;IF([.H52]=12;9;IF([.H52]=11;10;IF([.H52]=10;11;IF([.H52]=9;12;IF([.H52]=8;13;IF([.H52]=7;14;IF([.H52]=6;15;IF([.H52]=5;16;IF([.H52]=4;17;IF([.H52]=3;18;IF([.H52]=2;19;IF([.H52]=1;20;0)))))))))))))))))))))" office:value-type="float" office:value="0" calcext:value-type="float">
            <text:p>0</text:p>
          </table:table-cell>
          <table:table-cell table:style-name="ce134" office:value-type="string" calcext:value-type="string">
            <text:p>-</text:p>
          </table:table-cell>
          <table:table-cell table:style-name="ce145" table:formula="of:=IF([.J52]=20;1;IF([.J52]=19;2;IF([.J52]=19;2;IF([.J52]=18;3;IF([.J52]=17;4;IF([.J52]=16;5;IF([.J52]=15;6;IF([.J52]=14;7;IF([.J52]=13;8;IF([.J52]=12;9;IF([.J52]=11;10;IF([.J52]=10;11;IF([.J52]=9;12;IF([.J52]=8;13;IF([.J52]=7;14;IF([.J52]=6;15;IF([.J52]=5;16;IF([.J52]=4;17;IF([.J52]=3;18;IF([.J52]=2;19;IF([.J52]=1;20;0)))))))))))))))))))))" office:value-type="float" office:value="0" calcext:value-type="float">
            <text:p>0</text:p>
          </table:table-cell>
          <table:table-cell table:style-name="ce154"/>
          <table:table-cell table:style-name="ce158" table:formula="of:=SUM([.C52];[.E52];[.G52];[.I52];[.K52])" office:value-type="float" office:value="0" calcext:value-type="float">
            <text:p>0</text:p>
          </table:table-cell>
          <table:table-cell table:style-name="ce160" table:formula="of:=RANK([.M52];[.$M$4:.$M$133])" office:value-type="float" office:value="71" calcext:value-type="float">
            <text:p>71º</text:p>
          </table:table-cell>
          <table:table-cell table:style-name="ce163"/>
          <table:table-cell table:style-name="ce169" office:value-type="float" office:value="4" calcext:value-type="float">
            <text:p>4</text:p>
          </table:table-cell>
          <table:table-cell table:style-name="ce175" office:value-type="float" office:value="4" calcext:value-type="float">
            <text:p>4</text:p>
          </table:table-cell>
          <table:table-cell table:style-name="ce175" office:value-type="float" office:value="12" calcext:value-type="float">
            <text:p>12</text:p>
          </table:table-cell>
          <table:table-cell table:style-name="ce180" office:value-type="float" office:value="6" calcext:value-type="float">
            <text:p>6</text:p>
          </table:table-cell>
          <table:table-cell table:style-name="ce185" office:value-type="string" calcext:value-type="string">
            <text:p>-</text:p>
          </table:table-cell>
          <table:table-cell table:style-name="ce188" table:formula="of:=SUM([.P52:.T52])" office:value-type="float" office:value="26" calcext:value-type="float">
            <text:p>26</text:p>
          </table:table-cell>
          <table:table-cell table:style-name="ce189" table:formula="of:=RANK([.U52];[.$U$4:.$U$133])" office:value-type="float" office:value="19" calcext:value-type="float">
            <text:p>19º</text:p>
          </table:table-cell>
          <table:table-cell table:style-name="ce163"/>
          <table:table-cell table:style-name="ce193" table:formula="of:=COUNTIF([.B52];&quot;&gt;0&quot;)+COUNTIF([.D52];&quot;&gt;0&quot;)+COUNTIF([.F52];&quot;&gt;0&quot;)+COUNTIF([.H52];&quot;&gt;0&quot;)+COUNTIF([.J52];&quot;&gt;0&quot;)" office:value-type="float" office:value="4" calcext:value-type="float">
            <text:p>4</text:p>
          </table:table-cell>
          <table:table-cell table:style-name="ce200" table:formula="of:=[.M52]/[.X52]" office:value-type="float" office:value="0" calcext:value-type="float">
            <text:p>0.0</text:p>
          </table:table-cell>
          <table:table-cell table:style-name="ce204" table:formula="of:=RANK([.Y52];[.$Y$4:.$Y$133])" office:value-type="float" office:value="71" calcext:value-type="float">
            <text:p>71º</text:p>
          </table:table-cell>
          <table:table-cell table:style-name="ce208" table:formula="of:=[.U52]/[.X52]" office:value-type="float" office:value="6.5" calcext:value-type="float">
            <text:p>6.5</text:p>
          </table:table-cell>
          <table:table-cell table:style-name="ce212" table:formula="of:=RANK([.AA52];[.$AA$4:.$AA$133])" office:value-type="float" office:value="26" calcext:value-type="float">
            <text:p>26º</text:p>
          </table:table-cell>
          <table:table-cell table:number-columns-repeated="996"/>
        </table:table-row>
        <table:table-row table:style-name="ro10">
          <table:table-cell table:style-name="ce126" office:value-type="string" calcext:value-type="string">
            <text:p>GUILHERME DAL SASSO</text:p>
          </table:table-cell>
          <table:table-cell table:style-name="ce134" office:value-type="string" calcext:value-type="string">
            <text:p>-</text:p>
          </table:table-cell>
          <table:table-cell table:style-name="ce139" table:formula="of:=IF([.B53]=20;1;IF([.B53]=19;2;IF([.B53]=19;2;IF([.B53]=18;3;IF([.B53]=17;4;IF([.B53]=16;5;IF([.B53]=15;6;IF([.B53]=14;7;IF([.B53]=13;8;IF([.B53]=12;9;IF([.B53]=11;10;IF([.B53]=10;11;IF([.B53]=9;12;IF([.B53]=8;13;IF([.B53]=7;14;IF([.B53]=6;15;IF([.B53]=5;16;IF([.B53]=4;17;IF([.B53]=3;18;IF([.B53]=2;19;IF([.B53]=1;20;0)))))))))))))))))))))" office:value-type="float" office:value="0" calcext:value-type="float">
            <text:p>0</text:p>
          </table:table-cell>
          <table:table-cell table:style-name="ce134" office:value-type="string" calcext:value-type="string">
            <text:p>-</text:p>
          </table:table-cell>
          <table:table-cell table:style-name="ce139" table:formula="of:=IF([.D53]=20;1;IF([.D53]=19;2;IF([.D53]=19;2;IF([.D53]=18;3;IF([.D53]=17;4;IF([.D53]=16;5;IF([.D53]=15;6;IF([.D53]=14;7;IF([.D53]=13;8;IF([.D53]=12;9;IF([.D53]=11;10;IF([.D53]=10;11;IF([.D53]=9;12;IF([.D53]=8;13;IF([.D53]=7;14;IF([.D53]=6;15;IF([.D53]=5;16;IF([.D53]=4;17;IF([.D53]=3;18;IF([.D53]=2;19;IF([.D53]=1;20;0)))))))))))))))))))))" office:value-type="float" office:value="0" calcext:value-type="float">
            <text:p>0</text:p>
          </table:table-cell>
          <table:table-cell table:style-name="ce134" office:value-type="string" calcext:value-type="string">
            <text:p>-</text:p>
          </table:table-cell>
          <table:table-cell table:style-name="ce139" table:formula="of:=IF([.F53]=20;1;IF([.F53]=19;2;IF([.F53]=19;2;IF([.F53]=18;3;IF([.F53]=17;4;IF([.F53]=16;5;IF([.F53]=15;6;IF([.F53]=14;7;IF([.F53]=13;8;IF([.F53]=12;9;IF([.F53]=11;10;IF([.F53]=10;11;IF([.F53]=9;12;IF([.F53]=8;13;IF([.F53]=7;14;IF([.F53]=6;15;IF([.F53]=5;16;IF([.F53]=4;17;IF([.F53]=3;18;IF([.F53]=2;19;IF([.F53]=1;20;0)))))))))))))))))))))" office:value-type="float" office:value="0" calcext:value-type="float">
            <text:p>0</text:p>
          </table:table-cell>
          <table:table-cell table:style-name="ce134" office:value-type="float" office:value="66" calcext:value-type="float">
            <text:p>66º</text:p>
          </table:table-cell>
          <table:table-cell table:style-name="ce139" table:formula="of:=IF([.H53]=20;1;IF([.H53]=19;2;IF([.H53]=19;2;IF([.H53]=18;3;IF([.H53]=17;4;IF([.H53]=16;5;IF([.H53]=15;6;IF([.H53]=14;7;IF([.H53]=13;8;IF([.H53]=12;9;IF([.H53]=11;10;IF([.H53]=10;11;IF([.H53]=9;12;IF([.H53]=8;13;IF([.H53]=7;14;IF([.H53]=6;15;IF([.H53]=5;16;IF([.H53]=4;17;IF([.H53]=3;18;IF([.H53]=2;19;IF([.H53]=1;20;0)))))))))))))))))))))" office:value-type="float" office:value="0" calcext:value-type="float">
            <text:p>0</text:p>
          </table:table-cell>
          <table:table-cell table:style-name="ce134" office:value-type="string" calcext:value-type="string">
            <text:p>-</text:p>
          </table:table-cell>
          <table:table-cell table:style-name="ce145" table:formula="of:=IF([.J53]=20;1;IF([.J53]=19;2;IF([.J53]=19;2;IF([.J53]=18;3;IF([.J53]=17;4;IF([.J53]=16;5;IF([.J53]=15;6;IF([.J53]=14;7;IF([.J53]=13;8;IF([.J53]=12;9;IF([.J53]=11;10;IF([.J53]=10;11;IF([.J53]=9;12;IF([.J53]=8;13;IF([.J53]=7;14;IF([.J53]=6;15;IF([.J53]=5;16;IF([.J53]=4;17;IF([.J53]=3;18;IF([.J53]=2;19;IF([.J53]=1;20;0)))))))))))))))))))))" office:value-type="float" office:value="0" calcext:value-type="float">
            <text:p>0</text:p>
          </table:table-cell>
          <table:table-cell table:style-name="ce150"/>
          <table:table-cell table:style-name="ce158" table:formula="of:=SUM([.C53];[.E53];[.G53];[.I53];[.K53])" office:value-type="float" office:value="0" calcext:value-type="float">
            <text:p>0</text:p>
          </table:table-cell>
          <table:table-cell table:style-name="ce160" table:formula="of:=RANK([.M53];[.$M$4:.$M$133])" office:value-type="float" office:value="71" calcext:value-type="float">
            <text:p>71º</text:p>
          </table:table-cell>
          <table:table-cell table:style-name="ce161"/>
          <table:table-cell table:style-name="ce169" office:value-type="string" calcext:value-type="string">
            <text:p>-</text:p>
          </table:table-cell>
          <table:table-cell table:number-columns-repeated="2" table:style-name="ce175" office:value-type="string" calcext:value-type="string">
            <text:p>-</text:p>
          </table:table-cell>
          <table:table-cell table:style-name="ce180" office:value-type="float" office:value="7" calcext:value-type="float">
            <text:p>7</text:p>
          </table:table-cell>
          <table:table-cell table:style-name="ce185" office:value-type="string" calcext:value-type="string">
            <text:p>-</text:p>
          </table:table-cell>
          <table:table-cell table:style-name="ce188" table:formula="of:=SUM([.P53:.T53])" office:value-type="float" office:value="7" calcext:value-type="float">
            <text:p>7</text:p>
          </table:table-cell>
          <table:table-cell table:style-name="ce189" table:formula="of:=RANK([.U53];[.$U$4:.$U$133])" office:value-type="float" office:value="77" calcext:value-type="float">
            <text:p>77º</text:p>
          </table:table-cell>
          <table:table-cell table:style-name="ce161"/>
          <table:table-cell table:style-name="ce193" table:formula="of:=COUNTIF([.B53];&quot;&gt;0&quot;)+COUNTIF([.D53];&quot;&gt;0&quot;)+COUNTIF([.F53];&quot;&gt;0&quot;)+COUNTIF([.H53];&quot;&gt;0&quot;)+COUNTIF([.J53];&quot;&gt;0&quot;)" office:value-type="float" office:value="1" calcext:value-type="float">
            <text:p>1</text:p>
          </table:table-cell>
          <table:table-cell table:style-name="ce200" table:formula="of:=[.M53]/[.X53]" office:value-type="float" office:value="0" calcext:value-type="float">
            <text:p>0.0</text:p>
          </table:table-cell>
          <table:table-cell table:style-name="ce204" table:formula="of:=RANK([.Y53];[.$Y$4:.$Y$133])" office:value-type="float" office:value="71" calcext:value-type="float">
            <text:p>71º</text:p>
          </table:table-cell>
          <table:table-cell table:style-name="ce208" table:formula="of:=[.U53]/[.X53]" office:value-type="float" office:value="7" calcext:value-type="float">
            <text:p>7.0</text:p>
          </table:table-cell>
          <table:table-cell table:style-name="ce212" table:formula="of:=RANK([.AA53];[.$AA$4:.$AA$133])" office:value-type="float" office:value="11" calcext:value-type="float">
            <text:p>11º</text:p>
          </table:table-cell>
          <table:table-cell table:number-columns-repeated="996"/>
        </table:table-row>
        <table:table-row table:style-name="ro10">
          <table:table-cell table:style-name="ce126" office:value-type="string" calcext:value-type="string">
            <text:p>GUILHERME ISERHARD</text:p>
          </table:table-cell>
          <table:table-cell table:style-name="ce134" office:value-type="string" calcext:value-type="string">
            <text:p>-</text:p>
          </table:table-cell>
          <table:table-cell table:style-name="ce139" table:formula="of:=IF([.B54]=20;1;IF([.B54]=19;2;IF([.B54]=19;2;IF([.B54]=18;3;IF([.B54]=17;4;IF([.B54]=16;5;IF([.B54]=15;6;IF([.B54]=14;7;IF([.B54]=13;8;IF([.B54]=12;9;IF([.B54]=11;10;IF([.B54]=10;11;IF([.B54]=9;12;IF([.B54]=8;13;IF([.B54]=7;14;IF([.B54]=6;15;IF([.B54]=5;16;IF([.B54]=4;17;IF([.B54]=3;18;IF([.B54]=2;19;IF([.B54]=1;20;0)))))))))))))))))))))" office:value-type="float" office:value="0" calcext:value-type="float">
            <text:p>0</text:p>
          </table:table-cell>
          <table:table-cell table:style-name="ce134" office:value-type="string" calcext:value-type="string">
            <text:p>-</text:p>
          </table:table-cell>
          <table:table-cell table:style-name="ce139" table:formula="of:=IF([.D54]=20;1;IF([.D54]=19;2;IF([.D54]=19;2;IF([.D54]=18;3;IF([.D54]=17;4;IF([.D54]=16;5;IF([.D54]=15;6;IF([.D54]=14;7;IF([.D54]=13;8;IF([.D54]=12;9;IF([.D54]=11;10;IF([.D54]=10;11;IF([.D54]=9;12;IF([.D54]=8;13;IF([.D54]=7;14;IF([.D54]=6;15;IF([.D54]=5;16;IF([.D54]=4;17;IF([.D54]=3;18;IF([.D54]=2;19;IF([.D54]=1;20;0)))))))))))))))))))))" office:value-type="float" office:value="0" calcext:value-type="float">
            <text:p>0</text:p>
          </table:table-cell>
          <table:table-cell table:style-name="ce134" office:value-type="float" office:value="6" calcext:value-type="float">
            <text:p>6º</text:p>
          </table:table-cell>
          <table:table-cell table:style-name="ce139" table:formula="of:=IF([.F54]=20;1;IF([.F54]=19;2;IF([.F54]=19;2;IF([.F54]=18;3;IF([.F54]=17;4;IF([.F54]=16;5;IF([.F54]=15;6;IF([.F54]=14;7;IF([.F54]=13;8;IF([.F54]=12;9;IF([.F54]=11;10;IF([.F54]=10;11;IF([.F54]=9;12;IF([.F54]=8;13;IF([.F54]=7;14;IF([.F54]=6;15;IF([.F54]=5;16;IF([.F54]=4;17;IF([.F54]=3;18;IF([.F54]=2;19;IF([.F54]=1;20;0)))))))))))))))))))))" office:value-type="float" office:value="15" calcext:value-type="float">
            <text:p>15</text:p>
          </table:table-cell>
          <table:table-cell table:style-name="ce134" office:value-type="float" office:value="83" calcext:value-type="float">
            <text:p>83º</text:p>
          </table:table-cell>
          <table:table-cell table:style-name="ce139" table:formula="of:=IF([.H54]=20;1;IF([.H54]=19;2;IF([.H54]=19;2;IF([.H54]=18;3;IF([.H54]=17;4;IF([.H54]=16;5;IF([.H54]=15;6;IF([.H54]=14;7;IF([.H54]=13;8;IF([.H54]=12;9;IF([.H54]=11;10;IF([.H54]=10;11;IF([.H54]=9;12;IF([.H54]=8;13;IF([.H54]=7;14;IF([.H54]=6;15;IF([.H54]=5;16;IF([.H54]=4;17;IF([.H54]=3;18;IF([.H54]=2;19;IF([.H54]=1;20;0)))))))))))))))))))))" office:value-type="float" office:value="0" calcext:value-type="float">
            <text:p>0</text:p>
          </table:table-cell>
          <table:table-cell table:style-name="ce134" office:value-type="float" office:value="22" calcext:value-type="float">
            <text:p>22º</text:p>
          </table:table-cell>
          <table:table-cell table:style-name="ce145" table:formula="of:=IF([.J54]=20;1;IF([.J54]=19;2;IF([.J54]=19;2;IF([.J54]=18;3;IF([.J54]=17;4;IF([.J54]=16;5;IF([.J54]=15;6;IF([.J54]=14;7;IF([.J54]=13;8;IF([.J54]=12;9;IF([.J54]=11;10;IF([.J54]=10;11;IF([.J54]=9;12;IF([.J54]=8;13;IF([.J54]=7;14;IF([.J54]=6;15;IF([.J54]=5;16;IF([.J54]=4;17;IF([.J54]=3;18;IF([.J54]=2;19;IF([.J54]=1;20;0)))))))))))))))))))))" office:value-type="float" office:value="0" calcext:value-type="float">
            <text:p>0</text:p>
          </table:table-cell>
          <table:table-cell table:style-name="ce150"/>
          <table:table-cell table:style-name="ce158" table:formula="of:=SUM([.C54];[.E54];[.G54];[.I54];[.K54])" office:value-type="float" office:value="15" calcext:value-type="float">
            <text:p>15</text:p>
          </table:table-cell>
          <table:table-cell table:style-name="ce160" table:formula="of:=RANK([.M54];[.$M$4:.$M$133])" office:value-type="float" office:value="35" calcext:value-type="float">
            <text:p>35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10" calcext:value-type="float">
            <text:p>10</text:p>
          </table:table-cell>
          <table:table-cell table:style-name="ce180" office:value-type="float" office:value="10" calcext:value-type="float">
            <text:p>10</text:p>
          </table:table-cell>
          <table:table-cell table:style-name="ce185" office:value-type="float" office:value="1" calcext:value-type="float">
            <text:p>1</text:p>
          </table:table-cell>
          <table:table-cell table:style-name="ce188" table:formula="of:=SUM([.P54:.T54])" office:value-type="float" office:value="21" calcext:value-type="float">
            <text:p>21</text:p>
          </table:table-cell>
          <table:table-cell table:style-name="ce189" table:formula="of:=RANK([.U54];[.$U$4:.$U$133])" office:value-type="float" office:value="28" calcext:value-type="float">
            <text:p>28º</text:p>
          </table:table-cell>
          <table:table-cell table:style-name="ce161"/>
          <table:table-cell table:style-name="ce193" table:formula="of:=COUNTIF([.B54];&quot;&gt;0&quot;)+COUNTIF([.D54];&quot;&gt;0&quot;)+COUNTIF([.F54];&quot;&gt;0&quot;)+COUNTIF([.H54];&quot;&gt;0&quot;)+COUNTIF([.J54];&quot;&gt;0&quot;)" office:value-type="float" office:value="3" calcext:value-type="float">
            <text:p>3</text:p>
          </table:table-cell>
          <table:table-cell table:style-name="ce200" table:formula="of:=[.M54]/[.X54]" office:value-type="float" office:value="5" calcext:value-type="float">
            <text:p>5.0</text:p>
          </table:table-cell>
          <table:table-cell table:style-name="ce204" table:formula="of:=RANK([.Y54];[.$Y$4:.$Y$133])" office:value-type="float" office:value="26" calcext:value-type="float">
            <text:p>26º</text:p>
          </table:table-cell>
          <table:table-cell table:style-name="ce208" table:formula="of:=[.U54]/[.X54]" office:value-type="float" office:value="7" calcext:value-type="float">
            <text:p>7.0</text:p>
          </table:table-cell>
          <table:table-cell table:style-name="ce212" table:formula="of:=RANK([.AA54];[.$AA$4:.$AA$133])" office:value-type="float" office:value="11" calcext:value-type="float">
            <text:p>11º</text:p>
          </table:table-cell>
          <table:table-cell table:number-columns-repeated="996"/>
        </table:table-row>
        <table:table-row table:style-name="ro10">
          <table:table-cell table:style-name="ce126" office:value-type="string" calcext:value-type="string">
            <text:p>GUILHERME PETRY</text:p>
          </table:table-cell>
          <table:table-cell table:style-name="ce134" office:value-type="float" office:value="14" calcext:value-type="float">
            <text:p>14º</text:p>
          </table:table-cell>
          <table:table-cell table:style-name="ce139" table:formula="of:=IF([.B55]=20;1;IF([.B55]=19;2;IF([.B55]=19;2;IF([.B55]=18;3;IF([.B55]=17;4;IF([.B55]=16;5;IF([.B55]=15;6;IF([.B55]=14;7;IF([.B55]=13;8;IF([.B55]=12;9;IF([.B55]=11;10;IF([.B55]=10;11;IF([.B55]=9;12;IF([.B55]=8;13;IF([.B55]=7;14;IF([.B55]=6;15;IF([.B55]=5;16;IF([.B55]=4;17;IF([.B55]=3;18;IF([.B55]=2;19;IF([.B55]=1;20;0)))))))))))))))))))))" office:value-type="float" office:value="7" calcext:value-type="float">
            <text:p>7</text:p>
          </table:table-cell>
          <table:table-cell table:style-name="ce134" office:value-type="float" office:value="41" calcext:value-type="float">
            <text:p>41º</text:p>
          </table:table-cell>
          <table:table-cell table:style-name="ce139" table:formula="of:=IF([.D55]=20;1;IF([.D55]=19;2;IF([.D55]=19;2;IF([.D55]=18;3;IF([.D55]=17;4;IF([.D55]=16;5;IF([.D55]=15;6;IF([.D55]=14;7;IF([.D55]=13;8;IF([.D55]=12;9;IF([.D55]=11;10;IF([.D55]=10;11;IF([.D55]=9;12;IF([.D55]=8;13;IF([.D55]=7;14;IF([.D55]=6;15;IF([.D55]=5;16;IF([.D55]=4;17;IF([.D55]=3;18;IF([.D55]=2;19;IF([.D55]=1;20;0)))))))))))))))))))))" office:value-type="float" office:value="0" calcext:value-type="float">
            <text:p>0</text:p>
          </table:table-cell>
          <table:table-cell table:style-name="ce134" office:value-type="float" office:value="5" calcext:value-type="float">
            <text:p>5º</text:p>
          </table:table-cell>
          <table:table-cell table:style-name="ce139" table:formula="of:=IF([.F55]=20;1;IF([.F55]=19;2;IF([.F55]=19;2;IF([.F55]=18;3;IF([.F55]=17;4;IF([.F55]=16;5;IF([.F55]=15;6;IF([.F55]=14;7;IF([.F55]=13;8;IF([.F55]=12;9;IF([.F55]=11;10;IF([.F55]=10;11;IF([.F55]=9;12;IF([.F55]=8;13;IF([.F55]=7;14;IF([.F55]=6;15;IF([.F55]=5;16;IF([.F55]=4;17;IF([.F55]=3;18;IF([.F55]=2;19;IF([.F55]=1;20;0)))))))))))))))))))))" office:value-type="float" office:value="16" calcext:value-type="float">
            <text:p>16</text:p>
          </table:table-cell>
          <table:table-cell table:style-name="ce134" office:value-type="float" office:value="30" calcext:value-type="float">
            <text:p>30º</text:p>
          </table:table-cell>
          <table:table-cell table:style-name="ce139" table:formula="of:=IF([.H55]=20;1;IF([.H55]=19;2;IF([.H55]=19;2;IF([.H55]=18;3;IF([.H55]=17;4;IF([.H55]=16;5;IF([.H55]=15;6;IF([.H55]=14;7;IF([.H55]=13;8;IF([.H55]=12;9;IF([.H55]=11;10;IF([.H55]=10;11;IF([.H55]=9;12;IF([.H55]=8;13;IF([.H55]=7;14;IF([.H55]=6;15;IF([.H55]=5;16;IF([.H55]=4;17;IF([.H55]=3;18;IF([.H55]=2;19;IF([.H55]=1;20;0)))))))))))))))))))))" office:value-type="float" office:value="0" calcext:value-type="float">
            <text:p>0</text:p>
          </table:table-cell>
          <table:table-cell table:style-name="ce134" office:value-type="float" office:value="18" calcext:value-type="float">
            <text:p>18º</text:p>
          </table:table-cell>
          <table:table-cell table:style-name="ce145" table:formula="of:=IF([.J55]=20;1;IF([.J55]=19;2;IF([.J55]=19;2;IF([.J55]=18;3;IF([.J55]=17;4;IF([.J55]=16;5;IF([.J55]=15;6;IF([.J55]=14;7;IF([.J55]=13;8;IF([.J55]=12;9;IF([.J55]=11;10;IF([.J55]=10;11;IF([.J55]=9;12;IF([.J55]=8;13;IF([.J55]=7;14;IF([.J55]=6;15;IF([.J55]=5;16;IF([.J55]=4;17;IF([.J55]=3;18;IF([.J55]=2;19;IF([.J55]=1;20;0)))))))))))))))))))))" office:value-type="float" office:value="3" calcext:value-type="float">
            <text:p>3</text:p>
          </table:table-cell>
          <table:table-cell table:style-name="ce150"/>
          <table:table-cell table:style-name="ce158" table:formula="of:=SUM([.C55];[.E55];[.G55];[.I55];[.K55])" office:value-type="float" office:value="26" calcext:value-type="float">
            <text:p>26</text:p>
          </table:table-cell>
          <table:table-cell table:style-name="ce160" table:formula="of:=RANK([.M55];[.$M$4:.$M$133])" office:value-type="float" office:value="11" calcext:value-type="float">
            <text:p>11º</text:p>
          </table:table-cell>
          <table:table-cell table:style-name="ce161"/>
          <table:table-cell table:style-name="ce169" office:value-type="float" office:value="5" calcext:value-type="float">
            <text:p>5</text:p>
          </table:table-cell>
          <table:table-cell table:style-name="ce175" office:value-type="float" office:value="6" calcext:value-type="float">
            <text:p>6</text:p>
          </table:table-cell>
          <table:table-cell table:style-name="ce175" office:value-type="float" office:value="9" calcext:value-type="float">
            <text:p>9</text:p>
          </table:table-cell>
          <table:table-cell table:style-name="ce180" office:value-type="float" office:value="5" calcext:value-type="float">
            <text:p>5</text:p>
          </table:table-cell>
          <table:table-cell table:style-name="ce185" office:value-type="float" office:value="3" calcext:value-type="float">
            <text:p>3</text:p>
          </table:table-cell>
          <table:table-cell table:style-name="ce188" table:formula="of:=SUM([.P55:.T55])" office:value-type="float" office:value="28" calcext:value-type="float">
            <text:p>28</text:p>
          </table:table-cell>
          <table:table-cell table:style-name="ce189" table:formula="of:=RANK([.U55];[.$U$4:.$U$133])" office:value-type="float" office:value="10" calcext:value-type="float">
            <text:p>10º</text:p>
          </table:table-cell>
          <table:table-cell table:style-name="ce161"/>
          <table:table-cell table:style-name="ce193" table:formula="of:=COUNTIF([.B55];&quot;&gt;0&quot;)+COUNTIF([.D55];&quot;&gt;0&quot;)+COUNTIF([.F55];&quot;&gt;0&quot;)+COUNTIF([.H55];&quot;&gt;0&quot;)+COUNTIF([.J55];&quot;&gt;0&quot;)" office:value-type="float" office:value="5" calcext:value-type="float">
            <text:p>5</text:p>
          </table:table-cell>
          <table:table-cell table:style-name="ce200" table:formula="of:=[.M55]/[.X55]" office:value-type="float" office:value="5.2" calcext:value-type="float">
            <text:p>5.2</text:p>
          </table:table-cell>
          <table:table-cell table:style-name="ce204" table:formula="of:=RANK([.Y55];[.$Y$4:.$Y$133])" office:value-type="float" office:value="25" calcext:value-type="float">
            <text:p>25º</text:p>
          </table:table-cell>
          <table:table-cell table:style-name="ce208" table:formula="of:=[.U55]/[.X55]" office:value-type="float" office:value="5.6" calcext:value-type="float">
            <text:p>5.6</text:p>
          </table:table-cell>
          <table:table-cell table:style-name="ce212" table:formula="of:=RANK([.AA55];[.$AA$4:.$AA$133])" office:value-type="float" office:value="57" calcext:value-type="float">
            <text:p>57º</text:p>
          </table:table-cell>
          <table:table-cell table:number-columns-repeated="996"/>
        </table:table-row>
        <table:table-row table:style-name="ro10">
          <table:table-cell table:style-name="ce126" office:value-type="string" calcext:value-type="string">
            <text:p>GUILLAUME</text:p>
          </table:table-cell>
          <table:table-cell table:style-name="ce134" office:value-type="string" calcext:value-type="string">
            <text:p>-</text:p>
          </table:table-cell>
          <table:table-cell table:style-name="ce139" table:formula="of:=IF([.B56]=20;1;IF([.B56]=19;2;IF([.B56]=19;2;IF([.B56]=18;3;IF([.B56]=17;4;IF([.B56]=16;5;IF([.B56]=15;6;IF([.B56]=14;7;IF([.B56]=13;8;IF([.B56]=12;9;IF([.B56]=11;10;IF([.B56]=10;11;IF([.B56]=9;12;IF([.B56]=8;13;IF([.B56]=7;14;IF([.B56]=6;15;IF([.B56]=5;16;IF([.B56]=4;17;IF([.B56]=3;18;IF([.B56]=2;19;IF([.B56]=1;20;0)))))))))))))))))))))" office:value-type="float" office:value="0" calcext:value-type="float">
            <text:p>0</text:p>
          </table:table-cell>
          <table:table-cell table:style-name="ce134" office:value-type="string" calcext:value-type="string">
            <text:p>-</text:p>
          </table:table-cell>
          <table:table-cell table:style-name="ce139" table:formula="of:=IF([.D56]=20;1;IF([.D56]=19;2;IF([.D56]=19;2;IF([.D56]=18;3;IF([.D56]=17;4;IF([.D56]=16;5;IF([.D56]=15;6;IF([.D56]=14;7;IF([.D56]=13;8;IF([.D56]=12;9;IF([.D56]=11;10;IF([.D56]=10;11;IF([.D56]=9;12;IF([.D56]=8;13;IF([.D56]=7;14;IF([.D56]=6;15;IF([.D56]=5;16;IF([.D56]=4;17;IF([.D56]=3;18;IF([.D56]=2;19;IF([.D56]=1;20;0)))))))))))))))))))))" office:value-type="float" office:value="0" calcext:value-type="float">
            <text:p>0</text:p>
          </table:table-cell>
          <table:table-cell table:style-name="ce134" office:value-type="float" office:value="17" calcext:value-type="float">
            <text:p>17º</text:p>
          </table:table-cell>
          <table:table-cell table:style-name="ce139" table:formula="of:=IF([.F56]=20;1;IF([.F56]=19;2;IF([.F56]=19;2;IF([.F56]=18;3;IF([.F56]=17;4;IF([.F56]=16;5;IF([.F56]=15;6;IF([.F56]=14;7;IF([.F56]=13;8;IF([.F56]=12;9;IF([.F56]=11;10;IF([.F56]=10;11;IF([.F56]=9;12;IF([.F56]=8;13;IF([.F56]=7;14;IF([.F56]=6;15;IF([.F56]=5;16;IF([.F56]=4;17;IF([.F56]=3;18;IF([.F56]=2;19;IF([.F56]=1;20;0)))))))))))))))))))))" office:value-type="float" office:value="4" calcext:value-type="float">
            <text:p>4</text:p>
          </table:table-cell>
          <table:table-cell table:style-name="ce134" office:value-type="float" office:value="38" calcext:value-type="float">
            <text:p>38º</text:p>
          </table:table-cell>
          <table:table-cell table:style-name="ce139" table:formula="of:=IF([.H56]=20;1;IF([.H56]=19;2;IF([.H56]=19;2;IF([.H56]=18;3;IF([.H56]=17;4;IF([.H56]=16;5;IF([.H56]=15;6;IF([.H56]=14;7;IF([.H56]=13;8;IF([.H56]=12;9;IF([.H56]=11;10;IF([.H56]=10;11;IF([.H56]=9;12;IF([.H56]=8;13;IF([.H56]=7;14;IF([.H56]=6;15;IF([.H56]=5;16;IF([.H56]=4;17;IF([.H56]=3;18;IF([.H56]=2;19;IF([.H56]=1;20;0)))))))))))))))))))))" office:value-type="float" office:value="0" calcext:value-type="float">
            <text:p>0</text:p>
          </table:table-cell>
          <table:table-cell table:style-name="ce134" office:value-type="string" calcext:value-type="string">
            <text:p>-</text:p>
          </table:table-cell>
          <table:table-cell table:style-name="ce145" table:formula="of:=IF([.J56]=20;1;IF([.J56]=19;2;IF([.J56]=19;2;IF([.J56]=18;3;IF([.J56]=17;4;IF([.J56]=16;5;IF([.J56]=15;6;IF([.J56]=14;7;IF([.J56]=13;8;IF([.J56]=12;9;IF([.J56]=11;10;IF([.J56]=10;11;IF([.J56]=9;12;IF([.J56]=8;13;IF([.J56]=7;14;IF([.J56]=6;15;IF([.J56]=5;16;IF([.J56]=4;17;IF([.J56]=3;18;IF([.J56]=2;19;IF([.J56]=1;20;0)))))))))))))))))))))" office:value-type="float" office:value="0" calcext:value-type="float">
            <text:p>0</text:p>
          </table:table-cell>
          <table:table-cell table:style-name="ce150"/>
          <table:table-cell table:style-name="ce158" table:formula="of:=SUM([.C56];[.E56];[.G56];[.I56];[.K56])" office:value-type="float" office:value="4" calcext:value-type="float">
            <text:p>4</text:p>
          </table:table-cell>
          <table:table-cell table:style-name="ce160" table:formula="of:=RANK([.M56];[.$M$4:.$M$133])" office:value-type="float" office:value="59" calcext:value-type="float">
            <text:p>59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4" calcext:value-type="float">
            <text:p>4</text:p>
          </table:table-cell>
          <table:table-cell table:style-name="ce180" office:value-type="float" office:value="7" calcext:value-type="float">
            <text:p>7</text:p>
          </table:table-cell>
          <table:table-cell table:style-name="ce185" office:value-type="string" calcext:value-type="string">
            <text:p>-</text:p>
          </table:table-cell>
          <table:table-cell table:style-name="ce188" table:formula="of:=SUM([.P56:.T56])" office:value-type="float" office:value="11" calcext:value-type="float">
            <text:p>11</text:p>
          </table:table-cell>
          <table:table-cell table:style-name="ce189" table:formula="of:=RANK([.U56];[.$U$4:.$U$133])" office:value-type="float" office:value="62" calcext:value-type="float">
            <text:p>62º</text:p>
          </table:table-cell>
          <table:table-cell table:style-name="ce161"/>
          <table:table-cell table:style-name="ce193" table:formula="of:=COUNTIF([.B56];&quot;&gt;0&quot;)+COUNTIF([.D56];&quot;&gt;0&quot;)+COUNTIF([.F56];&quot;&gt;0&quot;)+COUNTIF([.H56];&quot;&gt;0&quot;)+COUNTIF([.J56];&quot;&gt;0&quot;)" office:value-type="float" office:value="2" calcext:value-type="float">
            <text:p>2</text:p>
          </table:table-cell>
          <table:table-cell table:style-name="ce200" table:formula="of:=[.M56]/[.X56]" office:value-type="float" office:value="2" calcext:value-type="float">
            <text:p>2.0</text:p>
          </table:table-cell>
          <table:table-cell table:style-name="ce204" table:formula="of:=RANK([.Y56];[.$Y$4:.$Y$133])" office:value-type="float" office:value="57" calcext:value-type="float">
            <text:p>57º</text:p>
          </table:table-cell>
          <table:table-cell table:style-name="ce208" table:formula="of:=[.U56]/[.X56]" office:value-type="float" office:value="5.5" calcext:value-type="float">
            <text:p>5.5</text:p>
          </table:table-cell>
          <table:table-cell table:style-name="ce212" table:formula="of:=RANK([.AA56];[.$AA$4:.$AA$133])" office:value-type="float" office:value="61" calcext:value-type="float">
            <text:p>61º</text:p>
          </table:table-cell>
          <table:table-cell table:number-columns-repeated="996"/>
        </table:table-row>
        <table:table-row table:style-name="ro10">
          <table:table-cell table:style-name="ce126" office:value-type="string" calcext:value-type="string">
            <text:p>GUSTAVO</text:p>
          </table:table-cell>
          <table:table-cell table:style-name="ce134" office:value-type="string" calcext:value-type="string">
            <text:p>-</text:p>
          </table:table-cell>
          <table:table-cell table:style-name="ce139" table:formula="of:=IF([.B57]=20;1;IF([.B57]=19;2;IF([.B57]=19;2;IF([.B57]=18;3;IF([.B57]=17;4;IF([.B57]=16;5;IF([.B57]=15;6;IF([.B57]=14;7;IF([.B57]=13;8;IF([.B57]=12;9;IF([.B57]=11;10;IF([.B57]=10;11;IF([.B57]=9;12;IF([.B57]=8;13;IF([.B57]=7;14;IF([.B57]=6;15;IF([.B57]=5;16;IF([.B57]=4;17;IF([.B57]=3;18;IF([.B57]=2;19;IF([.B57]=1;20;0)))))))))))))))))))))" office:value-type="float" office:value="0" calcext:value-type="float">
            <text:p>0</text:p>
          </table:table-cell>
          <table:table-cell table:style-name="ce134" office:value-type="string" calcext:value-type="string">
            <text:p>-</text:p>
          </table:table-cell>
          <table:table-cell table:style-name="ce139" table:formula="of:=IF([.D57]=20;1;IF([.D57]=19;2;IF([.D57]=19;2;IF([.D57]=18;3;IF([.D57]=17;4;IF([.D57]=16;5;IF([.D57]=15;6;IF([.D57]=14;7;IF([.D57]=13;8;IF([.D57]=12;9;IF([.D57]=11;10;IF([.D57]=10;11;IF([.D57]=9;12;IF([.D57]=8;13;IF([.D57]=7;14;IF([.D57]=6;15;IF([.D57]=5;16;IF([.D57]=4;17;IF([.D57]=3;18;IF([.D57]=2;19;IF([.D57]=1;20;0)))))))))))))))))))))" office:value-type="float" office:value="0" calcext:value-type="float">
            <text:p>0</text:p>
          </table:table-cell>
          <table:table-cell table:style-name="ce134" office:value-type="string" calcext:value-type="string">
            <text:p>-</text:p>
          </table:table-cell>
          <table:table-cell table:style-name="ce139" table:formula="of:=IF([.F57]=20;1;IF([.F57]=19;2;IF([.F57]=19;2;IF([.F57]=18;3;IF([.F57]=17;4;IF([.F57]=16;5;IF([.F57]=15;6;IF([.F57]=14;7;IF([.F57]=13;8;IF([.F57]=12;9;IF([.F57]=11;10;IF([.F57]=10;11;IF([.F57]=9;12;IF([.F57]=8;13;IF([.F57]=7;14;IF([.F57]=6;15;IF([.F57]=5;16;IF([.F57]=4;17;IF([.F57]=3;18;IF([.F57]=2;19;IF([.F57]=1;20;0)))))))))))))))))))))" office:value-type="float" office:value="0" calcext:value-type="float">
            <text:p>0</text:p>
          </table:table-cell>
          <table:table-cell table:style-name="ce134" office:value-type="float" office:value="85" calcext:value-type="float">
            <text:p>85º</text:p>
          </table:table-cell>
          <table:table-cell table:style-name="ce139" table:formula="of:=IF([.H57]=20;1;IF([.H57]=19;2;IF([.H57]=19;2;IF([.H57]=18;3;IF([.H57]=17;4;IF([.H57]=16;5;IF([.H57]=15;6;IF([.H57]=14;7;IF([.H57]=13;8;IF([.H57]=12;9;IF([.H57]=11;10;IF([.H57]=10;11;IF([.H57]=9;12;IF([.H57]=8;13;IF([.H57]=7;14;IF([.H57]=6;15;IF([.H57]=5;16;IF([.H57]=4;17;IF([.H57]=3;18;IF([.H57]=2;19;IF([.H57]=1;20;0)))))))))))))))))))))" office:value-type="float" office:value="0" calcext:value-type="float">
            <text:p>0</text:p>
          </table:table-cell>
          <table:table-cell table:style-name="ce134" office:value-type="string" calcext:value-type="string">
            <text:p>-</text:p>
          </table:table-cell>
          <table:table-cell table:style-name="ce145" table:formula="of:=IF([.J57]=20;1;IF([.J57]=19;2;IF([.J57]=19;2;IF([.J57]=18;3;IF([.J57]=17;4;IF([.J57]=16;5;IF([.J57]=15;6;IF([.J57]=14;7;IF([.J57]=13;8;IF([.J57]=12;9;IF([.J57]=11;10;IF([.J57]=10;11;IF([.J57]=9;12;IF([.J57]=8;13;IF([.J57]=7;14;IF([.J57]=6;15;IF([.J57]=5;16;IF([.J57]=4;17;IF([.J57]=3;18;IF([.J57]=2;19;IF([.J57]=1;20;0)))))))))))))))))))))" office:value-type="float" office:value="0" calcext:value-type="float">
            <text:p>0</text:p>
          </table:table-cell>
          <table:table-cell table:style-name="ce150"/>
          <table:table-cell table:style-name="ce158" table:formula="of:=SUM([.C57];[.E57];[.G57];[.I57];[.K57])" office:value-type="float" office:value="0" calcext:value-type="float">
            <text:p>0</text:p>
          </table:table-cell>
          <table:table-cell table:style-name="ce160" table:formula="of:=RANK([.M57];[.$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5" calcext:value-type="float">
            <text:p>5</text:p>
          </table:table-cell>
          <table:table-cell table:style-name="ce185" office:value-type="string" calcext:value-type="string">
            <text:p>-</text:p>
          </table:table-cell>
          <table:table-cell table:style-name="ce188" table:formula="of:=SUM([.P57:.T57])" office:value-type="float" office:value="5" calcext:value-type="float">
            <text:p>5</text:p>
          </table:table-cell>
          <table:table-cell table:style-name="ce189" table:formula="of:=RANK([.U57];[.$U$4:.$U$133])" office:value-type="float" office:value="102" calcext:value-type="float">
            <text:p>102º</text:p>
          </table:table-cell>
          <table:table-cell table:style-name="ce161"/>
          <table:table-cell table:style-name="ce193" table:formula="of:=COUNTIF([.B57];&quot;&gt;0&quot;)+COUNTIF([.D57];&quot;&gt;0&quot;)+COUNTIF([.F57];&quot;&gt;0&quot;)+COUNTIF([.H57];&quot;&gt;0&quot;)+COUNTIF([.J57];&quot;&gt;0&quot;)" office:value-type="float" office:value="1" calcext:value-type="float">
            <text:p>1</text:p>
          </table:table-cell>
          <table:table-cell table:style-name="ce200" table:formula="of:=[.M57]/[.X57]" office:value-type="float" office:value="0" calcext:value-type="float">
            <text:p>0.0</text:p>
          </table:table-cell>
          <table:table-cell table:style-name="ce204" table:formula="of:=RANK([.Y57];[.$Y$4:.$Y$133])" office:value-type="float" office:value="71" calcext:value-type="float">
            <text:p>71º</text:p>
          </table:table-cell>
          <table:table-cell table:style-name="ce208" table:formula="of:=[.U57]/[.X57]" office:value-type="float" office:value="5" calcext:value-type="float">
            <text:p>5.0</text:p>
          </table:table-cell>
          <table:table-cell table:style-name="ce212" table:formula="of:=RANK([.AA57];[.$AA$4:.$AA$133])" office:value-type="float" office:value="68" calcext:value-type="float">
            <text:p>68º</text:p>
          </table:table-cell>
          <table:table-cell table:number-columns-repeated="996"/>
        </table:table-row>
        <table:table-row table:style-name="ro10">
          <table:table-cell table:style-name="ce126" office:value-type="string" calcext:value-type="string">
            <text:p>GUTO</text:p>
          </table:table-cell>
          <table:table-cell table:style-name="ce134" office:value-type="float" office:value="18" calcext:value-type="float">
            <text:p>18º</text:p>
          </table:table-cell>
          <table:table-cell table:style-name="ce139" table:formula="of:=IF([.B58]=20;1;IF([.B58]=19;2;IF([.B58]=19;2;IF([.B58]=18;3;IF([.B58]=17;4;IF([.B58]=16;5;IF([.B58]=15;6;IF([.B58]=14;7;IF([.B58]=13;8;IF([.B58]=12;9;IF([.B58]=11;10;IF([.B58]=10;11;IF([.B58]=9;12;IF([.B58]=8;13;IF([.B58]=7;14;IF([.B58]=6;15;IF([.B58]=5;16;IF([.B58]=4;17;IF([.B58]=3;18;IF([.B58]=2;19;IF([.B58]=1;20;0)))))))))))))))))))))" office:value-type="float" office:value="3" calcext:value-type="float">
            <text:p>3</text:p>
          </table:table-cell>
          <table:table-cell table:style-name="ce134" office:value-type="float" office:value="12" calcext:value-type="float">
            <text:p>12º</text:p>
          </table:table-cell>
          <table:table-cell table:style-name="ce139" table:formula="of:=IF([.D58]=20;1;IF([.D58]=19;2;IF([.D58]=19;2;IF([.D58]=18;3;IF([.D58]=17;4;IF([.D58]=16;5;IF([.D58]=15;6;IF([.D58]=14;7;IF([.D58]=13;8;IF([.D58]=12;9;IF([.D58]=11;10;IF([.D58]=10;11;IF([.D58]=9;12;IF([.D58]=8;13;IF([.D58]=7;14;IF([.D58]=6;15;IF([.D58]=5;16;IF([.D58]=4;17;IF([.D58]=3;18;IF([.D58]=2;19;IF([.D58]=1;20;0)))))))))))))))))))))" office:value-type="float" office:value="9" calcext:value-type="float">
            <text:p>9</text:p>
          </table:table-cell>
          <table:table-cell table:style-name="ce134" office:value-type="float" office:value="66" calcext:value-type="float">
            <text:p>66º</text:p>
          </table:table-cell>
          <table:table-cell table:style-name="ce139" table:formula="of:=IF([.F58]=20;1;IF([.F58]=19;2;IF([.F58]=19;2;IF([.F58]=18;3;IF([.F58]=17;4;IF([.F58]=16;5;IF([.F58]=15;6;IF([.F58]=14;7;IF([.F58]=13;8;IF([.F58]=12;9;IF([.F58]=11;10;IF([.F58]=10;11;IF([.F58]=9;12;IF([.F58]=8;13;IF([.F58]=7;14;IF([.F58]=6;15;IF([.F58]=5;16;IF([.F58]=4;17;IF([.F58]=3;18;IF([.F58]=2;19;IF([.F58]=1;20;0)))))))))))))))))))))" office:value-type="float" office:value="0" calcext:value-type="float">
            <text:p>0</text:p>
          </table:table-cell>
          <table:table-cell table:style-name="ce134" office:value-type="float" office:value="89" calcext:value-type="float">
            <text:p>89º</text:p>
          </table:table-cell>
          <table:table-cell table:style-name="ce139" table:formula="of:=IF([.H58]=20;1;IF([.H58]=19;2;IF([.H58]=19;2;IF([.H58]=18;3;IF([.H58]=17;4;IF([.H58]=16;5;IF([.H58]=15;6;IF([.H58]=14;7;IF([.H58]=13;8;IF([.H58]=12;9;IF([.H58]=11;10;IF([.H58]=10;11;IF([.H58]=9;12;IF([.H58]=8;13;IF([.H58]=7;14;IF([.H58]=6;15;IF([.H58]=5;16;IF([.H58]=4;17;IF([.H58]=3;18;IF([.H58]=2;19;IF([.H58]=1;20;0)))))))))))))))))))))" office:value-type="float" office:value="0" calcext:value-type="float">
            <text:p>0</text:p>
          </table:table-cell>
          <table:table-cell table:style-name="ce134" office:value-type="float" office:value="28" calcext:value-type="float">
            <text:p>28º</text:p>
          </table:table-cell>
          <table:table-cell table:style-name="ce145" table:formula="of:=IF([.J58]=20;1;IF([.J58]=19;2;IF([.J58]=19;2;IF([.J58]=18;3;IF([.J58]=17;4;IF([.J58]=16;5;IF([.J58]=15;6;IF([.J58]=14;7;IF([.J58]=13;8;IF([.J58]=12;9;IF([.J58]=11;10;IF([.J58]=10;11;IF([.J58]=9;12;IF([.J58]=8;13;IF([.J58]=7;14;IF([.J58]=6;15;IF([.J58]=5;16;IF([.J58]=4;17;IF([.J58]=3;18;IF([.J58]=2;19;IF([.J58]=1;20;0)))))))))))))))))))))" office:value-type="float" office:value="0" calcext:value-type="float">
            <text:p>0</text:p>
          </table:table-cell>
          <table:table-cell table:style-name="ce150"/>
          <table:table-cell table:style-name="ce158" table:formula="of:=SUM([.C58];[.E58];[.G58];[.I58];[.K58])" office:value-type="float" office:value="12" calcext:value-type="float">
            <text:p>12</text:p>
          </table:table-cell>
          <table:table-cell table:style-name="ce160" table:formula="of:=RANK([.M58];[.$M$4:.$M$133])" office:value-type="float" office:value="41" calcext:value-type="float">
            <text:p>41º</text:p>
          </table:table-cell>
          <table:table-cell table:style-name="ce161"/>
          <table:table-cell table:style-name="ce169" office:value-type="float" office:value="4" calcext:value-type="float">
            <text:p>4</text:p>
          </table:table-cell>
          <table:table-cell table:style-name="ce175" office:value-type="float" office:value="7" calcext:value-type="float">
            <text:p>7</text:p>
          </table:table-cell>
          <table:table-cell table:style-name="ce175" office:value-type="float" office:value="3" calcext:value-type="float">
            <text:p>3</text:p>
          </table:table-cell>
          <table:table-cell table:style-name="ce180" office:value-type="float" office:value="3" calcext:value-type="float">
            <text:p>3</text:p>
          </table:table-cell>
          <table:table-cell table:style-name="ce185" office:value-type="float" office:value="1" calcext:value-type="float">
            <text:p>1</text:p>
          </table:table-cell>
          <table:table-cell table:style-name="ce188" table:formula="of:=SUM([.P58:.T58])" office:value-type="float" office:value="18" calcext:value-type="float">
            <text:p>18</text:p>
          </table:table-cell>
          <table:table-cell table:style-name="ce189" table:formula="of:=RANK([.U58];[.$U$4:.$U$133])" office:value-type="float" office:value="34" calcext:value-type="float">
            <text:p>34º</text:p>
          </table:table-cell>
          <table:table-cell table:style-name="ce161"/>
          <table:table-cell table:style-name="ce193" table:formula="of:=COUNTIF([.B58];&quot;&gt;0&quot;)+COUNTIF([.D58];&quot;&gt;0&quot;)+COUNTIF([.F58];&quot;&gt;0&quot;)+COUNTIF([.H58];&quot;&gt;0&quot;)+COUNTIF([.J58];&quot;&gt;0&quot;)" office:value-type="float" office:value="5" calcext:value-type="float">
            <text:p>5</text:p>
          </table:table-cell>
          <table:table-cell table:style-name="ce200" table:formula="of:=[.M58]/[.X58]" office:value-type="float" office:value="2.4" calcext:value-type="float">
            <text:p>2.4</text:p>
          </table:table-cell>
          <table:table-cell table:style-name="ce204" table:formula="of:=RANK([.Y58];[.$Y$4:.$Y$133])" office:value-type="float" office:value="55" calcext:value-type="float">
            <text:p>55º</text:p>
          </table:table-cell>
          <table:table-cell table:style-name="ce208" table:formula="of:=[.U58]/[.X58]" office:value-type="float" office:value="3.6" calcext:value-type="float">
            <text:p>3.6</text:p>
          </table:table-cell>
          <table:table-cell table:style-name="ce212" table:formula="of:=RANK([.AA58];[.$AA$4:.$AA$133])" office:value-type="float" office:value="109" calcext:value-type="float">
            <text:p>109º</text:p>
          </table:table-cell>
          <table:table-cell table:number-columns-repeated="996"/>
        </table:table-row>
        <table:table-row table:style-name="ro10">
          <table:table-cell table:style-name="ce126" office:value-type="string" calcext:value-type="string">
            <text:p>HELENA CUNDA</text:p>
          </table:table-cell>
          <table:table-cell table:style-name="ce134" office:value-type="string" calcext:value-type="string">
            <text:p>-</text:p>
          </table:table-cell>
          <table:table-cell table:style-name="ce139" table:formula="of:=IF([.B59]=20;1;IF([.B59]=19;2;IF([.B59]=19;2;IF([.B59]=18;3;IF([.B59]=17;4;IF([.B59]=16;5;IF([.B59]=15;6;IF([.B59]=14;7;IF([.B59]=13;8;IF([.B59]=12;9;IF([.B59]=11;10;IF([.B59]=10;11;IF([.B59]=9;12;IF([.B59]=8;13;IF([.B59]=7;14;IF([.B59]=6;15;IF([.B59]=5;16;IF([.B59]=4;17;IF([.B59]=3;18;IF([.B59]=2;19;IF([.B59]=1;20;0)))))))))))))))))))))" office:value-type="float" office:value="0" calcext:value-type="float">
            <text:p>0</text:p>
          </table:table-cell>
          <table:table-cell table:style-name="ce134" office:value-type="string" calcext:value-type="string">
            <text:p>-</text:p>
          </table:table-cell>
          <table:table-cell table:style-name="ce139" table:formula="of:=IF([.D59]=20;1;IF([.D59]=19;2;IF([.D59]=19;2;IF([.D59]=18;3;IF([.D59]=17;4;IF([.D59]=16;5;IF([.D59]=15;6;IF([.D59]=14;7;IF([.D59]=13;8;IF([.D59]=12;9;IF([.D59]=11;10;IF([.D59]=10;11;IF([.D59]=9;12;IF([.D59]=8;13;IF([.D59]=7;14;IF([.D59]=6;15;IF([.D59]=5;16;IF([.D59]=4;17;IF([.D59]=3;18;IF([.D59]=2;19;IF([.D59]=1;20;0)))))))))))))))))))))" office:value-type="float" office:value="0" calcext:value-type="float">
            <text:p>0</text:p>
          </table:table-cell>
          <table:table-cell table:style-name="ce134" office:value-type="float" office:value="64" calcext:value-type="float">
            <text:p>64º</text:p>
          </table:table-cell>
          <table:table-cell table:style-name="ce139" table:formula="of:=IF([.F59]=20;1;IF([.F59]=19;2;IF([.F59]=19;2;IF([.F59]=18;3;IF([.F59]=17;4;IF([.F59]=16;5;IF([.F59]=15;6;IF([.F59]=14;7;IF([.F59]=13;8;IF([.F59]=12;9;IF([.F59]=11;10;IF([.F59]=10;11;IF([.F59]=9;12;IF([.F59]=8;13;IF([.F59]=7;14;IF([.F59]=6;15;IF([.F59]=5;16;IF([.F59]=4;17;IF([.F59]=3;18;IF([.F59]=2;19;IF([.F59]=1;20;0)))))))))))))))))))))" office:value-type="float" office:value="0" calcext:value-type="float">
            <text:p>0</text:p>
          </table:table-cell>
          <table:table-cell table:style-name="ce134" office:value-type="float" office:value="16" calcext:value-type="float">
            <text:p>16º</text:p>
          </table:table-cell>
          <table:table-cell table:style-name="ce139" table:formula="of:=IF([.H59]=20;1;IF([.H59]=19;2;IF([.H59]=19;2;IF([.H59]=18;3;IF([.H59]=17;4;IF([.H59]=16;5;IF([.H59]=15;6;IF([.H59]=14;7;IF([.H59]=13;8;IF([.H59]=12;9;IF([.H59]=11;10;IF([.H59]=10;11;IF([.H59]=9;12;IF([.H59]=8;13;IF([.H59]=7;14;IF([.H59]=6;15;IF([.H59]=5;16;IF([.H59]=4;17;IF([.H59]=3;18;IF([.H59]=2;19;IF([.H59]=1;20;0)))))))))))))))))))))" office:value-type="float" office:value="5" calcext:value-type="float">
            <text:p>5</text:p>
          </table:table-cell>
          <table:table-cell table:style-name="ce134" office:value-type="float" office:value="16" calcext:value-type="float">
            <text:p>16º</text:p>
          </table:table-cell>
          <table:table-cell table:style-name="ce145" table:formula="of:=IF([.J59]=20;1;IF([.J59]=19;2;IF([.J59]=19;2;IF([.J59]=18;3;IF([.J59]=17;4;IF([.J59]=16;5;IF([.J59]=15;6;IF([.J59]=14;7;IF([.J59]=13;8;IF([.J59]=12;9;IF([.J59]=11;10;IF([.J59]=10;11;IF([.J59]=9;12;IF([.J59]=8;13;IF([.J59]=7;14;IF([.J59]=6;15;IF([.J59]=5;16;IF([.J59]=4;17;IF([.J59]=3;18;IF([.J59]=2;19;IF([.J59]=1;20;0)))))))))))))))))))))" office:value-type="float" office:value="5" calcext:value-type="float">
            <text:p>5</text:p>
          </table:table-cell>
          <table:table-cell table:style-name="ce150"/>
          <table:table-cell table:style-name="ce158" table:formula="of:=SUM([.C59];[.E59];[.G59];[.I59];[.K59])" office:value-type="float" office:value="10" calcext:value-type="float">
            <text:p>10</text:p>
          </table:table-cell>
          <table:table-cell table:style-name="ce160" table:formula="of:=RANK([.M59];[.$M$4:.$M$133])" office:value-type="float" office:value="46" calcext:value-type="float">
            <text:p>46º</text:p>
          </table:table-cell>
          <table:table-cell table:style-name="ce161"/>
          <table:table-cell table:style-name="ce172" office:value-type="string" calcext:value-type="string">
            <text:p>-</text:p>
          </table:table-cell>
          <table:table-cell table:style-name="ce176" office:value-type="string" calcext:value-type="string">
            <text:p>-</text:p>
          </table:table-cell>
          <table:table-cell table:style-name="ce175" office:value-type="float" office:value="5" calcext:value-type="float">
            <text:p>5</text:p>
          </table:table-cell>
          <table:table-cell table:style-name="ce180" office:value-type="float" office:value="7" calcext:value-type="float">
            <text:p>7</text:p>
          </table:table-cell>
          <table:table-cell table:style-name="ce185" office:value-type="float" office:value="2" calcext:value-type="float">
            <text:p>2</text:p>
          </table:table-cell>
          <table:table-cell table:style-name="ce188" table:formula="of:=SUM([.P59:.T59])" office:value-type="float" office:value="14" calcext:value-type="float">
            <text:p>14</text:p>
          </table:table-cell>
          <table:table-cell table:style-name="ce189" table:formula="of:=RANK([.U59];[.$U$4:.$U$133])" office:value-type="float" office:value="51" calcext:value-type="float">
            <text:p>51º</text:p>
          </table:table-cell>
          <table:table-cell table:style-name="ce161"/>
          <table:table-cell table:style-name="ce193" table:formula="of:=COUNTIF([.B59];&quot;&gt;0&quot;)+COUNTIF([.D59];&quot;&gt;0&quot;)+COUNTIF([.F59];&quot;&gt;0&quot;)+COUNTIF([.H59];&quot;&gt;0&quot;)+COUNTIF([.J59];&quot;&gt;0&quot;)" office:value-type="float" office:value="3" calcext:value-type="float">
            <text:p>3</text:p>
          </table:table-cell>
          <table:table-cell table:style-name="ce200" table:formula="of:=[.M59]/[.X59]" office:value-type="float" office:value="3.33333333333333" calcext:value-type="float">
            <text:p>3.3</text:p>
          </table:table-cell>
          <table:table-cell table:style-name="ce204" table:formula="of:=RANK([.Y59];[.$Y$4:.$Y$133])" office:value-type="float" office:value="50" calcext:value-type="float">
            <text:p>50º</text:p>
          </table:table-cell>
          <table:table-cell table:style-name="ce208" table:formula="of:=[.U59]/[.X59]" office:value-type="float" office:value="4.66666666666667" calcext:value-type="float">
            <text:p>4.7</text:p>
          </table:table-cell>
          <table:table-cell table:style-name="ce212" table:formula="of:=RANK([.AA59];[.$AA$4:.$AA$133])" office:value-type="float" office:value="89" calcext:value-type="float">
            <text:p>89º</text:p>
          </table:table-cell>
          <table:table-cell table:number-columns-repeated="996"/>
        </table:table-row>
        <table:table-row table:style-name="ro10">
          <table:table-cell table:style-name="ce126" office:value-type="string" calcext:value-type="string">
            <text:p>HELENA JACOBY</text:p>
          </table:table-cell>
          <table:table-cell table:style-name="ce134" office:value-type="string" calcext:value-type="string">
            <text:p>-</text:p>
          </table:table-cell>
          <table:table-cell table:style-name="ce139" table:formula="of:=IF([.B60]=20;1;IF([.B60]=19;2;IF([.B60]=19;2;IF([.B60]=18;3;IF([.B60]=17;4;IF([.B60]=16;5;IF([.B60]=15;6;IF([.B60]=14;7;IF([.B60]=13;8;IF([.B60]=12;9;IF([.B60]=11;10;IF([.B60]=10;11;IF([.B60]=9;12;IF([.B60]=8;13;IF([.B60]=7;14;IF([.B60]=6;15;IF([.B60]=5;16;IF([.B60]=4;17;IF([.B60]=3;18;IF([.B60]=2;19;IF([.B60]=1;20;0)))))))))))))))))))))" office:value-type="float" office:value="0" calcext:value-type="float">
            <text:p>0</text:p>
          </table:table-cell>
          <table:table-cell table:style-name="ce134" office:value-type="string" calcext:value-type="string">
            <text:p>-</text:p>
          </table:table-cell>
          <table:table-cell table:style-name="ce139" table:formula="of:=IF([.D60]=20;1;IF([.D60]=19;2;IF([.D60]=19;2;IF([.D60]=18;3;IF([.D60]=17;4;IF([.D60]=16;5;IF([.D60]=15;6;IF([.D60]=14;7;IF([.D60]=13;8;IF([.D60]=12;9;IF([.D60]=11;10;IF([.D60]=10;11;IF([.D60]=9;12;IF([.D60]=8;13;IF([.D60]=7;14;IF([.D60]=6;15;IF([.D60]=5;16;IF([.D60]=4;17;IF([.D60]=3;18;IF([.D60]=2;19;IF([.D60]=1;20;0)))))))))))))))))))))" office:value-type="float" office:value="0" calcext:value-type="float">
            <text:p>0</text:p>
          </table:table-cell>
          <table:table-cell table:style-name="ce134" office:value-type="float" office:value="11" calcext:value-type="float">
            <text:p>11º</text:p>
          </table:table-cell>
          <table:table-cell table:style-name="ce139" table:formula="of:=IF([.F60]=20;1;IF([.F60]=19;2;IF([.F60]=19;2;IF([.F60]=18;3;IF([.F60]=17;4;IF([.F60]=16;5;IF([.F60]=15;6;IF([.F60]=14;7;IF([.F60]=13;8;IF([.F60]=12;9;IF([.F60]=11;10;IF([.F60]=10;11;IF([.F60]=9;12;IF([.F60]=8;13;IF([.F60]=7;14;IF([.F60]=6;15;IF([.F60]=5;16;IF([.F60]=4;17;IF([.F60]=3;18;IF([.F60]=2;19;IF([.F60]=1;20;0)))))))))))))))))))))" office:value-type="float" office:value="10" calcext:value-type="float">
            <text:p>10</text:p>
          </table:table-cell>
          <table:table-cell table:style-name="ce134" office:value-type="float" office:value="6" calcext:value-type="float">
            <text:p>6º</text:p>
          </table:table-cell>
          <table:table-cell table:style-name="ce139" table:formula="of:=IF([.H60]=20;1;IF([.H60]=19;2;IF([.H60]=19;2;IF([.H60]=18;3;IF([.H60]=17;4;IF([.H60]=16;5;IF([.H60]=15;6;IF([.H60]=14;7;IF([.H60]=13;8;IF([.H60]=12;9;IF([.H60]=11;10;IF([.H60]=10;11;IF([.H60]=9;12;IF([.H60]=8;13;IF([.H60]=7;14;IF([.H60]=6;15;IF([.H60]=5;16;IF([.H60]=4;17;IF([.H60]=3;18;IF([.H60]=2;19;IF([.H60]=1;20;0)))))))))))))))))))))" office:value-type="float" office:value="15" calcext:value-type="float">
            <text:p>15</text:p>
          </table:table-cell>
          <table:table-cell table:style-name="ce134" office:value-type="string" calcext:value-type="string">
            <text:p>-</text:p>
          </table:table-cell>
          <table:table-cell table:style-name="ce145" table:formula="of:=IF([.J60]=20;1;IF([.J60]=19;2;IF([.J60]=19;2;IF([.J60]=18;3;IF([.J60]=17;4;IF([.J60]=16;5;IF([.J60]=15;6;IF([.J60]=14;7;IF([.J60]=13;8;IF([.J60]=12;9;IF([.J60]=11;10;IF([.J60]=10;11;IF([.J60]=9;12;IF([.J60]=8;13;IF([.J60]=7;14;IF([.J60]=6;15;IF([.J60]=5;16;IF([.J60]=4;17;IF([.J60]=3;18;IF([.J60]=2;19;IF([.J60]=1;20;0)))))))))))))))))))))" office:value-type="float" office:value="0" calcext:value-type="float">
            <text:p>0</text:p>
          </table:table-cell>
          <table:table-cell table:style-name="ce150"/>
          <table:table-cell table:style-name="ce158" table:formula="of:=SUM([.C60];[.E60];[.G60];[.I60];[.K60])" office:value-type="float" office:value="25" calcext:value-type="float">
            <text:p>25</text:p>
          </table:table-cell>
          <table:table-cell table:style-name="ce160" table:formula="of:=RANK([.M60];[.$M$4:.$M$133])" office:value-type="float" office:value="13" calcext:value-type="float">
            <text:p>13º</text:p>
          </table:table-cell>
          <table:table-cell table:style-name="ce161"/>
          <table:table-cell table:style-name="ce172" office:value-type="string" calcext:value-type="string">
            <text:p>-</text:p>
          </table:table-cell>
          <table:table-cell table:style-name="ce176" office:value-type="string" calcext:value-type="string">
            <text:p>-</text:p>
          </table:table-cell>
          <table:table-cell table:style-name="ce175" office:value-type="float" office:value="6" calcext:value-type="float">
            <text:p>6</text:p>
          </table:table-cell>
          <table:table-cell table:style-name="ce180" office:value-type="float" office:value="6" calcext:value-type="float">
            <text:p>6</text:p>
          </table:table-cell>
          <table:table-cell table:style-name="ce185" office:value-type="string" calcext:value-type="string">
            <text:p>-</text:p>
          </table:table-cell>
          <table:table-cell table:style-name="ce188" table:formula="of:=SUM([.P60:.T60])" office:value-type="float" office:value="12" calcext:value-type="float">
            <text:p>12</text:p>
          </table:table-cell>
          <table:table-cell table:style-name="ce189" table:formula="of:=RANK([.U60];[.$U$4:.$U$133])" office:value-type="float" office:value="56" calcext:value-type="float">
            <text:p>56º</text:p>
          </table:table-cell>
          <table:table-cell table:style-name="ce161"/>
          <table:table-cell table:style-name="ce193" table:formula="of:=COUNTIF([.B60];&quot;&gt;0&quot;)+COUNTIF([.D60];&quot;&gt;0&quot;)+COUNTIF([.F60];&quot;&gt;0&quot;)+COUNTIF([.H60];&quot;&gt;0&quot;)+COUNTIF([.J60];&quot;&gt;0&quot;)" office:value-type="float" office:value="2" calcext:value-type="float">
            <text:p>2</text:p>
          </table:table-cell>
          <table:table-cell table:style-name="ce200" table:formula="of:=[.M60]/[.X60]" office:value-type="float" office:value="12.5" calcext:value-type="float">
            <text:p>12.5</text:p>
          </table:table-cell>
          <table:table-cell table:style-name="ce204" table:formula="of:=RANK([.Y60];[.$Y$4:.$Y$133])" office:value-type="float" office:value="7" calcext:value-type="float">
            <text:p>7º</text:p>
          </table:table-cell>
          <table:table-cell table:style-name="ce208" table:formula="of:=[.U60]/[.X60]" office:value-type="float" office:value="6" calcext:value-type="float">
            <text:p>6.0</text:p>
          </table:table-cell>
          <table:table-cell table:style-name="ce212" table:formula="of:=RANK([.AA60];[.$AA$4:.$AA$133])" office:value-type="float" office:value="36" calcext:value-type="float">
            <text:p>36º</text:p>
          </table:table-cell>
          <table:table-cell table:number-columns-repeated="996"/>
        </table:table-row>
        <table:table-row table:style-name="ro10">
          <table:table-cell table:style-name="ce126" office:value-type="string" calcext:value-type="string">
            <text:p>IACÃ</text:p>
          </table:table-cell>
          <table:table-cell table:style-name="ce134" office:value-type="string" calcext:value-type="string">
            <text:p>-</text:p>
          </table:table-cell>
          <table:table-cell table:style-name="ce139" table:formula="of:=IF([.B61]=20;1;IF([.B61]=19;2;IF([.B61]=19;2;IF([.B61]=18;3;IF([.B61]=17;4;IF([.B61]=16;5;IF([.B61]=15;6;IF([.B61]=14;7;IF([.B61]=13;8;IF([.B61]=12;9;IF([.B61]=11;10;IF([.B61]=10;11;IF([.B61]=9;12;IF([.B61]=8;13;IF([.B61]=7;14;IF([.B61]=6;15;IF([.B61]=5;16;IF([.B61]=4;17;IF([.B61]=3;18;IF([.B61]=2;19;IF([.B61]=1;20;0)))))))))))))))))))))" office:value-type="float" office:value="0" calcext:value-type="float">
            <text:p>0</text:p>
          </table:table-cell>
          <table:table-cell table:style-name="ce134" office:value-type="string" calcext:value-type="string">
            <text:p>-</text:p>
          </table:table-cell>
          <table:table-cell table:style-name="ce139" table:formula="of:=IF([.D61]=20;1;IF([.D61]=19;2;IF([.D61]=19;2;IF([.D61]=18;3;IF([.D61]=17;4;IF([.D61]=16;5;IF([.D61]=15;6;IF([.D61]=14;7;IF([.D61]=13;8;IF([.D61]=12;9;IF([.D61]=11;10;IF([.D61]=10;11;IF([.D61]=9;12;IF([.D61]=8;13;IF([.D61]=7;14;IF([.D61]=6;15;IF([.D61]=5;16;IF([.D61]=4;17;IF([.D61]=3;18;IF([.D61]=2;19;IF([.D61]=1;20;0)))))))))))))))))))))" office:value-type="float" office:value="0" calcext:value-type="float">
            <text:p>0</text:p>
          </table:table-cell>
          <table:table-cell table:style-name="ce134" office:value-type="float" office:value="65" calcext:value-type="float">
            <text:p>65º</text:p>
          </table:table-cell>
          <table:table-cell table:style-name="ce139" table:formula="of:=IF([.F61]=20;1;IF([.F61]=19;2;IF([.F61]=19;2;IF([.F61]=18;3;IF([.F61]=17;4;IF([.F61]=16;5;IF([.F61]=15;6;IF([.F61]=14;7;IF([.F61]=13;8;IF([.F61]=12;9;IF([.F61]=11;10;IF([.F61]=10;11;IF([.F61]=9;12;IF([.F61]=8;13;IF([.F61]=7;14;IF([.F61]=6;15;IF([.F61]=5;16;IF([.F61]=4;17;IF([.F61]=3;18;IF([.F61]=2;19;IF([.F61]=1;20;0)))))))))))))))))))))" office:value-type="float" office:value="0" calcext:value-type="float">
            <text:p>0</text:p>
          </table:table-cell>
          <table:table-cell table:style-name="ce134" office:value-type="float" office:value="51" calcext:value-type="float">
            <text:p>51º</text:p>
          </table:table-cell>
          <table:table-cell table:style-name="ce139" table:formula="of:=IF([.H61]=20;1;IF([.H61]=19;2;IF([.H61]=19;2;IF([.H61]=18;3;IF([.H61]=17;4;IF([.H61]=16;5;IF([.H61]=15;6;IF([.H61]=14;7;IF([.H61]=13;8;IF([.H61]=12;9;IF([.H61]=11;10;IF([.H61]=10;11;IF([.H61]=9;12;IF([.H61]=8;13;IF([.H61]=7;14;IF([.H61]=6;15;IF([.H61]=5;16;IF([.H61]=4;17;IF([.H61]=3;18;IF([.H61]=2;19;IF([.H61]=1;20;0)))))))))))))))))))))" office:value-type="float" office:value="0" calcext:value-type="float">
            <text:p>0</text:p>
          </table:table-cell>
          <table:table-cell table:style-name="ce134" office:value-type="string" calcext:value-type="string">
            <text:p>-</text:p>
          </table:table-cell>
          <table:table-cell table:style-name="ce145" table:formula="of:=IF([.J61]=20;1;IF([.J61]=19;2;IF([.J61]=19;2;IF([.J61]=18;3;IF([.J61]=17;4;IF([.J61]=16;5;IF([.J61]=15;6;IF([.J61]=14;7;IF([.J61]=13;8;IF([.J61]=12;9;IF([.J61]=11;10;IF([.J61]=10;11;IF([.J61]=9;12;IF([.J61]=8;13;IF([.J61]=7;14;IF([.J61]=6;15;IF([.J61]=5;16;IF([.J61]=4;17;IF([.J61]=3;18;IF([.J61]=2;19;IF([.J61]=1;20;0)))))))))))))))))))))" office:value-type="float" office:value="0" calcext:value-type="float">
            <text:p>0</text:p>
          </table:table-cell>
          <table:table-cell table:style-name="ce150"/>
          <table:table-cell table:style-name="ce158" table:formula="of:=SUM([.C61];[.E61];[.G61];[.I61];[.K61])" office:value-type="float" office:value="0" calcext:value-type="float">
            <text:p>0</text:p>
          </table:table-cell>
          <table:table-cell table:style-name="ce160" table:formula="of:=RANK([.M61];[.$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5" calcext:value-type="float">
            <text:p>5</text:p>
          </table:table-cell>
          <table:table-cell table:style-name="ce180" office:value-type="float" office:value="5" calcext:value-type="float">
            <text:p>5</text:p>
          </table:table-cell>
          <table:table-cell table:style-name="ce185" office:value-type="string" calcext:value-type="string">
            <text:p>-</text:p>
          </table:table-cell>
          <table:table-cell table:style-name="ce188" table:formula="of:=SUM([.P61:.T61])" office:value-type="float" office:value="10" calcext:value-type="float">
            <text:p>10</text:p>
          </table:table-cell>
          <table:table-cell table:style-name="ce189" table:formula="of:=RANK([.U61];[.$U$4:.$U$133])" office:value-type="float" office:value="65" calcext:value-type="float">
            <text:p>65º</text:p>
          </table:table-cell>
          <table:table-cell table:style-name="ce161"/>
          <table:table-cell table:style-name="ce193" table:formula="of:=COUNTIF([.B61];&quot;&gt;0&quot;)+COUNTIF([.D61];&quot;&gt;0&quot;)+COUNTIF([.F61];&quot;&gt;0&quot;)+COUNTIF([.H61];&quot;&gt;0&quot;)+COUNTIF([.J61];&quot;&gt;0&quot;)" office:value-type="float" office:value="2" calcext:value-type="float">
            <text:p>2</text:p>
          </table:table-cell>
          <table:table-cell table:style-name="ce200" table:formula="of:=[.M61]/[.X61]" office:value-type="float" office:value="0" calcext:value-type="float">
            <text:p>0.0</text:p>
          </table:table-cell>
          <table:table-cell table:style-name="ce204" table:formula="of:=RANK([.Y61];[.$Y$4:.$Y$133])" office:value-type="float" office:value="71" calcext:value-type="float">
            <text:p>71º</text:p>
          </table:table-cell>
          <table:table-cell table:style-name="ce208" table:formula="of:=[.U61]/[.X61]" office:value-type="float" office:value="5" calcext:value-type="float">
            <text:p>5.0</text:p>
          </table:table-cell>
          <table:table-cell table:style-name="ce212" table:formula="of:=RANK([.AA61];[.$AA$4:.$AA$133])" office:value-type="float" office:value="68" calcext:value-type="float">
            <text:p>68º</text:p>
          </table:table-cell>
          <table:table-cell table:number-columns-repeated="996"/>
        </table:table-row>
        <table:table-row table:style-name="ro10">
          <table:table-cell table:style-name="ce126" office:value-type="string" calcext:value-type="string">
            <text:p>ISADORA</text:p>
            <draw:frame table:end-cell-address="'Rk Histórico'.A63" table:end-x="84.73pt" table:end-y="13.49pt" draw:z-index="3" draw:name="image3.png" draw:style-name="gr1" draw:text-style-name="P1" svg:width="14.23pt" svg:height="14.23pt" svg:x="70.5pt" svg:y="17.26pt">
              <draw:image xlink:href="Pictures/10000201000002D0000002D03A56A06C9213C946.png" xlink:type="simple" xlink:show="embed" xlink:actuate="onLoad">
                <text:p/>
              </draw:image>
            </draw:frame>
          </table:table-cell>
          <table:table-cell table:style-name="ce134" office:value-type="string" calcext:value-type="string">
            <text:p>-</text:p>
          </table:table-cell>
          <table:table-cell table:style-name="ce139" table:formula="of:=IF([.B62]=20;1;IF([.B62]=19;2;IF([.B62]=19;2;IF([.B62]=18;3;IF([.B62]=17;4;IF([.B62]=16;5;IF([.B62]=15;6;IF([.B62]=14;7;IF([.B62]=13;8;IF([.B62]=12;9;IF([.B62]=11;10;IF([.B62]=10;11;IF([.B62]=9;12;IF([.B62]=8;13;IF([.B62]=7;14;IF([.B62]=6;15;IF([.B62]=5;16;IF([.B62]=4;17;IF([.B62]=3;18;IF([.B62]=2;19;IF([.B62]=1;20;0)))))))))))))))))))))" office:value-type="float" office:value="0" calcext:value-type="float">
            <text:p>0</text:p>
          </table:table-cell>
          <table:table-cell table:style-name="ce134" office:value-type="float" office:value="24" calcext:value-type="float">
            <text:p>24º</text:p>
          </table:table-cell>
          <table:table-cell table:style-name="ce139" table:formula="of:=IF([.D62]=20;1;IF([.D62]=19;2;IF([.D62]=19;2;IF([.D62]=18;3;IF([.D62]=17;4;IF([.D62]=16;5;IF([.D62]=15;6;IF([.D62]=14;7;IF([.D62]=13;8;IF([.D62]=12;9;IF([.D62]=11;10;IF([.D62]=10;11;IF([.D62]=9;12;IF([.D62]=8;13;IF([.D62]=7;14;IF([.D62]=6;15;IF([.D62]=5;16;IF([.D62]=4;17;IF([.D62]=3;18;IF([.D62]=2;19;IF([.D62]=1;20;0)))))))))))))))))))))" office:value-type="float" office:value="0" calcext:value-type="float">
            <text:p>0</text:p>
          </table:table-cell>
          <table:table-cell table:style-name="ce134" office:value-type="float" office:value="61" calcext:value-type="float">
            <text:p>61º</text:p>
          </table:table-cell>
          <table:table-cell table:style-name="ce139" table:formula="of:=IF([.F62]=20;1;IF([.F62]=19;2;IF([.F62]=19;2;IF([.F62]=18;3;IF([.F62]=17;4;IF([.F62]=16;5;IF([.F62]=15;6;IF([.F62]=14;7;IF([.F62]=13;8;IF([.F62]=12;9;IF([.F62]=11;10;IF([.F62]=10;11;IF([.F62]=9;12;IF([.F62]=8;13;IF([.F62]=7;14;IF([.F62]=6;15;IF([.F62]=5;16;IF([.F62]=4;17;IF([.F62]=3;18;IF([.F62]=2;19;IF([.F62]=1;20;0)))))))))))))))))))))" office:value-type="float" office:value="0" calcext:value-type="float">
            <text:p>0</text:p>
          </table:table-cell>
          <table:table-cell table:style-name="ce134" office:value-type="float" office:value="34" calcext:value-type="float">
            <text:p>34º</text:p>
          </table:table-cell>
          <table:table-cell table:style-name="ce139" table:formula="of:=IF([.H62]=20;1;IF([.H62]=19;2;IF([.H62]=19;2;IF([.H62]=18;3;IF([.H62]=17;4;IF([.H62]=16;5;IF([.H62]=15;6;IF([.H62]=14;7;IF([.H62]=13;8;IF([.H62]=12;9;IF([.H62]=11;10;IF([.H62]=10;11;IF([.H62]=9;12;IF([.H62]=8;13;IF([.H62]=7;14;IF([.H62]=6;15;IF([.H62]=5;16;IF([.H62]=4;17;IF([.H62]=3;18;IF([.H62]=2;19;IF([.H62]=1;20;0)))))))))))))))))))))" office:value-type="float" office:value="0" calcext:value-type="float">
            <text:p>0</text:p>
          </table:table-cell>
          <table:table-cell table:style-name="ce134" office:value-type="float" office:value="20" calcext:value-type="float">
            <text:p>20º</text:p>
          </table:table-cell>
          <table:table-cell table:style-name="ce145" table:formula="of:=IF([.J62]=20;1;IF([.J62]=19;2;IF([.J62]=19;2;IF([.J62]=18;3;IF([.J62]=17;4;IF([.J62]=16;5;IF([.J62]=15;6;IF([.J62]=14;7;IF([.J62]=13;8;IF([.J62]=12;9;IF([.J62]=11;10;IF([.J62]=10;11;IF([.J62]=9;12;IF([.J62]=8;13;IF([.J62]=7;14;IF([.J62]=6;15;IF([.J62]=5;16;IF([.J62]=4;17;IF([.J62]=3;18;IF([.J62]=2;19;IF([.J62]=1;20;0)))))))))))))))))))))" office:value-type="float" office:value="1" calcext:value-type="float">
            <text:p>1</text:p>
          </table:table-cell>
          <table:table-cell table:style-name="ce150"/>
          <table:table-cell table:style-name="ce158" table:formula="of:=SUM([.C62];[.E62];[.G62];[.I62];[.K62])" office:value-type="float" office:value="1" calcext:value-type="float">
            <text:p>1</text:p>
          </table:table-cell>
          <table:table-cell table:style-name="ce160" table:formula="of:=RANK([.M62];[.$M$4:.$M$133])" office:value-type="float" office:value="69" calcext:value-type="float">
            <text:p>69º</text:p>
          </table:table-cell>
          <table:table-cell table:style-name="ce161"/>
          <table:table-cell table:style-name="ce169" office:value-type="string" calcext:value-type="string">
            <text:p>-</text:p>
          </table:table-cell>
          <table:table-cell table:style-name="ce175" office:value-type="float" office:value="6" calcext:value-type="float">
            <text:p>6</text:p>
          </table:table-cell>
          <table:table-cell table:style-name="ce175" office:value-type="float" office:value="5" calcext:value-type="float">
            <text:p>5</text:p>
          </table:table-cell>
          <table:table-cell table:style-name="ce180" office:value-type="float" office:value="3" calcext:value-type="float">
            <text:p>3</text:p>
          </table:table-cell>
          <table:table-cell table:style-name="ce185" office:value-type="float" office:value="3" calcext:value-type="float">
            <text:p>3</text:p>
          </table:table-cell>
          <table:table-cell table:style-name="ce188" table:formula="of:=SUM([.P62:.T62])" office:value-type="float" office:value="17" calcext:value-type="float">
            <text:p>17</text:p>
          </table:table-cell>
          <table:table-cell table:style-name="ce189" table:formula="of:=RANK([.U62];[.$U$4:.$U$133])" office:value-type="float" office:value="38" calcext:value-type="float">
            <text:p>38º</text:p>
          </table:table-cell>
          <table:table-cell table:style-name="ce161"/>
          <table:table-cell table:style-name="ce193" table:formula="of:=COUNTIF([.B62];&quot;&gt;0&quot;)+COUNTIF([.D62];&quot;&gt;0&quot;)+COUNTIF([.F62];&quot;&gt;0&quot;)+COUNTIF([.H62];&quot;&gt;0&quot;)+COUNTIF([.J62];&quot;&gt;0&quot;)" office:value-type="float" office:value="4" calcext:value-type="float">
            <text:p>4</text:p>
          </table:table-cell>
          <table:table-cell table:style-name="ce200" table:formula="of:=[.M62]/[.X62]" office:value-type="float" office:value="0.25" calcext:value-type="float">
            <text:p>0.3</text:p>
          </table:table-cell>
          <table:table-cell table:style-name="ce204" table:formula="of:=RANK([.Y62];[.$Y$4:.$Y$133])" office:value-type="float" office:value="70" calcext:value-type="float">
            <text:p>70º</text:p>
          </table:table-cell>
          <table:table-cell table:style-name="ce208" table:formula="of:=[.U62]/[.X62]" office:value-type="float" office:value="4.25" calcext:value-type="float">
            <text:p>4.3</text:p>
          </table:table-cell>
          <table:table-cell table:style-name="ce212" table:formula="of:=RANK([.AA62];[.$AA$4:.$AA$133])" office:value-type="float" office:value="96" calcext:value-type="float">
            <text:p>96º</text:p>
          </table:table-cell>
          <table:table-cell table:number-columns-repeated="996"/>
        </table:table-row>
        <table:table-row table:style-name="ro10">
          <table:table-cell table:style-name="ce126" office:value-type="string" calcext:value-type="string">
            <text:p>IURI</text:p>
          </table:table-cell>
          <table:table-cell table:style-name="ce134" office:value-type="float" office:value="35" calcext:value-type="float">
            <text:p>35º</text:p>
          </table:table-cell>
          <table:table-cell table:style-name="ce139" table:formula="of:=IF([.B63]=20;1;IF([.B63]=19;2;IF([.B63]=19;2;IF([.B63]=18;3;IF([.B63]=17;4;IF([.B63]=16;5;IF([.B63]=15;6;IF([.B63]=14;7;IF([.B63]=13;8;IF([.B63]=12;9;IF([.B63]=11;10;IF([.B63]=10;11;IF([.B63]=9;12;IF([.B63]=8;13;IF([.B63]=7;14;IF([.B63]=6;15;IF([.B63]=5;16;IF([.B63]=4;17;IF([.B63]=3;18;IF([.B63]=2;19;IF([.B63]=1;20;0)))))))))))))))))))))" office:value-type="float" office:value="0" calcext:value-type="float">
            <text:p>0</text:p>
          </table:table-cell>
          <table:table-cell table:style-name="ce134" office:value-type="float" office:value="23" calcext:value-type="float">
            <text:p>23º</text:p>
          </table:table-cell>
          <table:table-cell table:style-name="ce139" table:formula="of:=IF([.D63]=20;1;IF([.D63]=19;2;IF([.D63]=19;2;IF([.D63]=18;3;IF([.D63]=17;4;IF([.D63]=16;5;IF([.D63]=15;6;IF([.D63]=14;7;IF([.D63]=13;8;IF([.D63]=12;9;IF([.D63]=11;10;IF([.D63]=10;11;IF([.D63]=9;12;IF([.D63]=8;13;IF([.D63]=7;14;IF([.D63]=6;15;IF([.D63]=5;16;IF([.D63]=4;17;IF([.D63]=3;18;IF([.D63]=2;19;IF([.D63]=1;20;0)))))))))))))))))))))" office:value-type="float" office:value="0" calcext:value-type="float">
            <text:p>0</text:p>
          </table:table-cell>
          <table:table-cell table:style-name="ce134" office:value-type="float" office:value="26" calcext:value-type="float">
            <text:p>26º</text:p>
          </table:table-cell>
          <table:table-cell table:style-name="ce139" table:formula="of:=IF([.F63]=20;1;IF([.F63]=19;2;IF([.F63]=19;2;IF([.F63]=18;3;IF([.F63]=17;4;IF([.F63]=16;5;IF([.F63]=15;6;IF([.F63]=14;7;IF([.F63]=13;8;IF([.F63]=12;9;IF([.F63]=11;10;IF([.F63]=10;11;IF([.F63]=9;12;IF([.F63]=8;13;IF([.F63]=7;14;IF([.F63]=6;15;IF([.F63]=5;16;IF([.F63]=4;17;IF([.F63]=3;18;IF([.F63]=2;19;IF([.F63]=1;20;0)))))))))))))))))))))" office:value-type="float" office:value="0" calcext:value-type="float">
            <text:p>0</text:p>
          </table:table-cell>
          <table:table-cell table:style-name="ce134" office:value-type="float" office:value="1" calcext:value-type="float">
            <text:p>1º</text:p>
          </table:table-cell>
          <table:table-cell table:style-name="ce139" table:formula="of:=IF([.H63]=20;1;IF([.H63]=19;2;IF([.H63]=19;2;IF([.H63]=18;3;IF([.H63]=17;4;IF([.H63]=16;5;IF([.H63]=15;6;IF([.H63]=14;7;IF([.H63]=13;8;IF([.H63]=12;9;IF([.H63]=11;10;IF([.H63]=10;11;IF([.H63]=9;12;IF([.H63]=8;13;IF([.H63]=7;14;IF([.H63]=6;15;IF([.H63]=5;16;IF([.H63]=4;17;IF([.H63]=3;18;IF([.H63]=2;19;IF([.H63]=1;20;0)))))))))))))))))))))" office:value-type="float" office:value="20" calcext:value-type="float">
            <text:p>20</text:p>
          </table:table-cell>
          <table:table-cell table:style-name="ce134" office:value-type="float" office:value="31" calcext:value-type="float">
            <text:p>31º</text:p>
          </table:table-cell>
          <table:table-cell table:style-name="ce145" table:formula="of:=IF([.J63]=20;1;IF([.J63]=19;2;IF([.J63]=19;2;IF([.J63]=18;3;IF([.J63]=17;4;IF([.J63]=16;5;IF([.J63]=15;6;IF([.J63]=14;7;IF([.J63]=13;8;IF([.J63]=12;9;IF([.J63]=11;10;IF([.J63]=10;11;IF([.J63]=9;12;IF([.J63]=8;13;IF([.J63]=7;14;IF([.J63]=6;15;IF([.J63]=5;16;IF([.J63]=4;17;IF([.J63]=3;18;IF([.J63]=2;19;IF([.J63]=1;20;0)))))))))))))))))))))" office:value-type="float" office:value="0" calcext:value-type="float">
            <text:p>0</text:p>
          </table:table-cell>
          <table:table-cell table:style-name="ce150"/>
          <table:table-cell table:style-name="ce158" table:formula="of:=SUM([.C63];[.E63];[.G63];[.I63];[.K63])" office:value-type="float" office:value="20" calcext:value-type="float">
            <text:p>20</text:p>
          </table:table-cell>
          <table:table-cell table:style-name="ce160" table:formula="of:=RANK([.M63];[.$M$4:.$M$133])" office:value-type="float" office:value="18" calcext:value-type="float">
            <text:p>18º</text:p>
          </table:table-cell>
          <table:table-cell table:style-name="ce161"/>
          <table:table-cell table:style-name="ce169" office:value-type="float" office:value="3" calcext:value-type="float">
            <text:p>3</text:p>
          </table:table-cell>
          <table:table-cell table:style-name="ce175" office:value-type="float" office:value="6" calcext:value-type="float">
            <text:p>6</text:p>
          </table:table-cell>
          <table:table-cell table:style-name="ce175" office:value-type="float" office:value="7" calcext:value-type="float">
            <text:p>7</text:p>
          </table:table-cell>
          <table:table-cell table:style-name="ce180" office:value-type="float" office:value="12" calcext:value-type="float">
            <text:p>12</text:p>
          </table:table-cell>
          <table:table-cell table:style-name="ce185" office:value-type="float" office:value="1" calcext:value-type="float">
            <text:p>1</text:p>
          </table:table-cell>
          <table:table-cell table:style-name="ce188" table:formula="of:=SUM([.P63:.T63])" office:value-type="float" office:value="29" calcext:value-type="float">
            <text:p>29</text:p>
          </table:table-cell>
          <table:table-cell table:style-name="ce189" table:formula="of:=RANK([.U63];[.$U$4:.$U$133])" office:value-type="float" office:value="9" calcext:value-type="float">
            <text:p>9º</text:p>
          </table:table-cell>
          <table:table-cell table:style-name="ce161"/>
          <table:table-cell table:style-name="ce193" table:formula="of:=COUNTIF([.B63];&quot;&gt;0&quot;)+COUNTIF([.D63];&quot;&gt;0&quot;)+COUNTIF([.F63];&quot;&gt;0&quot;)+COUNTIF([.H63];&quot;&gt;0&quot;)+COUNTIF([.J63];&quot;&gt;0&quot;)" office:value-type="float" office:value="5" calcext:value-type="float">
            <text:p>5</text:p>
          </table:table-cell>
          <table:table-cell table:style-name="ce200" table:formula="of:=[.M63]/[.X63]" office:value-type="float" office:value="4" calcext:value-type="float">
            <text:p>4.0</text:p>
          </table:table-cell>
          <table:table-cell table:style-name="ce204" table:formula="of:=RANK([.Y63];[.$Y$4:.$Y$133])" office:value-type="float" office:value="39" calcext:value-type="float">
            <text:p>39º</text:p>
          </table:table-cell>
          <table:table-cell table:style-name="ce208" table:formula="of:=[.U63]/[.X63]" office:value-type="float" office:value="5.8" calcext:value-type="float">
            <text:p>5.8</text:p>
          </table:table-cell>
          <table:table-cell table:style-name="ce212" table:formula="of:=RANK([.AA63];[.$AA$4:.$AA$133])" office:value-type="float" office:value="51" calcext:value-type="float">
            <text:p>51º</text:p>
          </table:table-cell>
          <table:table-cell table:number-columns-repeated="996"/>
        </table:table-row>
        <table:table-row table:style-name="ro10">
          <table:table-cell table:style-name="ce126" office:value-type="string" calcext:value-type="string">
            <text:p>IVAN</text:p>
          </table:table-cell>
          <table:table-cell table:style-name="ce134" office:value-type="float" office:value="27" calcext:value-type="float">
            <text:p>27º</text:p>
          </table:table-cell>
          <table:table-cell table:style-name="ce139" table:formula="of:=IF([.B64]=20;1;IF([.B64]=19;2;IF([.B64]=19;2;IF([.B64]=18;3;IF([.B64]=17;4;IF([.B64]=16;5;IF([.B64]=15;6;IF([.B64]=14;7;IF([.B64]=13;8;IF([.B64]=12;9;IF([.B64]=11;10;IF([.B64]=10;11;IF([.B64]=9;12;IF([.B64]=8;13;IF([.B64]=7;14;IF([.B64]=6;15;IF([.B64]=5;16;IF([.B64]=4;17;IF([.B64]=3;18;IF([.B64]=2;19;IF([.B64]=1;20;0)))))))))))))))))))))" office:value-type="float" office:value="0" calcext:value-type="float">
            <text:p>0</text:p>
          </table:table-cell>
          <table:table-cell table:style-name="ce134" office:value-type="float" office:value="60" calcext:value-type="float">
            <text:p>60º</text:p>
          </table:table-cell>
          <table:table-cell table:style-name="ce139" table:formula="of:=IF([.D64]=20;1;IF([.D64]=19;2;IF([.D64]=19;2;IF([.D64]=18;3;IF([.D64]=17;4;IF([.D64]=16;5;IF([.D64]=15;6;IF([.D64]=14;7;IF([.D64]=13;8;IF([.D64]=12;9;IF([.D64]=11;10;IF([.D64]=10;11;IF([.D64]=9;12;IF([.D64]=8;13;IF([.D64]=7;14;IF([.D64]=6;15;IF([.D64]=5;16;IF([.D64]=4;17;IF([.D64]=3;18;IF([.D64]=2;19;IF([.D64]=1;20;0)))))))))))))))))))))" office:value-type="float" office:value="0" calcext:value-type="float">
            <text:p>0</text:p>
          </table:table-cell>
          <table:table-cell table:style-name="ce134" office:value-type="float" office:value="18" calcext:value-type="float">
            <text:p>18º</text:p>
          </table:table-cell>
          <table:table-cell table:style-name="ce139" table:formula="of:=IF([.F64]=20;1;IF([.F64]=19;2;IF([.F64]=19;2;IF([.F64]=18;3;IF([.F64]=17;4;IF([.F64]=16;5;IF([.F64]=15;6;IF([.F64]=14;7;IF([.F64]=13;8;IF([.F64]=12;9;IF([.F64]=11;10;IF([.F64]=10;11;IF([.F64]=9;12;IF([.F64]=8;13;IF([.F64]=7;14;IF([.F64]=6;15;IF([.F64]=5;16;IF([.F64]=4;17;IF([.F64]=3;18;IF([.F64]=2;19;IF([.F64]=1;20;0)))))))))))))))))))))" office:value-type="float" office:value="3" calcext:value-type="float">
            <text:p>3</text:p>
          </table:table-cell>
          <table:table-cell table:style-name="ce134" office:value-type="float" office:value="27" calcext:value-type="float">
            <text:p>27º</text:p>
          </table:table-cell>
          <table:table-cell table:style-name="ce139" table:formula="of:=IF([.H64]=20;1;IF([.H64]=19;2;IF([.H64]=19;2;IF([.H64]=18;3;IF([.H64]=17;4;IF([.H64]=16;5;IF([.H64]=15;6;IF([.H64]=14;7;IF([.H64]=13;8;IF([.H64]=12;9;IF([.H64]=11;10;IF([.H64]=10;11;IF([.H64]=9;12;IF([.H64]=8;13;IF([.H64]=7;14;IF([.H64]=6;15;IF([.H64]=5;16;IF([.H64]=4;17;IF([.H64]=3;18;IF([.H64]=2;19;IF([.H64]=1;20;0)))))))))))))))))))))" office:value-type="float" office:value="0" calcext:value-type="float">
            <text:p>0</text:p>
          </table:table-cell>
          <table:table-cell table:style-name="ce134" office:value-type="string" calcext:value-type="string">
            <text:p>-</text:p>
          </table:table-cell>
          <table:table-cell table:style-name="ce145" table:formula="of:=IF([.J64]=20;1;IF([.J64]=19;2;IF([.J64]=19;2;IF([.J64]=18;3;IF([.J64]=17;4;IF([.J64]=16;5;IF([.J64]=15;6;IF([.J64]=14;7;IF([.J64]=13;8;IF([.J64]=12;9;IF([.J64]=11;10;IF([.J64]=10;11;IF([.J64]=9;12;IF([.J64]=8;13;IF([.J64]=7;14;IF([.J64]=6;15;IF([.J64]=5;16;IF([.J64]=4;17;IF([.J64]=3;18;IF([.J64]=2;19;IF([.J64]=1;20;0)))))))))))))))))))))" office:value-type="float" office:value="0" calcext:value-type="float">
            <text:p>0</text:p>
          </table:table-cell>
          <table:table-cell table:style-name="ce150"/>
          <table:table-cell table:style-name="ce158" table:formula="of:=SUM([.C64];[.E64];[.G64];[.I64];[.K64])" office:value-type="float" office:value="3" calcext:value-type="float">
            <text:p>3</text:p>
          </table:table-cell>
          <table:table-cell table:style-name="ce160" table:formula="of:=RANK([.M64];[.$M$4:.$M$133])" office:value-type="float" office:value="64" calcext:value-type="float">
            <text:p>64º</text:p>
          </table:table-cell>
          <table:table-cell table:style-name="ce161"/>
          <table:table-cell table:style-name="ce169" office:value-type="float" office:value="4" calcext:value-type="float">
            <text:p>4</text:p>
          </table:table-cell>
          <table:table-cell table:style-name="ce175" office:value-type="float" office:value="6" calcext:value-type="float">
            <text:p>6</text:p>
          </table:table-cell>
          <table:table-cell table:style-name="ce175" office:value-type="float" office:value="12" calcext:value-type="float">
            <text:p>12</text:p>
          </table:table-cell>
          <table:table-cell table:style-name="ce180" office:value-type="float" office:value="4" calcext:value-type="float">
            <text:p>4</text:p>
          </table:table-cell>
          <table:table-cell table:style-name="ce185" office:value-type="string" calcext:value-type="string">
            <text:p>-</text:p>
          </table:table-cell>
          <table:table-cell table:style-name="ce188" table:formula="of:=SUM([.P64:.T64])" office:value-type="float" office:value="26" calcext:value-type="float">
            <text:p>26</text:p>
          </table:table-cell>
          <table:table-cell table:style-name="ce189" table:formula="of:=RANK([.U64];[.$U$4:.$U$133])" office:value-type="float" office:value="19" calcext:value-type="float">
            <text:p>19º</text:p>
          </table:table-cell>
          <table:table-cell table:style-name="ce161"/>
          <table:table-cell table:style-name="ce193" table:formula="of:=COUNTIF([.B64];&quot;&gt;0&quot;)+COUNTIF([.D64];&quot;&gt;0&quot;)+COUNTIF([.F64];&quot;&gt;0&quot;)+COUNTIF([.H64];&quot;&gt;0&quot;)+COUNTIF([.J64];&quot;&gt;0&quot;)" office:value-type="float" office:value="4" calcext:value-type="float">
            <text:p>4</text:p>
          </table:table-cell>
          <table:table-cell table:style-name="ce200" table:formula="of:=[.M64]/[.X64]" office:value-type="float" office:value="0.75" calcext:value-type="float">
            <text:p>0.8</text:p>
          </table:table-cell>
          <table:table-cell table:style-name="ce204" table:formula="of:=RANK([.Y64];[.$Y$4:.$Y$133])" office:value-type="float" office:value="68" calcext:value-type="float">
            <text:p>68º</text:p>
          </table:table-cell>
          <table:table-cell table:style-name="ce208" table:formula="of:=[.U64]/[.X64]" office:value-type="float" office:value="6.5" calcext:value-type="float">
            <text:p>6.5</text:p>
          </table:table-cell>
          <table:table-cell table:style-name="ce212" table:formula="of:=RANK([.AA64];[.$AA$4:.$AA$133])" office:value-type="float" office:value="26" calcext:value-type="float">
            <text:p>26º</text:p>
          </table:table-cell>
          <table:table-cell table:number-columns-repeated="996"/>
        </table:table-row>
        <table:table-row table:style-name="ro10">
          <table:table-cell table:style-name="ce126" office:value-type="string" calcext:value-type="string">
            <text:p>JOÃO ANTÔNIO</text:p>
          </table:table-cell>
          <table:table-cell table:style-name="ce134" office:value-type="string" calcext:value-type="string">
            <text:p>-</text:p>
          </table:table-cell>
          <table:table-cell table:style-name="ce139" table:formula="of:=IF([.B65]=20;1;IF([.B65]=19;2;IF([.B65]=19;2;IF([.B65]=18;3;IF([.B65]=17;4;IF([.B65]=16;5;IF([.B65]=15;6;IF([.B65]=14;7;IF([.B65]=13;8;IF([.B65]=12;9;IF([.B65]=11;10;IF([.B65]=10;11;IF([.B65]=9;12;IF([.B65]=8;13;IF([.B65]=7;14;IF([.B65]=6;15;IF([.B65]=5;16;IF([.B65]=4;17;IF([.B65]=3;18;IF([.B65]=2;19;IF([.B65]=1;20;0)))))))))))))))))))))" office:value-type="float" office:value="0" calcext:value-type="float">
            <text:p>0</text:p>
          </table:table-cell>
          <table:table-cell table:style-name="ce134" office:value-type="float" office:value="6" calcext:value-type="float">
            <text:p>6º</text:p>
          </table:table-cell>
          <table:table-cell table:style-name="ce139" table:formula="of:=IF([.D65]=20;1;IF([.D65]=19;2;IF([.D65]=19;2;IF([.D65]=18;3;IF([.D65]=17;4;IF([.D65]=16;5;IF([.D65]=15;6;IF([.D65]=14;7;IF([.D65]=13;8;IF([.D65]=12;9;IF([.D65]=11;10;IF([.D65]=10;11;IF([.D65]=9;12;IF([.D65]=8;13;IF([.D65]=7;14;IF([.D65]=6;15;IF([.D65]=5;16;IF([.D65]=4;17;IF([.D65]=3;18;IF([.D65]=2;19;IF([.D65]=1;20;0)))))))))))))))))))))" office:value-type="float" office:value="15" calcext:value-type="float">
            <text:p>15</text:p>
          </table:table-cell>
          <table:table-cell table:style-name="ce134" office:value-type="float" office:value="14" calcext:value-type="float">
            <text:p>14º</text:p>
          </table:table-cell>
          <table:table-cell table:style-name="ce139" table:formula="of:=IF([.F65]=20;1;IF([.F65]=19;2;IF([.F65]=19;2;IF([.F65]=18;3;IF([.F65]=17;4;IF([.F65]=16;5;IF([.F65]=15;6;IF([.F65]=14;7;IF([.F65]=13;8;IF([.F65]=12;9;IF([.F65]=11;10;IF([.F65]=10;11;IF([.F65]=9;12;IF([.F65]=8;13;IF([.F65]=7;14;IF([.F65]=6;15;IF([.F65]=5;16;IF([.F65]=4;17;IF([.F65]=3;18;IF([.F65]=2;19;IF([.F65]=1;20;0)))))))))))))))))))))" office:value-type="float" office:value="7" calcext:value-type="float">
            <text:p>7</text:p>
          </table:table-cell>
          <table:table-cell table:style-name="ce134" office:value-type="float" office:value="95" calcext:value-type="float">
            <text:p>95º</text:p>
          </table:table-cell>
          <table:table-cell table:style-name="ce139" table:formula="of:=IF([.H65]=20;1;IF([.H65]=19;2;IF([.H65]=19;2;IF([.H65]=18;3;IF([.H65]=17;4;IF([.H65]=16;5;IF([.H65]=15;6;IF([.H65]=14;7;IF([.H65]=13;8;IF([.H65]=12;9;IF([.H65]=11;10;IF([.H65]=10;11;IF([.H65]=9;12;IF([.H65]=8;13;IF([.H65]=7;14;IF([.H65]=6;15;IF([.H65]=5;16;IF([.H65]=4;17;IF([.H65]=3;18;IF([.H65]=2;19;IF([.H65]=1;20;0)))))))))))))))))))))" office:value-type="float" office:value="0" calcext:value-type="float">
            <text:p>0</text:p>
          </table:table-cell>
          <table:table-cell table:style-name="ce134" office:value-type="string" calcext:value-type="string">
            <text:p>-</text:p>
          </table:table-cell>
          <table:table-cell table:style-name="ce145" table:formula="of:=IF([.J65]=20;1;IF([.J65]=19;2;IF([.J65]=19;2;IF([.J65]=18;3;IF([.J65]=17;4;IF([.J65]=16;5;IF([.J65]=15;6;IF([.J65]=14;7;IF([.J65]=13;8;IF([.J65]=12;9;IF([.J65]=11;10;IF([.J65]=10;11;IF([.J65]=9;12;IF([.J65]=8;13;IF([.J65]=7;14;IF([.J65]=6;15;IF([.J65]=5;16;IF([.J65]=4;17;IF([.J65]=3;18;IF([.J65]=2;19;IF([.J65]=1;20;0)))))))))))))))))))))" office:value-type="float" office:value="0" calcext:value-type="float">
            <text:p>0</text:p>
          </table:table-cell>
          <table:table-cell table:style-name="ce150"/>
          <table:table-cell table:style-name="ce158" table:formula="of:=SUM([.C65];[.E65];[.G65];[.I65];[.K65])" office:value-type="float" office:value="22" calcext:value-type="float">
            <text:p>22</text:p>
          </table:table-cell>
          <table:table-cell table:style-name="ce160" table:formula="of:=RANK([.M65];[.$M$4:.$M$133])" office:value-type="float" office:value="16" calcext:value-type="float">
            <text:p>16º</text:p>
          </table:table-cell>
          <table:table-cell table:style-name="ce161"/>
          <table:table-cell table:style-name="ce169" office:value-type="string" calcext:value-type="string">
            <text:p>-</text:p>
          </table:table-cell>
          <table:table-cell table:style-name="ce175" office:value-type="float" office:value="6" calcext:value-type="float">
            <text:p>6</text:p>
          </table:table-cell>
          <table:table-cell table:style-name="ce175" office:value-type="float" office:value="5" calcext:value-type="float">
            <text:p>5</text:p>
          </table:table-cell>
          <table:table-cell table:style-name="ce180" office:value-type="float" office:value="4" calcext:value-type="float">
            <text:p>4</text:p>
          </table:table-cell>
          <table:table-cell table:style-name="ce185" office:value-type="string" calcext:value-type="string">
            <text:p>-</text:p>
          </table:table-cell>
          <table:table-cell table:style-name="ce188" table:formula="of:=SUM([.P65:.T65])" office:value-type="float" office:value="15" calcext:value-type="float">
            <text:p>15</text:p>
          </table:table-cell>
          <table:table-cell table:style-name="ce189" table:formula="of:=RANK([.U65];[.$U$4:.$U$133])" office:value-type="float" office:value="48" calcext:value-type="float">
            <text:p>48º</text:p>
          </table:table-cell>
          <table:table-cell table:style-name="ce161"/>
          <table:table-cell table:style-name="ce193" table:formula="of:=COUNTIF([.B65];&quot;&gt;0&quot;)+COUNTIF([.D65];&quot;&gt;0&quot;)+COUNTIF([.F65];&quot;&gt;0&quot;)+COUNTIF([.H65];&quot;&gt;0&quot;)+COUNTIF([.J65];&quot;&gt;0&quot;)" office:value-type="float" office:value="3" calcext:value-type="float">
            <text:p>3</text:p>
          </table:table-cell>
          <table:table-cell table:style-name="ce200" table:formula="of:=[.M65]/[.X65]" office:value-type="float" office:value="7.33333333333333" calcext:value-type="float">
            <text:p>7.3</text:p>
          </table:table-cell>
          <table:table-cell table:style-name="ce204" table:formula="of:=RANK([.Y65];[.$Y$4:.$Y$133])" office:value-type="float" office:value="13" calcext:value-type="float">
            <text:p>13º</text:p>
          </table:table-cell>
          <table:table-cell table:style-name="ce208" table:formula="of:=[.U65]/[.X65]" office:value-type="float" office:value="5" calcext:value-type="float">
            <text:p>5.0</text:p>
          </table:table-cell>
          <table:table-cell table:style-name="ce212" table:formula="of:=RANK([.AA65];[.$AA$4:.$AA$133])" office:value-type="float" office:value="68" calcext:value-type="float">
            <text:p>68º</text:p>
          </table:table-cell>
          <table:table-cell table:number-columns-repeated="996"/>
        </table:table-row>
        <table:table-row table:style-name="ro10">
          <table:table-cell table:style-name="ce126" office:value-type="string" calcext:value-type="string">
            <text:p>JOÃO RICKES</text:p>
          </table:table-cell>
          <table:table-cell table:style-name="ce134" office:value-type="string" calcext:value-type="string">
            <text:p>-</text:p>
          </table:table-cell>
          <table:table-cell table:style-name="ce139" table:formula="of:=IF([.B66]=20;1;IF([.B66]=19;2;IF([.B66]=19;2;IF([.B66]=18;3;IF([.B66]=17;4;IF([.B66]=16;5;IF([.B66]=15;6;IF([.B66]=14;7;IF([.B66]=13;8;IF([.B66]=12;9;IF([.B66]=11;10;IF([.B66]=10;11;IF([.B66]=9;12;IF([.B66]=8;13;IF([.B66]=7;14;IF([.B66]=6;15;IF([.B66]=5;16;IF([.B66]=4;17;IF([.B66]=3;18;IF([.B66]=2;19;IF([.B66]=1;20;0)))))))))))))))))))))" office:value-type="float" office:value="0" calcext:value-type="float">
            <text:p>0</text:p>
          </table:table-cell>
          <table:table-cell table:style-name="ce134" office:value-type="string" calcext:value-type="string">
            <text:p>-</text:p>
          </table:table-cell>
          <table:table-cell table:style-name="ce139" table:formula="of:=IF([.D66]=20;1;IF([.D66]=19;2;IF([.D66]=19;2;IF([.D66]=18;3;IF([.D66]=17;4;IF([.D66]=16;5;IF([.D66]=15;6;IF([.D66]=14;7;IF([.D66]=13;8;IF([.D66]=12;9;IF([.D66]=11;10;IF([.D66]=10;11;IF([.D66]=9;12;IF([.D66]=8;13;IF([.D66]=7;14;IF([.D66]=6;15;IF([.D66]=5;16;IF([.D66]=4;17;IF([.D66]=3;18;IF([.D66]=2;19;IF([.D66]=1;20;0)))))))))))))))))))))" office:value-type="float" office:value="0" calcext:value-type="float">
            <text:p>0</text:p>
          </table:table-cell>
          <table:table-cell table:style-name="ce134" office:value-type="string" calcext:value-type="string">
            <text:p>-</text:p>
          </table:table-cell>
          <table:table-cell table:style-name="ce139" table:formula="of:=IF([.F66]=20;1;IF([.F66]=19;2;IF([.F66]=19;2;IF([.F66]=18;3;IF([.F66]=17;4;IF([.F66]=16;5;IF([.F66]=15;6;IF([.F66]=14;7;IF([.F66]=13;8;IF([.F66]=12;9;IF([.F66]=11;10;IF([.F66]=10;11;IF([.F66]=9;12;IF([.F66]=8;13;IF([.F66]=7;14;IF([.F66]=6;15;IF([.F66]=5;16;IF([.F66]=4;17;IF([.F66]=3;18;IF([.F66]=2;19;IF([.F66]=1;20;0)))))))))))))))))))))" office:value-type="float" office:value="0" calcext:value-type="float">
            <text:p>0</text:p>
          </table:table-cell>
          <table:table-cell table:style-name="ce134" office:value-type="float" office:value="102" calcext:value-type="float">
            <text:p>102º</text:p>
          </table:table-cell>
          <table:table-cell table:style-name="ce139" table:formula="of:=IF([.H66]=20;1;IF([.H66]=19;2;IF([.H66]=19;2;IF([.H66]=18;3;IF([.H66]=17;4;IF([.H66]=16;5;IF([.H66]=15;6;IF([.H66]=14;7;IF([.H66]=13;8;IF([.H66]=12;9;IF([.H66]=11;10;IF([.H66]=10;11;IF([.H66]=9;12;IF([.H66]=8;13;IF([.H66]=7;14;IF([.H66]=6;15;IF([.H66]=5;16;IF([.H66]=4;17;IF([.H66]=3;18;IF([.H66]=2;19;IF([.H66]=1;20;0)))))))))))))))))))))" office:value-type="float" office:value="0" calcext:value-type="float">
            <text:p>0</text:p>
          </table:table-cell>
          <table:table-cell table:style-name="ce134" office:value-type="string" calcext:value-type="string">
            <text:p>-</text:p>
          </table:table-cell>
          <table:table-cell table:style-name="ce145" table:formula="of:=IF([.J66]=20;1;IF([.J66]=19;2;IF([.J66]=19;2;IF([.J66]=18;3;IF([.J66]=17;4;IF([.J66]=16;5;IF([.J66]=15;6;IF([.J66]=14;7;IF([.J66]=13;8;IF([.J66]=12;9;IF([.J66]=11;10;IF([.J66]=10;11;IF([.J66]=9;12;IF([.J66]=8;13;IF([.J66]=7;14;IF([.J66]=6;15;IF([.J66]=5;16;IF([.J66]=4;17;IF([.J66]=3;18;IF([.J66]=2;19;IF([.J66]=1;20;0)))))))))))))))))))))" office:value-type="float" office:value="0" calcext:value-type="float">
            <text:p>0</text:p>
          </table:table-cell>
          <table:table-cell table:style-name="ce150"/>
          <table:table-cell table:style-name="ce158" table:formula="of:=SUM([.C66];[.E66];[.G66];[.I66];[.K66])" office:value-type="float" office:value="0" calcext:value-type="float">
            <text:p>0</text:p>
          </table:table-cell>
          <table:table-cell table:style-name="ce160" table:formula="of:=RANK([.M66];[.$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0" calcext:value-type="float">
            <text:p>0</text:p>
          </table:table-cell>
          <table:table-cell table:style-name="ce185" office:value-type="string" calcext:value-type="string">
            <text:p>-</text:p>
          </table:table-cell>
          <table:table-cell table:style-name="ce188" table:formula="of:=SUM([.P66:.T66])" office:value-type="float" office:value="0" calcext:value-type="float">
            <text:p>0</text:p>
          </table:table-cell>
          <table:table-cell table:style-name="ce189" table:formula="of:=RANK([.U66];[.$U$4:.$U$133])" office:value-type="float" office:value="128" calcext:value-type="float">
            <text:p>128º</text:p>
          </table:table-cell>
          <table:table-cell table:style-name="ce161"/>
          <table:table-cell table:style-name="ce193" table:formula="of:=COUNTIF([.B66];&quot;&gt;0&quot;)+COUNTIF([.D66];&quot;&gt;0&quot;)+COUNTIF([.F66];&quot;&gt;0&quot;)+COUNTIF([.H66];&quot;&gt;0&quot;)+COUNTIF([.J66];&quot;&gt;0&quot;)" office:value-type="float" office:value="1" calcext:value-type="float">
            <text:p>1</text:p>
          </table:table-cell>
          <table:table-cell table:style-name="ce200" table:formula="of:=[.M66]/[.X66]" office:value-type="float" office:value="0" calcext:value-type="float">
            <text:p>0.0</text:p>
          </table:table-cell>
          <table:table-cell table:style-name="ce204" table:formula="of:=RANK([.Y66];[.$Y$4:.$Y$133])" office:value-type="float" office:value="71" calcext:value-type="float">
            <text:p>71º</text:p>
          </table:table-cell>
          <table:table-cell table:style-name="ce208" table:formula="of:=[.U66]/[.X66]" office:value-type="float" office:value="0" calcext:value-type="float">
            <text:p>0.0</text:p>
          </table:table-cell>
          <table:table-cell table:style-name="ce212" table:formula="of:=RANK([.AA66];[.$AA$4:.$AA$133])" office:value-type="float" office:value="128" calcext:value-type="float">
            <text:p>128º</text:p>
          </table:table-cell>
          <table:table-cell table:number-columns-repeated="996"/>
        </table:table-row>
        <table:table-row table:style-name="ro10">
          <table:table-cell table:style-name="ce126" office:value-type="string" calcext:value-type="string">
            <text:p>JUAN</text:p>
          </table:table-cell>
          <table:table-cell table:style-name="ce134" office:value-type="float" office:value="32" calcext:value-type="float">
            <text:p>32º</text:p>
          </table:table-cell>
          <table:table-cell table:style-name="ce139" table:formula="of:=IF([.B67]=20;1;IF([.B67]=19;2;IF([.B67]=19;2;IF([.B67]=18;3;IF([.B67]=17;4;IF([.B67]=16;5;IF([.B67]=15;6;IF([.B67]=14;7;IF([.B67]=13;8;IF([.B67]=12;9;IF([.B67]=11;10;IF([.B67]=10;11;IF([.B67]=9;12;IF([.B67]=8;13;IF([.B67]=7;14;IF([.B67]=6;15;IF([.B67]=5;16;IF([.B67]=4;17;IF([.B67]=3;18;IF([.B67]=2;19;IF([.B67]=1;20;0)))))))))))))))))))))" office:value-type="float" office:value="0" calcext:value-type="float">
            <text:p>0</text:p>
          </table:table-cell>
          <table:table-cell table:style-name="ce134" office:value-type="float" office:value="4" calcext:value-type="float">
            <text:p>4º</text:p>
          </table:table-cell>
          <table:table-cell table:style-name="ce139" table:formula="of:=IF([.D67]=20;1;IF([.D67]=19;2;IF([.D67]=19;2;IF([.D67]=18;3;IF([.D67]=17;4;IF([.D67]=16;5;IF([.D67]=15;6;IF([.D67]=14;7;IF([.D67]=13;8;IF([.D67]=12;9;IF([.D67]=11;10;IF([.D67]=10;11;IF([.D67]=9;12;IF([.D67]=8;13;IF([.D67]=7;14;IF([.D67]=6;15;IF([.D67]=5;16;IF([.D67]=4;17;IF([.D67]=3;18;IF([.D67]=2;19;IF([.D67]=1;20;0)))))))))))))))))))))" office:value-type="float" office:value="17" calcext:value-type="float">
            <text:p>17</text:p>
          </table:table-cell>
          <table:table-cell table:style-name="ce134" office:value-type="float" office:value="56" calcext:value-type="float">
            <text:p>56º</text:p>
          </table:table-cell>
          <table:table-cell table:style-name="ce139" table:formula="of:=IF([.F67]=20;1;IF([.F67]=19;2;IF([.F67]=19;2;IF([.F67]=18;3;IF([.F67]=17;4;IF([.F67]=16;5;IF([.F67]=15;6;IF([.F67]=14;7;IF([.F67]=13;8;IF([.F67]=12;9;IF([.F67]=11;10;IF([.F67]=10;11;IF([.F67]=9;12;IF([.F67]=8;13;IF([.F67]=7;14;IF([.F67]=6;15;IF([.F67]=5;16;IF([.F67]=4;17;IF([.F67]=3;18;IF([.F67]=2;19;IF([.F67]=1;20;0)))))))))))))))))))))" office:value-type="float" office:value="0" calcext:value-type="float">
            <text:p>0</text:p>
          </table:table-cell>
          <table:table-cell table:style-name="ce134" office:value-type="float" office:value="57" calcext:value-type="float">
            <text:p>57º</text:p>
          </table:table-cell>
          <table:table-cell table:style-name="ce139" table:formula="of:=IF([.H67]=20;1;IF([.H67]=19;2;IF([.H67]=19;2;IF([.H67]=18;3;IF([.H67]=17;4;IF([.H67]=16;5;IF([.H67]=15;6;IF([.H67]=14;7;IF([.H67]=13;8;IF([.H67]=12;9;IF([.H67]=11;10;IF([.H67]=10;11;IF([.H67]=9;12;IF([.H67]=8;13;IF([.H67]=7;14;IF([.H67]=6;15;IF([.H67]=5;16;IF([.H67]=4;17;IF([.H67]=3;18;IF([.H67]=2;19;IF([.H67]=1;20;0)))))))))))))))))))))" office:value-type="float" office:value="0" calcext:value-type="float">
            <text:p>0</text:p>
          </table:table-cell>
          <table:table-cell table:style-name="ce134" office:value-type="string" calcext:value-type="string">
            <text:p>-</text:p>
          </table:table-cell>
          <table:table-cell table:style-name="ce145" table:formula="of:=IF([.J67]=20;1;IF([.J67]=19;2;IF([.J67]=19;2;IF([.J67]=18;3;IF([.J67]=17;4;IF([.J67]=16;5;IF([.J67]=15;6;IF([.J67]=14;7;IF([.J67]=13;8;IF([.J67]=12;9;IF([.J67]=11;10;IF([.J67]=10;11;IF([.J67]=9;12;IF([.J67]=8;13;IF([.J67]=7;14;IF([.J67]=6;15;IF([.J67]=5;16;IF([.J67]=4;17;IF([.J67]=3;18;IF([.J67]=2;19;IF([.J67]=1;20;0)))))))))))))))))))))" office:value-type="float" office:value="0" calcext:value-type="float">
            <text:p>0</text:p>
          </table:table-cell>
          <table:table-cell table:style-name="ce150"/>
          <table:table-cell table:style-name="ce158" table:formula="of:=SUM([.C67];[.E67];[.G67];[.I67];[.K67])" office:value-type="float" office:value="17" calcext:value-type="float">
            <text:p>17</text:p>
          </table:table-cell>
          <table:table-cell table:style-name="ce160" table:formula="of:=RANK([.M67];[.$M$4:.$M$133])" office:value-type="float" office:value="29" calcext:value-type="float">
            <text:p>29º</text:p>
          </table:table-cell>
          <table:table-cell table:style-name="ce161"/>
          <table:table-cell table:style-name="ce169" office:value-type="float" office:value="2" calcext:value-type="float">
            <text:p>2</text:p>
          </table:table-cell>
          <table:table-cell table:style-name="ce175" office:value-type="float" office:value="7" calcext:value-type="float">
            <text:p>7</text:p>
          </table:table-cell>
          <table:table-cell table:style-name="ce175" office:value-type="float" office:value="5" calcext:value-type="float">
            <text:p>5</text:p>
          </table:table-cell>
          <table:table-cell table:style-name="ce180" office:value-type="float" office:value="0" calcext:value-type="float">
            <text:p>0</text:p>
          </table:table-cell>
          <table:table-cell table:style-name="ce185" office:value-type="string" calcext:value-type="string">
            <text:p>-</text:p>
          </table:table-cell>
          <table:table-cell table:style-name="ce188" table:formula="of:=SUM([.P67:.T67])" office:value-type="float" office:value="14" calcext:value-type="float">
            <text:p>14</text:p>
          </table:table-cell>
          <table:table-cell table:style-name="ce189" table:formula="of:=RANK([.U67];[.$U$4:.$U$133])" office:value-type="float" office:value="51" calcext:value-type="float">
            <text:p>51º</text:p>
          </table:table-cell>
          <table:table-cell table:style-name="ce161"/>
          <table:table-cell table:style-name="ce193" table:formula="of:=COUNTIF([.B67];&quot;&gt;0&quot;)+COUNTIF([.D67];&quot;&gt;0&quot;)+COUNTIF([.F67];&quot;&gt;0&quot;)+COUNTIF([.H67];&quot;&gt;0&quot;)+COUNTIF([.J67];&quot;&gt;0&quot;)" office:value-type="float" office:value="4" calcext:value-type="float">
            <text:p>4</text:p>
          </table:table-cell>
          <table:table-cell table:style-name="ce200" table:formula="of:=[.M67]/[.X67]" office:value-type="float" office:value="4.25" calcext:value-type="float">
            <text:p>4.3</text:p>
          </table:table-cell>
          <table:table-cell table:style-name="ce204" table:formula="of:=RANK([.Y67];[.$Y$4:.$Y$133])" office:value-type="float" office:value="37" calcext:value-type="float">
            <text:p>37º</text:p>
          </table:table-cell>
          <table:table-cell table:style-name="ce208" table:formula="of:=[.U67]/[.X67]" office:value-type="float" office:value="3.5" calcext:value-type="float">
            <text:p>3.5</text:p>
          </table:table-cell>
          <table:table-cell table:style-name="ce212" table:formula="of:=RANK([.AA67];[.$AA$4:.$AA$133])" office:value-type="float" office:value="110" calcext:value-type="float">
            <text:p>110º</text:p>
          </table:table-cell>
          <table:table-cell table:number-columns-repeated="996"/>
        </table:table-row>
        <table:table-row table:style-name="ro10">
          <table:table-cell table:style-name="ce126" office:value-type="string" calcext:value-type="string">
            <text:p>JULIA ROMBALDI</text:p>
          </table:table-cell>
          <table:table-cell table:style-name="ce134" office:value-type="string" calcext:value-type="string">
            <text:p>-</text:p>
          </table:table-cell>
          <table:table-cell table:style-name="ce139" table:formula="of:=IF([.B68]=20;1;IF([.B68]=19;2;IF([.B68]=19;2;IF([.B68]=18;3;IF([.B68]=17;4;IF([.B68]=16;5;IF([.B68]=15;6;IF([.B68]=14;7;IF([.B68]=13;8;IF([.B68]=12;9;IF([.B68]=11;10;IF([.B68]=10;11;IF([.B68]=9;12;IF([.B68]=8;13;IF([.B68]=7;14;IF([.B68]=6;15;IF([.B68]=5;16;IF([.B68]=4;17;IF([.B68]=3;18;IF([.B68]=2;19;IF([.B68]=1;20;0)))))))))))))))))))))" office:value-type="float" office:value="0" calcext:value-type="float">
            <text:p>0</text:p>
          </table:table-cell>
          <table:table-cell table:style-name="ce134" office:value-type="string" calcext:value-type="string">
            <text:p>-</text:p>
          </table:table-cell>
          <table:table-cell table:style-name="ce139" table:formula="of:=IF([.D68]=20;1;IF([.D68]=19;2;IF([.D68]=19;2;IF([.D68]=18;3;IF([.D68]=17;4;IF([.D68]=16;5;IF([.D68]=15;6;IF([.D68]=14;7;IF([.D68]=13;8;IF([.D68]=12;9;IF([.D68]=11;10;IF([.D68]=10;11;IF([.D68]=9;12;IF([.D68]=8;13;IF([.D68]=7;14;IF([.D68]=6;15;IF([.D68]=5;16;IF([.D68]=4;17;IF([.D68]=3;18;IF([.D68]=2;19;IF([.D68]=1;20;0)))))))))))))))))))))" office:value-type="float" office:value="0" calcext:value-type="float">
            <text:p>0</text:p>
          </table:table-cell>
          <table:table-cell table:style-name="ce134" office:value-type="string" calcext:value-type="string">
            <text:p>-</text:p>
          </table:table-cell>
          <table:table-cell table:style-name="ce139" table:formula="of:=IF([.F68]=20;1;IF([.F68]=19;2;IF([.F68]=19;2;IF([.F68]=18;3;IF([.F68]=17;4;IF([.F68]=16;5;IF([.F68]=15;6;IF([.F68]=14;7;IF([.F68]=13;8;IF([.F68]=12;9;IF([.F68]=11;10;IF([.F68]=10;11;IF([.F68]=9;12;IF([.F68]=8;13;IF([.F68]=7;14;IF([.F68]=6;15;IF([.F68]=5;16;IF([.F68]=4;17;IF([.F68]=3;18;IF([.F68]=2;19;IF([.F68]=1;20;0)))))))))))))))))))))" office:value-type="float" office:value="0" calcext:value-type="float">
            <text:p>0</text:p>
          </table:table-cell>
          <table:table-cell table:style-name="ce134" office:value-type="float" office:value="47" calcext:value-type="float">
            <text:p>47º</text:p>
          </table:table-cell>
          <table:table-cell table:style-name="ce139" table:formula="of:=IF([.H68]=20;1;IF([.H68]=19;2;IF([.H68]=19;2;IF([.H68]=18;3;IF([.H68]=17;4;IF([.H68]=16;5;IF([.H68]=15;6;IF([.H68]=14;7;IF([.H68]=13;8;IF([.H68]=12;9;IF([.H68]=11;10;IF([.H68]=10;11;IF([.H68]=9;12;IF([.H68]=8;13;IF([.H68]=7;14;IF([.H68]=6;15;IF([.H68]=5;16;IF([.H68]=4;17;IF([.H68]=3;18;IF([.H68]=2;19;IF([.H68]=1;20;0)))))))))))))))))))))" office:value-type="float" office:value="0" calcext:value-type="float">
            <text:p>0</text:p>
          </table:table-cell>
          <table:table-cell table:style-name="ce134" office:value-type="string" calcext:value-type="string">
            <text:p>-</text:p>
          </table:table-cell>
          <table:table-cell table:style-name="ce145" table:formula="of:=IF([.J68]=20;1;IF([.J68]=19;2;IF([.J68]=19;2;IF([.J68]=18;3;IF([.J68]=17;4;IF([.J68]=16;5;IF([.J68]=15;6;IF([.J68]=14;7;IF([.J68]=13;8;IF([.J68]=12;9;IF([.J68]=11;10;IF([.J68]=10;11;IF([.J68]=9;12;IF([.J68]=8;13;IF([.J68]=7;14;IF([.J68]=6;15;IF([.J68]=5;16;IF([.J68]=4;17;IF([.J68]=3;18;IF([.J68]=2;19;IF([.J68]=1;20;0)))))))))))))))))))))" office:value-type="float" office:value="0" calcext:value-type="float">
            <text:p>0</text:p>
          </table:table-cell>
          <table:table-cell table:style-name="ce150"/>
          <table:table-cell table:style-name="ce158" table:formula="of:=SUM([.C68];[.E68];[.G68];[.I68];[.K68])" office:value-type="float" office:value="0" calcext:value-type="float">
            <text:p>0</text:p>
          </table:table-cell>
          <table:table-cell table:style-name="ce160" table:formula="of:=RANK([.M68];[.$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7" calcext:value-type="float">
            <text:p>7</text:p>
          </table:table-cell>
          <table:table-cell table:style-name="ce185" office:value-type="string" calcext:value-type="string">
            <text:p>-</text:p>
          </table:table-cell>
          <table:table-cell table:style-name="ce188" table:formula="of:=SUM([.P68:.T68])" office:value-type="float" office:value="7" calcext:value-type="float">
            <text:p>7</text:p>
          </table:table-cell>
          <table:table-cell table:style-name="ce189" table:formula="of:=RANK([.U68];[.$U$4:.$U$133])" office:value-type="float" office:value="77" calcext:value-type="float">
            <text:p>77º</text:p>
          </table:table-cell>
          <table:table-cell table:style-name="ce161"/>
          <table:table-cell table:style-name="ce193" table:formula="of:=COUNTIF([.B68];&quot;&gt;0&quot;)+COUNTIF([.D68];&quot;&gt;0&quot;)+COUNTIF([.F68];&quot;&gt;0&quot;)+COUNTIF([.H68];&quot;&gt;0&quot;)+COUNTIF([.J68];&quot;&gt;0&quot;)" office:value-type="float" office:value="1" calcext:value-type="float">
            <text:p>1</text:p>
          </table:table-cell>
          <table:table-cell table:style-name="ce200" table:formula="of:=[.M68]/[.X68]" office:value-type="float" office:value="0" calcext:value-type="float">
            <text:p>0.0</text:p>
          </table:table-cell>
          <table:table-cell table:style-name="ce204" table:formula="of:=RANK([.Y68];[.$Y$4:.$Y$133])" office:value-type="float" office:value="71" calcext:value-type="float">
            <text:p>71º</text:p>
          </table:table-cell>
          <table:table-cell table:style-name="ce208" table:formula="of:=[.U68]/[.X68]" office:value-type="float" office:value="7" calcext:value-type="float">
            <text:p>7.0</text:p>
          </table:table-cell>
          <table:table-cell table:style-name="ce212" table:formula="of:=RANK([.AA68];[.$AA$4:.$AA$133])" office:value-type="float" office:value="11" calcext:value-type="float">
            <text:p>11º</text:p>
          </table:table-cell>
          <table:table-cell table:number-columns-repeated="996"/>
        </table:table-row>
        <table:table-row table:style-name="ro10">
          <table:table-cell table:style-name="ce126" office:value-type="string" calcext:value-type="string">
            <text:p>JULIANA MICHELIN</text:p>
          </table:table-cell>
          <table:table-cell table:style-name="ce134" office:value-type="string" calcext:value-type="string">
            <text:p>-</text:p>
          </table:table-cell>
          <table:table-cell table:style-name="ce139" table:formula="of:=IF([.B69]=20;1;IF([.B69]=19;2;IF([.B69]=19;2;IF([.B69]=18;3;IF([.B69]=17;4;IF([.B69]=16;5;IF([.B69]=15;6;IF([.B69]=14;7;IF([.B69]=13;8;IF([.B69]=12;9;IF([.B69]=11;10;IF([.B69]=10;11;IF([.B69]=9;12;IF([.B69]=8;13;IF([.B69]=7;14;IF([.B69]=6;15;IF([.B69]=5;16;IF([.B69]=4;17;IF([.B69]=3;18;IF([.B69]=2;19;IF([.B69]=1;20;0)))))))))))))))))))))" office:value-type="float" office:value="0" calcext:value-type="float">
            <text:p>0</text:p>
          </table:table-cell>
          <table:table-cell table:style-name="ce134" office:value-type="string" calcext:value-type="string">
            <text:p>-</text:p>
          </table:table-cell>
          <table:table-cell table:style-name="ce139" table:formula="of:=IF([.D69]=20;1;IF([.D69]=19;2;IF([.D69]=19;2;IF([.D69]=18;3;IF([.D69]=17;4;IF([.D69]=16;5;IF([.D69]=15;6;IF([.D69]=14;7;IF([.D69]=13;8;IF([.D69]=12;9;IF([.D69]=11;10;IF([.D69]=10;11;IF([.D69]=9;12;IF([.D69]=8;13;IF([.D69]=7;14;IF([.D69]=6;15;IF([.D69]=5;16;IF([.D69]=4;17;IF([.D69]=3;18;IF([.D69]=2;19;IF([.D69]=1;20;0)))))))))))))))))))))" office:value-type="float" office:value="0" calcext:value-type="float">
            <text:p>0</text:p>
          </table:table-cell>
          <table:table-cell table:style-name="ce134" office:value-type="string" calcext:value-type="string">
            <text:p>-</text:p>
          </table:table-cell>
          <table:table-cell table:style-name="ce139" table:formula="of:=IF([.F69]=20;1;IF([.F69]=19;2;IF([.F69]=19;2;IF([.F69]=18;3;IF([.F69]=17;4;IF([.F69]=16;5;IF([.F69]=15;6;IF([.F69]=14;7;IF([.F69]=13;8;IF([.F69]=12;9;IF([.F69]=11;10;IF([.F69]=10;11;IF([.F69]=9;12;IF([.F69]=8;13;IF([.F69]=7;14;IF([.F69]=6;15;IF([.F69]=5;16;IF([.F69]=4;17;IF([.F69]=3;18;IF([.F69]=2;19;IF([.F69]=1;20;0)))))))))))))))))))))" office:value-type="float" office:value="0" calcext:value-type="float">
            <text:p>0</text:p>
          </table:table-cell>
          <table:table-cell table:style-name="ce134" office:value-type="float" office:value="76" calcext:value-type="float">
            <text:p>76º</text:p>
          </table:table-cell>
          <table:table-cell table:style-name="ce139" table:formula="of:=IF([.H69]=20;1;IF([.H69]=19;2;IF([.H69]=19;2;IF([.H69]=18;3;IF([.H69]=17;4;IF([.H69]=16;5;IF([.H69]=15;6;IF([.H69]=14;7;IF([.H69]=13;8;IF([.H69]=12;9;IF([.H69]=11;10;IF([.H69]=10;11;IF([.H69]=9;12;IF([.H69]=8;13;IF([.H69]=7;14;IF([.H69]=6;15;IF([.H69]=5;16;IF([.H69]=4;17;IF([.H69]=3;18;IF([.H69]=2;19;IF([.H69]=1;20;0)))))))))))))))))))))" office:value-type="float" office:value="0" calcext:value-type="float">
            <text:p>0</text:p>
          </table:table-cell>
          <table:table-cell table:style-name="ce134" office:value-type="string" calcext:value-type="string">
            <text:p>-</text:p>
          </table:table-cell>
          <table:table-cell table:style-name="ce145" table:formula="of:=IF([.J69]=20;1;IF([.J69]=19;2;IF([.J69]=19;2;IF([.J69]=18;3;IF([.J69]=17;4;IF([.J69]=16;5;IF([.J69]=15;6;IF([.J69]=14;7;IF([.J69]=13;8;IF([.J69]=12;9;IF([.J69]=11;10;IF([.J69]=10;11;IF([.J69]=9;12;IF([.J69]=8;13;IF([.J69]=7;14;IF([.J69]=6;15;IF([.J69]=5;16;IF([.J69]=4;17;IF([.J69]=3;18;IF([.J69]=2;19;IF([.J69]=1;20;0)))))))))))))))))))))" office:value-type="float" office:value="0" calcext:value-type="float">
            <text:p>0</text:p>
          </table:table-cell>
          <table:table-cell table:style-name="ce150"/>
          <table:table-cell table:style-name="ce158" table:formula="of:=SUM([.C69];[.E69];[.G69];[.I69];[.K69])" office:value-type="float" office:value="0" calcext:value-type="float">
            <text:p>0</text:p>
          </table:table-cell>
          <table:table-cell table:style-name="ce160" table:formula="of:=RANK([.M69];[.$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5" calcext:value-type="float">
            <text:p>5</text:p>
          </table:table-cell>
          <table:table-cell table:style-name="ce185" office:value-type="string" calcext:value-type="string">
            <text:p>-</text:p>
          </table:table-cell>
          <table:table-cell table:style-name="ce188" table:formula="of:=SUM([.P69:.T69])" office:value-type="float" office:value="5" calcext:value-type="float">
            <text:p>5</text:p>
          </table:table-cell>
          <table:table-cell table:style-name="ce189" table:formula="of:=RANK([.U69];[.$U$4:.$U$133])" office:value-type="float" office:value="102" calcext:value-type="float">
            <text:p>102º</text:p>
          </table:table-cell>
          <table:table-cell table:style-name="ce161"/>
          <table:table-cell table:style-name="ce193" table:formula="of:=COUNTIF([.B69];&quot;&gt;0&quot;)+COUNTIF([.D69];&quot;&gt;0&quot;)+COUNTIF([.F69];&quot;&gt;0&quot;)+COUNTIF([.H69];&quot;&gt;0&quot;)+COUNTIF([.J69];&quot;&gt;0&quot;)" office:value-type="float" office:value="1" calcext:value-type="float">
            <text:p>1</text:p>
          </table:table-cell>
          <table:table-cell table:style-name="ce200" table:formula="of:=[.M69]/[.X69]" office:value-type="float" office:value="0" calcext:value-type="float">
            <text:p>0.0</text:p>
          </table:table-cell>
          <table:table-cell table:style-name="ce204" table:formula="of:=RANK([.Y69];[.$Y$4:.$Y$133])" office:value-type="float" office:value="71" calcext:value-type="float">
            <text:p>71º</text:p>
          </table:table-cell>
          <table:table-cell table:style-name="ce208" table:formula="of:=[.U69]/[.X69]" office:value-type="float" office:value="5" calcext:value-type="float">
            <text:p>5.0</text:p>
          </table:table-cell>
          <table:table-cell table:style-name="ce212" table:formula="of:=RANK([.AA69];[.$AA$4:.$AA$133])" office:value-type="float" office:value="68" calcext:value-type="float">
            <text:p>68º</text:p>
          </table:table-cell>
          <table:table-cell table:number-columns-repeated="996"/>
        </table:table-row>
        <table:table-row table:style-name="ro10">
          <table:table-cell table:style-name="ce126" office:value-type="string" calcext:value-type="string">
            <text:p>JULIÃO MARQUES</text:p>
          </table:table-cell>
          <table:table-cell table:style-name="ce134" office:value-type="string" calcext:value-type="string">
            <text:p>-</text:p>
          </table:table-cell>
          <table:table-cell table:style-name="ce139" table:formula="of:=IF([.B70]=20;1;IF([.B70]=19;2;IF([.B70]=19;2;IF([.B70]=18;3;IF([.B70]=17;4;IF([.B70]=16;5;IF([.B70]=15;6;IF([.B70]=14;7;IF([.B70]=13;8;IF([.B70]=12;9;IF([.B70]=11;10;IF([.B70]=10;11;IF([.B70]=9;12;IF([.B70]=8;13;IF([.B70]=7;14;IF([.B70]=6;15;IF([.B70]=5;16;IF([.B70]=4;17;IF([.B70]=3;18;IF([.B70]=2;19;IF([.B70]=1;20;0)))))))))))))))))))))" office:value-type="float" office:value="0" calcext:value-type="float">
            <text:p>0</text:p>
          </table:table-cell>
          <table:table-cell table:style-name="ce134" office:value-type="string" calcext:value-type="string">
            <text:p>-</text:p>
          </table:table-cell>
          <table:table-cell table:style-name="ce139" table:formula="of:=IF([.D70]=20;1;IF([.D70]=19;2;IF([.D70]=19;2;IF([.D70]=18;3;IF([.D70]=17;4;IF([.D70]=16;5;IF([.D70]=15;6;IF([.D70]=14;7;IF([.D70]=13;8;IF([.D70]=12;9;IF([.D70]=11;10;IF([.D70]=10;11;IF([.D70]=9;12;IF([.D70]=8;13;IF([.D70]=7;14;IF([.D70]=6;15;IF([.D70]=5;16;IF([.D70]=4;17;IF([.D70]=3;18;IF([.D70]=2;19;IF([.D70]=1;20;0)))))))))))))))))))))" office:value-type="float" office:value="0" calcext:value-type="float">
            <text:p>0</text:p>
          </table:table-cell>
          <table:table-cell table:style-name="ce134" office:value-type="string" calcext:value-type="string">
            <text:p>-</text:p>
          </table:table-cell>
          <table:table-cell table:style-name="ce139" table:formula="of:=IF([.F70]=20;1;IF([.F70]=19;2;IF([.F70]=19;2;IF([.F70]=18;3;IF([.F70]=17;4;IF([.F70]=16;5;IF([.F70]=15;6;IF([.F70]=14;7;IF([.F70]=13;8;IF([.F70]=12;9;IF([.F70]=11;10;IF([.F70]=10;11;IF([.F70]=9;12;IF([.F70]=8;13;IF([.F70]=7;14;IF([.F70]=6;15;IF([.F70]=5;16;IF([.F70]=4;17;IF([.F70]=3;18;IF([.F70]=2;19;IF([.F70]=1;20;0)))))))))))))))))))))" office:value-type="float" office:value="0" calcext:value-type="float">
            <text:p>0</text:p>
          </table:table-cell>
          <table:table-cell table:style-name="ce134" office:value-type="float" office:value="32" calcext:value-type="float">
            <text:p>32º</text:p>
          </table:table-cell>
          <table:table-cell table:style-name="ce139" table:formula="of:=IF([.H70]=20;1;IF([.H70]=19;2;IF([.H70]=19;2;IF([.H70]=18;3;IF([.H70]=17;4;IF([.H70]=16;5;IF([.H70]=15;6;IF([.H70]=14;7;IF([.H70]=13;8;IF([.H70]=12;9;IF([.H70]=11;10;IF([.H70]=10;11;IF([.H70]=9;12;IF([.H70]=8;13;IF([.H70]=7;14;IF([.H70]=6;15;IF([.H70]=5;16;IF([.H70]=4;17;IF([.H70]=3;18;IF([.H70]=2;19;IF([.H70]=1;20;0)))))))))))))))))))))" office:value-type="float" office:value="0" calcext:value-type="float">
            <text:p>0</text:p>
          </table:table-cell>
          <table:table-cell table:style-name="ce134" office:value-type="string" calcext:value-type="string">
            <text:p>-</text:p>
          </table:table-cell>
          <table:table-cell table:style-name="ce145" table:formula="of:=IF([.J70]=20;1;IF([.J70]=19;2;IF([.J70]=19;2;IF([.J70]=18;3;IF([.J70]=17;4;IF([.J70]=16;5;IF([.J70]=15;6;IF([.J70]=14;7;IF([.J70]=13;8;IF([.J70]=12;9;IF([.J70]=11;10;IF([.J70]=10;11;IF([.J70]=9;12;IF([.J70]=8;13;IF([.J70]=7;14;IF([.J70]=6;15;IF([.J70]=5;16;IF([.J70]=4;17;IF([.J70]=3;18;IF([.J70]=2;19;IF([.J70]=1;20;0)))))))))))))))))))))" office:value-type="float" office:value="0" calcext:value-type="float">
            <text:p>0</text:p>
          </table:table-cell>
          <table:table-cell table:style-name="ce150"/>
          <table:table-cell table:style-name="ce158" table:formula="of:=SUM([.C70];[.E70];[.G70];[.I70];[.K70])" office:value-type="float" office:value="0" calcext:value-type="float">
            <text:p>0</text:p>
          </table:table-cell>
          <table:table-cell table:style-name="ce160" table:formula="of:=RANK([.M70];[.$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5" calcext:value-type="float">
            <text:p>5</text:p>
          </table:table-cell>
          <table:table-cell table:style-name="ce185" office:value-type="string" calcext:value-type="string">
            <text:p>-</text:p>
          </table:table-cell>
          <table:table-cell table:style-name="ce188" table:formula="of:=SUM([.P70:.T70])" office:value-type="float" office:value="5" calcext:value-type="float">
            <text:p>5</text:p>
          </table:table-cell>
          <table:table-cell table:style-name="ce189" table:formula="of:=RANK([.U70];[.$U$4:.$U$133])" office:value-type="float" office:value="102" calcext:value-type="float">
            <text:p>102º</text:p>
          </table:table-cell>
          <table:table-cell table:style-name="ce161"/>
          <table:table-cell table:style-name="ce193" table:formula="of:=COUNTIF([.B70];&quot;&gt;0&quot;)+COUNTIF([.D70];&quot;&gt;0&quot;)+COUNTIF([.F70];&quot;&gt;0&quot;)+COUNTIF([.H70];&quot;&gt;0&quot;)+COUNTIF([.J70];&quot;&gt;0&quot;)" office:value-type="float" office:value="1" calcext:value-type="float">
            <text:p>1</text:p>
          </table:table-cell>
          <table:table-cell table:style-name="ce200" table:formula="of:=[.M70]/[.X70]" office:value-type="float" office:value="0" calcext:value-type="float">
            <text:p>0.0</text:p>
          </table:table-cell>
          <table:table-cell table:style-name="ce204" table:formula="of:=RANK([.Y70];[.$Y$4:.$Y$133])" office:value-type="float" office:value="71" calcext:value-type="float">
            <text:p>71º</text:p>
          </table:table-cell>
          <table:table-cell table:style-name="ce208" table:formula="of:=[.U70]/[.X70]" office:value-type="float" office:value="5" calcext:value-type="float">
            <text:p>5.0</text:p>
          </table:table-cell>
          <table:table-cell table:style-name="ce212" table:formula="of:=RANK([.AA70];[.$AA$4:.$AA$133])" office:value-type="float" office:value="68" calcext:value-type="float">
            <text:p>68º</text:p>
          </table:table-cell>
          <table:table-cell table:number-columns-repeated="996"/>
        </table:table-row>
        <table:table-row table:style-name="ro10">
          <table:table-cell table:style-name="ce126" office:value-type="string" calcext:value-type="string">
            <text:p>JUSSARA</text:p>
          </table:table-cell>
          <table:table-cell table:style-name="ce134" office:value-type="string" calcext:value-type="string">
            <text:p>-</text:p>
          </table:table-cell>
          <table:table-cell table:style-name="ce139" table:formula="of:=IF([.B71]=20;1;IF([.B71]=19;2;IF([.B71]=19;2;IF([.B71]=18;3;IF([.B71]=17;4;IF([.B71]=16;5;IF([.B71]=15;6;IF([.B71]=14;7;IF([.B71]=13;8;IF([.B71]=12;9;IF([.B71]=11;10;IF([.B71]=10;11;IF([.B71]=9;12;IF([.B71]=8;13;IF([.B71]=7;14;IF([.B71]=6;15;IF([.B71]=5;16;IF([.B71]=4;17;IF([.B71]=3;18;IF([.B71]=2;19;IF([.B71]=1;20;0)))))))))))))))))))))" office:value-type="float" office:value="0" calcext:value-type="float">
            <text:p>0</text:p>
          </table:table-cell>
          <table:table-cell table:style-name="ce134" office:value-type="float" office:value="67" calcext:value-type="float">
            <text:p>67º</text:p>
          </table:table-cell>
          <table:table-cell table:style-name="ce139" table:formula="of:=IF([.D71]=20;1;IF([.D71]=19;2;IF([.D71]=19;2;IF([.D71]=18;3;IF([.D71]=17;4;IF([.D71]=16;5;IF([.D71]=15;6;IF([.D71]=14;7;IF([.D71]=13;8;IF([.D71]=12;9;IF([.D71]=11;10;IF([.D71]=10;11;IF([.D71]=9;12;IF([.D71]=8;13;IF([.D71]=7;14;IF([.D71]=6;15;IF([.D71]=5;16;IF([.D71]=4;17;IF([.D71]=3;18;IF([.D71]=2;19;IF([.D71]=1;20;0)))))))))))))))))))))" office:value-type="float" office:value="0" calcext:value-type="float">
            <text:p>0</text:p>
          </table:table-cell>
          <table:table-cell table:style-name="ce134"/>
          <table:table-cell table:style-name="ce139" table:formula="of:=IF([.F71]=20;1;IF([.F71]=19;2;IF([.F71]=19;2;IF([.F71]=18;3;IF([.F71]=17;4;IF([.F71]=16;5;IF([.F71]=15;6;IF([.F71]=14;7;IF([.F71]=13;8;IF([.F71]=12;9;IF([.F71]=11;10;IF([.F71]=10;11;IF([.F71]=9;12;IF([.F71]=8;13;IF([.F71]=7;14;IF([.F71]=6;15;IF([.F71]=5;16;IF([.F71]=4;17;IF([.F71]=3;18;IF([.F71]=2;19;IF([.F71]=1;20;0)))))))))))))))))))))" office:value-type="float" office:value="0" calcext:value-type="float">
            <text:p>0</text:p>
          </table:table-cell>
          <table:table-cell table:style-name="ce134"/>
          <table:table-cell table:style-name="ce139" table:formula="of:=IF([.H71]=20;1;IF([.H71]=19;2;IF([.H71]=19;2;IF([.H71]=18;3;IF([.H71]=17;4;IF([.H71]=16;5;IF([.H71]=15;6;IF([.H71]=14;7;IF([.H71]=13;8;IF([.H71]=12;9;IF([.H71]=11;10;IF([.H71]=10;11;IF([.H71]=9;12;IF([.H71]=8;13;IF([.H71]=7;14;IF([.H71]=6;15;IF([.H71]=5;16;IF([.H71]=4;17;IF([.H71]=3;18;IF([.H71]=2;19;IF([.H71]=1;20;0)))))))))))))))))))))" office:value-type="float" office:value="0" calcext:value-type="float">
            <text:p>0</text:p>
          </table:table-cell>
          <table:table-cell table:style-name="ce134"/>
          <table:table-cell table:style-name="ce145" table:formula="of:=IF([.J71]=20;1;IF([.J71]=19;2;IF([.J71]=19;2;IF([.J71]=18;3;IF([.J71]=17;4;IF([.J71]=16;5;IF([.J71]=15;6;IF([.J71]=14;7;IF([.J71]=13;8;IF([.J71]=12;9;IF([.J71]=11;10;IF([.J71]=10;11;IF([.J71]=9;12;IF([.J71]=8;13;IF([.J71]=7;14;IF([.J71]=6;15;IF([.J71]=5;16;IF([.J71]=4;17;IF([.J71]=3;18;IF([.J71]=2;19;IF([.J71]=1;20;0)))))))))))))))))))))" office:value-type="float" office:value="0" calcext:value-type="float">
            <text:p>0</text:p>
          </table:table-cell>
          <table:table-cell table:style-name="ce150"/>
          <table:table-cell table:style-name="ce158" table:formula="of:=SUM([.C71];[.E71];[.G71];[.I71];[.K71])" office:value-type="float" office:value="0" calcext:value-type="float">
            <text:p>0</text:p>
          </table:table-cell>
          <table:table-cell table:style-name="ce160" table:formula="of:=RANK([.M71];[.$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float" office:value="4" calcext:value-type="float">
            <text:p>4</text:p>
          </table:table-cell>
          <table:table-cell table:style-name="ce176"/>
          <table:table-cell table:style-name="ce180"/>
          <table:table-cell table:style-name="ce185" office:value-type="string" calcext:value-type="string">
            <text:p>-</text:p>
          </table:table-cell>
          <table:table-cell table:style-name="ce188" table:formula="of:=SUM([.P71:.T71])" office:value-type="float" office:value="4" calcext:value-type="float">
            <text:p>4</text:p>
          </table:table-cell>
          <table:table-cell table:style-name="ce189" table:formula="of:=RANK([.U71];[.$U$4:.$U$133])" office:value-type="float" office:value="113" calcext:value-type="float">
            <text:p>113º</text:p>
          </table:table-cell>
          <table:table-cell table:style-name="ce161"/>
          <table:table-cell table:style-name="ce193" table:formula="of:=COUNTIF([.B71];&quot;&gt;0&quot;)+COUNTIF([.D71];&quot;&gt;0&quot;)+COUNTIF([.F71];&quot;&gt;0&quot;)+COUNTIF([.H71];&quot;&gt;0&quot;)+COUNTIF([.J71];&quot;&gt;0&quot;)" office:value-type="float" office:value="1" calcext:value-type="float">
            <text:p>1</text:p>
          </table:table-cell>
          <table:table-cell table:style-name="ce200" table:formula="of:=[.M71]/[.X71]" office:value-type="float" office:value="0" calcext:value-type="float">
            <text:p>0.0</text:p>
          </table:table-cell>
          <table:table-cell table:style-name="ce204" table:formula="of:=RANK([.Y71];[.$Y$4:.$Y$133])" office:value-type="float" office:value="71" calcext:value-type="float">
            <text:p>71º</text:p>
          </table:table-cell>
          <table:table-cell table:style-name="ce208" table:formula="of:=[.U71]/[.X71]" office:value-type="float" office:value="4" calcext:value-type="float">
            <text:p>4.0</text:p>
          </table:table-cell>
          <table:table-cell table:style-name="ce212" table:formula="of:=RANK([.AA71];[.$AA$4:.$AA$133])" office:value-type="float" office:value="98" calcext:value-type="float">
            <text:p>98º</text:p>
          </table:table-cell>
          <table:table-cell table:number-columns-repeated="996"/>
        </table:table-row>
        <table:table-row table:style-name="ro10">
          <table:table-cell table:style-name="ce126" office:value-type="string" calcext:value-type="string">
            <text:p>KARINE</text:p>
          </table:table-cell>
          <table:table-cell table:style-name="ce134" office:value-type="string" calcext:value-type="string">
            <text:p>-</text:p>
          </table:table-cell>
          <table:table-cell table:style-name="ce139" table:formula="of:=IF([.B72]=20;1;IF([.B72]=19;2;IF([.B72]=19;2;IF([.B72]=18;3;IF([.B72]=17;4;IF([.B72]=16;5;IF([.B72]=15;6;IF([.B72]=14;7;IF([.B72]=13;8;IF([.B72]=12;9;IF([.B72]=11;10;IF([.B72]=10;11;IF([.B72]=9;12;IF([.B72]=8;13;IF([.B72]=7;14;IF([.B72]=6;15;IF([.B72]=5;16;IF([.B72]=4;17;IF([.B72]=3;18;IF([.B72]=2;19;IF([.B72]=1;20;0)))))))))))))))))))))" office:value-type="float" office:value="0" calcext:value-type="float">
            <text:p>0</text:p>
          </table:table-cell>
          <table:table-cell table:style-name="ce134" office:value-type="float" office:value="33" calcext:value-type="float">
            <text:p>33º</text:p>
          </table:table-cell>
          <table:table-cell table:style-name="ce139" table:formula="of:=IF([.D72]=20;1;IF([.D72]=19;2;IF([.D72]=19;2;IF([.D72]=18;3;IF([.D72]=17;4;IF([.D72]=16;5;IF([.D72]=15;6;IF([.D72]=14;7;IF([.D72]=13;8;IF([.D72]=12;9;IF([.D72]=11;10;IF([.D72]=10;11;IF([.D72]=9;12;IF([.D72]=8;13;IF([.D72]=7;14;IF([.D72]=6;15;IF([.D72]=5;16;IF([.D72]=4;17;IF([.D72]=3;18;IF([.D72]=2;19;IF([.D72]=1;20;0)))))))))))))))))))))" office:value-type="float" office:value="0" calcext:value-type="float">
            <text:p>0</text:p>
          </table:table-cell>
          <table:table-cell table:style-name="ce134" office:value-type="string" calcext:value-type="string">
            <text:p>-</text:p>
          </table:table-cell>
          <table:table-cell table:style-name="ce139" table:formula="of:=IF([.F72]=20;1;IF([.F72]=19;2;IF([.F72]=19;2;IF([.F72]=18;3;IF([.F72]=17;4;IF([.F72]=16;5;IF([.F72]=15;6;IF([.F72]=14;7;IF([.F72]=13;8;IF([.F72]=12;9;IF([.F72]=11;10;IF([.F72]=10;11;IF([.F72]=9;12;IF([.F72]=8;13;IF([.F72]=7;14;IF([.F72]=6;15;IF([.F72]=5;16;IF([.F72]=4;17;IF([.F72]=3;18;IF([.F72]=2;19;IF([.F72]=1;20;0)))))))))))))))))))))" office:value-type="float" office:value="0" calcext:value-type="float">
            <text:p>0</text:p>
          </table:table-cell>
          <table:table-cell table:style-name="ce134" office:value-type="float" office:value="80" calcext:value-type="float">
            <text:p>80º</text:p>
          </table:table-cell>
          <table:table-cell table:style-name="ce139" table:formula="of:=IF([.H72]=20;1;IF([.H72]=19;2;IF([.H72]=19;2;IF([.H72]=18;3;IF([.H72]=17;4;IF([.H72]=16;5;IF([.H72]=15;6;IF([.H72]=14;7;IF([.H72]=13;8;IF([.H72]=12;9;IF([.H72]=11;10;IF([.H72]=10;11;IF([.H72]=9;12;IF([.H72]=8;13;IF([.H72]=7;14;IF([.H72]=6;15;IF([.H72]=5;16;IF([.H72]=4;17;IF([.H72]=3;18;IF([.H72]=2;19;IF([.H72]=1;20;0)))))))))))))))))))))" office:value-type="float" office:value="0" calcext:value-type="float">
            <text:p>0</text:p>
          </table:table-cell>
          <table:table-cell table:style-name="ce134" office:value-type="float" office:value="5" calcext:value-type="float">
            <text:p>5º</text:p>
          </table:table-cell>
          <table:table-cell table:style-name="ce145" table:formula="of:=IF([.J72]=20;1;IF([.J72]=19;2;IF([.J72]=19;2;IF([.J72]=18;3;IF([.J72]=17;4;IF([.J72]=16;5;IF([.J72]=15;6;IF([.J72]=14;7;IF([.J72]=13;8;IF([.J72]=12;9;IF([.J72]=11;10;IF([.J72]=10;11;IF([.J72]=9;12;IF([.J72]=8;13;IF([.J72]=7;14;IF([.J72]=6;15;IF([.J72]=5;16;IF([.J72]=4;17;IF([.J72]=3;18;IF([.J72]=2;19;IF([.J72]=1;20;0)))))))))))))))))))))" office:value-type="float" office:value="16" calcext:value-type="float">
            <text:p>16</text:p>
          </table:table-cell>
          <table:table-cell table:style-name="ce150"/>
          <table:table-cell table:style-name="ce158" table:formula="of:=SUM([.C72];[.E72];[.G72];[.I72];[.K72])" office:value-type="float" office:value="16" calcext:value-type="float">
            <text:p>16</text:p>
          </table:table-cell>
          <table:table-cell table:style-name="ce160" table:formula="of:=RANK([.M72];[.$M$4:.$M$133])" office:value-type="float" office:value="33" calcext:value-type="float">
            <text:p>33º</text:p>
          </table:table-cell>
          <table:table-cell table:style-name="ce161"/>
          <table:table-cell table:style-name="ce169" office:value-type="string" calcext:value-type="string">
            <text:p>-</text:p>
          </table:table-cell>
          <table:table-cell table:style-name="ce175" office:value-type="float" office:value="5" calcext:value-type="float">
            <text:p>5</text:p>
          </table:table-cell>
          <table:table-cell table:style-name="ce176" office:value-type="string" calcext:value-type="string">
            <text:p>-</text:p>
          </table:table-cell>
          <table:table-cell table:style-name="ce180" office:value-type="float" office:value="2" calcext:value-type="float">
            <text:p>2</text:p>
          </table:table-cell>
          <table:table-cell table:style-name="ce185" office:value-type="float" office:value="5" calcext:value-type="float">
            <text:p>5</text:p>
          </table:table-cell>
          <table:table-cell table:style-name="ce188" table:formula="of:=SUM([.P72:.T72])" office:value-type="float" office:value="12" calcext:value-type="float">
            <text:p>12</text:p>
          </table:table-cell>
          <table:table-cell table:style-name="ce189" table:formula="of:=RANK([.U72];[.$U$4:.$U$133])" office:value-type="float" office:value="56" calcext:value-type="float">
            <text:p>56º</text:p>
          </table:table-cell>
          <table:table-cell table:style-name="ce161"/>
          <table:table-cell table:style-name="ce193" table:formula="of:=COUNTIF([.B72];&quot;&gt;0&quot;)+COUNTIF([.D72];&quot;&gt;0&quot;)+COUNTIF([.F72];&quot;&gt;0&quot;)+COUNTIF([.H72];&quot;&gt;0&quot;)+COUNTIF([.J72];&quot;&gt;0&quot;)" office:value-type="float" office:value="3" calcext:value-type="float">
            <text:p>3</text:p>
          </table:table-cell>
          <table:table-cell table:style-name="ce200" table:formula="of:=[.M72]/[.X72]" office:value-type="float" office:value="5.33333333333333" calcext:value-type="float">
            <text:p>5.3</text:p>
          </table:table-cell>
          <table:table-cell table:style-name="ce204" table:formula="of:=RANK([.Y72];[.$Y$4:.$Y$133])" office:value-type="float" office:value="23" calcext:value-type="float">
            <text:p>23º</text:p>
          </table:table-cell>
          <table:table-cell table:style-name="ce208" table:formula="of:=[.U72]/[.X72]" office:value-type="float" office:value="4" calcext:value-type="float">
            <text:p>4.0</text:p>
          </table:table-cell>
          <table:table-cell table:style-name="ce212" table:formula="of:=RANK([.AA72];[.$AA$4:.$AA$133])" office:value-type="float" office:value="98" calcext:value-type="float">
            <text:p>98º</text:p>
          </table:table-cell>
          <table:table-cell table:number-columns-repeated="996"/>
        </table:table-row>
        <table:table-row table:style-name="ro10">
          <table:table-cell table:style-name="ce126" office:value-type="string" calcext:value-type="string">
            <text:p>KOPINSKI</text:p>
          </table:table-cell>
          <table:table-cell table:style-name="ce134" office:value-type="string" calcext:value-type="string">
            <text:p>-</text:p>
          </table:table-cell>
          <table:table-cell table:style-name="ce139" table:formula="of:=IF([.B73]=20;1;IF([.B73]=19;2;IF([.B73]=19;2;IF([.B73]=18;3;IF([.B73]=17;4;IF([.B73]=16;5;IF([.B73]=15;6;IF([.B73]=14;7;IF([.B73]=13;8;IF([.B73]=12;9;IF([.B73]=11;10;IF([.B73]=10;11;IF([.B73]=9;12;IF([.B73]=8;13;IF([.B73]=7;14;IF([.B73]=6;15;IF([.B73]=5;16;IF([.B73]=4;17;IF([.B73]=3;18;IF([.B73]=2;19;IF([.B73]=1;20;0)))))))))))))))))))))" office:value-type="float" office:value="0" calcext:value-type="float">
            <text:p>0</text:p>
          </table:table-cell>
          <table:table-cell table:style-name="ce134" office:value-type="string" calcext:value-type="string">
            <text:p>-</text:p>
          </table:table-cell>
          <table:table-cell table:style-name="ce139" table:formula="of:=IF([.D73]=20;1;IF([.D73]=19;2;IF([.D73]=19;2;IF([.D73]=18;3;IF([.D73]=17;4;IF([.D73]=16;5;IF([.D73]=15;6;IF([.D73]=14;7;IF([.D73]=13;8;IF([.D73]=12;9;IF([.D73]=11;10;IF([.D73]=10;11;IF([.D73]=9;12;IF([.D73]=8;13;IF([.D73]=7;14;IF([.D73]=6;15;IF([.D73]=5;16;IF([.D73]=4;17;IF([.D73]=3;18;IF([.D73]=2;19;IF([.D73]=1;20;0)))))))))))))))))))))" office:value-type="float" office:value="0" calcext:value-type="float">
            <text:p>0</text:p>
          </table:table-cell>
          <table:table-cell table:style-name="ce134" office:value-type="string" calcext:value-type="string">
            <text:p>-</text:p>
          </table:table-cell>
          <table:table-cell table:style-name="ce139" table:formula="of:=IF([.F73]=20;1;IF([.F73]=19;2;IF([.F73]=19;2;IF([.F73]=18;3;IF([.F73]=17;4;IF([.F73]=16;5;IF([.F73]=15;6;IF([.F73]=14;7;IF([.F73]=13;8;IF([.F73]=12;9;IF([.F73]=11;10;IF([.F73]=10;11;IF([.F73]=9;12;IF([.F73]=8;13;IF([.F73]=7;14;IF([.F73]=6;15;IF([.F73]=5;16;IF([.F73]=4;17;IF([.F73]=3;18;IF([.F73]=2;19;IF([.F73]=1;20;0)))))))))))))))))))))" office:value-type="float" office:value="0" calcext:value-type="float">
            <text:p>0</text:p>
          </table:table-cell>
          <table:table-cell table:style-name="ce134" office:value-type="float" office:value="59" calcext:value-type="float">
            <text:p>59º</text:p>
          </table:table-cell>
          <table:table-cell table:style-name="ce139" table:formula="of:=IF([.H73]=20;1;IF([.H73]=19;2;IF([.H73]=19;2;IF([.H73]=18;3;IF([.H73]=17;4;IF([.H73]=16;5;IF([.H73]=15;6;IF([.H73]=14;7;IF([.H73]=13;8;IF([.H73]=12;9;IF([.H73]=11;10;IF([.H73]=10;11;IF([.H73]=9;12;IF([.H73]=8;13;IF([.H73]=7;14;IF([.H73]=6;15;IF([.H73]=5;16;IF([.H73]=4;17;IF([.H73]=3;18;IF([.H73]=2;19;IF([.H73]=1;20;0)))))))))))))))))))))" office:value-type="float" office:value="0" calcext:value-type="float">
            <text:p>0</text:p>
          </table:table-cell>
          <table:table-cell table:style-name="ce134" office:value-type="string" calcext:value-type="string">
            <text:p>-</text:p>
          </table:table-cell>
          <table:table-cell table:style-name="ce145" table:formula="of:=IF([.J73]=20;1;IF([.J73]=19;2;IF([.J73]=19;2;IF([.J73]=18;3;IF([.J73]=17;4;IF([.J73]=16;5;IF([.J73]=15;6;IF([.J73]=14;7;IF([.J73]=13;8;IF([.J73]=12;9;IF([.J73]=11;10;IF([.J73]=10;11;IF([.J73]=9;12;IF([.J73]=8;13;IF([.J73]=7;14;IF([.J73]=6;15;IF([.J73]=5;16;IF([.J73]=4;17;IF([.J73]=3;18;IF([.J73]=2;19;IF([.J73]=1;20;0)))))))))))))))))))))" office:value-type="float" office:value="0" calcext:value-type="float">
            <text:p>0</text:p>
          </table:table-cell>
          <table:table-cell table:style-name="ce150"/>
          <table:table-cell table:style-name="ce158" table:formula="of:=SUM([.C73];[.E73];[.G73];[.I73];[.K73])" office:value-type="float" office:value="0" calcext:value-type="float">
            <text:p>0</text:p>
          </table:table-cell>
          <table:table-cell table:style-name="ce160" table:formula="of:=RANK([.M73];[.$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6" office:value-type="string" calcext:value-type="string">
            <text:p>-</text:p>
          </table:table-cell>
          <table:table-cell table:style-name="ce180" office:value-type="float" office:value="6" calcext:value-type="float">
            <text:p>6</text:p>
          </table:table-cell>
          <table:table-cell table:style-name="ce185" office:value-type="string" calcext:value-type="string">
            <text:p>-</text:p>
          </table:table-cell>
          <table:table-cell table:style-name="ce188" table:formula="of:=SUM([.P73:.T73])" office:value-type="float" office:value="6" calcext:value-type="float">
            <text:p>6</text:p>
          </table:table-cell>
          <table:table-cell table:style-name="ce189" table:formula="of:=RANK([.U73];[.$U$4:.$U$133])" office:value-type="float" office:value="89" calcext:value-type="float">
            <text:p>89º</text:p>
          </table:table-cell>
          <table:table-cell table:style-name="ce161"/>
          <table:table-cell table:style-name="ce193" table:formula="of:=COUNTIF([.B73];&quot;&gt;0&quot;)+COUNTIF([.D73];&quot;&gt;0&quot;)+COUNTIF([.F73];&quot;&gt;0&quot;)+COUNTIF([.H73];&quot;&gt;0&quot;)+COUNTIF([.J73];&quot;&gt;0&quot;)" office:value-type="float" office:value="1" calcext:value-type="float">
            <text:p>1</text:p>
          </table:table-cell>
          <table:table-cell table:style-name="ce200" table:formula="of:=[.M73]/[.X73]" office:value-type="float" office:value="0" calcext:value-type="float">
            <text:p>0.0</text:p>
          </table:table-cell>
          <table:table-cell table:style-name="ce204" table:formula="of:=RANK([.Y73];[.$Y$4:.$Y$133])" office:value-type="float" office:value="71" calcext:value-type="float">
            <text:p>71º</text:p>
          </table:table-cell>
          <table:table-cell table:style-name="ce208" table:formula="of:=[.U73]/[.X73]" office:value-type="float" office:value="6" calcext:value-type="float">
            <text:p>6.0</text:p>
          </table:table-cell>
          <table:table-cell table:style-name="ce212" table:formula="of:=RANK([.AA73];[.$AA$4:.$AA$133])" office:value-type="float" office:value="36" calcext:value-type="float">
            <text:p>36º</text:p>
          </table:table-cell>
          <table:table-cell table:number-columns-repeated="996"/>
        </table:table-row>
        <table:table-row table:style-name="ro10">
          <table:table-cell table:style-name="ce129" office:value-type="string" calcext:value-type="string">
            <text:p>LARA MIZOGUCHI</text:p>
          </table:table-cell>
          <table:table-cell table:style-name="ce134" office:value-type="float" office:value="24" calcext:value-type="float">
            <text:p>24º</text:p>
          </table:table-cell>
          <table:table-cell table:style-name="ce139" table:formula="of:=IF([.B74]=20;1;IF([.B74]=19;2;IF([.B74]=19;2;IF([.B74]=18;3;IF([.B74]=17;4;IF([.B74]=16;5;IF([.B74]=15;6;IF([.B74]=14;7;IF([.B74]=13;8;IF([.B74]=12;9;IF([.B74]=11;10;IF([.B74]=10;11;IF([.B74]=9;12;IF([.B74]=8;13;IF([.B74]=7;14;IF([.B74]=6;15;IF([.B74]=5;16;IF([.B74]=4;17;IF([.B74]=3;18;IF([.B74]=2;19;IF([.B74]=1;20;0)))))))))))))))))))))" office:value-type="float" office:value="0" calcext:value-type="float">
            <text:p>0</text:p>
          </table:table-cell>
          <table:table-cell table:style-name="ce134" office:value-type="float" office:value="19" calcext:value-type="float">
            <text:p>19º</text:p>
          </table:table-cell>
          <table:table-cell table:style-name="ce139" table:formula="of:=IF([.D74]=20;1;IF([.D74]=19;2;IF([.D74]=19;2;IF([.D74]=18;3;IF([.D74]=17;4;IF([.D74]=16;5;IF([.D74]=15;6;IF([.D74]=14;7;IF([.D74]=13;8;IF([.D74]=12;9;IF([.D74]=11;10;IF([.D74]=10;11;IF([.D74]=9;12;IF([.D74]=8;13;IF([.D74]=7;14;IF([.D74]=6;15;IF([.D74]=5;16;IF([.D74]=4;17;IF([.D74]=3;18;IF([.D74]=2;19;IF([.D74]=1;20;0)))))))))))))))))))))" office:value-type="float" office:value="2" calcext:value-type="float">
            <text:p>2</text:p>
          </table:table-cell>
          <table:table-cell table:style-name="ce134" office:value-type="float" office:value="34" calcext:value-type="float">
            <text:p>34º</text:p>
          </table:table-cell>
          <table:table-cell table:style-name="ce139" table:formula="of:=IF([.F74]=20;1;IF([.F74]=19;2;IF([.F74]=19;2;IF([.F74]=18;3;IF([.F74]=17;4;IF([.F74]=16;5;IF([.F74]=15;6;IF([.F74]=14;7;IF([.F74]=13;8;IF([.F74]=12;9;IF([.F74]=11;10;IF([.F74]=10;11;IF([.F74]=9;12;IF([.F74]=8;13;IF([.F74]=7;14;IF([.F74]=6;15;IF([.F74]=5;16;IF([.F74]=4;17;IF([.F74]=3;18;IF([.F74]=2;19;IF([.F74]=1;20;0)))))))))))))))))))))" office:value-type="float" office:value="0" calcext:value-type="float">
            <text:p>0</text:p>
          </table:table-cell>
          <table:table-cell table:style-name="ce134" office:value-type="float" office:value="2" calcext:value-type="float">
            <text:p>2º</text:p>
          </table:table-cell>
          <table:table-cell table:style-name="ce139" table:formula="of:=IF([.H74]=20;1;IF([.H74]=19;2;IF([.H74]=19;2;IF([.H74]=18;3;IF([.H74]=17;4;IF([.H74]=16;5;IF([.H74]=15;6;IF([.H74]=14;7;IF([.H74]=13;8;IF([.H74]=12;9;IF([.H74]=11;10;IF([.H74]=10;11;IF([.H74]=9;12;IF([.H74]=8;13;IF([.H74]=7;14;IF([.H74]=6;15;IF([.H74]=5;16;IF([.H74]=4;17;IF([.H74]=3;18;IF([.H74]=2;19;IF([.H74]=1;20;0)))))))))))))))))))))" office:value-type="float" office:value="19" calcext:value-type="float">
            <text:p>19</text:p>
          </table:table-cell>
          <table:table-cell table:style-name="ce134" office:value-type="float" office:value="15" calcext:value-type="float">
            <text:p>15º</text:p>
          </table:table-cell>
          <table:table-cell table:style-name="ce145" table:formula="of:=IF([.J74]=20;1;IF([.J74]=19;2;IF([.J74]=19;2;IF([.J74]=18;3;IF([.J74]=17;4;IF([.J74]=16;5;IF([.J74]=15;6;IF([.J74]=14;7;IF([.J74]=13;8;IF([.J74]=12;9;IF([.J74]=11;10;IF([.J74]=10;11;IF([.J74]=9;12;IF([.J74]=8;13;IF([.J74]=7;14;IF([.J74]=6;15;IF([.J74]=5;16;IF([.J74]=4;17;IF([.J74]=3;18;IF([.J74]=2;19;IF([.J74]=1;20;0)))))))))))))))))))))" office:value-type="float" office:value="6" calcext:value-type="float">
            <text:p>6</text:p>
          </table:table-cell>
          <table:table-cell table:style-name="ce150"/>
          <table:table-cell table:style-name="ce158" table:formula="of:=SUM([.C74];[.E74];[.G74];[.I74];[.K74])" office:value-type="float" office:value="27" calcext:value-type="float">
            <text:p>27</text:p>
          </table:table-cell>
          <table:table-cell table:style-name="ce160" table:formula="of:=RANK([.M74];[.$M$4:.$M$133])" office:value-type="float" office:value="8" calcext:value-type="float">
            <text:p>8º</text:p>
          </table:table-cell>
          <table:table-cell table:style-name="ce161"/>
          <table:table-cell table:style-name="ce169" office:value-type="float" office:value="6" calcext:value-type="float">
            <text:p>6</text:p>
          </table:table-cell>
          <table:table-cell table:style-name="ce175" office:value-type="float" office:value="7" calcext:value-type="float">
            <text:p>7</text:p>
          </table:table-cell>
          <table:table-cell table:style-name="ce175" office:value-type="float" office:value="6" calcext:value-type="float">
            <text:p>6</text:p>
          </table:table-cell>
          <table:table-cell table:style-name="ce180" office:value-type="float" office:value="6" calcext:value-type="float">
            <text:p>6</text:p>
          </table:table-cell>
          <table:table-cell table:style-name="ce185" office:value-type="float" office:value="2" calcext:value-type="float">
            <text:p>2</text:p>
          </table:table-cell>
          <table:table-cell table:style-name="ce188" table:formula="of:=SUM([.P74:.T74])" office:value-type="float" office:value="27" calcext:value-type="float">
            <text:p>27</text:p>
          </table:table-cell>
          <table:table-cell table:style-name="ce189" table:formula="of:=RANK([.U74];[.$U$4:.$U$133])" office:value-type="float" office:value="16" calcext:value-type="float">
            <text:p>16º</text:p>
          </table:table-cell>
          <table:table-cell table:style-name="ce161"/>
          <table:table-cell table:style-name="ce193" table:formula="of:=COUNTIF([.B74];&quot;&gt;0&quot;)+COUNTIF([.D74];&quot;&gt;0&quot;)+COUNTIF([.F74];&quot;&gt;0&quot;)+COUNTIF([.H74];&quot;&gt;0&quot;)+COUNTIF([.J74];&quot;&gt;0&quot;)" office:value-type="float" office:value="5" calcext:value-type="float">
            <text:p>5</text:p>
          </table:table-cell>
          <table:table-cell table:style-name="ce200" table:formula="of:=[.M74]/[.X74]" office:value-type="float" office:value="5.4" calcext:value-type="float">
            <text:p>5.4</text:p>
          </table:table-cell>
          <table:table-cell table:style-name="ce204" table:formula="of:=RANK([.Y74];[.$Y$4:.$Y$133])" office:value-type="float" office:value="20" calcext:value-type="float">
            <text:p>20º</text:p>
          </table:table-cell>
          <table:table-cell table:style-name="ce208" table:formula="of:=[.U74]/[.X74]" office:value-type="float" office:value="5.4" calcext:value-type="float">
            <text:p>5.4</text:p>
          </table:table-cell>
          <table:table-cell table:style-name="ce212" table:formula="of:=RANK([.AA74];[.$AA$4:.$AA$133])" office:value-type="float" office:value="64" calcext:value-type="float">
            <text:p>64º</text:p>
          </table:table-cell>
          <table:table-cell table:number-columns-repeated="996"/>
        </table:table-row>
        <table:table-row table:style-name="ro10">
          <table:table-cell table:style-name="ce129" office:value-type="string" calcext:value-type="string">
            <text:p>LEANDRO CARMELINI</text:p>
          </table:table-cell>
          <table:table-cell table:style-name="ce134" office:value-type="string" calcext:value-type="string">
            <text:p>-</text:p>
          </table:table-cell>
          <table:table-cell table:style-name="ce139" table:formula="of:=IF([.B75]=20;1;IF([.B75]=19;2;IF([.B75]=19;2;IF([.B75]=18;3;IF([.B75]=17;4;IF([.B75]=16;5;IF([.B75]=15;6;IF([.B75]=14;7;IF([.B75]=13;8;IF([.B75]=12;9;IF([.B75]=11;10;IF([.B75]=10;11;IF([.B75]=9;12;IF([.B75]=8;13;IF([.B75]=7;14;IF([.B75]=6;15;IF([.B75]=5;16;IF([.B75]=4;17;IF([.B75]=3;18;IF([.B75]=2;19;IF([.B75]=1;20;0)))))))))))))))))))))" office:value-type="float" office:value="0" calcext:value-type="float">
            <text:p>0</text:p>
          </table:table-cell>
          <table:table-cell table:style-name="ce134" office:value-type="string" calcext:value-type="string">
            <text:p>-</text:p>
          </table:table-cell>
          <table:table-cell table:style-name="ce139" table:formula="of:=IF([.D75]=20;1;IF([.D75]=19;2;IF([.D75]=19;2;IF([.D75]=18;3;IF([.D75]=17;4;IF([.D75]=16;5;IF([.D75]=15;6;IF([.D75]=14;7;IF([.D75]=13;8;IF([.D75]=12;9;IF([.D75]=11;10;IF([.D75]=10;11;IF([.D75]=9;12;IF([.D75]=8;13;IF([.D75]=7;14;IF([.D75]=6;15;IF([.D75]=5;16;IF([.D75]=4;17;IF([.D75]=3;18;IF([.D75]=2;19;IF([.D75]=1;20;0)))))))))))))))))))))" office:value-type="float" office:value="0" calcext:value-type="float">
            <text:p>0</text:p>
          </table:table-cell>
          <table:table-cell table:style-name="ce134" office:value-type="string" calcext:value-type="string">
            <text:p>-</text:p>
          </table:table-cell>
          <table:table-cell table:style-name="ce139" table:formula="of:=IF([.F75]=20;1;IF([.F75]=19;2;IF([.F75]=19;2;IF([.F75]=18;3;IF([.F75]=17;4;IF([.F75]=16;5;IF([.F75]=15;6;IF([.F75]=14;7;IF([.F75]=13;8;IF([.F75]=12;9;IF([.F75]=11;10;IF([.F75]=10;11;IF([.F75]=9;12;IF([.F75]=8;13;IF([.F75]=7;14;IF([.F75]=6;15;IF([.F75]=5;16;IF([.F75]=4;17;IF([.F75]=3;18;IF([.F75]=2;19;IF([.F75]=1;20;0)))))))))))))))))))))" office:value-type="float" office:value="0" calcext:value-type="float">
            <text:p>0</text:p>
          </table:table-cell>
          <table:table-cell table:style-name="ce134" office:value-type="float" office:value="87" calcext:value-type="float">
            <text:p>87º</text:p>
          </table:table-cell>
          <table:table-cell table:style-name="ce139" table:formula="of:=IF([.H75]=20;1;IF([.H75]=19;2;IF([.H75]=19;2;IF([.H75]=18;3;IF([.H75]=17;4;IF([.H75]=16;5;IF([.H75]=15;6;IF([.H75]=14;7;IF([.H75]=13;8;IF([.H75]=12;9;IF([.H75]=11;10;IF([.H75]=10;11;IF([.H75]=9;12;IF([.H75]=8;13;IF([.H75]=7;14;IF([.H75]=6;15;IF([.H75]=5;16;IF([.H75]=4;17;IF([.H75]=3;18;IF([.H75]=2;19;IF([.H75]=1;20;0)))))))))))))))))))))" office:value-type="float" office:value="0" calcext:value-type="float">
            <text:p>0</text:p>
          </table:table-cell>
          <table:table-cell table:style-name="ce134" office:value-type="string" calcext:value-type="string">
            <text:p>-</text:p>
          </table:table-cell>
          <table:table-cell table:style-name="ce145" table:formula="of:=IF([.J75]=20;1;IF([.J75]=19;2;IF([.J75]=19;2;IF([.J75]=18;3;IF([.J75]=17;4;IF([.J75]=16;5;IF([.J75]=15;6;IF([.J75]=14;7;IF([.J75]=13;8;IF([.J75]=12;9;IF([.J75]=11;10;IF([.J75]=10;11;IF([.J75]=9;12;IF([.J75]=8;13;IF([.J75]=7;14;IF([.J75]=6;15;IF([.J75]=5;16;IF([.J75]=4;17;IF([.J75]=3;18;IF([.J75]=2;19;IF([.J75]=1;20;0)))))))))))))))))))))" office:value-type="float" office:value="0" calcext:value-type="float">
            <text:p>0</text:p>
          </table:table-cell>
          <table:table-cell table:style-name="ce151"/>
          <table:table-cell table:style-name="ce158" table:formula="of:=SUM([.C75];[.E75];[.G75];[.I75];[.K75])" office:value-type="float" office:value="0" calcext:value-type="float">
            <text:p>0</text:p>
          </table:table-cell>
          <table:table-cell table:style-name="ce160" table:formula="of:=RANK([.M75];[.$M$4:.$M$133])" office:value-type="float" office:value="71" calcext:value-type="float">
            <text:p>71º</text:p>
          </table:table-cell>
          <table:table-cell table:style-name="ce162"/>
          <table:table-cell table:style-name="ce172" office:value-type="string" calcext:value-type="string">
            <text:p>-</text:p>
          </table:table-cell>
          <table:table-cell table:number-columns-repeated="2" table:style-name="ce176" office:value-type="string" calcext:value-type="string">
            <text:p>-</text:p>
          </table:table-cell>
          <table:table-cell table:style-name="ce180" office:value-type="float" office:value="4" calcext:value-type="float">
            <text:p>4</text:p>
          </table:table-cell>
          <table:table-cell table:style-name="ce185" office:value-type="string" calcext:value-type="string">
            <text:p>-</text:p>
          </table:table-cell>
          <table:table-cell table:style-name="ce188" table:formula="of:=SUM([.P75:.T75])" office:value-type="float" office:value="4" calcext:value-type="float">
            <text:p>4</text:p>
          </table:table-cell>
          <table:table-cell table:style-name="ce189" table:formula="of:=RANK([.U75];[.$U$4:.$U$133])" office:value-type="float" office:value="113" calcext:value-type="float">
            <text:p>113º</text:p>
          </table:table-cell>
          <table:table-cell table:style-name="ce162"/>
          <table:table-cell table:style-name="ce193" table:formula="of:=COUNTIF([.B75];&quot;&gt;0&quot;)+COUNTIF([.D75];&quot;&gt;0&quot;)+COUNTIF([.F75];&quot;&gt;0&quot;)+COUNTIF([.H75];&quot;&gt;0&quot;)+COUNTIF([.J75];&quot;&gt;0&quot;)" office:value-type="float" office:value="1" calcext:value-type="float">
            <text:p>1</text:p>
          </table:table-cell>
          <table:table-cell table:style-name="ce200" table:formula="of:=[.M75]/[.X75]" office:value-type="float" office:value="0" calcext:value-type="float">
            <text:p>0.0</text:p>
          </table:table-cell>
          <table:table-cell table:style-name="ce204" table:formula="of:=RANK([.Y75];[.$Y$4:.$Y$133])" office:value-type="float" office:value="71" calcext:value-type="float">
            <text:p>71º</text:p>
          </table:table-cell>
          <table:table-cell table:style-name="ce208" table:formula="of:=[.U75]/[.X75]" office:value-type="float" office:value="4" calcext:value-type="float">
            <text:p>4.0</text:p>
          </table:table-cell>
          <table:table-cell table:style-name="ce212" table:formula="of:=RANK([.AA75];[.$AA$4:.$AA$133])" office:value-type="float" office:value="98" calcext:value-type="float">
            <text:p>98º</text:p>
          </table:table-cell>
          <table:table-cell table:number-columns-repeated="996"/>
        </table:table-row>
        <table:table-row table:style-name="ro10">
          <table:table-cell table:style-name="ce129" office:value-type="string" calcext:value-type="string">
            <text:p>LEIDIANA</text:p>
          </table:table-cell>
          <table:table-cell table:style-name="ce134" office:value-type="string" calcext:value-type="string">
            <text:p>-</text:p>
          </table:table-cell>
          <table:table-cell table:style-name="ce139" table:formula="of:=IF([.B76]=20;1;IF([.B76]=19;2;IF([.B76]=19;2;IF([.B76]=18;3;IF([.B76]=17;4;IF([.B76]=16;5;IF([.B76]=15;6;IF([.B76]=14;7;IF([.B76]=13;8;IF([.B76]=12;9;IF([.B76]=11;10;IF([.B76]=10;11;IF([.B76]=9;12;IF([.B76]=8;13;IF([.B76]=7;14;IF([.B76]=6;15;IF([.B76]=5;16;IF([.B76]=4;17;IF([.B76]=3;18;IF([.B76]=2;19;IF([.B76]=1;20;0)))))))))))))))))))))" office:value-type="float" office:value="0" calcext:value-type="float">
            <text:p>0</text:p>
          </table:table-cell>
          <table:table-cell table:style-name="ce134" office:value-type="float" office:value="31" calcext:value-type="float">
            <text:p>31º</text:p>
          </table:table-cell>
          <table:table-cell table:style-name="ce139" table:formula="of:=IF([.D76]=20;1;IF([.D76]=19;2;IF([.D76]=19;2;IF([.D76]=18;3;IF([.D76]=17;4;IF([.D76]=16;5;IF([.D76]=15;6;IF([.D76]=14;7;IF([.D76]=13;8;IF([.D76]=12;9;IF([.D76]=11;10;IF([.D76]=10;11;IF([.D76]=9;12;IF([.D76]=8;13;IF([.D76]=7;14;IF([.D76]=6;15;IF([.D76]=5;16;IF([.D76]=4;17;IF([.D76]=3;18;IF([.D76]=2;19;IF([.D76]=1;20;0)))))))))))))))))))))" office:value-type="float" office:value="0" calcext:value-type="float">
            <text:p>0</text:p>
          </table:table-cell>
          <table:table-cell table:style-name="ce134" office:value-type="string" calcext:value-type="string">
            <text:p>-</text:p>
          </table:table-cell>
          <table:table-cell table:style-name="ce139" table:formula="of:=IF([.F76]=20;1;IF([.F76]=19;2;IF([.F76]=19;2;IF([.F76]=18;3;IF([.F76]=17;4;IF([.F76]=16;5;IF([.F76]=15;6;IF([.F76]=14;7;IF([.F76]=13;8;IF([.F76]=12;9;IF([.F76]=11;10;IF([.F76]=10;11;IF([.F76]=9;12;IF([.F76]=8;13;IF([.F76]=7;14;IF([.F76]=6;15;IF([.F76]=5;16;IF([.F76]=4;17;IF([.F76]=3;18;IF([.F76]=2;19;IF([.F76]=1;20;0)))))))))))))))))))))" office:value-type="float" office:value="0" calcext:value-type="float">
            <text:p>0</text:p>
          </table:table-cell>
          <table:table-cell table:style-name="ce134" office:value-type="string" calcext:value-type="string">
            <text:p>-</text:p>
          </table:table-cell>
          <table:table-cell table:style-name="ce139" table:formula="of:=IF([.H76]=20;1;IF([.H76]=19;2;IF([.H76]=19;2;IF([.H76]=18;3;IF([.H76]=17;4;IF([.H76]=16;5;IF([.H76]=15;6;IF([.H76]=14;7;IF([.H76]=13;8;IF([.H76]=12;9;IF([.H76]=11;10;IF([.H76]=10;11;IF([.H76]=9;12;IF([.H76]=8;13;IF([.H76]=7;14;IF([.H76]=6;15;IF([.H76]=5;16;IF([.H76]=4;17;IF([.H76]=3;18;IF([.H76]=2;19;IF([.H76]=1;20;0)))))))))))))))))))))" office:value-type="float" office:value="0" calcext:value-type="float">
            <text:p>0</text:p>
          </table:table-cell>
          <table:table-cell table:style-name="ce134" office:value-type="string" calcext:value-type="string">
            <text:p>-</text:p>
          </table:table-cell>
          <table:table-cell table:style-name="ce145" table:formula="of:=IF([.J76]=20;1;IF([.J76]=19;2;IF([.J76]=19;2;IF([.J76]=18;3;IF([.J76]=17;4;IF([.J76]=16;5;IF([.J76]=15;6;IF([.J76]=14;7;IF([.J76]=13;8;IF([.J76]=12;9;IF([.J76]=11;10;IF([.J76]=10;11;IF([.J76]=9;12;IF([.J76]=8;13;IF([.J76]=7;14;IF([.J76]=6;15;IF([.J76]=5;16;IF([.J76]=4;17;IF([.J76]=3;18;IF([.J76]=2;19;IF([.J76]=1;20;0)))))))))))))))))))))" office:value-type="float" office:value="0" calcext:value-type="float">
            <text:p>0</text:p>
          </table:table-cell>
          <table:table-cell table:style-name="ce150"/>
          <table:table-cell table:style-name="ce158" table:formula="of:=SUM([.C76];[.E76];[.G76];[.I76];[.K76])" office:value-type="float" office:value="0" calcext:value-type="float">
            <text:p>0</text:p>
          </table:table-cell>
          <table:table-cell table:style-name="ce160" table:formula="of:=RANK([.M76];[.$M$4:.$M$133])" office:value-type="float" office:value="71" calcext:value-type="float">
            <text:p>71º</text:p>
          </table:table-cell>
          <table:table-cell table:style-name="ce161"/>
          <table:table-cell table:style-name="ce169"/>
          <table:table-cell table:style-name="ce175" table:number-columns-repeated="2"/>
          <table:table-cell table:style-name="ce180"/>
          <table:table-cell table:style-name="ce185" office:value-type="string" calcext:value-type="string">
            <text:p>-</text:p>
          </table:table-cell>
          <table:table-cell table:style-name="ce188" table:formula="of:=SUM([.P76:.T76])" office:value-type="float" office:value="0" calcext:value-type="float">
            <text:p>0</text:p>
          </table:table-cell>
          <table:table-cell table:style-name="ce189" table:formula="of:=RANK([.U76];[.$U$4:.$U$133])" office:value-type="float" office:value="128" calcext:value-type="float">
            <text:p>128º</text:p>
          </table:table-cell>
          <table:table-cell table:style-name="ce161"/>
          <table:table-cell table:style-name="ce193" table:formula="of:=COUNTIF([.B76];&quot;&gt;0&quot;)+COUNTIF([.D76];&quot;&gt;0&quot;)+COUNTIF([.F76];&quot;&gt;0&quot;)+COUNTIF([.H76];&quot;&gt;0&quot;)+COUNTIF([.J76];&quot;&gt;0&quot;)" office:value-type="float" office:value="1" calcext:value-type="float">
            <text:p>1</text:p>
          </table:table-cell>
          <table:table-cell table:style-name="ce200" table:formula="of:=[.M76]/[.X76]" office:value-type="float" office:value="0" calcext:value-type="float">
            <text:p>0.0</text:p>
          </table:table-cell>
          <table:table-cell table:style-name="ce204" table:formula="of:=RANK([.Y76];[.$Y$4:.$Y$133])" office:value-type="float" office:value="71" calcext:value-type="float">
            <text:p>71º</text:p>
          </table:table-cell>
          <table:table-cell table:style-name="ce208" table:formula="of:=[.U76]/[.X76]" office:value-type="float" office:value="0" calcext:value-type="float">
            <text:p>0.0</text:p>
          </table:table-cell>
          <table:table-cell table:style-name="ce212" table:formula="of:=RANK([.AA76];[.$AA$4:.$AA$133])" office:value-type="float" office:value="128" calcext:value-type="float">
            <text:p>128º</text:p>
          </table:table-cell>
          <table:table-cell table:number-columns-repeated="996"/>
        </table:table-row>
        <table:table-row table:style-name="ro10">
          <table:table-cell table:style-name="ce129" office:value-type="string" calcext:value-type="string">
            <text:p>LEONARDO GARAVELO</text:p>
          </table:table-cell>
          <table:table-cell table:style-name="ce134" office:value-type="string" calcext:value-type="string">
            <text:p>-</text:p>
          </table:table-cell>
          <table:table-cell table:style-name="ce139" table:formula="of:=IF([.B77]=20;1;IF([.B77]=19;2;IF([.B77]=19;2;IF([.B77]=18;3;IF([.B77]=17;4;IF([.B77]=16;5;IF([.B77]=15;6;IF([.B77]=14;7;IF([.B77]=13;8;IF([.B77]=12;9;IF([.B77]=11;10;IF([.B77]=10;11;IF([.B77]=9;12;IF([.B77]=8;13;IF([.B77]=7;14;IF([.B77]=6;15;IF([.B77]=5;16;IF([.B77]=4;17;IF([.B77]=3;18;IF([.B77]=2;19;IF([.B77]=1;20;0)))))))))))))))))))))" office:value-type="float" office:value="0" calcext:value-type="float">
            <text:p>0</text:p>
          </table:table-cell>
          <table:table-cell table:style-name="ce134" office:value-type="string" calcext:value-type="string">
            <text:p>-</text:p>
          </table:table-cell>
          <table:table-cell table:style-name="ce139" table:formula="of:=IF([.D77]=20;1;IF([.D77]=19;2;IF([.D77]=19;2;IF([.D77]=18;3;IF([.D77]=17;4;IF([.D77]=16;5;IF([.D77]=15;6;IF([.D77]=14;7;IF([.D77]=13;8;IF([.D77]=12;9;IF([.D77]=11;10;IF([.D77]=10;11;IF([.D77]=9;12;IF([.D77]=8;13;IF([.D77]=7;14;IF([.D77]=6;15;IF([.D77]=5;16;IF([.D77]=4;17;IF([.D77]=3;18;IF([.D77]=2;19;IF([.D77]=1;20;0)))))))))))))))))))))" office:value-type="float" office:value="0" calcext:value-type="float">
            <text:p>0</text:p>
          </table:table-cell>
          <table:table-cell table:style-name="ce134" office:value-type="float" office:value="67" calcext:value-type="float">
            <text:p>67º</text:p>
          </table:table-cell>
          <table:table-cell table:style-name="ce139" table:formula="of:=IF([.F77]=20;1;IF([.F77]=19;2;IF([.F77]=19;2;IF([.F77]=18;3;IF([.F77]=17;4;IF([.F77]=16;5;IF([.F77]=15;6;IF([.F77]=14;7;IF([.F77]=13;8;IF([.F77]=12;9;IF([.F77]=11;10;IF([.F77]=10;11;IF([.F77]=9;12;IF([.F77]=8;13;IF([.F77]=7;14;IF([.F77]=6;15;IF([.F77]=5;16;IF([.F77]=4;17;IF([.F77]=3;18;IF([.F77]=2;19;IF([.F77]=1;20;0)))))))))))))))))))))" office:value-type="float" office:value="0" calcext:value-type="float">
            <text:p>0</text:p>
          </table:table-cell>
          <table:table-cell table:style-name="ce134" office:value-type="float" office:value="68" calcext:value-type="float">
            <text:p>68º</text:p>
          </table:table-cell>
          <table:table-cell table:style-name="ce139" table:formula="of:=IF([.H77]=20;1;IF([.H77]=19;2;IF([.H77]=19;2;IF([.H77]=18;3;IF([.H77]=17;4;IF([.H77]=16;5;IF([.H77]=15;6;IF([.H77]=14;7;IF([.H77]=13;8;IF([.H77]=12;9;IF([.H77]=11;10;IF([.H77]=10;11;IF([.H77]=9;12;IF([.H77]=8;13;IF([.H77]=7;14;IF([.H77]=6;15;IF([.H77]=5;16;IF([.H77]=4;17;IF([.H77]=3;18;IF([.H77]=2;19;IF([.H77]=1;20;0)))))))))))))))))))))" office:value-type="float" office:value="0" calcext:value-type="float">
            <text:p>0</text:p>
          </table:table-cell>
          <table:table-cell table:style-name="ce134" office:value-type="string" calcext:value-type="string">
            <text:p>-</text:p>
          </table:table-cell>
          <table:table-cell table:style-name="ce145" table:formula="of:=IF([.J77]=20;1;IF([.J77]=19;2;IF([.J77]=19;2;IF([.J77]=18;3;IF([.J77]=17;4;IF([.J77]=16;5;IF([.J77]=15;6;IF([.J77]=14;7;IF([.J77]=13;8;IF([.J77]=12;9;IF([.J77]=11;10;IF([.J77]=10;11;IF([.J77]=9;12;IF([.J77]=8;13;IF([.J77]=7;14;IF([.J77]=6;15;IF([.J77]=5;16;IF([.J77]=4;17;IF([.J77]=3;18;IF([.J77]=2;19;IF([.J77]=1;20;0)))))))))))))))))))))" office:value-type="float" office:value="0" calcext:value-type="float">
            <text:p>0</text:p>
          </table:table-cell>
          <table:table-cell table:style-name="ce150"/>
          <table:table-cell table:style-name="ce158" table:formula="of:=SUM([.C77];[.E77];[.G77];[.I77];[.K77])" office:value-type="float" office:value="0" calcext:value-type="float">
            <text:p>0</text:p>
          </table:table-cell>
          <table:table-cell table:style-name="ce160" table:formula="of:=RANK([.M77];[.$M$4:.$M$133])" office:value-type="float" office:value="71" calcext:value-type="float">
            <text:p>71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3" calcext:value-type="float">
            <text:p>3</text:p>
          </table:table-cell>
          <table:table-cell table:style-name="ce180" office:value-type="float" office:value="4" calcext:value-type="float">
            <text:p>4</text:p>
          </table:table-cell>
          <table:table-cell table:style-name="ce185" office:value-type="float" office:value="3" calcext:value-type="float">
            <text:p>3</text:p>
          </table:table-cell>
          <table:table-cell table:style-name="ce188" table:formula="of:=SUM([.P77:.T77])" office:value-type="float" office:value="10" calcext:value-type="float">
            <text:p>10</text:p>
          </table:table-cell>
          <table:table-cell table:style-name="ce189" table:formula="of:=RANK([.U77];[.$U$4:.$U$133])" office:value-type="float" office:value="65" calcext:value-type="float">
            <text:p>65º</text:p>
          </table:table-cell>
          <table:table-cell table:style-name="ce161"/>
          <table:table-cell table:style-name="ce193" table:formula="of:=COUNTIF([.B77];&quot;&gt;0&quot;)+COUNTIF([.D77];&quot;&gt;0&quot;)+COUNTIF([.F77];&quot;&gt;0&quot;)+COUNTIF([.H77];&quot;&gt;0&quot;)+COUNTIF([.J77];&quot;&gt;0&quot;)" office:value-type="float" office:value="2" calcext:value-type="float">
            <text:p>2</text:p>
          </table:table-cell>
          <table:table-cell table:style-name="ce200" table:formula="of:=[.M77]/[.X77]" office:value-type="float" office:value="0" calcext:value-type="float">
            <text:p>0.0</text:p>
          </table:table-cell>
          <table:table-cell table:style-name="ce204" table:formula="of:=RANK([.Y77];[.$Y$4:.$Y$133])" office:value-type="float" office:value="71" calcext:value-type="float">
            <text:p>71º</text:p>
          </table:table-cell>
          <table:table-cell table:style-name="ce208" table:formula="of:=[.U77]/[.X77]" office:value-type="float" office:value="5" calcext:value-type="float">
            <text:p>5.0</text:p>
          </table:table-cell>
          <table:table-cell table:style-name="ce212" table:formula="of:=RANK([.AA77];[.$AA$4:.$AA$133])" office:value-type="float" office:value="68" calcext:value-type="float">
            <text:p>68º</text:p>
          </table:table-cell>
          <table:table-cell table:number-columns-repeated="996"/>
        </table:table-row>
        <table:table-row table:style-name="ro10">
          <table:table-cell table:style-name="ce129" office:value-type="string" calcext:value-type="string">
            <text:p>LEONEL</text:p>
          </table:table-cell>
          <table:table-cell table:style-name="ce134" office:value-type="string" calcext:value-type="string">
            <text:p>-</text:p>
          </table:table-cell>
          <table:table-cell table:style-name="ce139" table:formula="of:=IF([.B78]=20;1;IF([.B78]=19;2;IF([.B78]=19;2;IF([.B78]=18;3;IF([.B78]=17;4;IF([.B78]=16;5;IF([.B78]=15;6;IF([.B78]=14;7;IF([.B78]=13;8;IF([.B78]=12;9;IF([.B78]=11;10;IF([.B78]=10;11;IF([.B78]=9;12;IF([.B78]=8;13;IF([.B78]=7;14;IF([.B78]=6;15;IF([.B78]=5;16;IF([.B78]=4;17;IF([.B78]=3;18;IF([.B78]=2;19;IF([.B78]=1;20;0)))))))))))))))))))))" office:value-type="float" office:value="0" calcext:value-type="float">
            <text:p>0</text:p>
          </table:table-cell>
          <table:table-cell table:style-name="ce134" office:value-type="string" calcext:value-type="string">
            <text:p>-</text:p>
          </table:table-cell>
          <table:table-cell table:style-name="ce139" table:formula="of:=IF([.D78]=20;1;IF([.D78]=19;2;IF([.D78]=19;2;IF([.D78]=18;3;IF([.D78]=17;4;IF([.D78]=16;5;IF([.D78]=15;6;IF([.D78]=14;7;IF([.D78]=13;8;IF([.D78]=12;9;IF([.D78]=11;10;IF([.D78]=10;11;IF([.D78]=9;12;IF([.D78]=8;13;IF([.D78]=7;14;IF([.D78]=6;15;IF([.D78]=5;16;IF([.D78]=4;17;IF([.D78]=3;18;IF([.D78]=2;19;IF([.D78]=1;20;0)))))))))))))))))))))" office:value-type="float" office:value="0" calcext:value-type="float">
            <text:p>0</text:p>
          </table:table-cell>
          <table:table-cell table:style-name="ce134" office:value-type="float" office:value="40" calcext:value-type="float">
            <text:p>40º</text:p>
          </table:table-cell>
          <table:table-cell table:style-name="ce139" table:formula="of:=IF([.F78]=20;1;IF([.F78]=19;2;IF([.F78]=19;2;IF([.F78]=18;3;IF([.F78]=17;4;IF([.F78]=16;5;IF([.F78]=15;6;IF([.F78]=14;7;IF([.F78]=13;8;IF([.F78]=12;9;IF([.F78]=11;10;IF([.F78]=10;11;IF([.F78]=9;12;IF([.F78]=8;13;IF([.F78]=7;14;IF([.F78]=6;15;IF([.F78]=5;16;IF([.F78]=4;17;IF([.F78]=3;18;IF([.F78]=2;19;IF([.F78]=1;20;0)))))))))))))))))))))" office:value-type="float" office:value="0" calcext:value-type="float">
            <text:p>0</text:p>
          </table:table-cell>
          <table:table-cell table:style-name="ce134" office:value-type="float" office:value="11" calcext:value-type="float">
            <text:p>11º</text:p>
          </table:table-cell>
          <table:table-cell table:style-name="ce139" table:formula="of:=IF([.H78]=20;1;IF([.H78]=19;2;IF([.H78]=19;2;IF([.H78]=18;3;IF([.H78]=17;4;IF([.H78]=16;5;IF([.H78]=15;6;IF([.H78]=14;7;IF([.H78]=13;8;IF([.H78]=12;9;IF([.H78]=11;10;IF([.H78]=10;11;IF([.H78]=9;12;IF([.H78]=8;13;IF([.H78]=7;14;IF([.H78]=6;15;IF([.H78]=5;16;IF([.H78]=4;17;IF([.H78]=3;18;IF([.H78]=2;19;IF([.H78]=1;20;0)))))))))))))))))))))" office:value-type="float" office:value="10" calcext:value-type="float">
            <text:p>10</text:p>
          </table:table-cell>
          <table:table-cell table:style-name="ce134" office:value-type="string" calcext:value-type="string">
            <text:p>-</text:p>
          </table:table-cell>
          <table:table-cell table:style-name="ce145" table:formula="of:=IF([.J78]=20;1;IF([.J78]=19;2;IF([.J78]=19;2;IF([.J78]=18;3;IF([.J78]=17;4;IF([.J78]=16;5;IF([.J78]=15;6;IF([.J78]=14;7;IF([.J78]=13;8;IF([.J78]=12;9;IF([.J78]=11;10;IF([.J78]=10;11;IF([.J78]=9;12;IF([.J78]=8;13;IF([.J78]=7;14;IF([.J78]=6;15;IF([.J78]=5;16;IF([.J78]=4;17;IF([.J78]=3;18;IF([.J78]=2;19;IF([.J78]=1;20;0)))))))))))))))))))))" office:value-type="float" office:value="0" calcext:value-type="float">
            <text:p>0</text:p>
          </table:table-cell>
          <table:table-cell table:style-name="ce150"/>
          <table:table-cell table:style-name="ce158" table:formula="of:=SUM([.C78];[.E78];[.G78];[.I78];[.K78])" office:value-type="float" office:value="10" calcext:value-type="float">
            <text:p>10</text:p>
          </table:table-cell>
          <table:table-cell table:style-name="ce160" table:formula="of:=RANK([.M78];[.$M$4:.$M$133])" office:value-type="float" office:value="46" calcext:value-type="float">
            <text:p>46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8" calcext:value-type="float">
            <text:p>8</text:p>
          </table:table-cell>
          <table:table-cell table:style-name="ce180" office:value-type="float" office:value="8" calcext:value-type="float">
            <text:p>8</text:p>
          </table:table-cell>
          <table:table-cell table:style-name="ce185" office:value-type="string" calcext:value-type="string">
            <text:p>-</text:p>
          </table:table-cell>
          <table:table-cell table:style-name="ce188" table:formula="of:=SUM([.P78:.T78])" office:value-type="float" office:value="16" calcext:value-type="float">
            <text:p>16</text:p>
          </table:table-cell>
          <table:table-cell table:style-name="ce189" table:formula="of:=RANK([.U78];[.$U$4:.$U$133])" office:value-type="float" office:value="44" calcext:value-type="float">
            <text:p>44º</text:p>
          </table:table-cell>
          <table:table-cell table:style-name="ce161"/>
          <table:table-cell table:style-name="ce193" table:formula="of:=COUNTIF([.B78];&quot;&gt;0&quot;)+COUNTIF([.D78];&quot;&gt;0&quot;)+COUNTIF([.F78];&quot;&gt;0&quot;)+COUNTIF([.H78];&quot;&gt;0&quot;)+COUNTIF([.J78];&quot;&gt;0&quot;)" office:value-type="float" office:value="2" calcext:value-type="float">
            <text:p>2</text:p>
          </table:table-cell>
          <table:table-cell table:style-name="ce200" table:formula="of:=[.M78]/[.X78]" office:value-type="float" office:value="5" calcext:value-type="float">
            <text:p>5.0</text:p>
          </table:table-cell>
          <table:table-cell table:style-name="ce204" table:formula="of:=RANK([.Y78];[.$Y$4:.$Y$133])" office:value-type="float" office:value="26" calcext:value-type="float">
            <text:p>26º</text:p>
          </table:table-cell>
          <table:table-cell table:style-name="ce208" table:formula="of:=[.U78]/[.X78]" office:value-type="float" office:value="8" calcext:value-type="float">
            <text:p>8.0</text:p>
          </table:table-cell>
          <table:table-cell table:style-name="ce212" table:formula="of:=RANK([.AA78];[.$AA$4:.$AA$133])" office:value-type="float" office:value="6" calcext:value-type="float">
            <text:p>6º</text:p>
          </table:table-cell>
          <table:table-cell table:number-columns-repeated="996"/>
        </table:table-row>
        <table:table-row table:style-name="ro10">
          <table:table-cell table:style-name="ce129" office:value-type="string" calcext:value-type="string">
            <text:p>LETÍCIA JACOBY</text:p>
          </table:table-cell>
          <table:table-cell table:style-name="ce134" office:value-type="string" calcext:value-type="string">
            <text:p>-</text:p>
          </table:table-cell>
          <table:table-cell table:style-name="ce139" table:formula="of:=IF([.B79]=20;1;IF([.B79]=19;2;IF([.B79]=19;2;IF([.B79]=18;3;IF([.B79]=17;4;IF([.B79]=16;5;IF([.B79]=15;6;IF([.B79]=14;7;IF([.B79]=13;8;IF([.B79]=12;9;IF([.B79]=11;10;IF([.B79]=10;11;IF([.B79]=9;12;IF([.B79]=8;13;IF([.B79]=7;14;IF([.B79]=6;15;IF([.B79]=5;16;IF([.B79]=4;17;IF([.B79]=3;18;IF([.B79]=2;19;IF([.B79]=1;20;0)))))))))))))))))))))" office:value-type="float" office:value="0" calcext:value-type="float">
            <text:p>0</text:p>
          </table:table-cell>
          <table:table-cell table:style-name="ce134" office:value-type="float" office:value="48" calcext:value-type="float">
            <text:p>48º</text:p>
          </table:table-cell>
          <table:table-cell table:style-name="ce139" table:formula="of:=IF([.D79]=20;1;IF([.D79]=19;2;IF([.D79]=19;2;IF([.D79]=18;3;IF([.D79]=17;4;IF([.D79]=16;5;IF([.D79]=15;6;IF([.D79]=14;7;IF([.D79]=13;8;IF([.D79]=12;9;IF([.D79]=11;10;IF([.D79]=10;11;IF([.D79]=9;12;IF([.D79]=8;13;IF([.D79]=7;14;IF([.D79]=6;15;IF([.D79]=5;16;IF([.D79]=4;17;IF([.D79]=3;18;IF([.D79]=2;19;IF([.D79]=1;20;0)))))))))))))))))))))" office:value-type="float" office:value="0" calcext:value-type="float">
            <text:p>0</text:p>
          </table:table-cell>
          <table:table-cell table:style-name="ce134" office:value-type="float" office:value="52" calcext:value-type="float">
            <text:p>52º</text:p>
          </table:table-cell>
          <table:table-cell table:style-name="ce139" table:formula="of:=IF([.F79]=20;1;IF([.F79]=19;2;IF([.F79]=19;2;IF([.F79]=18;3;IF([.F79]=17;4;IF([.F79]=16;5;IF([.F79]=15;6;IF([.F79]=14;7;IF([.F79]=13;8;IF([.F79]=12;9;IF([.F79]=11;10;IF([.F79]=10;11;IF([.F79]=9;12;IF([.F79]=8;13;IF([.F79]=7;14;IF([.F79]=6;15;IF([.F79]=5;16;IF([.F79]=4;17;IF([.F79]=3;18;IF([.F79]=2;19;IF([.F79]=1;20;0)))))))))))))))))))))" office:value-type="float" office:value="0" calcext:value-type="float">
            <text:p>0</text:p>
          </table:table-cell>
          <table:table-cell table:style-name="ce134" office:value-type="float" office:value="10" calcext:value-type="float">
            <text:p>10º</text:p>
          </table:table-cell>
          <table:table-cell table:style-name="ce139" table:formula="of:=IF([.H79]=20;1;IF([.H79]=19;2;IF([.H79]=19;2;IF([.H79]=18;3;IF([.H79]=17;4;IF([.H79]=16;5;IF([.H79]=15;6;IF([.H79]=14;7;IF([.H79]=13;8;IF([.H79]=12;9;IF([.H79]=11;10;IF([.H79]=10;11;IF([.H79]=9;12;IF([.H79]=8;13;IF([.H79]=7;14;IF([.H79]=6;15;IF([.H79]=5;16;IF([.H79]=4;17;IF([.H79]=3;18;IF([.H79]=2;19;IF([.H79]=1;20;0)))))))))))))))))))))" office:value-type="float" office:value="11" calcext:value-type="float">
            <text:p>11</text:p>
          </table:table-cell>
          <table:table-cell table:style-name="ce134" office:value-type="string" calcext:value-type="string">
            <text:p>-</text:p>
          </table:table-cell>
          <table:table-cell table:style-name="ce145" table:formula="of:=IF([.J79]=20;1;IF([.J79]=19;2;IF([.J79]=19;2;IF([.J79]=18;3;IF([.J79]=17;4;IF([.J79]=16;5;IF([.J79]=15;6;IF([.J79]=14;7;IF([.J79]=13;8;IF([.J79]=12;9;IF([.J79]=11;10;IF([.J79]=10;11;IF([.J79]=9;12;IF([.J79]=8;13;IF([.J79]=7;14;IF([.J79]=6;15;IF([.J79]=5;16;IF([.J79]=4;17;IF([.J79]=3;18;IF([.J79]=2;19;IF([.J79]=1;20;0)))))))))))))))))))))" office:value-type="float" office:value="0" calcext:value-type="float">
            <text:p>0</text:p>
          </table:table-cell>
          <table:table-cell table:style-name="ce150"/>
          <table:table-cell table:style-name="ce158" table:formula="of:=SUM([.C79];[.E79];[.G79];[.I79];[.K79])" office:value-type="float" office:value="11" calcext:value-type="float">
            <text:p>11</text:p>
          </table:table-cell>
          <table:table-cell table:style-name="ce160" table:formula="of:=RANK([.M79];[.$M$4:.$M$133])" office:value-type="float" office:value="43" calcext:value-type="float">
            <text:p>43º</text:p>
          </table:table-cell>
          <table:table-cell table:style-name="ce161"/>
          <table:table-cell table:style-name="ce169" office:value-type="string" calcext:value-type="string">
            <text:p>-</text:p>
          </table:table-cell>
          <table:table-cell table:style-name="ce175" office:value-type="float" office:value="5" calcext:value-type="float">
            <text:p>5</text:p>
          </table:table-cell>
          <table:table-cell table:style-name="ce175" office:value-type="float" office:value="8" calcext:value-type="float">
            <text:p>8</text:p>
          </table:table-cell>
          <table:table-cell table:style-name="ce180" office:value-type="float" office:value="3" calcext:value-type="float">
            <text:p>3</text:p>
          </table:table-cell>
          <table:table-cell table:style-name="ce185" office:value-type="string" calcext:value-type="string">
            <text:p>-</text:p>
          </table:table-cell>
          <table:table-cell table:style-name="ce188" table:formula="of:=SUM([.P79:.T79])" office:value-type="float" office:value="16" calcext:value-type="float">
            <text:p>16</text:p>
          </table:table-cell>
          <table:table-cell table:style-name="ce189" table:formula="of:=RANK([.U79];[.$U$4:.$U$133])" office:value-type="float" office:value="44" calcext:value-type="float">
            <text:p>44º</text:p>
          </table:table-cell>
          <table:table-cell table:style-name="ce161"/>
          <table:table-cell table:style-name="ce193" table:formula="of:=COUNTIF([.B79];&quot;&gt;0&quot;)+COUNTIF([.D79];&quot;&gt;0&quot;)+COUNTIF([.F79];&quot;&gt;0&quot;)+COUNTIF([.H79];&quot;&gt;0&quot;)+COUNTIF([.J79];&quot;&gt;0&quot;)" office:value-type="float" office:value="3" calcext:value-type="float">
            <text:p>3</text:p>
          </table:table-cell>
          <table:table-cell table:style-name="ce200" table:formula="of:=[.M79]/[.X79]" office:value-type="float" office:value="3.66666666666667" calcext:value-type="float">
            <text:p>3.7</text:p>
          </table:table-cell>
          <table:table-cell table:style-name="ce204" table:formula="of:=RANK([.Y79];[.$Y$4:.$Y$133])" office:value-type="float" office:value="47" calcext:value-type="float">
            <text:p>47º</text:p>
          </table:table-cell>
          <table:table-cell table:style-name="ce208" table:formula="of:=[.U79]/[.X79]" office:value-type="float" office:value="5.33333333333333" calcext:value-type="float">
            <text:p>5.3</text:p>
          </table:table-cell>
          <table:table-cell table:style-name="ce212" table:formula="of:=RANK([.AA79];[.$AA$4:.$AA$133])" office:value-type="float" office:value="66" calcext:value-type="float">
            <text:p>66º</text:p>
          </table:table-cell>
          <table:table-cell table:number-columns-repeated="996"/>
        </table:table-row>
        <table:table-row table:style-name="ro10">
          <table:table-cell table:style-name="ce129" office:value-type="string" calcext:value-type="string">
            <text:p>LUCAS ALVARES</text:p>
          </table:table-cell>
          <table:table-cell table:style-name="ce134" office:value-type="string" calcext:value-type="string">
            <text:p>-</text:p>
          </table:table-cell>
          <table:table-cell table:style-name="ce139" table:formula="of:=IF([.B80]=20;1;IF([.B80]=19;2;IF([.B80]=19;2;IF([.B80]=18;3;IF([.B80]=17;4;IF([.B80]=16;5;IF([.B80]=15;6;IF([.B80]=14;7;IF([.B80]=13;8;IF([.B80]=12;9;IF([.B80]=11;10;IF([.B80]=10;11;IF([.B80]=9;12;IF([.B80]=8;13;IF([.B80]=7;14;IF([.B80]=6;15;IF([.B80]=5;16;IF([.B80]=4;17;IF([.B80]=3;18;IF([.B80]=2;19;IF([.B80]=1;20;0)))))))))))))))))))))" office:value-type="float" office:value="0" calcext:value-type="float">
            <text:p>0</text:p>
          </table:table-cell>
          <table:table-cell table:style-name="ce134" office:value-type="string" calcext:value-type="string">
            <text:p>-</text:p>
          </table:table-cell>
          <table:table-cell table:style-name="ce139" table:formula="of:=IF([.D80]=20;1;IF([.D80]=19;2;IF([.D80]=19;2;IF([.D80]=18;3;IF([.D80]=17;4;IF([.D80]=16;5;IF([.D80]=15;6;IF([.D80]=14;7;IF([.D80]=13;8;IF([.D80]=12;9;IF([.D80]=11;10;IF([.D80]=10;11;IF([.D80]=9;12;IF([.D80]=8;13;IF([.D80]=7;14;IF([.D80]=6;15;IF([.D80]=5;16;IF([.D80]=4;17;IF([.D80]=3;18;IF([.D80]=2;19;IF([.D80]=1;20;0)))))))))))))))))))))" office:value-type="float" office:value="0" calcext:value-type="float">
            <text:p>0</text:p>
          </table:table-cell>
          <table:table-cell table:style-name="ce134" office:value-type="string" calcext:value-type="string">
            <text:p>-</text:p>
          </table:table-cell>
          <table:table-cell table:style-name="ce139" table:formula="of:=IF([.F80]=20;1;IF([.F80]=19;2;IF([.F80]=19;2;IF([.F80]=18;3;IF([.F80]=17;4;IF([.F80]=16;5;IF([.F80]=15;6;IF([.F80]=14;7;IF([.F80]=13;8;IF([.F80]=12;9;IF([.F80]=11;10;IF([.F80]=10;11;IF([.F80]=9;12;IF([.F80]=8;13;IF([.F80]=7;14;IF([.F80]=6;15;IF([.F80]=5;16;IF([.F80]=4;17;IF([.F80]=3;18;IF([.F80]=2;19;IF([.F80]=1;20;0)))))))))))))))))))))" office:value-type="float" office:value="0" calcext:value-type="float">
            <text:p>0</text:p>
          </table:table-cell>
          <table:table-cell table:style-name="ce134" office:value-type="float" office:value="40" calcext:value-type="float">
            <text:p>40º</text:p>
          </table:table-cell>
          <table:table-cell table:style-name="ce139" table:formula="of:=IF([.H80]=20;1;IF([.H80]=19;2;IF([.H80]=19;2;IF([.H80]=18;3;IF([.H80]=17;4;IF([.H80]=16;5;IF([.H80]=15;6;IF([.H80]=14;7;IF([.H80]=13;8;IF([.H80]=12;9;IF([.H80]=11;10;IF([.H80]=10;11;IF([.H80]=9;12;IF([.H80]=8;13;IF([.H80]=7;14;IF([.H80]=6;15;IF([.H80]=5;16;IF([.H80]=4;17;IF([.H80]=3;18;IF([.H80]=2;19;IF([.H80]=1;20;0)))))))))))))))))))))" office:value-type="float" office:value="0" calcext:value-type="float">
            <text:p>0</text:p>
          </table:table-cell>
          <table:table-cell table:style-name="ce134" office:value-type="string" calcext:value-type="string">
            <text:p>-</text:p>
          </table:table-cell>
          <table:table-cell table:style-name="ce145" table:formula="of:=IF([.J80]=20;1;IF([.J80]=19;2;IF([.J80]=19;2;IF([.J80]=18;3;IF([.J80]=17;4;IF([.J80]=16;5;IF([.J80]=15;6;IF([.J80]=14;7;IF([.J80]=13;8;IF([.J80]=12;9;IF([.J80]=11;10;IF([.J80]=10;11;IF([.J80]=9;12;IF([.J80]=8;13;IF([.J80]=7;14;IF([.J80]=6;15;IF([.J80]=5;16;IF([.J80]=4;17;IF([.J80]=3;18;IF([.J80]=2;19;IF([.J80]=1;20;0)))))))))))))))))))))" office:value-type="float" office:value="0" calcext:value-type="float">
            <text:p>0</text:p>
          </table:table-cell>
          <table:table-cell table:style-name="ce151"/>
          <table:table-cell table:style-name="ce158" table:formula="of:=SUM([.C80];[.E80];[.G80];[.I80];[.K80])" office:value-type="float" office:value="0" calcext:value-type="float">
            <text:p>0</text:p>
          </table:table-cell>
          <table:table-cell table:style-name="ce160" table:formula="of:=RANK([.M80];[.$M$4:.$M$133])" office:value-type="float" office:value="71" calcext:value-type="float">
            <text:p>71º</text:p>
          </table:table-cell>
          <table:table-cell table:style-name="ce162"/>
          <table:table-cell table:style-name="ce172" office:value-type="string" calcext:value-type="string">
            <text:p>-</text:p>
          </table:table-cell>
          <table:table-cell table:number-columns-repeated="2" table:style-name="ce176" office:value-type="string" calcext:value-type="string">
            <text:p>-</text:p>
          </table:table-cell>
          <table:table-cell table:style-name="ce180" office:value-type="float" office:value="9" calcext:value-type="float">
            <text:p>9</text:p>
          </table:table-cell>
          <table:table-cell table:style-name="ce185" office:value-type="string" calcext:value-type="string">
            <text:p>-</text:p>
          </table:table-cell>
          <table:table-cell table:style-name="ce188" table:formula="of:=SUM([.P80:.T80])" office:value-type="float" office:value="9" calcext:value-type="float">
            <text:p>9</text:p>
          </table:table-cell>
          <table:table-cell table:style-name="ce189" table:formula="of:=RANK([.U80];[.$U$4:.$U$133])" office:value-type="float" office:value="71" calcext:value-type="float">
            <text:p>71º</text:p>
          </table:table-cell>
          <table:table-cell table:style-name="ce162"/>
          <table:table-cell table:style-name="ce193" table:formula="of:=COUNTIF([.B80];&quot;&gt;0&quot;)+COUNTIF([.D80];&quot;&gt;0&quot;)+COUNTIF([.F80];&quot;&gt;0&quot;)+COUNTIF([.H80];&quot;&gt;0&quot;)+COUNTIF([.J80];&quot;&gt;0&quot;)" office:value-type="float" office:value="1" calcext:value-type="float">
            <text:p>1</text:p>
          </table:table-cell>
          <table:table-cell table:style-name="ce200" table:formula="of:=[.M80]/[.X80]" office:value-type="float" office:value="0" calcext:value-type="float">
            <text:p>0.0</text:p>
          </table:table-cell>
          <table:table-cell table:style-name="ce204" table:formula="of:=RANK([.Y80];[.$Y$4:.$Y$133])" office:value-type="float" office:value="71" calcext:value-type="float">
            <text:p>71º</text:p>
          </table:table-cell>
          <table:table-cell table:style-name="ce208" table:formula="of:=[.U80]/[.X80]" office:value-type="float" office:value="9" calcext:value-type="float">
            <text:p>9.0</text:p>
          </table:table-cell>
          <table:table-cell table:style-name="ce212" table:formula="of:=RANK([.AA80];[.$AA$4:.$AA$133])" office:value-type="float" office:value="1" calcext:value-type="float">
            <text:p>1º</text:p>
          </table:table-cell>
          <table:table-cell table:number-columns-repeated="996"/>
        </table:table-row>
        <table:table-row table:style-name="ro10">
          <table:table-cell table:style-name="ce129" office:value-type="string" calcext:value-type="string">
            <text:p>LUCAS DONHAUSER</text:p>
          </table:table-cell>
          <table:table-cell table:style-name="ce134" office:value-type="string" calcext:value-type="string">
            <text:p>-</text:p>
          </table:table-cell>
          <table:table-cell table:style-name="ce139" table:formula="of:=IF([.B81]=20;1;IF([.B81]=19;2;IF([.B81]=19;2;IF([.B81]=18;3;IF([.B81]=17;4;IF([.B81]=16;5;IF([.B81]=15;6;IF([.B81]=14;7;IF([.B81]=13;8;IF([.B81]=12;9;IF([.B81]=11;10;IF([.B81]=10;11;IF([.B81]=9;12;IF([.B81]=8;13;IF([.B81]=7;14;IF([.B81]=6;15;IF([.B81]=5;16;IF([.B81]=4;17;IF([.B81]=3;18;IF([.B81]=2;19;IF([.B81]=1;20;0)))))))))))))))))))))" office:value-type="float" office:value="0" calcext:value-type="float">
            <text:p>0</text:p>
          </table:table-cell>
          <table:table-cell table:style-name="ce134" office:value-type="string" calcext:value-type="string">
            <text:p>-</text:p>
          </table:table-cell>
          <table:table-cell table:style-name="ce139" table:formula="of:=IF([.D81]=20;1;IF([.D81]=19;2;IF([.D81]=19;2;IF([.D81]=18;3;IF([.D81]=17;4;IF([.D81]=16;5;IF([.D81]=15;6;IF([.D81]=14;7;IF([.D81]=13;8;IF([.D81]=12;9;IF([.D81]=11;10;IF([.D81]=10;11;IF([.D81]=9;12;IF([.D81]=8;13;IF([.D81]=7;14;IF([.D81]=6;15;IF([.D81]=5;16;IF([.D81]=4;17;IF([.D81]=3;18;IF([.D81]=2;19;IF([.D81]=1;20;0)))))))))))))))))))))" office:value-type="float" office:value="0" calcext:value-type="float">
            <text:p>0</text:p>
          </table:table-cell>
          <table:table-cell table:style-name="ce134" office:value-type="string" calcext:value-type="string">
            <text:p>-</text:p>
          </table:table-cell>
          <table:table-cell table:style-name="ce139" table:formula="of:=IF([.F81]=20;1;IF([.F81]=19;2;IF([.F81]=19;2;IF([.F81]=18;3;IF([.F81]=17;4;IF([.F81]=16;5;IF([.F81]=15;6;IF([.F81]=14;7;IF([.F81]=13;8;IF([.F81]=12;9;IF([.F81]=11;10;IF([.F81]=10;11;IF([.F81]=9;12;IF([.F81]=8;13;IF([.F81]=7;14;IF([.F81]=6;15;IF([.F81]=5;16;IF([.F81]=4;17;IF([.F81]=3;18;IF([.F81]=2;19;IF([.F81]=1;20;0)))))))))))))))))))))" office:value-type="float" office:value="0" calcext:value-type="float">
            <text:p>0</text:p>
          </table:table-cell>
          <table:table-cell table:style-name="ce134" office:value-type="float" office:value="73" calcext:value-type="float">
            <text:p>73º</text:p>
          </table:table-cell>
          <table:table-cell table:style-name="ce139" table:formula="of:=IF([.H81]=20;1;IF([.H81]=19;2;IF([.H81]=19;2;IF([.H81]=18;3;IF([.H81]=17;4;IF([.H81]=16;5;IF([.H81]=15;6;IF([.H81]=14;7;IF([.H81]=13;8;IF([.H81]=12;9;IF([.H81]=11;10;IF([.H81]=10;11;IF([.H81]=9;12;IF([.H81]=8;13;IF([.H81]=7;14;IF([.H81]=6;15;IF([.H81]=5;16;IF([.H81]=4;17;IF([.H81]=3;18;IF([.H81]=2;19;IF([.H81]=1;20;0)))))))))))))))))))))" office:value-type="float" office:value="0" calcext:value-type="float">
            <text:p>0</text:p>
          </table:table-cell>
          <table:table-cell table:style-name="ce134" office:value-type="string" calcext:value-type="string">
            <text:p>-</text:p>
          </table:table-cell>
          <table:table-cell table:style-name="ce145" table:formula="of:=IF([.J81]=20;1;IF([.J81]=19;2;IF([.J81]=19;2;IF([.J81]=18;3;IF([.J81]=17;4;IF([.J81]=16;5;IF([.J81]=15;6;IF([.J81]=14;7;IF([.J81]=13;8;IF([.J81]=12;9;IF([.J81]=11;10;IF([.J81]=10;11;IF([.J81]=9;12;IF([.J81]=8;13;IF([.J81]=7;14;IF([.J81]=6;15;IF([.J81]=5;16;IF([.J81]=4;17;IF([.J81]=3;18;IF([.J81]=2;19;IF([.J81]=1;20;0)))))))))))))))))))))" office:value-type="float" office:value="0" calcext:value-type="float">
            <text:p>0</text:p>
          </table:table-cell>
          <table:table-cell table:style-name="ce151"/>
          <table:table-cell table:style-name="ce158" table:formula="of:=SUM([.C81];[.E81];[.G81];[.I81];[.K81])" office:value-type="float" office:value="0" calcext:value-type="float">
            <text:p>0</text:p>
          </table:table-cell>
          <table:table-cell table:style-name="ce160" table:formula="of:=RANK([.M81];[.$M$4:.$M$133])" office:value-type="float" office:value="71" calcext:value-type="float">
            <text:p>71º</text:p>
          </table:table-cell>
          <table:table-cell table:style-name="ce162"/>
          <table:table-cell table:style-name="ce172" office:value-type="string" calcext:value-type="string">
            <text:p>-</text:p>
          </table:table-cell>
          <table:table-cell table:number-columns-repeated="2" table:style-name="ce176" office:value-type="string" calcext:value-type="string">
            <text:p>-</text:p>
          </table:table-cell>
          <table:table-cell table:style-name="ce180" office:value-type="float" office:value="7" calcext:value-type="float">
            <text:p>7</text:p>
          </table:table-cell>
          <table:table-cell table:style-name="ce185" office:value-type="string" calcext:value-type="string">
            <text:p>-</text:p>
          </table:table-cell>
          <table:table-cell table:style-name="ce188" table:formula="of:=SUM([.P81:.T81])" office:value-type="float" office:value="7" calcext:value-type="float">
            <text:p>7</text:p>
          </table:table-cell>
          <table:table-cell table:style-name="ce189" table:formula="of:=RANK([.U81];[.$U$4:.$U$133])" office:value-type="float" office:value="77" calcext:value-type="float">
            <text:p>77º</text:p>
          </table:table-cell>
          <table:table-cell table:style-name="ce162"/>
          <table:table-cell table:style-name="ce193" table:formula="of:=COUNTIF([.B81];&quot;&gt;0&quot;)+COUNTIF([.D81];&quot;&gt;0&quot;)+COUNTIF([.F81];&quot;&gt;0&quot;)+COUNTIF([.H81];&quot;&gt;0&quot;)+COUNTIF([.J81];&quot;&gt;0&quot;)" office:value-type="float" office:value="1" calcext:value-type="float">
            <text:p>1</text:p>
          </table:table-cell>
          <table:table-cell table:style-name="ce200" table:formula="of:=[.M81]/[.X81]" office:value-type="float" office:value="0" calcext:value-type="float">
            <text:p>0.0</text:p>
          </table:table-cell>
          <table:table-cell table:style-name="ce204" table:formula="of:=RANK([.Y81];[.$Y$4:.$Y$133])" office:value-type="float" office:value="71" calcext:value-type="float">
            <text:p>71º</text:p>
          </table:table-cell>
          <table:table-cell table:style-name="ce208" table:formula="of:=[.U81]/[.X81]" office:value-type="float" office:value="7" calcext:value-type="float">
            <text:p>7.0</text:p>
          </table:table-cell>
          <table:table-cell table:style-name="ce212" table:formula="of:=RANK([.AA81];[.$AA$4:.$AA$133])" office:value-type="float" office:value="11" calcext:value-type="float">
            <text:p>11º</text:p>
          </table:table-cell>
          <table:table-cell table:number-columns-repeated="996"/>
        </table:table-row>
        <table:table-row table:style-name="ro10">
          <table:table-cell table:style-name="ce129" office:value-type="string" calcext:value-type="string">
            <text:p>LUÍSA SUSIN</text:p>
          </table:table-cell>
          <table:table-cell table:style-name="ce134" office:value-type="string" calcext:value-type="string">
            <text:p>-</text:p>
          </table:table-cell>
          <table:table-cell table:style-name="ce139" table:formula="of:=IF([.B82]=20;1;IF([.B82]=19;2;IF([.B82]=19;2;IF([.B82]=18;3;IF([.B82]=17;4;IF([.B82]=16;5;IF([.B82]=15;6;IF([.B82]=14;7;IF([.B82]=13;8;IF([.B82]=12;9;IF([.B82]=11;10;IF([.B82]=10;11;IF([.B82]=9;12;IF([.B82]=8;13;IF([.B82]=7;14;IF([.B82]=6;15;IF([.B82]=5;16;IF([.B82]=4;17;IF([.B82]=3;18;IF([.B82]=2;19;IF([.B82]=1;20;0)))))))))))))))))))))" office:value-type="float" office:value="0" calcext:value-type="float">
            <text:p>0</text:p>
          </table:table-cell>
          <table:table-cell table:style-name="ce134" office:value-type="string" calcext:value-type="string">
            <text:p>-</text:p>
          </table:table-cell>
          <table:table-cell table:style-name="ce139" table:formula="of:=IF([.D82]=20;1;IF([.D82]=19;2;IF([.D82]=19;2;IF([.D82]=18;3;IF([.D82]=17;4;IF([.D82]=16;5;IF([.D82]=15;6;IF([.D82]=14;7;IF([.D82]=13;8;IF([.D82]=12;9;IF([.D82]=11;10;IF([.D82]=10;11;IF([.D82]=9;12;IF([.D82]=8;13;IF([.D82]=7;14;IF([.D82]=6;15;IF([.D82]=5;16;IF([.D82]=4;17;IF([.D82]=3;18;IF([.D82]=2;19;IF([.D82]=1;20;0)))))))))))))))))))))" office:value-type="float" office:value="0" calcext:value-type="float">
            <text:p>0</text:p>
          </table:table-cell>
          <table:table-cell table:style-name="ce134" office:value-type="string" calcext:value-type="string">
            <text:p>-</text:p>
          </table:table-cell>
          <table:table-cell table:style-name="ce139" table:formula="of:=IF([.F82]=20;1;IF([.F82]=19;2;IF([.F82]=19;2;IF([.F82]=18;3;IF([.F82]=17;4;IF([.F82]=16;5;IF([.F82]=15;6;IF([.F82]=14;7;IF([.F82]=13;8;IF([.F82]=12;9;IF([.F82]=11;10;IF([.F82]=10;11;IF([.F82]=9;12;IF([.F82]=8;13;IF([.F82]=7;14;IF([.F82]=6;15;IF([.F82]=5;16;IF([.F82]=4;17;IF([.F82]=3;18;IF([.F82]=2;19;IF([.F82]=1;20;0)))))))))))))))))))))" office:value-type="float" office:value="0" calcext:value-type="float">
            <text:p>0</text:p>
          </table:table-cell>
          <table:table-cell table:style-name="ce134" office:value-type="float" office:value="67" calcext:value-type="float">
            <text:p>67º</text:p>
          </table:table-cell>
          <table:table-cell table:style-name="ce139" table:formula="of:=IF([.H82]=20;1;IF([.H82]=19;2;IF([.H82]=19;2;IF([.H82]=18;3;IF([.H82]=17;4;IF([.H82]=16;5;IF([.H82]=15;6;IF([.H82]=14;7;IF([.H82]=13;8;IF([.H82]=12;9;IF([.H82]=11;10;IF([.H82]=10;11;IF([.H82]=9;12;IF([.H82]=8;13;IF([.H82]=7;14;IF([.H82]=6;15;IF([.H82]=5;16;IF([.H82]=4;17;IF([.H82]=3;18;IF([.H82]=2;19;IF([.H82]=1;20;0)))))))))))))))))))))" office:value-type="float" office:value="0" calcext:value-type="float">
            <text:p>0</text:p>
          </table:table-cell>
          <table:table-cell table:style-name="ce134" office:value-type="string" calcext:value-type="string">
            <text:p>-</text:p>
          </table:table-cell>
          <table:table-cell table:style-name="ce145" table:formula="of:=IF([.J82]=20;1;IF([.J82]=19;2;IF([.J82]=19;2;IF([.J82]=18;3;IF([.J82]=17;4;IF([.J82]=16;5;IF([.J82]=15;6;IF([.J82]=14;7;IF([.J82]=13;8;IF([.J82]=12;9;IF([.J82]=11;10;IF([.J82]=10;11;IF([.J82]=9;12;IF([.J82]=8;13;IF([.J82]=7;14;IF([.J82]=6;15;IF([.J82]=5;16;IF([.J82]=4;17;IF([.J82]=3;18;IF([.J82]=2;19;IF([.J82]=1;20;0)))))))))))))))))))))" office:value-type="float" office:value="0" calcext:value-type="float">
            <text:p>0</text:p>
          </table:table-cell>
          <table:table-cell table:style-name="ce151"/>
          <table:table-cell table:style-name="ce158" table:formula="of:=SUM([.C82];[.E82];[.G82];[.I82];[.K82])" office:value-type="float" office:value="0" calcext:value-type="float">
            <text:p>0</text:p>
          </table:table-cell>
          <table:table-cell table:style-name="ce160" table:formula="of:=RANK([.M82];[.$M$4:.$M$133])" office:value-type="float" office:value="71" calcext:value-type="float">
            <text:p>71º</text:p>
          </table:table-cell>
          <table:table-cell table:style-name="ce162"/>
          <table:table-cell table:style-name="ce172" office:value-type="string" calcext:value-type="string">
            <text:p>-</text:p>
          </table:table-cell>
          <table:table-cell table:number-columns-repeated="2" table:style-name="ce176" office:value-type="string" calcext:value-type="string">
            <text:p>-</text:p>
          </table:table-cell>
          <table:table-cell table:style-name="ce180" office:value-type="float" office:value="6" calcext:value-type="float">
            <text:p>6</text:p>
          </table:table-cell>
          <table:table-cell table:style-name="ce185" office:value-type="string" calcext:value-type="string">
            <text:p>-</text:p>
          </table:table-cell>
          <table:table-cell table:style-name="ce188" table:formula="of:=SUM([.P82:.T82])" office:value-type="float" office:value="6" calcext:value-type="float">
            <text:p>6</text:p>
          </table:table-cell>
          <table:table-cell table:style-name="ce189" table:formula="of:=RANK([.U82];[.$U$4:.$U$133])" office:value-type="float" office:value="89" calcext:value-type="float">
            <text:p>89º</text:p>
          </table:table-cell>
          <table:table-cell table:style-name="ce162"/>
          <table:table-cell table:style-name="ce193" table:formula="of:=COUNTIF([.B82];&quot;&gt;0&quot;)+COUNTIF([.D82];&quot;&gt;0&quot;)+COUNTIF([.F82];&quot;&gt;0&quot;)+COUNTIF([.H82];&quot;&gt;0&quot;)+COUNTIF([.J82];&quot;&gt;0&quot;)" office:value-type="float" office:value="1" calcext:value-type="float">
            <text:p>1</text:p>
          </table:table-cell>
          <table:table-cell table:style-name="ce200" table:formula="of:=[.M82]/[.X82]" office:value-type="float" office:value="0" calcext:value-type="float">
            <text:p>0.0</text:p>
          </table:table-cell>
          <table:table-cell table:style-name="ce204" table:formula="of:=RANK([.Y82];[.$Y$4:.$Y$133])" office:value-type="float" office:value="71" calcext:value-type="float">
            <text:p>71º</text:p>
          </table:table-cell>
          <table:table-cell table:style-name="ce208" table:formula="of:=[.U82]/[.X82]" office:value-type="float" office:value="6" calcext:value-type="float">
            <text:p>6.0</text:p>
          </table:table-cell>
          <table:table-cell table:style-name="ce212" table:formula="of:=RANK([.AA82];[.$AA$4:.$AA$133])" office:value-type="float" office:value="36" calcext:value-type="float">
            <text:p>36º</text:p>
          </table:table-cell>
          <table:table-cell table:number-columns-repeated="996"/>
        </table:table-row>
        <table:table-row table:style-name="ro10">
          <table:table-cell table:style-name="ce129" office:value-type="string" calcext:value-type="string">
            <text:p>LUIZ FERNANDO</text:p>
          </table:table-cell>
          <table:table-cell table:style-name="ce134" office:value-type="string" calcext:value-type="string">
            <text:p>-</text:p>
          </table:table-cell>
          <table:table-cell table:style-name="ce139" table:formula="of:=IF([.B83]=20;1;IF([.B83]=19;2;IF([.B83]=19;2;IF([.B83]=18;3;IF([.B83]=17;4;IF([.B83]=16;5;IF([.B83]=15;6;IF([.B83]=14;7;IF([.B83]=13;8;IF([.B83]=12;9;IF([.B83]=11;10;IF([.B83]=10;11;IF([.B83]=9;12;IF([.B83]=8;13;IF([.B83]=7;14;IF([.B83]=6;15;IF([.B83]=5;16;IF([.B83]=4;17;IF([.B83]=3;18;IF([.B83]=2;19;IF([.B83]=1;20;0)))))))))))))))))))))" office:value-type="float" office:value="0" calcext:value-type="float">
            <text:p>0</text:p>
          </table:table-cell>
          <table:table-cell table:style-name="ce134" office:value-type="float" office:value="25" calcext:value-type="float">
            <text:p>25º</text:p>
          </table:table-cell>
          <table:table-cell table:style-name="ce139" table:formula="of:=IF([.D83]=20;1;IF([.D83]=19;2;IF([.D83]=19;2;IF([.D83]=18;3;IF([.D83]=17;4;IF([.D83]=16;5;IF([.D83]=15;6;IF([.D83]=14;7;IF([.D83]=13;8;IF([.D83]=12;9;IF([.D83]=11;10;IF([.D83]=10;11;IF([.D83]=9;12;IF([.D83]=8;13;IF([.D83]=7;14;IF([.D83]=6;15;IF([.D83]=5;16;IF([.D83]=4;17;IF([.D83]=3;18;IF([.D83]=2;19;IF([.D83]=1;20;0)))))))))))))))))))))" office:value-type="float" office:value="0" calcext:value-type="float">
            <text:p>0</text:p>
          </table:table-cell>
          <table:table-cell table:style-name="ce134"/>
          <table:table-cell table:style-name="ce139" table:formula="of:=IF([.F83]=20;1;IF([.F83]=19;2;IF([.F83]=19;2;IF([.F83]=18;3;IF([.F83]=17;4;IF([.F83]=16;5;IF([.F83]=15;6;IF([.F83]=14;7;IF([.F83]=13;8;IF([.F83]=12;9;IF([.F83]=11;10;IF([.F83]=10;11;IF([.F83]=9;12;IF([.F83]=8;13;IF([.F83]=7;14;IF([.F83]=6;15;IF([.F83]=5;16;IF([.F83]=4;17;IF([.F83]=3;18;IF([.F83]=2;19;IF([.F83]=1;20;0)))))))))))))))))))))" office:value-type="float" office:value="0" calcext:value-type="float">
            <text:p>0</text:p>
          </table:table-cell>
          <table:table-cell table:style-name="ce134"/>
          <table:table-cell table:style-name="ce139" table:formula="of:=IF([.H83]=20;1;IF([.H83]=19;2;IF([.H83]=19;2;IF([.H83]=18;3;IF([.H83]=17;4;IF([.H83]=16;5;IF([.H83]=15;6;IF([.H83]=14;7;IF([.H83]=13;8;IF([.H83]=12;9;IF([.H83]=11;10;IF([.H83]=10;11;IF([.H83]=9;12;IF([.H83]=8;13;IF([.H83]=7;14;IF([.H83]=6;15;IF([.H83]=5;16;IF([.H83]=4;17;IF([.H83]=3;18;IF([.H83]=2;19;IF([.H83]=1;20;0)))))))))))))))))))))" office:value-type="float" office:value="0" calcext:value-type="float">
            <text:p>0</text:p>
          </table:table-cell>
          <table:table-cell table:style-name="ce134"/>
          <table:table-cell table:style-name="ce145" table:formula="of:=IF([.J83]=20;1;IF([.J83]=19;2;IF([.J83]=19;2;IF([.J83]=18;3;IF([.J83]=17;4;IF([.J83]=16;5;IF([.J83]=15;6;IF([.J83]=14;7;IF([.J83]=13;8;IF([.J83]=12;9;IF([.J83]=11;10;IF([.J83]=10;11;IF([.J83]=9;12;IF([.J83]=8;13;IF([.J83]=7;14;IF([.J83]=6;15;IF([.J83]=5;16;IF([.J83]=4;17;IF([.J83]=3;18;IF([.J83]=2;19;IF([.J83]=1;20;0)))))))))))))))))))))" office:value-type="float" office:value="0" calcext:value-type="float">
            <text:p>0</text:p>
          </table:table-cell>
          <table:table-cell table:style-name="ce151"/>
          <table:table-cell table:style-name="ce158" table:formula="of:=SUM([.C83];[.E83];[.G83];[.I83];[.K83])" office:value-type="float" office:value="0" calcext:value-type="float">
            <text:p>0</text:p>
          </table:table-cell>
          <table:table-cell table:style-name="ce160" table:formula="of:=RANK([.M83];[.$M$4:.$M$133])" office:value-type="float" office:value="71" calcext:value-type="float">
            <text:p>71º</text:p>
          </table:table-cell>
          <table:table-cell table:style-name="ce162"/>
          <table:table-cell table:style-name="ce169" office:value-type="string" calcext:value-type="string">
            <text:p>-</text:p>
          </table:table-cell>
          <table:table-cell table:style-name="ce175" office:value-type="float" office:value="5" calcext:value-type="float">
            <text:p>5</text:p>
          </table:table-cell>
          <table:table-cell table:style-name="ce175"/>
          <table:table-cell table:style-name="ce180"/>
          <table:table-cell table:style-name="ce185" office:value-type="string" calcext:value-type="string">
            <text:p>-</text:p>
          </table:table-cell>
          <table:table-cell table:style-name="ce188" table:formula="of:=SUM([.P83:.T83])" office:value-type="float" office:value="5" calcext:value-type="float">
            <text:p>5</text:p>
          </table:table-cell>
          <table:table-cell table:style-name="ce189" table:formula="of:=RANK([.U83];[.$U$4:.$U$133])" office:value-type="float" office:value="102" calcext:value-type="float">
            <text:p>102º</text:p>
          </table:table-cell>
          <table:table-cell table:style-name="ce162"/>
          <table:table-cell table:style-name="ce193" table:formula="of:=COUNTIF([.B83];&quot;&gt;0&quot;)+COUNTIF([.D83];&quot;&gt;0&quot;)+COUNTIF([.F83];&quot;&gt;0&quot;)+COUNTIF([.H83];&quot;&gt;0&quot;)+COUNTIF([.J83];&quot;&gt;0&quot;)" office:value-type="float" office:value="1" calcext:value-type="float">
            <text:p>1</text:p>
          </table:table-cell>
          <table:table-cell table:style-name="ce200" table:formula="of:=[.M83]/[.X83]" office:value-type="float" office:value="0" calcext:value-type="float">
            <text:p>0.0</text:p>
          </table:table-cell>
          <table:table-cell table:style-name="ce204" table:formula="of:=RANK([.Y83];[.$Y$4:.$Y$133])" office:value-type="float" office:value="71" calcext:value-type="float">
            <text:p>71º</text:p>
          </table:table-cell>
          <table:table-cell table:style-name="ce208" table:formula="of:=[.U83]/[.X83]" office:value-type="float" office:value="5" calcext:value-type="float">
            <text:p>5.0</text:p>
          </table:table-cell>
          <table:table-cell table:style-name="ce212" table:formula="of:=RANK([.AA83];[.$AA$4:.$AA$133])" office:value-type="float" office:value="68" calcext:value-type="float">
            <text:p>68º</text:p>
          </table:table-cell>
          <table:table-cell table:number-columns-repeated="996"/>
        </table:table-row>
        <table:table-row table:style-name="ro10">
          <table:table-cell table:style-name="ce129" office:value-type="string" calcext:value-type="string">
            <text:p>LUIZ STAUDT</text:p>
          </table:table-cell>
          <table:table-cell table:style-name="ce134" office:value-type="string" calcext:value-type="string">
            <text:p>-</text:p>
          </table:table-cell>
          <table:table-cell table:style-name="ce139" table:formula="of:=IF([.B84]=20;1;IF([.B84]=19;2;IF([.B84]=19;2;IF([.B84]=18;3;IF([.B84]=17;4;IF([.B84]=16;5;IF([.B84]=15;6;IF([.B84]=14;7;IF([.B84]=13;8;IF([.B84]=12;9;IF([.B84]=11;10;IF([.B84]=10;11;IF([.B84]=9;12;IF([.B84]=8;13;IF([.B84]=7;14;IF([.B84]=6;15;IF([.B84]=5;16;IF([.B84]=4;17;IF([.B84]=3;18;IF([.B84]=2;19;IF([.B84]=1;20;0)))))))))))))))))))))" office:value-type="float" office:value="0" calcext:value-type="float">
            <text:p>0</text:p>
          </table:table-cell>
          <table:table-cell table:style-name="ce134" office:value-type="string" calcext:value-type="string">
            <text:p>-</text:p>
          </table:table-cell>
          <table:table-cell table:style-name="ce139" table:formula="of:=IF([.D84]=20;1;IF([.D84]=19;2;IF([.D84]=19;2;IF([.D84]=18;3;IF([.D84]=17;4;IF([.D84]=16;5;IF([.D84]=15;6;IF([.D84]=14;7;IF([.D84]=13;8;IF([.D84]=12;9;IF([.D84]=11;10;IF([.D84]=10;11;IF([.D84]=9;12;IF([.D84]=8;13;IF([.D84]=7;14;IF([.D84]=6;15;IF([.D84]=5;16;IF([.D84]=4;17;IF([.D84]=3;18;IF([.D84]=2;19;IF([.D84]=1;20;0)))))))))))))))))))))" office:value-type="float" office:value="0" calcext:value-type="float">
            <text:p>0</text:p>
          </table:table-cell>
          <table:table-cell table:style-name="ce134" office:value-type="float" office:value="58" calcext:value-type="float">
            <text:p>58º</text:p>
          </table:table-cell>
          <table:table-cell table:style-name="ce139" table:formula="of:=IF([.F84]=20;1;IF([.F84]=19;2;IF([.F84]=19;2;IF([.F84]=18;3;IF([.F84]=17;4;IF([.F84]=16;5;IF([.F84]=15;6;IF([.F84]=14;7;IF([.F84]=13;8;IF([.F84]=12;9;IF([.F84]=11;10;IF([.F84]=10;11;IF([.F84]=9;12;IF([.F84]=8;13;IF([.F84]=7;14;IF([.F84]=6;15;IF([.F84]=5;16;IF([.F84]=4;17;IF([.F84]=3;18;IF([.F84]=2;19;IF([.F84]=1;20;0)))))))))))))))))))))" office:value-type="float" office:value="0" calcext:value-type="float">
            <text:p>0</text:p>
          </table:table-cell>
          <table:table-cell table:style-name="ce134"/>
          <table:table-cell table:style-name="ce139" table:formula="of:=IF([.H84]=20;1;IF([.H84]=19;2;IF([.H84]=19;2;IF([.H84]=18;3;IF([.H84]=17;4;IF([.H84]=16;5;IF([.H84]=15;6;IF([.H84]=14;7;IF([.H84]=13;8;IF([.H84]=12;9;IF([.H84]=11;10;IF([.H84]=10;11;IF([.H84]=9;12;IF([.H84]=8;13;IF([.H84]=7;14;IF([.H84]=6;15;IF([.H84]=5;16;IF([.H84]=4;17;IF([.H84]=3;18;IF([.H84]=2;19;IF([.H84]=1;20;0)))))))))))))))))))))" office:value-type="float" office:value="0" calcext:value-type="float">
            <text:p>0</text:p>
          </table:table-cell>
          <table:table-cell table:style-name="ce134"/>
          <table:table-cell table:style-name="ce145" table:formula="of:=IF([.J84]=20;1;IF([.J84]=19;2;IF([.J84]=19;2;IF([.J84]=18;3;IF([.J84]=17;4;IF([.J84]=16;5;IF([.J84]=15;6;IF([.J84]=14;7;IF([.J84]=13;8;IF([.J84]=12;9;IF([.J84]=11;10;IF([.J84]=10;11;IF([.J84]=9;12;IF([.J84]=8;13;IF([.J84]=7;14;IF([.J84]=6;15;IF([.J84]=5;16;IF([.J84]=4;17;IF([.J84]=3;18;IF([.J84]=2;19;IF([.J84]=1;20;0)))))))))))))))))))))" office:value-type="float" office:value="0" calcext:value-type="float">
            <text:p>0</text:p>
          </table:table-cell>
          <table:table-cell table:style-name="ce151"/>
          <table:table-cell table:style-name="ce158" table:formula="of:=SUM([.C84];[.E84];[.G84];[.I84];[.K84])" office:value-type="float" office:value="0" calcext:value-type="float">
            <text:p>0</text:p>
          </table:table-cell>
          <table:table-cell table:style-name="ce160" table:formula="of:=RANK([.M84];[.$M$4:.$M$133])" office:value-type="float" office:value="71" calcext:value-type="float">
            <text:p>71º</text:p>
          </table:table-cell>
          <table:table-cell table:style-name="ce162"/>
          <table:table-cell table:style-name="ce169"/>
          <table:table-cell table:style-name="ce175"/>
          <table:table-cell table:style-name="ce175" office:value-type="float" office:value="7" calcext:value-type="float">
            <text:p>7</text:p>
          </table:table-cell>
          <table:table-cell table:style-name="ce180"/>
          <table:table-cell table:style-name="ce185" office:value-type="string" calcext:value-type="string">
            <text:p>-</text:p>
          </table:table-cell>
          <table:table-cell table:style-name="ce188" table:formula="of:=SUM([.P84:.T84])" office:value-type="float" office:value="7" calcext:value-type="float">
            <text:p>7</text:p>
          </table:table-cell>
          <table:table-cell table:style-name="ce189" table:formula="of:=RANK([.U84];[.$U$4:.$U$133])" office:value-type="float" office:value="77" calcext:value-type="float">
            <text:p>77º</text:p>
          </table:table-cell>
          <table:table-cell table:style-name="ce162"/>
          <table:table-cell table:style-name="ce193" table:formula="of:=COUNTIF([.B84];&quot;&gt;0&quot;)+COUNTIF([.D84];&quot;&gt;0&quot;)+COUNTIF([.F84];&quot;&gt;0&quot;)+COUNTIF([.H84];&quot;&gt;0&quot;)+COUNTIF([.J84];&quot;&gt;0&quot;)" office:value-type="float" office:value="1" calcext:value-type="float">
            <text:p>1</text:p>
          </table:table-cell>
          <table:table-cell table:style-name="ce200" table:formula="of:=[.M84]/[.X84]" office:value-type="float" office:value="0" calcext:value-type="float">
            <text:p>0.0</text:p>
          </table:table-cell>
          <table:table-cell table:style-name="ce204" table:formula="of:=RANK([.Y84];[.$Y$4:.$Y$133])" office:value-type="float" office:value="71" calcext:value-type="float">
            <text:p>71º</text:p>
          </table:table-cell>
          <table:table-cell table:style-name="ce208" table:formula="of:=[.U84]/[.X84]" office:value-type="float" office:value="7" calcext:value-type="float">
            <text:p>7.0</text:p>
          </table:table-cell>
          <table:table-cell table:style-name="ce212" table:formula="of:=RANK([.AA84];[.$AA$4:.$AA$133])" office:value-type="float" office:value="11" calcext:value-type="float">
            <text:p>11º</text:p>
          </table:table-cell>
          <table:table-cell table:number-columns-repeated="996"/>
        </table:table-row>
        <table:table-row table:style-name="ro10">
          <table:table-cell table:style-name="ce129" office:value-type="string" calcext:value-type="string">
            <text:p>LUIZA PETRY</text:p>
          </table:table-cell>
          <table:table-cell table:style-name="ce134" office:value-type="string" calcext:value-type="string">
            <text:p>-</text:p>
          </table:table-cell>
          <table:table-cell table:style-name="ce139" table:formula="of:=IF([.B85]=20;1;IF([.B85]=19;2;IF([.B85]=19;2;IF([.B85]=18;3;IF([.B85]=17;4;IF([.B85]=16;5;IF([.B85]=15;6;IF([.B85]=14;7;IF([.B85]=13;8;IF([.B85]=12;9;IF([.B85]=11;10;IF([.B85]=10;11;IF([.B85]=9;12;IF([.B85]=8;13;IF([.B85]=7;14;IF([.B85]=6;15;IF([.B85]=5;16;IF([.B85]=4;17;IF([.B85]=3;18;IF([.B85]=2;19;IF([.B85]=1;20;0)))))))))))))))))))))" office:value-type="float" office:value="0" calcext:value-type="float">
            <text:p>0</text:p>
          </table:table-cell>
          <table:table-cell table:style-name="ce134" office:value-type="float" office:value="8" calcext:value-type="float">
            <text:p>8º</text:p>
          </table:table-cell>
          <table:table-cell table:style-name="ce139" table:formula="of:=IF([.D85]=20;1;IF([.D85]=19;2;IF([.D85]=19;2;IF([.D85]=18;3;IF([.D85]=17;4;IF([.D85]=16;5;IF([.D85]=15;6;IF([.D85]=14;7;IF([.D85]=13;8;IF([.D85]=12;9;IF([.D85]=11;10;IF([.D85]=10;11;IF([.D85]=9;12;IF([.D85]=8;13;IF([.D85]=7;14;IF([.D85]=6;15;IF([.D85]=5;16;IF([.D85]=4;17;IF([.D85]=3;18;IF([.D85]=2;19;IF([.D85]=1;20;0)))))))))))))))))))))" office:value-type="float" office:value="13" calcext:value-type="float">
            <text:p>13</text:p>
          </table:table-cell>
          <table:table-cell table:style-name="ce134" office:value-type="float" office:value="3" calcext:value-type="float">
            <text:p>3º</text:p>
          </table:table-cell>
          <table:table-cell table:style-name="ce139" table:formula="of:=IF([.F85]=20;1;IF([.F85]=19;2;IF([.F85]=19;2;IF([.F85]=18;3;IF([.F85]=17;4;IF([.F85]=16;5;IF([.F85]=15;6;IF([.F85]=14;7;IF([.F85]=13;8;IF([.F85]=12;9;IF([.F85]=11;10;IF([.F85]=10;11;IF([.F85]=9;12;IF([.F85]=8;13;IF([.F85]=7;14;IF([.F85]=6;15;IF([.F85]=5;16;IF([.F85]=4;17;IF([.F85]=3;18;IF([.F85]=2;19;IF([.F85]=1;20;0)))))))))))))))))))))" office:value-type="float" office:value="18" calcext:value-type="float">
            <text:p>18</text:p>
          </table:table-cell>
          <table:table-cell table:style-name="ce134" office:value-type="float" office:value="86" calcext:value-type="float">
            <text:p>86º</text:p>
          </table:table-cell>
          <table:table-cell table:style-name="ce139" table:formula="of:=IF([.H85]=20;1;IF([.H85]=19;2;IF([.H85]=19;2;IF([.H85]=18;3;IF([.H85]=17;4;IF([.H85]=16;5;IF([.H85]=15;6;IF([.H85]=14;7;IF([.H85]=13;8;IF([.H85]=12;9;IF([.H85]=11;10;IF([.H85]=10;11;IF([.H85]=9;12;IF([.H85]=8;13;IF([.H85]=7;14;IF([.H85]=6;15;IF([.H85]=5;16;IF([.H85]=4;17;IF([.H85]=3;18;IF([.H85]=2;19;IF([.H85]=1;20;0)))))))))))))))))))))" office:value-type="float" office:value="0" calcext:value-type="float">
            <text:p>0</text:p>
          </table:table-cell>
          <table:table-cell table:style-name="ce134" office:value-type="float" office:value="17" calcext:value-type="float">
            <text:p>17º</text:p>
          </table:table-cell>
          <table:table-cell table:style-name="ce145" table:formula="of:=IF([.J85]=20;1;IF([.J85]=19;2;IF([.J85]=19;2;IF([.J85]=18;3;IF([.J85]=17;4;IF([.J85]=16;5;IF([.J85]=15;6;IF([.J85]=14;7;IF([.J85]=13;8;IF([.J85]=12;9;IF([.J85]=11;10;IF([.J85]=10;11;IF([.J85]=9;12;IF([.J85]=8;13;IF([.J85]=7;14;IF([.J85]=6;15;IF([.J85]=5;16;IF([.J85]=4;17;IF([.J85]=3;18;IF([.J85]=2;19;IF([.J85]=1;20;0)))))))))))))))))))))" office:value-type="float" office:value="4" calcext:value-type="float">
            <text:p>4</text:p>
          </table:table-cell>
          <table:table-cell table:style-name="ce151"/>
          <table:table-cell table:style-name="ce158" table:formula="of:=SUM([.C85];[.E85];[.G85];[.I85];[.K85])" office:value-type="float" office:value="35" calcext:value-type="float">
            <text:p>35</text:p>
          </table:table-cell>
          <table:table-cell table:style-name="ce160" table:formula="of:=RANK([.M85];[.$M$4:.$M$133])" office:value-type="float" office:value="4" calcext:value-type="float">
            <text:p>4º</text:p>
          </table:table-cell>
          <table:table-cell table:style-name="ce162"/>
          <table:table-cell table:style-name="ce169" office:value-type="string" calcext:value-type="string">
            <text:p>-</text:p>
          </table:table-cell>
          <table:table-cell table:style-name="ce175" office:value-type="float" office:value="7" calcext:value-type="float">
            <text:p>7</text:p>
          </table:table-cell>
          <table:table-cell table:style-name="ce175" office:value-type="float" office:value="4" calcext:value-type="float">
            <text:p>4</text:p>
          </table:table-cell>
          <table:table-cell table:style-name="ce180" office:value-type="float" office:value="7" calcext:value-type="float">
            <text:p>7</text:p>
          </table:table-cell>
          <table:table-cell table:style-name="ce185" office:value-type="float" office:value="2" calcext:value-type="float">
            <text:p>2</text:p>
          </table:table-cell>
          <table:table-cell table:style-name="ce188" table:formula="of:=SUM([.P85:.T85])" office:value-type="float" office:value="20" calcext:value-type="float">
            <text:p>20</text:p>
          </table:table-cell>
          <table:table-cell table:style-name="ce189" table:formula="of:=RANK([.U85];[.$U$4:.$U$133])" office:value-type="float" office:value="29" calcext:value-type="float">
            <text:p>29º</text:p>
          </table:table-cell>
          <table:table-cell table:style-name="ce162"/>
          <table:table-cell table:style-name="ce193" table:formula="of:=COUNTIF([.B85];&quot;&gt;0&quot;)+COUNTIF([.D85];&quot;&gt;0&quot;)+COUNTIF([.F85];&quot;&gt;0&quot;)+COUNTIF([.H85];&quot;&gt;0&quot;)+COUNTIF([.J85];&quot;&gt;0&quot;)" office:value-type="float" office:value="4" calcext:value-type="float">
            <text:p>4</text:p>
          </table:table-cell>
          <table:table-cell table:style-name="ce200" table:formula="of:=[.M85]/[.X85]" office:value-type="float" office:value="8.75" calcext:value-type="float">
            <text:p>8.8</text:p>
          </table:table-cell>
          <table:table-cell table:style-name="ce204" table:formula="of:=RANK([.Y85];[.$Y$4:.$Y$133])" office:value-type="float" office:value="11" calcext:value-type="float">
            <text:p>11º</text:p>
          </table:table-cell>
          <table:table-cell table:style-name="ce208" table:formula="of:=[.U85]/[.X85]" office:value-type="float" office:value="5" calcext:value-type="float">
            <text:p>5.0</text:p>
          </table:table-cell>
          <table:table-cell table:style-name="ce212" table:formula="of:=RANK([.AA85];[.$AA$4:.$AA$133])" office:value-type="float" office:value="68" calcext:value-type="float">
            <text:p>68º</text:p>
          </table:table-cell>
          <table:table-cell table:number-columns-repeated="996"/>
        </table:table-row>
        <table:table-row table:style-name="ro10">
          <table:table-cell table:style-name="ce129" office:value-type="string" calcext:value-type="string">
            <text:p>MAÍRA</text:p>
          </table:table-cell>
          <table:table-cell table:style-name="ce134" office:value-type="float" office:value="13" calcext:value-type="float">
            <text:p>13º</text:p>
          </table:table-cell>
          <table:table-cell table:style-name="ce139" table:formula="of:=IF([.B86]=20;1;IF([.B86]=19;2;IF([.B86]=19;2;IF([.B86]=18;3;IF([.B86]=17;4;IF([.B86]=16;5;IF([.B86]=15;6;IF([.B86]=14;7;IF([.B86]=13;8;IF([.B86]=12;9;IF([.B86]=11;10;IF([.B86]=10;11;IF([.B86]=9;12;IF([.B86]=8;13;IF([.B86]=7;14;IF([.B86]=6;15;IF([.B86]=5;16;IF([.B86]=4;17;IF([.B86]=3;18;IF([.B86]=2;19;IF([.B86]=1;20;0)))))))))))))))))))))" office:value-type="float" office:value="8" calcext:value-type="float">
            <text:p>8</text:p>
          </table:table-cell>
          <table:table-cell table:style-name="ce134" office:value-type="float" office:value="50" calcext:value-type="float">
            <text:p>50º</text:p>
          </table:table-cell>
          <table:table-cell table:style-name="ce139" table:formula="of:=IF([.D86]=20;1;IF([.D86]=19;2;IF([.D86]=19;2;IF([.D86]=18;3;IF([.D86]=17;4;IF([.D86]=16;5;IF([.D86]=15;6;IF([.D86]=14;7;IF([.D86]=13;8;IF([.D86]=12;9;IF([.D86]=11;10;IF([.D86]=10;11;IF([.D86]=9;12;IF([.D86]=8;13;IF([.D86]=7;14;IF([.D86]=6;15;IF([.D86]=5;16;IF([.D86]=4;17;IF([.D86]=3;18;IF([.D86]=2;19;IF([.D86]=1;20;0)))))))))))))))))))))" office:value-type="float" office:value="0" calcext:value-type="float">
            <text:p>0</text:p>
          </table:table-cell>
          <table:table-cell table:style-name="ce134" office:value-type="float" office:value="54" calcext:value-type="float">
            <text:p>54º</text:p>
          </table:table-cell>
          <table:table-cell table:style-name="ce139" table:formula="of:=IF([.F86]=20;1;IF([.F86]=19;2;IF([.F86]=19;2;IF([.F86]=18;3;IF([.F86]=17;4;IF([.F86]=16;5;IF([.F86]=15;6;IF([.F86]=14;7;IF([.F86]=13;8;IF([.F86]=12;9;IF([.F86]=11;10;IF([.F86]=10;11;IF([.F86]=9;12;IF([.F86]=8;13;IF([.F86]=7;14;IF([.F86]=6;15;IF([.F86]=5;16;IF([.F86]=4;17;IF([.F86]=3;18;IF([.F86]=2;19;IF([.F86]=1;20;0)))))))))))))))))))))" office:value-type="float" office:value="0" calcext:value-type="float">
            <text:p>0</text:p>
          </table:table-cell>
          <table:table-cell table:style-name="ce134" office:value-type="float" office:value="43" calcext:value-type="float">
            <text:p>43º</text:p>
          </table:table-cell>
          <table:table-cell table:style-name="ce139" table:formula="of:=IF([.H86]=20;1;IF([.H86]=19;2;IF([.H86]=19;2;IF([.H86]=18;3;IF([.H86]=17;4;IF([.H86]=16;5;IF([.H86]=15;6;IF([.H86]=14;7;IF([.H86]=13;8;IF([.H86]=12;9;IF([.H86]=11;10;IF([.H86]=10;11;IF([.H86]=9;12;IF([.H86]=8;13;IF([.H86]=7;14;IF([.H86]=6;15;IF([.H86]=5;16;IF([.H86]=4;17;IF([.H86]=3;18;IF([.H86]=2;19;IF([.H86]=1;20;0)))))))))))))))))))))" office:value-type="float" office:value="0" calcext:value-type="float">
            <text:p>0</text:p>
          </table:table-cell>
          <table:table-cell table:style-name="ce134" office:value-type="float" office:value="6" calcext:value-type="float">
            <text:p>6º</text:p>
          </table:table-cell>
          <table:table-cell table:style-name="ce145" table:formula="of:=IF([.J86]=20;1;IF([.J86]=19;2;IF([.J86]=19;2;IF([.J86]=18;3;IF([.J86]=17;4;IF([.J86]=16;5;IF([.J86]=15;6;IF([.J86]=14;7;IF([.J86]=13;8;IF([.J86]=12;9;IF([.J86]=11;10;IF([.J86]=10;11;IF([.J86]=9;12;IF([.J86]=8;13;IF([.J86]=7;14;IF([.J86]=6;15;IF([.J86]=5;16;IF([.J86]=4;17;IF([.J86]=3;18;IF([.J86]=2;19;IF([.J86]=1;20;0)))))))))))))))))))))" office:value-type="float" office:value="15" calcext:value-type="float">
            <text:p>15</text:p>
          </table:table-cell>
          <table:table-cell table:style-name="ce151"/>
          <table:table-cell table:style-name="ce158" table:formula="of:=SUM([.C86];[.E86];[.G86];[.I86];[.K86])" office:value-type="float" office:value="23" calcext:value-type="float">
            <text:p>23</text:p>
          </table:table-cell>
          <table:table-cell table:style-name="ce160" table:formula="of:=RANK([.M86];[.$M$4:.$M$133])" office:value-type="float" office:value="15" calcext:value-type="float">
            <text:p>15º</text:p>
          </table:table-cell>
          <table:table-cell table:style-name="ce162"/>
          <table:table-cell table:style-name="ce169" office:value-type="float" office:value="7" calcext:value-type="float">
            <text:p>7</text:p>
          </table:table-cell>
          <table:table-cell table:style-name="ce175" office:value-type="float" office:value="6" calcext:value-type="float">
            <text:p>6</text:p>
          </table:table-cell>
          <table:table-cell table:style-name="ce175" office:value-type="float" office:value="8" calcext:value-type="float">
            <text:p>8</text:p>
          </table:table-cell>
          <table:table-cell table:style-name="ce180" office:value-type="float" office:value="3" calcext:value-type="float">
            <text:p>3</text:p>
          </table:table-cell>
          <table:table-cell table:style-name="ce185" office:value-type="float" office:value="7" calcext:value-type="float">
            <text:p>7</text:p>
          </table:table-cell>
          <table:table-cell table:style-name="ce188" table:formula="of:=SUM([.P86:.T86])" office:value-type="float" office:value="31" calcext:value-type="float">
            <text:p>31</text:p>
          </table:table-cell>
          <table:table-cell table:style-name="ce189" table:formula="of:=RANK([.U86];[.$U$4:.$U$133])" office:value-type="float" office:value="5" calcext:value-type="float">
            <text:p>5º</text:p>
          </table:table-cell>
          <table:table-cell table:style-name="ce162"/>
          <table:table-cell table:style-name="ce193" table:formula="of:=COUNTIF([.B86];&quot;&gt;0&quot;)+COUNTIF([.D86];&quot;&gt;0&quot;)+COUNTIF([.F86];&quot;&gt;0&quot;)+COUNTIF([.H86];&quot;&gt;0&quot;)+COUNTIF([.J86];&quot;&gt;0&quot;)" office:value-type="float" office:value="5" calcext:value-type="float">
            <text:p>5</text:p>
          </table:table-cell>
          <table:table-cell table:style-name="ce200" table:formula="of:=[.M86]/[.X86]" office:value-type="float" office:value="4.6" calcext:value-type="float">
            <text:p>4.6</text:p>
          </table:table-cell>
          <table:table-cell table:style-name="ce204" table:formula="of:=RANK([.Y86];[.$Y$4:.$Y$133])" office:value-type="float" office:value="34" calcext:value-type="float">
            <text:p>34º</text:p>
          </table:table-cell>
          <table:table-cell table:style-name="ce208" table:formula="of:=[.U86]/[.X86]" office:value-type="float" office:value="6.2" calcext:value-type="float">
            <text:p>6.2</text:p>
          </table:table-cell>
          <table:table-cell table:style-name="ce212" table:formula="of:=RANK([.AA86];[.$AA$4:.$AA$133])" office:value-type="float" office:value="33" calcext:value-type="float">
            <text:p>33º</text:p>
          </table:table-cell>
          <table:table-cell table:number-columns-repeated="996"/>
        </table:table-row>
        <table:table-row table:style-name="ro10">
          <table:table-cell table:style-name="ce129" office:value-type="string" calcext:value-type="string">
            <text:p>MANOEL</text:p>
          </table:table-cell>
          <table:table-cell table:style-name="ce134" office:value-type="float" office:value="11" calcext:value-type="float">
            <text:p>11º</text:p>
          </table:table-cell>
          <table:table-cell table:style-name="ce139" table:formula="of:=IF([.B87]=20;1;IF([.B87]=19;2;IF([.B87]=19;2;IF([.B87]=18;3;IF([.B87]=17;4;IF([.B87]=16;5;IF([.B87]=15;6;IF([.B87]=14;7;IF([.B87]=13;8;IF([.B87]=12;9;IF([.B87]=11;10;IF([.B87]=10;11;IF([.B87]=9;12;IF([.B87]=8;13;IF([.B87]=7;14;IF([.B87]=6;15;IF([.B87]=5;16;IF([.B87]=4;17;IF([.B87]=3;18;IF([.B87]=2;19;IF([.B87]=1;20;0)))))))))))))))))))))" office:value-type="float" office:value="10" calcext:value-type="float">
            <text:p>10</text:p>
          </table:table-cell>
          <table:table-cell table:style-name="ce134" office:value-type="float" office:value="39" calcext:value-type="float">
            <text:p>39º</text:p>
          </table:table-cell>
          <table:table-cell table:style-name="ce139" table:formula="of:=IF([.D87]=20;1;IF([.D87]=19;2;IF([.D87]=19;2;IF([.D87]=18;3;IF([.D87]=17;4;IF([.D87]=16;5;IF([.D87]=15;6;IF([.D87]=14;7;IF([.D87]=13;8;IF([.D87]=12;9;IF([.D87]=11;10;IF([.D87]=10;11;IF([.D87]=9;12;IF([.D87]=8;13;IF([.D87]=7;14;IF([.D87]=6;15;IF([.D87]=5;16;IF([.D87]=4;17;IF([.D87]=3;18;IF([.D87]=2;19;IF([.D87]=1;20;0)))))))))))))))))))))" office:value-type="float" office:value="0" calcext:value-type="float">
            <text:p>0</text:p>
          </table:table-cell>
          <table:table-cell table:style-name="ce134" office:value-type="float" office:value="37" calcext:value-type="float">
            <text:p>37º</text:p>
          </table:table-cell>
          <table:table-cell table:style-name="ce139" table:formula="of:=IF([.F87]=20;1;IF([.F87]=19;2;IF([.F87]=19;2;IF([.F87]=18;3;IF([.F87]=17;4;IF([.F87]=16;5;IF([.F87]=15;6;IF([.F87]=14;7;IF([.F87]=13;8;IF([.F87]=12;9;IF([.F87]=11;10;IF([.F87]=10;11;IF([.F87]=9;12;IF([.F87]=8;13;IF([.F87]=7;14;IF([.F87]=6;15;IF([.F87]=5;16;IF([.F87]=4;17;IF([.F87]=3;18;IF([.F87]=2;19;IF([.F87]=1;20;0)))))))))))))))))))))" office:value-type="float" office:value="0" calcext:value-type="float">
            <text:p>0</text:p>
          </table:table-cell>
          <table:table-cell table:style-name="ce134" office:value-type="float" office:value="12" calcext:value-type="float">
            <text:p>12º</text:p>
          </table:table-cell>
          <table:table-cell table:style-name="ce139" table:formula="of:=IF([.H87]=20;1;IF([.H87]=19;2;IF([.H87]=19;2;IF([.H87]=18;3;IF([.H87]=17;4;IF([.H87]=16;5;IF([.H87]=15;6;IF([.H87]=14;7;IF([.H87]=13;8;IF([.H87]=12;9;IF([.H87]=11;10;IF([.H87]=10;11;IF([.H87]=9;12;IF([.H87]=8;13;IF([.H87]=7;14;IF([.H87]=6;15;IF([.H87]=5;16;IF([.H87]=4;17;IF([.H87]=3;18;IF([.H87]=2;19;IF([.H87]=1;20;0)))))))))))))))))))))" office:value-type="float" office:value="9" calcext:value-type="float">
            <text:p>9</text:p>
          </table:table-cell>
          <table:table-cell table:style-name="ce134" office:value-type="string" calcext:value-type="string">
            <text:p>-</text:p>
          </table:table-cell>
          <table:table-cell table:style-name="ce145" table:formula="of:=IF([.J87]=20;1;IF([.J87]=19;2;IF([.J87]=19;2;IF([.J87]=18;3;IF([.J87]=17;4;IF([.J87]=16;5;IF([.J87]=15;6;IF([.J87]=14;7;IF([.J87]=13;8;IF([.J87]=12;9;IF([.J87]=11;10;IF([.J87]=10;11;IF([.J87]=9;12;IF([.J87]=8;13;IF([.J87]=7;14;IF([.J87]=6;15;IF([.J87]=5;16;IF([.J87]=4;17;IF([.J87]=3;18;IF([.J87]=2;19;IF([.J87]=1;20;0)))))))))))))))))))))" office:value-type="float" office:value="0" calcext:value-type="float">
            <text:p>0</text:p>
          </table:table-cell>
          <table:table-cell table:style-name="ce151"/>
          <table:table-cell table:style-name="ce158" table:formula="of:=SUM([.C87];[.E87];[.G87];[.I87];[.K87])" office:value-type="float" office:value="19" calcext:value-type="float">
            <text:p>19</text:p>
          </table:table-cell>
          <table:table-cell table:style-name="ce160" table:formula="of:=RANK([.M87];[.$M$4:.$M$133])" office:value-type="float" office:value="20" calcext:value-type="float">
            <text:p>20º</text:p>
          </table:table-cell>
          <table:table-cell table:style-name="ce162"/>
          <table:table-cell table:style-name="ce169" office:value-type="float" office:value="5" calcext:value-type="float">
            <text:p>5</text:p>
          </table:table-cell>
          <table:table-cell table:style-name="ce175" office:value-type="float" office:value="4" calcext:value-type="float">
            <text:p>4</text:p>
          </table:table-cell>
          <table:table-cell table:style-name="ce175" office:value-type="float" office:value="5" calcext:value-type="float">
            <text:p>5</text:p>
          </table:table-cell>
          <table:table-cell table:style-name="ce180" office:value-type="float" office:value="5" calcext:value-type="float">
            <text:p>5</text:p>
          </table:table-cell>
          <table:table-cell table:style-name="ce185" office:value-type="string" calcext:value-type="string">
            <text:p>-</text:p>
          </table:table-cell>
          <table:table-cell table:style-name="ce188" table:formula="of:=SUM([.P87:.T87])" office:value-type="float" office:value="19" calcext:value-type="float">
            <text:p>19</text:p>
          </table:table-cell>
          <table:table-cell table:style-name="ce189" table:formula="of:=RANK([.U87];[.$U$4:.$U$133])" office:value-type="float" office:value="31" calcext:value-type="float">
            <text:p>31º</text:p>
          </table:table-cell>
          <table:table-cell table:style-name="ce162"/>
          <table:table-cell table:style-name="ce193" table:formula="of:=COUNTIF([.B87];&quot;&gt;0&quot;)+COUNTIF([.D87];&quot;&gt;0&quot;)+COUNTIF([.F87];&quot;&gt;0&quot;)+COUNTIF([.H87];&quot;&gt;0&quot;)+COUNTIF([.J87];&quot;&gt;0&quot;)" office:value-type="float" office:value="4" calcext:value-type="float">
            <text:p>4</text:p>
          </table:table-cell>
          <table:table-cell table:style-name="ce200" table:formula="of:=[.M87]/[.X87]" office:value-type="float" office:value="4.75" calcext:value-type="float">
            <text:p>4.8</text:p>
          </table:table-cell>
          <table:table-cell table:style-name="ce204" table:formula="of:=RANK([.Y87];[.$Y$4:.$Y$133])" office:value-type="float" office:value="31" calcext:value-type="float">
            <text:p>31º</text:p>
          </table:table-cell>
          <table:table-cell table:style-name="ce208" table:formula="of:=[.U87]/[.X87]" office:value-type="float" office:value="4.75" calcext:value-type="float">
            <text:p>4.8</text:p>
          </table:table-cell>
          <table:table-cell table:style-name="ce212" table:formula="of:=RANK([.AA87];[.$AA$4:.$AA$133])" office:value-type="float" office:value="88" calcext:value-type="float">
            <text:p>88º</text:p>
          </table:table-cell>
          <table:table-cell table:number-columns-repeated="996"/>
        </table:table-row>
        <table:table-row table:style-name="ro10">
          <table:table-cell table:style-name="ce129" office:value-type="string" calcext:value-type="string">
            <text:p>MARCELO FERREIRA</text:p>
          </table:table-cell>
          <table:table-cell table:style-name="ce134" office:value-type="string" calcext:value-type="string">
            <text:p>-</text:p>
          </table:table-cell>
          <table:table-cell table:style-name="ce139" table:formula="of:=IF([.B88]=20;1;IF([.B88]=19;2;IF([.B88]=19;2;IF([.B88]=18;3;IF([.B88]=17;4;IF([.B88]=16;5;IF([.B88]=15;6;IF([.B88]=14;7;IF([.B88]=13;8;IF([.B88]=12;9;IF([.B88]=11;10;IF([.B88]=10;11;IF([.B88]=9;12;IF([.B88]=8;13;IF([.B88]=7;14;IF([.B88]=6;15;IF([.B88]=5;16;IF([.B88]=4;17;IF([.B88]=3;18;IF([.B88]=2;19;IF([.B88]=1;20;0)))))))))))))))))))))" office:value-type="float" office:value="0" calcext:value-type="float">
            <text:p>0</text:p>
          </table:table-cell>
          <table:table-cell table:style-name="ce134" office:value-type="string" calcext:value-type="string">
            <text:p>-</text:p>
          </table:table-cell>
          <table:table-cell table:style-name="ce139" table:formula="of:=IF([.D88]=20;1;IF([.D88]=19;2;IF([.D88]=19;2;IF([.D88]=18;3;IF([.D88]=17;4;IF([.D88]=16;5;IF([.D88]=15;6;IF([.D88]=14;7;IF([.D88]=13;8;IF([.D88]=12;9;IF([.D88]=11;10;IF([.D88]=10;11;IF([.D88]=9;12;IF([.D88]=8;13;IF([.D88]=7;14;IF([.D88]=6;15;IF([.D88]=5;16;IF([.D88]=4;17;IF([.D88]=3;18;IF([.D88]=2;19;IF([.D88]=1;20;0)))))))))))))))))))))" office:value-type="float" office:value="0" calcext:value-type="float">
            <text:p>0</text:p>
          </table:table-cell>
          <table:table-cell table:style-name="ce134" office:value-type="string" calcext:value-type="string">
            <text:p>-</text:p>
          </table:table-cell>
          <table:table-cell table:style-name="ce139" table:formula="of:=IF([.F88]=20;1;IF([.F88]=19;2;IF([.F88]=19;2;IF([.F88]=18;3;IF([.F88]=17;4;IF([.F88]=16;5;IF([.F88]=15;6;IF([.F88]=14;7;IF([.F88]=13;8;IF([.F88]=12;9;IF([.F88]=11;10;IF([.F88]=10;11;IF([.F88]=9;12;IF([.F88]=8;13;IF([.F88]=7;14;IF([.F88]=6;15;IF([.F88]=5;16;IF([.F88]=4;17;IF([.F88]=3;18;IF([.F88]=2;19;IF([.F88]=1;20;0)))))))))))))))))))))" office:value-type="float" office:value="0" calcext:value-type="float">
            <text:p>0</text:p>
          </table:table-cell>
          <table:table-cell table:style-name="ce134" office:value-type="float" office:value="33" calcext:value-type="float">
            <text:p>33º</text:p>
          </table:table-cell>
          <table:table-cell table:style-name="ce139" table:formula="of:=IF([.H88]=20;1;IF([.H88]=19;2;IF([.H88]=19;2;IF([.H88]=18;3;IF([.H88]=17;4;IF([.H88]=16;5;IF([.H88]=15;6;IF([.H88]=14;7;IF([.H88]=13;8;IF([.H88]=12;9;IF([.H88]=11;10;IF([.H88]=10;11;IF([.H88]=9;12;IF([.H88]=8;13;IF([.H88]=7;14;IF([.H88]=6;15;IF([.H88]=5;16;IF([.H88]=4;17;IF([.H88]=3;18;IF([.H88]=2;19;IF([.H88]=1;20;0)))))))))))))))))))))" office:value-type="float" office:value="0" calcext:value-type="float">
            <text:p>0</text:p>
          </table:table-cell>
          <table:table-cell table:style-name="ce134" office:value-type="string" calcext:value-type="string">
            <text:p>-</text:p>
          </table:table-cell>
          <table:table-cell table:style-name="ce145" table:formula="of:=IF([.J88]=20;1;IF([.J88]=19;2;IF([.J88]=19;2;IF([.J88]=18;3;IF([.J88]=17;4;IF([.J88]=16;5;IF([.J88]=15;6;IF([.J88]=14;7;IF([.J88]=13;8;IF([.J88]=12;9;IF([.J88]=11;10;IF([.J88]=10;11;IF([.J88]=9;12;IF([.J88]=8;13;IF([.J88]=7;14;IF([.J88]=6;15;IF([.J88]=5;16;IF([.J88]=4;17;IF([.J88]=3;18;IF([.J88]=2;19;IF([.J88]=1;20;0)))))))))))))))))))))" office:value-type="float" office:value="0" calcext:value-type="float">
            <text:p>0</text:p>
          </table:table-cell>
          <table:table-cell table:style-name="ce151"/>
          <table:table-cell table:style-name="ce158" table:formula="of:=SUM([.C88];[.E88];[.G88];[.I88];[.K88])" office:value-type="float" office:value="0" calcext:value-type="float">
            <text:p>0</text:p>
          </table:table-cell>
          <table:table-cell table:style-name="ce160" table:formula="of:=RANK([.M88];[.$M$4:.$M$133])" office:value-type="float" office:value="71" calcext:value-type="float">
            <text:p>71º</text:p>
          </table:table-cell>
          <table:table-cell table:style-name="ce162"/>
          <table:table-cell table:style-name="ce172" office:value-type="string" calcext:value-type="string">
            <text:p>-</text:p>
          </table:table-cell>
          <table:table-cell table:number-columns-repeated="2" table:style-name="ce176" office:value-type="string" calcext:value-type="string">
            <text:p>-</text:p>
          </table:table-cell>
          <table:table-cell table:style-name="ce180" office:value-type="float" office:value="8" calcext:value-type="float">
            <text:p>8</text:p>
          </table:table-cell>
          <table:table-cell table:style-name="ce185" office:value-type="string" calcext:value-type="string">
            <text:p>-</text:p>
          </table:table-cell>
          <table:table-cell table:style-name="ce188" table:formula="of:=SUM([.P88:.T88])" office:value-type="float" office:value="8" calcext:value-type="float">
            <text:p>8</text:p>
          </table:table-cell>
          <table:table-cell table:style-name="ce189" table:formula="of:=RANK([.U88];[.$U$4:.$U$133])" office:value-type="float" office:value="75" calcext:value-type="float">
            <text:p>75º</text:p>
          </table:table-cell>
          <table:table-cell table:style-name="ce162"/>
          <table:table-cell table:style-name="ce193" table:formula="of:=COUNTIF([.B88];&quot;&gt;0&quot;)+COUNTIF([.D88];&quot;&gt;0&quot;)+COUNTIF([.F88];&quot;&gt;0&quot;)+COUNTIF([.H88];&quot;&gt;0&quot;)+COUNTIF([.J88];&quot;&gt;0&quot;)" office:value-type="float" office:value="1" calcext:value-type="float">
            <text:p>1</text:p>
          </table:table-cell>
          <table:table-cell table:style-name="ce200" table:formula="of:=[.M88]/[.X88]" office:value-type="float" office:value="0" calcext:value-type="float">
            <text:p>0.0</text:p>
          </table:table-cell>
          <table:table-cell table:style-name="ce204" table:formula="of:=RANK([.Y88];[.$Y$4:.$Y$133])" office:value-type="float" office:value="71" calcext:value-type="float">
            <text:p>71º</text:p>
          </table:table-cell>
          <table:table-cell table:style-name="ce208" table:formula="of:=[.U88]/[.X88]" office:value-type="float" office:value="8" calcext:value-type="float">
            <text:p>8.0</text:p>
          </table:table-cell>
          <table:table-cell table:style-name="ce212" table:formula="of:=RANK([.AA88];[.$AA$4:.$AA$133])" office:value-type="float" office:value="6" calcext:value-type="float">
            <text:p>6º</text:p>
          </table:table-cell>
          <table:table-cell table:number-columns-repeated="996"/>
        </table:table-row>
        <table:table-row table:style-name="ro10">
          <table:table-cell table:style-name="ce129" office:value-type="string" calcext:value-type="string">
            <text:p>MARCELO MIGLIAVACCA</text:p>
          </table:table-cell>
          <table:table-cell table:style-name="ce134" office:value-type="string" calcext:value-type="string">
            <text:p>-</text:p>
          </table:table-cell>
          <table:table-cell table:style-name="ce139" table:formula="of:=IF([.B89]=20;1;IF([.B89]=19;2;IF([.B89]=19;2;IF([.B89]=18;3;IF([.B89]=17;4;IF([.B89]=16;5;IF([.B89]=15;6;IF([.B89]=14;7;IF([.B89]=13;8;IF([.B89]=12;9;IF([.B89]=11;10;IF([.B89]=10;11;IF([.B89]=9;12;IF([.B89]=8;13;IF([.B89]=7;14;IF([.B89]=6;15;IF([.B89]=5;16;IF([.B89]=4;17;IF([.B89]=3;18;IF([.B89]=2;19;IF([.B89]=1;20;0)))))))))))))))))))))" office:value-type="float" office:value="0" calcext:value-type="float">
            <text:p>0</text:p>
          </table:table-cell>
          <table:table-cell table:style-name="ce134" office:value-type="string" calcext:value-type="string">
            <text:p>-</text:p>
          </table:table-cell>
          <table:table-cell table:style-name="ce139" table:formula="of:=IF([.D89]=20;1;IF([.D89]=19;2;IF([.D89]=19;2;IF([.D89]=18;3;IF([.D89]=17;4;IF([.D89]=16;5;IF([.D89]=15;6;IF([.D89]=14;7;IF([.D89]=13;8;IF([.D89]=12;9;IF([.D89]=11;10;IF([.D89]=10;11;IF([.D89]=9;12;IF([.D89]=8;13;IF([.D89]=7;14;IF([.D89]=6;15;IF([.D89]=5;16;IF([.D89]=4;17;IF([.D89]=3;18;IF([.D89]=2;19;IF([.D89]=1;20;0)))))))))))))))))))))" office:value-type="float" office:value="0" calcext:value-type="float">
            <text:p>0</text:p>
          </table:table-cell>
          <table:table-cell table:style-name="ce134" office:value-type="string" calcext:value-type="string">
            <text:p>-</text:p>
          </table:table-cell>
          <table:table-cell table:style-name="ce139" table:formula="of:=IF([.F89]=20;1;IF([.F89]=19;2;IF([.F89]=19;2;IF([.F89]=18;3;IF([.F89]=17;4;IF([.F89]=16;5;IF([.F89]=15;6;IF([.F89]=14;7;IF([.F89]=13;8;IF([.F89]=12;9;IF([.F89]=11;10;IF([.F89]=10;11;IF([.F89]=9;12;IF([.F89]=8;13;IF([.F89]=7;14;IF([.F89]=6;15;IF([.F89]=5;16;IF([.F89]=4;17;IF([.F89]=3;18;IF([.F89]=2;19;IF([.F89]=1;20;0)))))))))))))))))))))" office:value-type="float" office:value="0" calcext:value-type="float">
            <text:p>0</text:p>
          </table:table-cell>
          <table:table-cell table:style-name="ce134" office:value-type="float" office:value="35" calcext:value-type="float">
            <text:p>35º</text:p>
          </table:table-cell>
          <table:table-cell table:style-name="ce139" table:formula="of:=IF([.H89]=20;1;IF([.H89]=19;2;IF([.H89]=19;2;IF([.H89]=18;3;IF([.H89]=17;4;IF([.H89]=16;5;IF([.H89]=15;6;IF([.H89]=14;7;IF([.H89]=13;8;IF([.H89]=12;9;IF([.H89]=11;10;IF([.H89]=10;11;IF([.H89]=9;12;IF([.H89]=8;13;IF([.H89]=7;14;IF([.H89]=6;15;IF([.H89]=5;16;IF([.H89]=4;17;IF([.H89]=3;18;IF([.H89]=2;19;IF([.H89]=1;20;0)))))))))))))))))))))" office:value-type="float" office:value="0" calcext:value-type="float">
            <text:p>0</text:p>
          </table:table-cell>
          <table:table-cell table:style-name="ce134" office:value-type="string" calcext:value-type="string">
            <text:p>-</text:p>
          </table:table-cell>
          <table:table-cell table:style-name="ce145" table:formula="of:=IF([.J89]=20;1;IF([.J89]=19;2;IF([.J89]=19;2;IF([.J89]=18;3;IF([.J89]=17;4;IF([.J89]=16;5;IF([.J89]=15;6;IF([.J89]=14;7;IF([.J89]=13;8;IF([.J89]=12;9;IF([.J89]=11;10;IF([.J89]=10;11;IF([.J89]=9;12;IF([.J89]=8;13;IF([.J89]=7;14;IF([.J89]=6;15;IF([.J89]=5;16;IF([.J89]=4;17;IF([.J89]=3;18;IF([.J89]=2;19;IF([.J89]=1;20;0)))))))))))))))))))))" office:value-type="float" office:value="0" calcext:value-type="float">
            <text:p>0</text:p>
          </table:table-cell>
          <table:table-cell table:style-name="ce151"/>
          <table:table-cell table:style-name="ce158" table:formula="of:=SUM([.C89];[.E89];[.G89];[.I89];[.K89])" office:value-type="float" office:value="0" calcext:value-type="float">
            <text:p>0</text:p>
          </table:table-cell>
          <table:table-cell table:style-name="ce160" table:formula="of:=RANK([.M89];[.$M$4:.$M$133])" office:value-type="float" office:value="71" calcext:value-type="float">
            <text:p>71º</text:p>
          </table:table-cell>
          <table:table-cell table:style-name="ce162"/>
          <table:table-cell table:style-name="ce172" office:value-type="string" calcext:value-type="string">
            <text:p>-</text:p>
          </table:table-cell>
          <table:table-cell table:number-columns-repeated="2" table:style-name="ce176" office:value-type="string" calcext:value-type="string">
            <text:p>-</text:p>
          </table:table-cell>
          <table:table-cell table:style-name="ce180" office:value-type="float" office:value="9" calcext:value-type="float">
            <text:p>9</text:p>
          </table:table-cell>
          <table:table-cell table:style-name="ce185" office:value-type="string" calcext:value-type="string">
            <text:p>-</text:p>
          </table:table-cell>
          <table:table-cell table:style-name="ce188" table:formula="of:=SUM([.P89:.T89])" office:value-type="float" office:value="9" calcext:value-type="float">
            <text:p>9</text:p>
          </table:table-cell>
          <table:table-cell table:style-name="ce189" table:formula="of:=RANK([.U89];[.$U$4:.$U$133])" office:value-type="float" office:value="71" calcext:value-type="float">
            <text:p>71º</text:p>
          </table:table-cell>
          <table:table-cell table:style-name="ce162"/>
          <table:table-cell table:style-name="ce193" table:formula="of:=COUNTIF([.B89];&quot;&gt;0&quot;)+COUNTIF([.D89];&quot;&gt;0&quot;)+COUNTIF([.F89];&quot;&gt;0&quot;)+COUNTIF([.H89];&quot;&gt;0&quot;)+COUNTIF([.J89];&quot;&gt;0&quot;)" office:value-type="float" office:value="1" calcext:value-type="float">
            <text:p>1</text:p>
          </table:table-cell>
          <table:table-cell table:style-name="ce200" table:formula="of:=[.M89]/[.X89]" office:value-type="float" office:value="0" calcext:value-type="float">
            <text:p>0.0</text:p>
          </table:table-cell>
          <table:table-cell table:style-name="ce204" table:formula="of:=RANK([.Y89];[.$Y$4:.$Y$133])" office:value-type="float" office:value="71" calcext:value-type="float">
            <text:p>71º</text:p>
          </table:table-cell>
          <table:table-cell table:style-name="ce208" table:formula="of:=[.U89]/[.X89]" office:value-type="float" office:value="9" calcext:value-type="float">
            <text:p>9.0</text:p>
          </table:table-cell>
          <table:table-cell table:style-name="ce212" table:formula="of:=RANK([.AA89];[.$AA$4:.$AA$133])" office:value-type="float" office:value="1" calcext:value-type="float">
            <text:p>1º</text:p>
          </table:table-cell>
          <table:table-cell table:number-columns-repeated="996"/>
        </table:table-row>
        <table:table-row table:style-name="ro10">
          <table:table-cell table:style-name="ce129" office:value-type="string" calcext:value-type="string">
            <text:p>MÁRCIO ROBERT</text:p>
          </table:table-cell>
          <table:table-cell table:style-name="ce134" office:value-type="string" calcext:value-type="string">
            <text:p>-</text:p>
          </table:table-cell>
          <table:table-cell table:style-name="ce139" table:formula="of:=IF([.B90]=20;1;IF([.B90]=19;2;IF([.B90]=19;2;IF([.B90]=18;3;IF([.B90]=17;4;IF([.B90]=16;5;IF([.B90]=15;6;IF([.B90]=14;7;IF([.B90]=13;8;IF([.B90]=12;9;IF([.B90]=11;10;IF([.B90]=10;11;IF([.B90]=9;12;IF([.B90]=8;13;IF([.B90]=7;14;IF([.B90]=6;15;IF([.B90]=5;16;IF([.B90]=4;17;IF([.B90]=3;18;IF([.B90]=2;19;IF([.B90]=1;20;0)))))))))))))))))))))" office:value-type="float" office:value="0" calcext:value-type="float">
            <text:p>0</text:p>
          </table:table-cell>
          <table:table-cell table:style-name="ce134" office:value-type="float" office:value="3" calcext:value-type="float">
            <text:p>3º</text:p>
          </table:table-cell>
          <table:table-cell table:style-name="ce139" table:formula="of:=IF([.D90]=20;1;IF([.D90]=19;2;IF([.D90]=19;2;IF([.D90]=18;3;IF([.D90]=17;4;IF([.D90]=16;5;IF([.D90]=15;6;IF([.D90]=14;7;IF([.D90]=13;8;IF([.D90]=12;9;IF([.D90]=11;10;IF([.D90]=10;11;IF([.D90]=9;12;IF([.D90]=8;13;IF([.D90]=7;14;IF([.D90]=6;15;IF([.D90]=5;16;IF([.D90]=4;17;IF([.D90]=3;18;IF([.D90]=2;19;IF([.D90]=1;20;0)))))))))))))))))))))" office:value-type="float" office:value="18" calcext:value-type="float">
            <text:p>18</text:p>
          </table:table-cell>
          <table:table-cell table:style-name="ce134"/>
          <table:table-cell table:style-name="ce139" table:formula="of:=IF([.F90]=20;1;IF([.F90]=19;2;IF([.F90]=19;2;IF([.F90]=18;3;IF([.F90]=17;4;IF([.F90]=16;5;IF([.F90]=15;6;IF([.F90]=14;7;IF([.F90]=13;8;IF([.F90]=12;9;IF([.F90]=11;10;IF([.F90]=10;11;IF([.F90]=9;12;IF([.F90]=8;13;IF([.F90]=7;14;IF([.F90]=6;15;IF([.F90]=5;16;IF([.F90]=4;17;IF([.F90]=3;18;IF([.F90]=2;19;IF([.F90]=1;20;0)))))))))))))))))))))" office:value-type="float" office:value="0" calcext:value-type="float">
            <text:p>0</text:p>
          </table:table-cell>
          <table:table-cell table:style-name="ce134"/>
          <table:table-cell table:style-name="ce139" table:formula="of:=IF([.H90]=20;1;IF([.H90]=19;2;IF([.H90]=19;2;IF([.H90]=18;3;IF([.H90]=17;4;IF([.H90]=16;5;IF([.H90]=15;6;IF([.H90]=14;7;IF([.H90]=13;8;IF([.H90]=12;9;IF([.H90]=11;10;IF([.H90]=10;11;IF([.H90]=9;12;IF([.H90]=8;13;IF([.H90]=7;14;IF([.H90]=6;15;IF([.H90]=5;16;IF([.H90]=4;17;IF([.H90]=3;18;IF([.H90]=2;19;IF([.H90]=1;20;0)))))))))))))))))))))" office:value-type="float" office:value="0" calcext:value-type="float">
            <text:p>0</text:p>
          </table:table-cell>
          <table:table-cell table:style-name="ce134"/>
          <table:table-cell table:style-name="ce145" table:formula="of:=IF([.J90]=20;1;IF([.J90]=19;2;IF([.J90]=19;2;IF([.J90]=18;3;IF([.J90]=17;4;IF([.J90]=16;5;IF([.J90]=15;6;IF([.J90]=14;7;IF([.J90]=13;8;IF([.J90]=12;9;IF([.J90]=11;10;IF([.J90]=10;11;IF([.J90]=9;12;IF([.J90]=8;13;IF([.J90]=7;14;IF([.J90]=6;15;IF([.J90]=5;16;IF([.J90]=4;17;IF([.J90]=3;18;IF([.J90]=2;19;IF([.J90]=1;20;0)))))))))))))))))))))" office:value-type="float" office:value="0" calcext:value-type="float">
            <text:p>0</text:p>
          </table:table-cell>
          <table:table-cell table:style-name="ce151"/>
          <table:table-cell table:style-name="ce158" table:formula="of:=SUM([.C90];[.E90];[.G90];[.I90];[.K90])" office:value-type="float" office:value="18" calcext:value-type="float">
            <text:p>18</text:p>
          </table:table-cell>
          <table:table-cell table:style-name="ce160" table:formula="of:=RANK([.M90];[.$M$4:.$M$133])" office:value-type="float" office:value="24" calcext:value-type="float">
            <text:p>24º</text:p>
          </table:table-cell>
          <table:table-cell table:style-name="ce162"/>
          <table:table-cell table:style-name="ce169" office:value-type="string" calcext:value-type="string">
            <text:p>-</text:p>
          </table:table-cell>
          <table:table-cell table:style-name="ce175" office:value-type="float" office:value="5" calcext:value-type="float">
            <text:p>5</text:p>
          </table:table-cell>
          <table:table-cell table:style-name="ce175" office:value-type="string" calcext:value-type="string">
            <text:p>-</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90:.T90])" office:value-type="float" office:value="5" calcext:value-type="float">
            <text:p>5</text:p>
          </table:table-cell>
          <table:table-cell table:style-name="ce189" table:formula="of:=RANK([.U90];[.$U$4:.$U$133])" office:value-type="float" office:value="102" calcext:value-type="float">
            <text:p>102º</text:p>
          </table:table-cell>
          <table:table-cell table:style-name="ce162"/>
          <table:table-cell table:style-name="ce193" table:formula="of:=COUNTIF([.B90];&quot;&gt;0&quot;)+COUNTIF([.D90];&quot;&gt;0&quot;)+COUNTIF([.F90];&quot;&gt;0&quot;)+COUNTIF([.H90];&quot;&gt;0&quot;)+COUNTIF([.J90];&quot;&gt;0&quot;)" office:value-type="float" office:value="1" calcext:value-type="float">
            <text:p>1</text:p>
          </table:table-cell>
          <table:table-cell table:style-name="ce200" table:formula="of:=[.M90]/[.X90]" office:value-type="float" office:value="18" calcext:value-type="float">
            <text:p>18.0</text:p>
          </table:table-cell>
          <table:table-cell table:style-name="ce204" table:formula="of:=RANK([.Y90];[.$Y$4:.$Y$133])" office:value-type="float" office:value="1" calcext:value-type="float">
            <text:p>1º</text:p>
          </table:table-cell>
          <table:table-cell table:style-name="ce208" table:formula="of:=[.U90]/[.X90]" office:value-type="float" office:value="5" calcext:value-type="float">
            <text:p>5.0</text:p>
          </table:table-cell>
          <table:table-cell table:style-name="ce212" table:formula="of:=RANK([.AA90];[.$AA$4:.$AA$133])" office:value-type="float" office:value="68" calcext:value-type="float">
            <text:p>68º</text:p>
          </table:table-cell>
          <table:table-cell table:number-columns-repeated="996"/>
        </table:table-row>
        <table:table-row table:style-name="ro10">
          <table:table-cell table:style-name="ce129" office:value-type="string" calcext:value-type="string">
            <text:p>MARIA RIBEIRO</text:p>
          </table:table-cell>
          <table:table-cell table:style-name="ce134" office:value-type="string" calcext:value-type="string">
            <text:p>-</text:p>
          </table:table-cell>
          <table:table-cell table:style-name="ce139" table:formula="of:=IF([.B91]=20;1;IF([.B91]=19;2;IF([.B91]=19;2;IF([.B91]=18;3;IF([.B91]=17;4;IF([.B91]=16;5;IF([.B91]=15;6;IF([.B91]=14;7;IF([.B91]=13;8;IF([.B91]=12;9;IF([.B91]=11;10;IF([.B91]=10;11;IF([.B91]=9;12;IF([.B91]=8;13;IF([.B91]=7;14;IF([.B91]=6;15;IF([.B91]=5;16;IF([.B91]=4;17;IF([.B91]=3;18;IF([.B91]=2;19;IF([.B91]=1;20;0)))))))))))))))))))))" office:value-type="float" office:value="0" calcext:value-type="float">
            <text:p>0</text:p>
          </table:table-cell>
          <table:table-cell table:style-name="ce134" office:value-type="string" calcext:value-type="string">
            <text:p>-</text:p>
          </table:table-cell>
          <table:table-cell table:style-name="ce139" table:formula="of:=IF([.D91]=20;1;IF([.D91]=19;2;IF([.D91]=19;2;IF([.D91]=18;3;IF([.D91]=17;4;IF([.D91]=16;5;IF([.D91]=15;6;IF([.D91]=14;7;IF([.D91]=13;8;IF([.D91]=12;9;IF([.D91]=11;10;IF([.D91]=10;11;IF([.D91]=9;12;IF([.D91]=8;13;IF([.D91]=7;14;IF([.D91]=6;15;IF([.D91]=5;16;IF([.D91]=4;17;IF([.D91]=3;18;IF([.D91]=2;19;IF([.D91]=1;20;0)))))))))))))))))))))" office:value-type="float" office:value="0" calcext:value-type="float">
            <text:p>0</text:p>
          </table:table-cell>
          <table:table-cell table:style-name="ce134" office:value-type="float" office:value="43" calcext:value-type="float">
            <text:p>43º</text:p>
          </table:table-cell>
          <table:table-cell table:style-name="ce139" table:formula="of:=IF([.F91]=20;1;IF([.F91]=19;2;IF([.F91]=19;2;IF([.F91]=18;3;IF([.F91]=17;4;IF([.F91]=16;5;IF([.F91]=15;6;IF([.F91]=14;7;IF([.F91]=13;8;IF([.F91]=12;9;IF([.F91]=11;10;IF([.F91]=10;11;IF([.F91]=9;12;IF([.F91]=8;13;IF([.F91]=7;14;IF([.F91]=6;15;IF([.F91]=5;16;IF([.F91]=4;17;IF([.F91]=3;18;IF([.F91]=2;19;IF([.F91]=1;20;0)))))))))))))))))))))" office:value-type="float" office:value="0" calcext:value-type="float">
            <text:p>0</text:p>
          </table:table-cell>
          <table:table-cell table:style-name="ce134" office:value-type="string" calcext:value-type="string">
            <text:p>-</text:p>
          </table:table-cell>
          <table:table-cell table:style-name="ce139" table:formula="of:=IF([.H91]=20;1;IF([.H91]=19;2;IF([.H91]=19;2;IF([.H91]=18;3;IF([.H91]=17;4;IF([.H91]=16;5;IF([.H91]=15;6;IF([.H91]=14;7;IF([.H91]=13;8;IF([.H91]=12;9;IF([.H91]=11;10;IF([.H91]=10;11;IF([.H91]=9;12;IF([.H91]=8;13;IF([.H91]=7;14;IF([.H91]=6;15;IF([.H91]=5;16;IF([.H91]=4;17;IF([.H91]=3;18;IF([.H91]=2;19;IF([.H91]=1;20;0)))))))))))))))))))))" office:value-type="float" office:value="0" calcext:value-type="float">
            <text:p>0</text:p>
          </table:table-cell>
          <table:table-cell table:style-name="ce134" office:value-type="string" calcext:value-type="string">
            <text:p>-</text:p>
          </table:table-cell>
          <table:table-cell table:style-name="ce145" table:formula="of:=IF([.J91]=20;1;IF([.J91]=19;2;IF([.J91]=19;2;IF([.J91]=18;3;IF([.J91]=17;4;IF([.J91]=16;5;IF([.J91]=15;6;IF([.J91]=14;7;IF([.J91]=13;8;IF([.J91]=12;9;IF([.J91]=11;10;IF([.J91]=10;11;IF([.J91]=9;12;IF([.J91]=8;13;IF([.J91]=7;14;IF([.J91]=6;15;IF([.J91]=5;16;IF([.J91]=4;17;IF([.J91]=3;18;IF([.J91]=2;19;IF([.J91]=1;20;0)))))))))))))))))))))" office:value-type="float" office:value="0" calcext:value-type="float">
            <text:p>0</text:p>
          </table:table-cell>
          <table:table-cell table:style-name="ce151"/>
          <table:table-cell table:style-name="ce158" table:formula="of:=SUM([.C91];[.E91];[.G91];[.I91];[.K91])" office:value-type="float" office:value="0" calcext:value-type="float">
            <text:p>0</text:p>
          </table:table-cell>
          <table:table-cell table:style-name="ce160" table:formula="of:=RANK([.M91];[.$M$4:.$M$133])" office:value-type="float" office:value="71" calcext:value-type="float">
            <text:p>71º</text:p>
          </table:table-cell>
          <table:table-cell table:style-name="ce162"/>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5" calcext:value-type="float">
            <text:p>5</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91:.T91])" office:value-type="float" office:value="5" calcext:value-type="float">
            <text:p>5</text:p>
          </table:table-cell>
          <table:table-cell table:style-name="ce189" table:formula="of:=RANK([.U91];[.$U$4:.$U$133])" office:value-type="float" office:value="102" calcext:value-type="float">
            <text:p>102º</text:p>
          </table:table-cell>
          <table:table-cell table:style-name="ce162"/>
          <table:table-cell table:style-name="ce193" table:formula="of:=COUNTIF([.B91];&quot;&gt;0&quot;)+COUNTIF([.D91];&quot;&gt;0&quot;)+COUNTIF([.F91];&quot;&gt;0&quot;)+COUNTIF([.H91];&quot;&gt;0&quot;)+COUNTIF([.J91];&quot;&gt;0&quot;)" office:value-type="float" office:value="1" calcext:value-type="float">
            <text:p>1</text:p>
          </table:table-cell>
          <table:table-cell table:style-name="ce200" table:formula="of:=[.M91]/[.X91]" office:value-type="float" office:value="0" calcext:value-type="float">
            <text:p>0.0</text:p>
          </table:table-cell>
          <table:table-cell table:style-name="ce204" table:formula="of:=RANK([.Y91];[.$Y$4:.$Y$133])" office:value-type="float" office:value="71" calcext:value-type="float">
            <text:p>71º</text:p>
          </table:table-cell>
          <table:table-cell table:style-name="ce208" table:formula="of:=[.U91]/[.X91]" office:value-type="float" office:value="5" calcext:value-type="float">
            <text:p>5.0</text:p>
          </table:table-cell>
          <table:table-cell table:style-name="ce212" table:formula="of:=RANK([.AA91];[.$AA$4:.$AA$133])" office:value-type="float" office:value="68" calcext:value-type="float">
            <text:p>68º</text:p>
          </table:table-cell>
          <table:table-cell table:number-columns-repeated="996"/>
        </table:table-row>
        <table:table-row table:style-name="ro10">
          <table:table-cell table:style-name="ce129" office:value-type="string" calcext:value-type="string">
            <text:p>MATEUS</text:p>
            <draw:frame table:end-cell-address="'Rk Histórico'.A93" table:end-x="66.73pt" table:end-y="13.49pt" draw:z-index="0" draw:name="image3.png" draw:style-name="gr1" draw:text-style-name="P1" svg:width="14.23pt" svg:height="14.23pt" svg:x="52.5pt" svg:y="17.26pt">
              <draw:image xlink:href="Pictures/10000201000002D0000002D03A56A06C9213C946.png" xlink:type="simple" xlink:show="embed" xlink:actuate="onLoad">
                <text:p/>
              </draw:image>
            </draw:frame>
          </table:table-cell>
          <table:table-cell table:style-name="ce134" office:value-type="float" office:value="2" calcext:value-type="float">
            <text:p>2º</text:p>
          </table:table-cell>
          <table:table-cell table:style-name="ce139" table:formula="of:=IF([.B92]=20;1;IF([.B92]=19;2;IF([.B92]=19;2;IF([.B92]=18;3;IF([.B92]=17;4;IF([.B92]=16;5;IF([.B92]=15;6;IF([.B92]=14;7;IF([.B92]=13;8;IF([.B92]=12;9;IF([.B92]=11;10;IF([.B92]=10;11;IF([.B92]=9;12;IF([.B92]=8;13;IF([.B92]=7;14;IF([.B92]=6;15;IF([.B92]=5;16;IF([.B92]=4;17;IF([.B92]=3;18;IF([.B92]=2;19;IF([.B92]=1;20;0)))))))))))))))))))))" office:value-type="float" office:value="19" calcext:value-type="float">
            <text:p>19</text:p>
          </table:table-cell>
          <table:table-cell table:style-name="ce134" office:value-type="float" office:value="21" calcext:value-type="float">
            <text:p>21º</text:p>
          </table:table-cell>
          <table:table-cell table:style-name="ce139" table:formula="of:=IF([.D92]=20;1;IF([.D92]=19;2;IF([.D92]=19;2;IF([.D92]=18;3;IF([.D92]=17;4;IF([.D92]=16;5;IF([.D92]=15;6;IF([.D92]=14;7;IF([.D92]=13;8;IF([.D92]=12;9;IF([.D92]=11;10;IF([.D92]=10;11;IF([.D92]=9;12;IF([.D92]=8;13;IF([.D92]=7;14;IF([.D92]=6;15;IF([.D92]=5;16;IF([.D92]=4;17;IF([.D92]=3;18;IF([.D92]=2;19;IF([.D92]=1;20;0)))))))))))))))))))))" office:value-type="float" office:value="0" calcext:value-type="float">
            <text:p>0</text:p>
          </table:table-cell>
          <table:table-cell table:style-name="ce134" office:value-type="float" office:value="20" calcext:value-type="float">
            <text:p>20º</text:p>
          </table:table-cell>
          <table:table-cell table:style-name="ce139" table:formula="of:=IF([.F92]=20;1;IF([.F92]=19;2;IF([.F92]=19;2;IF([.F92]=18;3;IF([.F92]=17;4;IF([.F92]=16;5;IF([.F92]=15;6;IF([.F92]=14;7;IF([.F92]=13;8;IF([.F92]=12;9;IF([.F92]=11;10;IF([.F92]=10;11;IF([.F92]=9;12;IF([.F92]=8;13;IF([.F92]=7;14;IF([.F92]=6;15;IF([.F92]=5;16;IF([.F92]=4;17;IF([.F92]=3;18;IF([.F92]=2;19;IF([.F92]=1;20;0)))))))))))))))))))))" office:value-type="float" office:value="1" calcext:value-type="float">
            <text:p>1</text:p>
          </table:table-cell>
          <table:table-cell table:style-name="ce134" office:value-type="float" office:value="90" calcext:value-type="float">
            <text:p>90º</text:p>
          </table:table-cell>
          <table:table-cell table:style-name="ce139" table:formula="of:=IF([.H92]=20;1;IF([.H92]=19;2;IF([.H92]=19;2;IF([.H92]=18;3;IF([.H92]=17;4;IF([.H92]=16;5;IF([.H92]=15;6;IF([.H92]=14;7;IF([.H92]=13;8;IF([.H92]=12;9;IF([.H92]=11;10;IF([.H92]=10;11;IF([.H92]=9;12;IF([.H92]=8;13;IF([.H92]=7;14;IF([.H92]=6;15;IF([.H92]=5;16;IF([.H92]=4;17;IF([.H92]=3;18;IF([.H92]=2;19;IF([.H92]=1;20;0)))))))))))))))))))))" office:value-type="float" office:value="0" calcext:value-type="float">
            <text:p>0</text:p>
          </table:table-cell>
          <table:table-cell table:style-name="ce134" office:value-type="float" office:value="14" calcext:value-type="float">
            <text:p>14º</text:p>
          </table:table-cell>
          <table:table-cell table:style-name="ce145" table:formula="of:=IF([.J92]=20;1;IF([.J92]=19;2;IF([.J92]=19;2;IF([.J92]=18;3;IF([.J92]=17;4;IF([.J92]=16;5;IF([.J92]=15;6;IF([.J92]=14;7;IF([.J92]=13;8;IF([.J92]=12;9;IF([.J92]=11;10;IF([.J92]=10;11;IF([.J92]=9;12;IF([.J92]=8;13;IF([.J92]=7;14;IF([.J92]=6;15;IF([.J92]=5;16;IF([.J92]=4;17;IF([.J92]=3;18;IF([.J92]=2;19;IF([.J92]=1;20;0)))))))))))))))))))))" office:value-type="float" office:value="7" calcext:value-type="float">
            <text:p>7</text:p>
          </table:table-cell>
          <table:table-cell table:style-name="ce151"/>
          <table:table-cell table:style-name="ce158" table:formula="of:=SUM([.C92];[.E92];[.G92];[.I92];[.K92])" office:value-type="float" office:value="27" calcext:value-type="float">
            <text:p>27</text:p>
          </table:table-cell>
          <table:table-cell table:style-name="ce160" table:formula="of:=RANK([.M92];[.$M$4:.$M$133])" office:value-type="float" office:value="8" calcext:value-type="float">
            <text:p>8º</text:p>
          </table:table-cell>
          <table:table-cell table:style-name="ce162"/>
          <table:table-cell table:style-name="ce169" office:value-type="float" office:value="9" calcext:value-type="float">
            <text:p>9</text:p>
          </table:table-cell>
          <table:table-cell table:style-name="ce175" office:value-type="float" office:value="5" calcext:value-type="float">
            <text:p>5</text:p>
          </table:table-cell>
          <table:table-cell table:style-name="ce175" office:value-type="float" office:value="10" calcext:value-type="float">
            <text:p>10</text:p>
          </table:table-cell>
          <table:table-cell table:style-name="ce180" office:value-type="float" office:value="5" calcext:value-type="float">
            <text:p>5</text:p>
          </table:table-cell>
          <table:table-cell table:style-name="ce185" office:value-type="float" office:value="3" calcext:value-type="float">
            <text:p>3</text:p>
          </table:table-cell>
          <table:table-cell table:style-name="ce188" table:formula="of:=SUM([.P92:.T92])" office:value-type="float" office:value="32" calcext:value-type="float">
            <text:p>32</text:p>
          </table:table-cell>
          <table:table-cell table:style-name="ce189" table:formula="of:=RANK([.U92];[.$U$4:.$U$133])" office:value-type="float" office:value="4" calcext:value-type="float">
            <text:p>4º</text:p>
          </table:table-cell>
          <table:table-cell table:style-name="ce162"/>
          <table:table-cell table:style-name="ce193" table:formula="of:=COUNTIF([.B92];&quot;&gt;0&quot;)+COUNTIF([.D92];&quot;&gt;0&quot;)+COUNTIF([.F92];&quot;&gt;0&quot;)+COUNTIF([.H92];&quot;&gt;0&quot;)+COUNTIF([.J92];&quot;&gt;0&quot;)" office:value-type="float" office:value="5" calcext:value-type="float">
            <text:p>5</text:p>
          </table:table-cell>
          <table:table-cell table:style-name="ce200" table:formula="of:=[.M92]/[.X92]" office:value-type="float" office:value="5.4" calcext:value-type="float">
            <text:p>5.4</text:p>
          </table:table-cell>
          <table:table-cell table:style-name="ce204" table:formula="of:=RANK([.Y92];[.$Y$4:.$Y$133])" office:value-type="float" office:value="20" calcext:value-type="float">
            <text:p>20º</text:p>
          </table:table-cell>
          <table:table-cell table:style-name="ce208" table:formula="of:=[.U92]/[.X92]" office:value-type="float" office:value="6.4" calcext:value-type="float">
            <text:p>6.4</text:p>
          </table:table-cell>
          <table:table-cell table:style-name="ce212" table:formula="of:=RANK([.AA92];[.$AA$4:.$AA$133])" office:value-type="float" office:value="31" calcext:value-type="float">
            <text:p>31º</text:p>
          </table:table-cell>
          <table:table-cell table:number-columns-repeated="996"/>
        </table:table-row>
        <table:table-row table:style-name="ro10">
          <table:table-cell table:style-name="ce129" office:value-type="string" calcext:value-type="string">
            <text:p>MARCOS</text:p>
          </table:table-cell>
          <table:table-cell table:style-name="ce134" office:value-type="string" calcext:value-type="string">
            <text:p>-</text:p>
          </table:table-cell>
          <table:table-cell table:style-name="ce139" table:formula="of:=IF([.B93]=20;1;IF([.B93]=19;2;IF([.B93]=19;2;IF([.B93]=18;3;IF([.B93]=17;4;IF([.B93]=16;5;IF([.B93]=15;6;IF([.B93]=14;7;IF([.B93]=13;8;IF([.B93]=12;9;IF([.B93]=11;10;IF([.B93]=10;11;IF([.B93]=9;12;IF([.B93]=8;13;IF([.B93]=7;14;IF([.B93]=6;15;IF([.B93]=5;16;IF([.B93]=4;17;IF([.B93]=3;18;IF([.B93]=2;19;IF([.B93]=1;20;0)))))))))))))))))))))" office:value-type="float" office:value="0" calcext:value-type="float">
            <text:p>0</text:p>
          </table:table-cell>
          <table:table-cell table:style-name="ce134" office:value-type="float" office:value="1" calcext:value-type="float">
            <text:p>1º</text:p>
          </table:table-cell>
          <table:table-cell table:style-name="ce139" table:formula="of:=IF([.D93]=20;1;IF([.D93]=19;2;IF([.D93]=19;2;IF([.D93]=18;3;IF([.D93]=17;4;IF([.D93]=16;5;IF([.D93]=15;6;IF([.D93]=14;7;IF([.D93]=13;8;IF([.D93]=12;9;IF([.D93]=11;10;IF([.D93]=10;11;IF([.D93]=9;12;IF([.D93]=8;13;IF([.D93]=7;14;IF([.D93]=6;15;IF([.D93]=5;16;IF([.D93]=4;17;IF([.D93]=3;18;IF([.D93]=2;19;IF([.D93]=1;20;0)))))))))))))))))))))" office:value-type="float" office:value="20" calcext:value-type="float">
            <text:p>20</text:p>
          </table:table-cell>
          <table:table-cell table:style-name="ce134" office:value-type="float" office:value="73" calcext:value-type="float">
            <text:p>73º</text:p>
          </table:table-cell>
          <table:table-cell table:style-name="ce139" table:formula="of:=IF([.F93]=20;1;IF([.F93]=19;2;IF([.F93]=19;2;IF([.F93]=18;3;IF([.F93]=17;4;IF([.F93]=16;5;IF([.F93]=15;6;IF([.F93]=14;7;IF([.F93]=13;8;IF([.F93]=12;9;IF([.F93]=11;10;IF([.F93]=10;11;IF([.F93]=9;12;IF([.F93]=8;13;IF([.F93]=7;14;IF([.F93]=6;15;IF([.F93]=5;16;IF([.F93]=4;17;IF([.F93]=3;18;IF([.F93]=2;19;IF([.F93]=1;20;0)))))))))))))))))))))" office:value-type="float" office:value="0" calcext:value-type="float">
            <text:p>0</text:p>
          </table:table-cell>
          <table:table-cell table:style-name="ce134" office:value-type="float" office:value="98" calcext:value-type="float">
            <text:p>98º</text:p>
          </table:table-cell>
          <table:table-cell table:style-name="ce139" table:formula="of:=IF([.H93]=20;1;IF([.H93]=19;2;IF([.H93]=19;2;IF([.H93]=18;3;IF([.H93]=17;4;IF([.H93]=16;5;IF([.H93]=15;6;IF([.H93]=14;7;IF([.H93]=13;8;IF([.H93]=12;9;IF([.H93]=11;10;IF([.H93]=10;11;IF([.H93]=9;12;IF([.H93]=8;13;IF([.H93]=7;14;IF([.H93]=6;15;IF([.H93]=5;16;IF([.H93]=4;17;IF([.H93]=3;18;IF([.H93]=2;19;IF([.H93]=1;20;0)))))))))))))))))))))" office:value-type="float" office:value="0" calcext:value-type="float">
            <text:p>0</text:p>
          </table:table-cell>
          <table:table-cell table:style-name="ce134" office:value-type="float" office:value="37" calcext:value-type="float">
            <text:p>37º</text:p>
          </table:table-cell>
          <table:table-cell table:style-name="ce145" table:formula="of:=IF([.J93]=20;1;IF([.J93]=19;2;IF([.J93]=19;2;IF([.J93]=18;3;IF([.J93]=17;4;IF([.J93]=16;5;IF([.J93]=15;6;IF([.J93]=14;7;IF([.J93]=13;8;IF([.J93]=12;9;IF([.J93]=11;10;IF([.J93]=10;11;IF([.J93]=9;12;IF([.J93]=8;13;IF([.J93]=7;14;IF([.J93]=6;15;IF([.J93]=5;16;IF([.J93]=4;17;IF([.J93]=3;18;IF([.J93]=2;19;IF([.J93]=1;20;0)))))))))))))))))))))" office:value-type="float" office:value="0" calcext:value-type="float">
            <text:p>0</text:p>
          </table:table-cell>
          <table:table-cell table:style-name="ce151"/>
          <table:table-cell table:style-name="ce158" table:formula="of:=SUM([.C93];[.E93];[.G93];[.I93];[.K93])" office:value-type="float" office:value="20" calcext:value-type="float">
            <text:p>20</text:p>
          </table:table-cell>
          <table:table-cell table:style-name="ce160" table:formula="of:=RANK([.M93];[.$M$4:.$M$133])" office:value-type="float" office:value="18" calcext:value-type="float">
            <text:p>18º</text:p>
          </table:table-cell>
          <table:table-cell table:style-name="ce162"/>
          <table:table-cell table:style-name="ce169" office:value-type="string" calcext:value-type="string">
            <text:p>-</text:p>
          </table:table-cell>
          <table:table-cell table:style-name="ce175" office:value-type="float" office:value="11" calcext:value-type="float">
            <text:p>11</text:p>
          </table:table-cell>
          <table:table-cell table:style-name="ce175" office:value-type="float" office:value="3" calcext:value-type="float">
            <text:p>3</text:p>
          </table:table-cell>
          <table:table-cell table:style-name="ce180" office:value-type="float" office:value="2" calcext:value-type="float">
            <text:p>2</text:p>
          </table:table-cell>
          <table:table-cell table:style-name="ce185" office:value-type="float" office:value="1" calcext:value-type="float">
            <text:p>1</text:p>
          </table:table-cell>
          <table:table-cell table:style-name="ce188" table:formula="of:=SUM([.P93:.T93])" office:value-type="float" office:value="17" calcext:value-type="float">
            <text:p>17</text:p>
          </table:table-cell>
          <table:table-cell table:style-name="ce189" table:formula="of:=RANK([.U93];[.$U$4:.$U$133])" office:value-type="float" office:value="38" calcext:value-type="float">
            <text:p>38º</text:p>
          </table:table-cell>
          <table:table-cell table:style-name="ce162"/>
          <table:table-cell table:style-name="ce193" table:formula="of:=COUNTIF([.B93];&quot;&gt;0&quot;)+COUNTIF([.D93];&quot;&gt;0&quot;)+COUNTIF([.F93];&quot;&gt;0&quot;)+COUNTIF([.H93];&quot;&gt;0&quot;)+COUNTIF([.J93];&quot;&gt;0&quot;)" office:value-type="float" office:value="4" calcext:value-type="float">
            <text:p>4</text:p>
          </table:table-cell>
          <table:table-cell table:style-name="ce200" table:formula="of:=[.M93]/[.X93]" office:value-type="float" office:value="5" calcext:value-type="float">
            <text:p>5.0</text:p>
          </table:table-cell>
          <table:table-cell table:style-name="ce204" table:formula="of:=RANK([.Y93];[.$Y$4:.$Y$133])" office:value-type="float" office:value="26" calcext:value-type="float">
            <text:p>26º</text:p>
          </table:table-cell>
          <table:table-cell table:style-name="ce208" table:formula="of:=[.U93]/[.X93]" office:value-type="float" office:value="4.25" calcext:value-type="float">
            <text:p>4.3</text:p>
          </table:table-cell>
          <table:table-cell table:style-name="ce212" table:formula="of:=RANK([.AA93];[.$AA$4:.$AA$133])" office:value-type="float" office:value="96" calcext:value-type="float">
            <text:p>96º</text:p>
          </table:table-cell>
          <table:table-cell table:number-columns-repeated="996"/>
        </table:table-row>
        <table:table-row table:style-name="ro10">
          <table:table-cell table:style-name="ce129" office:value-type="string" calcext:value-type="string">
            <text:p>MARIA ANTONIETA</text:p>
          </table:table-cell>
          <table:table-cell table:style-name="ce134" office:value-type="string" calcext:value-type="string">
            <text:p>-</text:p>
          </table:table-cell>
          <table:table-cell table:style-name="ce139" table:formula="of:=IF([.B94]=20;1;IF([.B94]=19;2;IF([.B94]=19;2;IF([.B94]=18;3;IF([.B94]=17;4;IF([.B94]=16;5;IF([.B94]=15;6;IF([.B94]=14;7;IF([.B94]=13;8;IF([.B94]=12;9;IF([.B94]=11;10;IF([.B94]=10;11;IF([.B94]=9;12;IF([.B94]=8;13;IF([.B94]=7;14;IF([.B94]=6;15;IF([.B94]=5;16;IF([.B94]=4;17;IF([.B94]=3;18;IF([.B94]=2;19;IF([.B94]=1;20;0)))))))))))))))))))))" office:value-type="float" office:value="0" calcext:value-type="float">
            <text:p>0</text:p>
          </table:table-cell>
          <table:table-cell table:style-name="ce134" office:value-type="string" calcext:value-type="string">
            <text:p>-</text:p>
          </table:table-cell>
          <table:table-cell table:style-name="ce139" table:formula="of:=IF([.D94]=20;1;IF([.D94]=19;2;IF([.D94]=19;2;IF([.D94]=18;3;IF([.D94]=17;4;IF([.D94]=16;5;IF([.D94]=15;6;IF([.D94]=14;7;IF([.D94]=13;8;IF([.D94]=12;9;IF([.D94]=11;10;IF([.D94]=10;11;IF([.D94]=9;12;IF([.D94]=8;13;IF([.D94]=7;14;IF([.D94]=6;15;IF([.D94]=5;16;IF([.D94]=4;17;IF([.D94]=3;18;IF([.D94]=2;19;IF([.D94]=1;20;0)))))))))))))))))))))" office:value-type="float" office:value="0" calcext:value-type="float">
            <text:p>0</text:p>
          </table:table-cell>
          <table:table-cell table:style-name="ce134" office:value-type="string" calcext:value-type="string">
            <text:p>-</text:p>
          </table:table-cell>
          <table:table-cell table:style-name="ce139" table:formula="of:=IF([.F94]=20;1;IF([.F94]=19;2;IF([.F94]=19;2;IF([.F94]=18;3;IF([.F94]=17;4;IF([.F94]=16;5;IF([.F94]=15;6;IF([.F94]=14;7;IF([.F94]=13;8;IF([.F94]=12;9;IF([.F94]=11;10;IF([.F94]=10;11;IF([.F94]=9;12;IF([.F94]=8;13;IF([.F94]=7;14;IF([.F94]=6;15;IF([.F94]=5;16;IF([.F94]=4;17;IF([.F94]=3;18;IF([.F94]=2;19;IF([.F94]=1;20;0)))))))))))))))))))))" office:value-type="float" office:value="0" calcext:value-type="float">
            <text:p>0</text:p>
          </table:table-cell>
          <table:table-cell table:style-name="ce134" office:value-type="float" office:value="29" calcext:value-type="float">
            <text:p>29º</text:p>
          </table:table-cell>
          <table:table-cell table:style-name="ce139" table:formula="of:=IF([.H94]=20;1;IF([.H94]=19;2;IF([.H94]=19;2;IF([.H94]=18;3;IF([.H94]=17;4;IF([.H94]=16;5;IF([.H94]=15;6;IF([.H94]=14;7;IF([.H94]=13;8;IF([.H94]=12;9;IF([.H94]=11;10;IF([.H94]=10;11;IF([.H94]=9;12;IF([.H94]=8;13;IF([.H94]=7;14;IF([.H94]=6;15;IF([.H94]=5;16;IF([.H94]=4;17;IF([.H94]=3;18;IF([.H94]=2;19;IF([.H94]=1;20;0)))))))))))))))))))))" office:value-type="float" office:value="0" calcext:value-type="float">
            <text:p>0</text:p>
          </table:table-cell>
          <table:table-cell table:style-name="ce134" office:value-type="string" calcext:value-type="string">
            <text:p>-</text:p>
          </table:table-cell>
          <table:table-cell table:style-name="ce145" table:formula="of:=IF([.J94]=20;1;IF([.J94]=19;2;IF([.J94]=19;2;IF([.J94]=18;3;IF([.J94]=17;4;IF([.J94]=16;5;IF([.J94]=15;6;IF([.J94]=14;7;IF([.J94]=13;8;IF([.J94]=12;9;IF([.J94]=11;10;IF([.J94]=10;11;IF([.J94]=9;12;IF([.J94]=8;13;IF([.J94]=7;14;IF([.J94]=6;15;IF([.J94]=5;16;IF([.J94]=4;17;IF([.J94]=3;18;IF([.J94]=2;19;IF([.J94]=1;20;0)))))))))))))))))))))" office:value-type="float" office:value="0" calcext:value-type="float">
            <text:p>0</text:p>
          </table:table-cell>
          <table:table-cell table:style-name="ce151"/>
          <table:table-cell table:style-name="ce158" table:formula="of:=SUM([.C94];[.E94];[.G94];[.I94];[.K94])" office:value-type="float" office:value="0" calcext:value-type="float">
            <text:p>0</text:p>
          </table:table-cell>
          <table:table-cell table:style-name="ce160" table:formula="of:=RANK([.M94];[.$M$4:.$M$133])" office:value-type="float" office:value="71" calcext:value-type="float">
            <text:p>71º</text:p>
          </table:table-cell>
          <table:table-cell table:style-name="ce162"/>
          <table:table-cell table:style-name="ce172" office:value-type="string" calcext:value-type="string">
            <text:p>-</text:p>
          </table:table-cell>
          <table:table-cell table:number-columns-repeated="2" table:style-name="ce176" office:value-type="string" calcext:value-type="string">
            <text:p>-</text:p>
          </table:table-cell>
          <table:table-cell table:style-name="ce180" office:value-type="float" office:value="4" calcext:value-type="float">
            <text:p>4</text:p>
          </table:table-cell>
          <table:table-cell table:style-name="ce185" office:value-type="string" calcext:value-type="string">
            <text:p>-</text:p>
          </table:table-cell>
          <table:table-cell table:style-name="ce188" table:formula="of:=SUM([.P94:.T94])" office:value-type="float" office:value="4" calcext:value-type="float">
            <text:p>4</text:p>
          </table:table-cell>
          <table:table-cell table:style-name="ce189" table:formula="of:=RANK([.U94];[.$U$4:.$U$133])" office:value-type="float" office:value="113" calcext:value-type="float">
            <text:p>113º</text:p>
          </table:table-cell>
          <table:table-cell table:style-name="ce162"/>
          <table:table-cell table:style-name="ce193" table:formula="of:=COUNTIF([.B94];&quot;&gt;0&quot;)+COUNTIF([.D94];&quot;&gt;0&quot;)+COUNTIF([.F94];&quot;&gt;0&quot;)+COUNTIF([.H94];&quot;&gt;0&quot;)+COUNTIF([.J94];&quot;&gt;0&quot;)" office:value-type="float" office:value="1" calcext:value-type="float">
            <text:p>1</text:p>
          </table:table-cell>
          <table:table-cell table:style-name="ce200" table:formula="of:=[.M94]/[.X94]" office:value-type="float" office:value="0" calcext:value-type="float">
            <text:p>0.0</text:p>
          </table:table-cell>
          <table:table-cell table:style-name="ce204" table:formula="of:=RANK([.Y94];[.$Y$4:.$Y$133])" office:value-type="float" office:value="71" calcext:value-type="float">
            <text:p>71º</text:p>
          </table:table-cell>
          <table:table-cell table:style-name="ce208" table:formula="of:=[.U94]/[.X94]" office:value-type="float" office:value="4" calcext:value-type="float">
            <text:p>4.0</text:p>
          </table:table-cell>
          <table:table-cell table:style-name="ce212" table:formula="of:=RANK([.AA94];[.$AA$4:.$AA$133])" office:value-type="float" office:value="98" calcext:value-type="float">
            <text:p>98º</text:p>
          </table:table-cell>
          <table:table-cell table:number-columns-repeated="996"/>
        </table:table-row>
        <table:table-row table:style-name="ro10">
          <table:table-cell table:style-name="ce129" office:value-type="string" calcext:value-type="string">
            <text:p>MARIA HENRIQUETA</text:p>
          </table:table-cell>
          <table:table-cell table:style-name="ce134" office:value-type="string" calcext:value-type="string">
            <text:p>-</text:p>
          </table:table-cell>
          <table:table-cell table:style-name="ce139" table:formula="of:=IF([.B95]=20;1;IF([.B95]=19;2;IF([.B95]=19;2;IF([.B95]=18;3;IF([.B95]=17;4;IF([.B95]=16;5;IF([.B95]=15;6;IF([.B95]=14;7;IF([.B95]=13;8;IF([.B95]=12;9;IF([.B95]=11;10;IF([.B95]=10;11;IF([.B95]=9;12;IF([.B95]=8;13;IF([.B95]=7;14;IF([.B95]=6;15;IF([.B95]=5;16;IF([.B95]=4;17;IF([.B95]=3;18;IF([.B95]=2;19;IF([.B95]=1;20;0)))))))))))))))))))))" office:value-type="float" office:value="0" calcext:value-type="float">
            <text:p>0</text:p>
          </table:table-cell>
          <table:table-cell table:style-name="ce134" office:value-type="string" calcext:value-type="string">
            <text:p>-</text:p>
          </table:table-cell>
          <table:table-cell table:style-name="ce139" table:formula="of:=IF([.D95]=20;1;IF([.D95]=19;2;IF([.D95]=19;2;IF([.D95]=18;3;IF([.D95]=17;4;IF([.D95]=16;5;IF([.D95]=15;6;IF([.D95]=14;7;IF([.D95]=13;8;IF([.D95]=12;9;IF([.D95]=11;10;IF([.D95]=10;11;IF([.D95]=9;12;IF([.D95]=8;13;IF([.D95]=7;14;IF([.D95]=6;15;IF([.D95]=5;16;IF([.D95]=4;17;IF([.D95]=3;18;IF([.D95]=2;19;IF([.D95]=1;20;0)))))))))))))))))))))" office:value-type="float" office:value="0" calcext:value-type="float">
            <text:p>0</text:p>
          </table:table-cell>
          <table:table-cell table:style-name="ce134" office:value-type="string" calcext:value-type="string">
            <text:p>-</text:p>
          </table:table-cell>
          <table:table-cell table:style-name="ce139" table:formula="of:=IF([.F95]=20;1;IF([.F95]=19;2;IF([.F95]=19;2;IF([.F95]=18;3;IF([.F95]=17;4;IF([.F95]=16;5;IF([.F95]=15;6;IF([.F95]=14;7;IF([.F95]=13;8;IF([.F95]=12;9;IF([.F95]=11;10;IF([.F95]=10;11;IF([.F95]=9;12;IF([.F95]=8;13;IF([.F95]=7;14;IF([.F95]=6;15;IF([.F95]=5;16;IF([.F95]=4;17;IF([.F95]=3;18;IF([.F95]=2;19;IF([.F95]=1;20;0)))))))))))))))))))))" office:value-type="float" office:value="0" calcext:value-type="float">
            <text:p>0</text:p>
          </table:table-cell>
          <table:table-cell table:style-name="ce134" office:value-type="float" office:value="97" calcext:value-type="float">
            <text:p>97º</text:p>
          </table:table-cell>
          <table:table-cell table:style-name="ce139" table:formula="of:=IF([.H95]=20;1;IF([.H95]=19;2;IF([.H95]=19;2;IF([.H95]=18;3;IF([.H95]=17;4;IF([.H95]=16;5;IF([.H95]=15;6;IF([.H95]=14;7;IF([.H95]=13;8;IF([.H95]=12;9;IF([.H95]=11;10;IF([.H95]=10;11;IF([.H95]=9;12;IF([.H95]=8;13;IF([.H95]=7;14;IF([.H95]=6;15;IF([.H95]=5;16;IF([.H95]=4;17;IF([.H95]=3;18;IF([.H95]=2;19;IF([.H95]=1;20;0)))))))))))))))))))))" office:value-type="float" office:value="0" calcext:value-type="float">
            <text:p>0</text:p>
          </table:table-cell>
          <table:table-cell table:style-name="ce134" office:value-type="string" calcext:value-type="string">
            <text:p>-</text:p>
          </table:table-cell>
          <table:table-cell table:style-name="ce145" table:formula="of:=IF([.J95]=20;1;IF([.J95]=19;2;IF([.J95]=19;2;IF([.J95]=18;3;IF([.J95]=17;4;IF([.J95]=16;5;IF([.J95]=15;6;IF([.J95]=14;7;IF([.J95]=13;8;IF([.J95]=12;9;IF([.J95]=11;10;IF([.J95]=10;11;IF([.J95]=9;12;IF([.J95]=8;13;IF([.J95]=7;14;IF([.J95]=6;15;IF([.J95]=5;16;IF([.J95]=4;17;IF([.J95]=3;18;IF([.J95]=2;19;IF([.J95]=1;20;0)))))))))))))))))))))" office:value-type="float" office:value="0" calcext:value-type="float">
            <text:p>0</text:p>
          </table:table-cell>
          <table:table-cell table:style-name="ce151"/>
          <table:table-cell table:style-name="ce158" table:formula="of:=SUM([.C95];[.E95];[.G95];[.I95];[.K95])" office:value-type="float" office:value="0" calcext:value-type="float">
            <text:p>0</text:p>
          </table:table-cell>
          <table:table-cell table:style-name="ce160" table:formula="of:=RANK([.M95];[.$M$4:.$M$133])" office:value-type="float" office:value="71" calcext:value-type="float">
            <text:p>71º</text:p>
          </table:table-cell>
          <table:table-cell table:style-name="ce162"/>
          <table:table-cell table:style-name="ce172" office:value-type="string" calcext:value-type="string">
            <text:p>-</text:p>
          </table:table-cell>
          <table:table-cell table:number-columns-repeated="2" table:style-name="ce176" office:value-type="string" calcext:value-type="string">
            <text:p>-</text:p>
          </table:table-cell>
          <table:table-cell table:style-name="ce180" office:value-type="float" office:value="4" calcext:value-type="float">
            <text:p>4</text:p>
          </table:table-cell>
          <table:table-cell table:style-name="ce185" office:value-type="string" calcext:value-type="string">
            <text:p>-</text:p>
          </table:table-cell>
          <table:table-cell table:style-name="ce188" table:formula="of:=SUM([.P95:.T95])" office:value-type="float" office:value="4" calcext:value-type="float">
            <text:p>4</text:p>
          </table:table-cell>
          <table:table-cell table:style-name="ce189" table:formula="of:=RANK([.U95];[.$U$4:.$U$133])" office:value-type="float" office:value="113" calcext:value-type="float">
            <text:p>113º</text:p>
          </table:table-cell>
          <table:table-cell table:style-name="ce162"/>
          <table:table-cell table:style-name="ce193" table:formula="of:=COUNTIF([.B95];&quot;&gt;0&quot;)+COUNTIF([.D95];&quot;&gt;0&quot;)+COUNTIF([.F95];&quot;&gt;0&quot;)+COUNTIF([.H95];&quot;&gt;0&quot;)+COUNTIF([.J95];&quot;&gt;0&quot;)" office:value-type="float" office:value="1" calcext:value-type="float">
            <text:p>1</text:p>
          </table:table-cell>
          <table:table-cell table:style-name="ce200" table:formula="of:=[.M95]/[.X95]" office:value-type="float" office:value="0" calcext:value-type="float">
            <text:p>0.0</text:p>
          </table:table-cell>
          <table:table-cell table:style-name="ce204" table:formula="of:=RANK([.Y95];[.$Y$4:.$Y$133])" office:value-type="float" office:value="71" calcext:value-type="float">
            <text:p>71º</text:p>
          </table:table-cell>
          <table:table-cell table:style-name="ce208" table:formula="of:=[.U95]/[.X95]" office:value-type="float" office:value="4" calcext:value-type="float">
            <text:p>4.0</text:p>
          </table:table-cell>
          <table:table-cell table:style-name="ce212" table:formula="of:=RANK([.AA95];[.$AA$4:.$AA$133])" office:value-type="float" office:value="98" calcext:value-type="float">
            <text:p>98º</text:p>
          </table:table-cell>
          <table:table-cell table:number-columns-repeated="996"/>
        </table:table-row>
        <table:table-row table:style-name="ro10">
          <table:table-cell table:style-name="ce129" office:value-type="string" calcext:value-type="string">
            <text:p>MARIA LAURA</text:p>
            <draw:frame table:end-cell-address="'Rk Histórico'.A97" table:end-x="66.73pt" table:end-y="13.49pt" draw:z-index="2" draw:name="image3.png" draw:style-name="gr1" draw:text-style-name="P1" svg:width="14.23pt" svg:height="14.23pt" svg:x="52.5pt" svg:y="17.26pt">
              <draw:image xlink:href="Pictures/10000201000002D0000002D03A56A06C9213C946.png" xlink:type="simple" xlink:show="embed" xlink:actuate="onLoad">
                <text:p/>
              </draw:image>
            </draw:frame>
          </table:table-cell>
          <table:table-cell table:style-name="ce134" office:value-type="float" office:value="3" calcext:value-type="float">
            <text:p>3º</text:p>
          </table:table-cell>
          <table:table-cell table:style-name="ce139" table:formula="of:=IF([.B96]=20;1;IF([.B96]=19;2;IF([.B96]=19;2;IF([.B96]=18;3;IF([.B96]=17;4;IF([.B96]=16;5;IF([.B96]=15;6;IF([.B96]=14;7;IF([.B96]=13;8;IF([.B96]=12;9;IF([.B96]=11;10;IF([.B96]=10;11;IF([.B96]=9;12;IF([.B96]=8;13;IF([.B96]=7;14;IF([.B96]=6;15;IF([.B96]=5;16;IF([.B96]=4;17;IF([.B96]=3;18;IF([.B96]=2;19;IF([.B96]=1;20;0)))))))))))))))))))))" office:value-type="float" office:value="18" calcext:value-type="float">
            <text:p>18</text:p>
          </table:table-cell>
          <table:table-cell table:style-name="ce134" office:value-type="string" calcext:value-type="string">
            <text:p>-</text:p>
          </table:table-cell>
          <table:table-cell table:style-name="ce139" table:formula="of:=IF([.D96]=20;1;IF([.D96]=19;2;IF([.D96]=19;2;IF([.D96]=18;3;IF([.D96]=17;4;IF([.D96]=16;5;IF([.D96]=15;6;IF([.D96]=14;7;IF([.D96]=13;8;IF([.D96]=12;9;IF([.D96]=11;10;IF([.D96]=10;11;IF([.D96]=9;12;IF([.D96]=8;13;IF([.D96]=7;14;IF([.D96]=6;15;IF([.D96]=5;16;IF([.D96]=4;17;IF([.D96]=3;18;IF([.D96]=2;19;IF([.D96]=1;20;0)))))))))))))))))))))" office:value-type="float" office:value="0" calcext:value-type="float">
            <text:p>0</text:p>
          </table:table-cell>
          <table:table-cell table:style-name="ce134" office:value-type="string" calcext:value-type="string">
            <text:p>-</text:p>
          </table:table-cell>
          <table:table-cell table:style-name="ce139" table:formula="of:=IF([.F96]=20;1;IF([.F96]=19;2;IF([.F96]=19;2;IF([.F96]=18;3;IF([.F96]=17;4;IF([.F96]=16;5;IF([.F96]=15;6;IF([.F96]=14;7;IF([.F96]=13;8;IF([.F96]=12;9;IF([.F96]=11;10;IF([.F96]=10;11;IF([.F96]=9;12;IF([.F96]=8;13;IF([.F96]=7;14;IF([.F96]=6;15;IF([.F96]=5;16;IF([.F96]=4;17;IF([.F96]=3;18;IF([.F96]=2;19;IF([.F96]=1;20;0)))))))))))))))))))))" office:value-type="float" office:value="0" calcext:value-type="float">
            <text:p>0</text:p>
          </table:table-cell>
          <table:table-cell table:style-name="ce134" office:value-type="string" calcext:value-type="string">
            <text:p>-</text:p>
          </table:table-cell>
          <table:table-cell table:style-name="ce139" table:formula="of:=IF([.H96]=20;1;IF([.H96]=19;2;IF([.H96]=19;2;IF([.H96]=18;3;IF([.H96]=17;4;IF([.H96]=16;5;IF([.H96]=15;6;IF([.H96]=14;7;IF([.H96]=13;8;IF([.H96]=12;9;IF([.H96]=11;10;IF([.H96]=10;11;IF([.H96]=9;12;IF([.H96]=8;13;IF([.H96]=7;14;IF([.H96]=6;15;IF([.H96]=5;16;IF([.H96]=4;17;IF([.H96]=3;18;IF([.H96]=2;19;IF([.H96]=1;20;0)))))))))))))))))))))" office:value-type="float" office:value="0" calcext:value-type="float">
            <text:p>0</text:p>
          </table:table-cell>
          <table:table-cell table:style-name="ce134" office:value-type="string" calcext:value-type="string">
            <text:p>-</text:p>
          </table:table-cell>
          <table:table-cell table:style-name="ce145" table:formula="of:=IF([.J96]=20;1;IF([.J96]=19;2;IF([.J96]=19;2;IF([.J96]=18;3;IF([.J96]=17;4;IF([.J96]=16;5;IF([.J96]=15;6;IF([.J96]=14;7;IF([.J96]=13;8;IF([.J96]=12;9;IF([.J96]=11;10;IF([.J96]=10;11;IF([.J96]=9;12;IF([.J96]=8;13;IF([.J96]=7;14;IF([.J96]=6;15;IF([.J96]=5;16;IF([.J96]=4;17;IF([.J96]=3;18;IF([.J96]=2;19;IF([.J96]=1;20;0)))))))))))))))))))))" office:value-type="float" office:value="0" calcext:value-type="float">
            <text:p>0</text:p>
          </table:table-cell>
          <table:table-cell table:style-name="ce151"/>
          <table:table-cell table:style-name="ce158" table:formula="of:=SUM([.C96];[.E96];[.G96];[.I96];[.K96])" office:value-type="float" office:value="18" calcext:value-type="float">
            <text:p>18</text:p>
          </table:table-cell>
          <table:table-cell table:style-name="ce160" table:formula="of:=RANK([.M96];[.$M$4:.$M$133])" office:value-type="float" office:value="24" calcext:value-type="float">
            <text:p>24º</text:p>
          </table:table-cell>
          <table:table-cell table:style-name="ce162"/>
          <table:table-cell table:style-name="ce169" office:value-type="float" office:value="7" calcext:value-type="float">
            <text:p>7</text:p>
          </table:table-cell>
          <table:table-cell table:number-columns-repeated="2" table:style-name="ce175" office:value-type="string" calcext:value-type="string">
            <text:p>-</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96:.T96])" office:value-type="float" office:value="7" calcext:value-type="float">
            <text:p>7</text:p>
          </table:table-cell>
          <table:table-cell table:style-name="ce189" table:formula="of:=RANK([.U96];[.$U$4:.$U$133])" office:value-type="float" office:value="77" calcext:value-type="float">
            <text:p>77º</text:p>
          </table:table-cell>
          <table:table-cell table:style-name="ce162"/>
          <table:table-cell table:style-name="ce193" table:formula="of:=COUNTIF([.B96];&quot;&gt;0&quot;)+COUNTIF([.D96];&quot;&gt;0&quot;)+COUNTIF([.F96];&quot;&gt;0&quot;)+COUNTIF([.H96];&quot;&gt;0&quot;)+COUNTIF([.J96];&quot;&gt;0&quot;)" office:value-type="float" office:value="1" calcext:value-type="float">
            <text:p>1</text:p>
          </table:table-cell>
          <table:table-cell table:style-name="ce200" table:formula="of:=[.M96]/[.X96]" office:value-type="float" office:value="18" calcext:value-type="float">
            <text:p>18.0</text:p>
          </table:table-cell>
          <table:table-cell table:style-name="ce204" table:formula="of:=RANK([.Y96];[.$Y$4:.$Y$133])" office:value-type="float" office:value="1" calcext:value-type="float">
            <text:p>1º</text:p>
          </table:table-cell>
          <table:table-cell table:style-name="ce208" table:formula="of:=[.U96]/[.X96]" office:value-type="float" office:value="7" calcext:value-type="float">
            <text:p>7.0</text:p>
          </table:table-cell>
          <table:table-cell table:style-name="ce212" table:formula="of:=RANK([.AA96];[.$AA$4:.$AA$133])" office:value-type="float" office:value="11" calcext:value-type="float">
            <text:p>11º</text:p>
          </table:table-cell>
          <table:table-cell table:number-columns-repeated="996"/>
        </table:table-row>
        <table:table-row table:style-name="ro10">
          <table:table-cell table:style-name="ce129" office:value-type="string" calcext:value-type="string">
            <text:p>MARÍLIA</text:p>
          </table:table-cell>
          <table:table-cell table:style-name="ce134" office:value-type="float" office:value="1" calcext:value-type="float">
            <text:p>1º</text:p>
          </table:table-cell>
          <table:table-cell table:style-name="ce139" table:formula="of:=IF([.B97]=20;1;IF([.B97]=19;2;IF([.B97]=19;2;IF([.B97]=18;3;IF([.B97]=17;4;IF([.B97]=16;5;IF([.B97]=15;6;IF([.B97]=14;7;IF([.B97]=13;8;IF([.B97]=12;9;IF([.B97]=11;10;IF([.B97]=10;11;IF([.B97]=9;12;IF([.B97]=8;13;IF([.B97]=7;14;IF([.B97]=6;15;IF([.B97]=5;16;IF([.B97]=4;17;IF([.B97]=3;18;IF([.B97]=2;19;IF([.B97]=1;20;0)))))))))))))))))))))" office:value-type="float" office:value="20" calcext:value-type="float">
            <text:p>20</text:p>
          </table:table-cell>
          <table:table-cell table:style-name="ce134" office:value-type="float" office:value="29" calcext:value-type="float">
            <text:p>29º</text:p>
          </table:table-cell>
          <table:table-cell table:style-name="ce139" table:formula="of:=IF([.D97]=20;1;IF([.D97]=19;2;IF([.D97]=19;2;IF([.D97]=18;3;IF([.D97]=17;4;IF([.D97]=16;5;IF([.D97]=15;6;IF([.D97]=14;7;IF([.D97]=13;8;IF([.D97]=12;9;IF([.D97]=11;10;IF([.D97]=10;11;IF([.D97]=9;12;IF([.D97]=8;13;IF([.D97]=7;14;IF([.D97]=6;15;IF([.D97]=5;16;IF([.D97]=4;17;IF([.D97]=3;18;IF([.D97]=2;19;IF([.D97]=1;20;0)))))))))))))))))))))" office:value-type="float" office:value="0" calcext:value-type="float">
            <text:p>0</text:p>
          </table:table-cell>
          <table:table-cell table:style-name="ce134" office:value-type="float" office:value="46" calcext:value-type="float">
            <text:p>46º</text:p>
          </table:table-cell>
          <table:table-cell table:style-name="ce139" table:formula="of:=IF([.F97]=20;1;IF([.F97]=19;2;IF([.F97]=19;2;IF([.F97]=18;3;IF([.F97]=17;4;IF([.F97]=16;5;IF([.F97]=15;6;IF([.F97]=14;7;IF([.F97]=13;8;IF([.F97]=12;9;IF([.F97]=11;10;IF([.F97]=10;11;IF([.F97]=9;12;IF([.F97]=8;13;IF([.F97]=7;14;IF([.F97]=6;15;IF([.F97]=5;16;IF([.F97]=4;17;IF([.F97]=3;18;IF([.F97]=2;19;IF([.F97]=1;20;0)))))))))))))))))))))" office:value-type="float" office:value="0" calcext:value-type="float">
            <text:p>0</text:p>
          </table:table-cell>
          <table:table-cell table:style-name="ce134" office:value-type="float" office:value="5" calcext:value-type="float">
            <text:p>5º</text:p>
          </table:table-cell>
          <table:table-cell table:style-name="ce139" table:formula="of:=IF([.H97]=20;1;IF([.H97]=19;2;IF([.H97]=19;2;IF([.H97]=18;3;IF([.H97]=17;4;IF([.H97]=16;5;IF([.H97]=15;6;IF([.H97]=14;7;IF([.H97]=13;8;IF([.H97]=12;9;IF([.H97]=11;10;IF([.H97]=10;11;IF([.H97]=9;12;IF([.H97]=8;13;IF([.H97]=7;14;IF([.H97]=6;15;IF([.H97]=5;16;IF([.H97]=4;17;IF([.H97]=3;18;IF([.H97]=2;19;IF([.H97]=1;20;0)))))))))))))))))))))" office:value-type="float" office:value="16" calcext:value-type="float">
            <text:p>16</text:p>
          </table:table-cell>
          <table:table-cell table:style-name="ce134" office:value-type="float" office:value="2" calcext:value-type="float">
            <text:p>2º</text:p>
          </table:table-cell>
          <table:table-cell table:style-name="ce145" table:formula="of:=IF([.J97]=20;1;IF([.J97]=19;2;IF([.J97]=19;2;IF([.J97]=18;3;IF([.J97]=17;4;IF([.J97]=16;5;IF([.J97]=15;6;IF([.J97]=14;7;IF([.J97]=13;8;IF([.J97]=12;9;IF([.J97]=11;10;IF([.J97]=10;11;IF([.J97]=9;12;IF([.J97]=8;13;IF([.J97]=7;14;IF([.J97]=6;15;IF([.J97]=5;16;IF([.J97]=4;17;IF([.J97]=3;18;IF([.J97]=2;19;IF([.J97]=1;20;0)))))))))))))))))))))" office:value-type="float" office:value="19" calcext:value-type="float">
            <text:p>19</text:p>
          </table:table-cell>
          <table:table-cell table:style-name="ce151"/>
          <table:table-cell table:style-name="ce158" table:formula="of:=SUM([.C97];[.E97];[.G97];[.I97];[.K97])" office:value-type="float" office:value="55" calcext:value-type="float">
            <text:p>55</text:p>
          </table:table-cell>
          <table:table-cell table:style-name="ce160" table:formula="of:=RANK([.M97];[.$M$4:.$M$133])" office:value-type="float" office:value="1" calcext:value-type="float">
            <text:p>1º</text:p>
          </table:table-cell>
          <table:table-cell table:style-name="ce162"/>
          <table:table-cell table:style-name="ce169" office:value-type="float" office:value="9" calcext:value-type="float">
            <text:p>9</text:p>
          </table:table-cell>
          <table:table-cell table:style-name="ce175" office:value-type="float" office:value="10" calcext:value-type="float">
            <text:p>10</text:p>
          </table:table-cell>
          <table:table-cell table:style-name="ce175" office:value-type="float" office:value="5" calcext:value-type="float">
            <text:p>5</text:p>
          </table:table-cell>
          <table:table-cell table:style-name="ce180" office:value-type="float" office:value="5" calcext:value-type="float">
            <text:p>5</text:p>
          </table:table-cell>
          <table:table-cell table:style-name="ce185" office:value-type="float" office:value="6" calcext:value-type="float">
            <text:p>6</text:p>
          </table:table-cell>
          <table:table-cell table:style-name="ce188" table:formula="of:=SUM([.P97:.T97])" office:value-type="float" office:value="35" calcext:value-type="float">
            <text:p>35</text:p>
          </table:table-cell>
          <table:table-cell table:style-name="ce189" table:formula="of:=RANK([.U97];[.$U$4:.$U$133])" office:value-type="float" office:value="2" calcext:value-type="float">
            <text:p>2º</text:p>
          </table:table-cell>
          <table:table-cell table:style-name="ce162"/>
          <table:table-cell table:style-name="ce193" table:formula="of:=COUNTIF([.B97];&quot;&gt;0&quot;)+COUNTIF([.D97];&quot;&gt;0&quot;)+COUNTIF([.F97];&quot;&gt;0&quot;)+COUNTIF([.H97];&quot;&gt;0&quot;)+COUNTIF([.J97];&quot;&gt;0&quot;)" office:value-type="float" office:value="5" calcext:value-type="float">
            <text:p>5</text:p>
          </table:table-cell>
          <table:table-cell table:style-name="ce200" table:formula="of:=[.M97]/[.X97]" office:value-type="float" office:value="11" calcext:value-type="float">
            <text:p>11.0</text:p>
          </table:table-cell>
          <table:table-cell table:style-name="ce204" table:formula="of:=RANK([.Y97];[.$Y$4:.$Y$133])" office:value-type="float" office:value="8" calcext:value-type="float">
            <text:p>8º</text:p>
          </table:table-cell>
          <table:table-cell table:style-name="ce208" table:formula="of:=[.U97]/[.X97]" office:value-type="float" office:value="7" calcext:value-type="float">
            <text:p>7.0</text:p>
          </table:table-cell>
          <table:table-cell table:style-name="ce212" table:formula="of:=RANK([.AA97];[.$AA$4:.$AA$133])" office:value-type="float" office:value="11" calcext:value-type="float">
            <text:p>11º</text:p>
          </table:table-cell>
          <table:table-cell table:number-columns-repeated="996"/>
        </table:table-row>
        <table:table-row table:style-name="ro10">
          <table:table-cell table:style-name="ce129" office:value-type="string" calcext:value-type="string">
            <text:p>MARINA</text:p>
          </table:table-cell>
          <table:table-cell table:style-name="ce134" office:value-type="float" office:value="7" calcext:value-type="float">
            <text:p>7º</text:p>
          </table:table-cell>
          <table:table-cell table:style-name="ce139" table:formula="of:=IF([.B98]=20;1;IF([.B98]=19;2;IF([.B98]=19;2;IF([.B98]=18;3;IF([.B98]=17;4;IF([.B98]=16;5;IF([.B98]=15;6;IF([.B98]=14;7;IF([.B98]=13;8;IF([.B98]=12;9;IF([.B98]=11;10;IF([.B98]=10;11;IF([.B98]=9;12;IF([.B98]=8;13;IF([.B98]=7;14;IF([.B98]=6;15;IF([.B98]=5;16;IF([.B98]=4;17;IF([.B98]=3;18;IF([.B98]=2;19;IF([.B98]=1;20;0)))))))))))))))))))))" office:value-type="float" office:value="14" calcext:value-type="float">
            <text:p>14</text:p>
          </table:table-cell>
          <table:table-cell table:style-name="ce134"/>
          <table:table-cell table:style-name="ce139" table:formula="of:=IF([.D98]=20;1;IF([.D98]=19;2;IF([.D98]=19;2;IF([.D98]=18;3;IF([.D98]=17;4;IF([.D98]=16;5;IF([.D98]=15;6;IF([.D98]=14;7;IF([.D98]=13;8;IF([.D98]=12;9;IF([.D98]=11;10;IF([.D98]=10;11;IF([.D98]=9;12;IF([.D98]=8;13;IF([.D98]=7;14;IF([.D98]=6;15;IF([.D98]=5;16;IF([.D98]=4;17;IF([.D98]=3;18;IF([.D98]=2;19;IF([.D98]=1;20;0)))))))))))))))))))))" office:value-type="float" office:value="0" calcext:value-type="float">
            <text:p>0</text:p>
          </table:table-cell>
          <table:table-cell table:style-name="ce134"/>
          <table:table-cell table:style-name="ce139" table:formula="of:=IF([.F98]=20;1;IF([.F98]=19;2;IF([.F98]=19;2;IF([.F98]=18;3;IF([.F98]=17;4;IF([.F98]=16;5;IF([.F98]=15;6;IF([.F98]=14;7;IF([.F98]=13;8;IF([.F98]=12;9;IF([.F98]=11;10;IF([.F98]=10;11;IF([.F98]=9;12;IF([.F98]=8;13;IF([.F98]=7;14;IF([.F98]=6;15;IF([.F98]=5;16;IF([.F98]=4;17;IF([.F98]=3;18;IF([.F98]=2;19;IF([.F98]=1;20;0)))))))))))))))))))))" office:value-type="float" office:value="0" calcext:value-type="float">
            <text:p>0</text:p>
          </table:table-cell>
          <table:table-cell table:style-name="ce134"/>
          <table:table-cell table:style-name="ce139" table:formula="of:=IF([.H98]=20;1;IF([.H98]=19;2;IF([.H98]=19;2;IF([.H98]=18;3;IF([.H98]=17;4;IF([.H98]=16;5;IF([.H98]=15;6;IF([.H98]=14;7;IF([.H98]=13;8;IF([.H98]=12;9;IF([.H98]=11;10;IF([.H98]=10;11;IF([.H98]=9;12;IF([.H98]=8;13;IF([.H98]=7;14;IF([.H98]=6;15;IF([.H98]=5;16;IF([.H98]=4;17;IF([.H98]=3;18;IF([.H98]=2;19;IF([.H98]=1;20;0)))))))))))))))))))))" office:value-type="float" office:value="0" calcext:value-type="float">
            <text:p>0</text:p>
          </table:table-cell>
          <table:table-cell table:style-name="ce134"/>
          <table:table-cell table:style-name="ce145" table:formula="of:=IF([.J98]=20;1;IF([.J98]=19;2;IF([.J98]=19;2;IF([.J98]=18;3;IF([.J98]=17;4;IF([.J98]=16;5;IF([.J98]=15;6;IF([.J98]=14;7;IF([.J98]=13;8;IF([.J98]=12;9;IF([.J98]=11;10;IF([.J98]=10;11;IF([.J98]=9;12;IF([.J98]=8;13;IF([.J98]=7;14;IF([.J98]=6;15;IF([.J98]=5;16;IF([.J98]=4;17;IF([.J98]=3;18;IF([.J98]=2;19;IF([.J98]=1;20;0)))))))))))))))))))))" office:value-type="float" office:value="0" calcext:value-type="float">
            <text:p>0</text:p>
          </table:table-cell>
          <table:table-cell table:style-name="ce151"/>
          <table:table-cell table:style-name="ce158" table:formula="of:=SUM([.C98];[.E98];[.G98];[.I98];[.K98])" office:value-type="float" office:value="14" calcext:value-type="float">
            <text:p>14</text:p>
          </table:table-cell>
          <table:table-cell table:style-name="ce160" table:formula="of:=RANK([.M98];[.$M$4:.$M$133])" office:value-type="float" office:value="37" calcext:value-type="float">
            <text:p>37º</text:p>
          </table:table-cell>
          <table:table-cell table:style-name="ce162"/>
          <table:table-cell table:style-name="ce172" office:value-type="float" office:value="7" calcext:value-type="float">
            <text:p>7º</text:p>
          </table:table-cell>
          <table:table-cell table:number-columns-repeated="2" table:style-name="ce176" office:value-type="string" calcext:value-type="string">
            <text:p>-</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98:.T98])" office:value-type="float" office:value="7" calcext:value-type="float">
            <text:p>7</text:p>
          </table:table-cell>
          <table:table-cell table:style-name="ce189" table:formula="of:=RANK([.U98];[.$U$4:.$U$133])" office:value-type="float" office:value="77" calcext:value-type="float">
            <text:p>77º</text:p>
          </table:table-cell>
          <table:table-cell table:style-name="ce162"/>
          <table:table-cell table:style-name="ce193" table:formula="of:=COUNTIF([.B98];&quot;&gt;0&quot;)+COUNTIF([.D98];&quot;&gt;0&quot;)+COUNTIF([.F98];&quot;&gt;0&quot;)+COUNTIF([.H98];&quot;&gt;0&quot;)+COUNTIF([.J98];&quot;&gt;0&quot;)" office:value-type="float" office:value="1" calcext:value-type="float">
            <text:p>1</text:p>
          </table:table-cell>
          <table:table-cell table:style-name="ce200" table:formula="of:=[.M98]/[.X98]" office:value-type="float" office:value="14" calcext:value-type="float">
            <text:p>14.0</text:p>
          </table:table-cell>
          <table:table-cell table:style-name="ce204" table:formula="of:=RANK([.Y98];[.$Y$4:.$Y$133])" office:value-type="float" office:value="5" calcext:value-type="float">
            <text:p>5º</text:p>
          </table:table-cell>
          <table:table-cell table:style-name="ce208" table:formula="of:=[.U98]/[.X98]" office:value-type="float" office:value="7" calcext:value-type="float">
            <text:p>7.0</text:p>
          </table:table-cell>
          <table:table-cell table:style-name="ce212" table:formula="of:=RANK([.AA98];[.$AA$4:.$AA$133])" office:value-type="float" office:value="11" calcext:value-type="float">
            <text:p>11º</text:p>
          </table:table-cell>
          <table:table-cell table:number-columns-repeated="996"/>
        </table:table-row>
        <table:table-row table:style-name="ro10">
          <table:table-cell table:style-name="ce129" office:value-type="string" calcext:value-type="string">
            <text:p>MARTINO</text:p>
          </table:table-cell>
          <table:table-cell table:style-name="ce134" office:value-type="string" calcext:value-type="string">
            <text:p>-</text:p>
          </table:table-cell>
          <table:table-cell table:style-name="ce139" table:formula="of:=IF([.B99]=20;1;IF([.B99]=19;2;IF([.B99]=19;2;IF([.B99]=18;3;IF([.B99]=17;4;IF([.B99]=16;5;IF([.B99]=15;6;IF([.B99]=14;7;IF([.B99]=13;8;IF([.B99]=12;9;IF([.B99]=11;10;IF([.B99]=10;11;IF([.B99]=9;12;IF([.B99]=8;13;IF([.B99]=7;14;IF([.B99]=6;15;IF([.B99]=5;16;IF([.B99]=4;17;IF([.B99]=3;18;IF([.B99]=2;19;IF([.B99]=1;20;0)))))))))))))))))))))" office:value-type="float" office:value="0" calcext:value-type="float">
            <text:p>0</text:p>
          </table:table-cell>
          <table:table-cell table:style-name="ce134" office:value-type="string" calcext:value-type="string">
            <text:p>-</text:p>
          </table:table-cell>
          <table:table-cell table:style-name="ce139" table:formula="of:=IF([.D99]=20;1;IF([.D99]=19;2;IF([.D99]=19;2;IF([.D99]=18;3;IF([.D99]=17;4;IF([.D99]=16;5;IF([.D99]=15;6;IF([.D99]=14;7;IF([.D99]=13;8;IF([.D99]=12;9;IF([.D99]=11;10;IF([.D99]=10;11;IF([.D99]=9;12;IF([.D99]=8;13;IF([.D99]=7;14;IF([.D99]=6;15;IF([.D99]=5;16;IF([.D99]=4;17;IF([.D99]=3;18;IF([.D99]=2;19;IF([.D99]=1;20;0)))))))))))))))))))))" office:value-type="float" office:value="0" calcext:value-type="float">
            <text:p>0</text:p>
          </table:table-cell>
          <table:table-cell table:style-name="ce134" office:value-type="string" calcext:value-type="string">
            <text:p>-</text:p>
          </table:table-cell>
          <table:table-cell table:style-name="ce139" table:formula="of:=IF([.F99]=20;1;IF([.F99]=19;2;IF([.F99]=19;2;IF([.F99]=18;3;IF([.F99]=17;4;IF([.F99]=16;5;IF([.F99]=15;6;IF([.F99]=14;7;IF([.F99]=13;8;IF([.F99]=12;9;IF([.F99]=11;10;IF([.F99]=10;11;IF([.F99]=9;12;IF([.F99]=8;13;IF([.F99]=7;14;IF([.F99]=6;15;IF([.F99]=5;16;IF([.F99]=4;17;IF([.F99]=3;18;IF([.F99]=2;19;IF([.F99]=1;20;0)))))))))))))))))))))" office:value-type="float" office:value="0" calcext:value-type="float">
            <text:p>0</text:p>
          </table:table-cell>
          <table:table-cell table:style-name="ce134" office:value-type="float" office:value="21" calcext:value-type="float">
            <text:p>21º</text:p>
          </table:table-cell>
          <table:table-cell table:style-name="ce139" table:formula="of:=IF([.H99]=20;1;IF([.H99]=19;2;IF([.H99]=19;2;IF([.H99]=18;3;IF([.H99]=17;4;IF([.H99]=16;5;IF([.H99]=15;6;IF([.H99]=14;7;IF([.H99]=13;8;IF([.H99]=12;9;IF([.H99]=11;10;IF([.H99]=10;11;IF([.H99]=9;12;IF([.H99]=8;13;IF([.H99]=7;14;IF([.H99]=6;15;IF([.H99]=5;16;IF([.H99]=4;17;IF([.H99]=3;18;IF([.H99]=2;19;IF([.H99]=1;20;0)))))))))))))))))))))" office:value-type="float" office:value="0" calcext:value-type="float">
            <text:p>0</text:p>
          </table:table-cell>
          <table:table-cell table:style-name="ce134" office:value-type="float" office:value="38" calcext:value-type="float">
            <text:p>38º</text:p>
          </table:table-cell>
          <table:table-cell table:style-name="ce145" table:formula="of:=IF([.J99]=20;1;IF([.J99]=19;2;IF([.J99]=19;2;IF([.J99]=18;3;IF([.J99]=17;4;IF([.J99]=16;5;IF([.J99]=15;6;IF([.J99]=14;7;IF([.J99]=13;8;IF([.J99]=12;9;IF([.J99]=11;10;IF([.J99]=10;11;IF([.J99]=9;12;IF([.J99]=8;13;IF([.J99]=7;14;IF([.J99]=6;15;IF([.J99]=5;16;IF([.J99]=4;17;IF([.J99]=3;18;IF([.J99]=2;19;IF([.J99]=1;20;0)))))))))))))))))))))" office:value-type="float" office:value="0" calcext:value-type="float">
            <text:p>0</text:p>
          </table:table-cell>
          <table:table-cell table:style-name="ce151"/>
          <table:table-cell table:style-name="ce158" table:formula="of:=SUM([.C99];[.E99];[.G99];[.I99];[.K99])" office:value-type="float" office:value="0" calcext:value-type="float">
            <text:p>0</text:p>
          </table:table-cell>
          <table:table-cell table:style-name="ce160" table:formula="of:=RANK([.M99];[.$M$4:.$M$133])" office:value-type="float" office:value="71" calcext:value-type="float">
            <text:p>71º</text:p>
          </table:table-cell>
          <table:table-cell table:style-name="ce162"/>
          <table:table-cell table:style-name="ce172" office:value-type="string" calcext:value-type="string">
            <text:p>-</text:p>
          </table:table-cell>
          <table:table-cell table:number-columns-repeated="2" table:style-name="ce176" office:value-type="string" calcext:value-type="string">
            <text:p>-</text:p>
          </table:table-cell>
          <table:table-cell table:style-name="ce180" office:value-type="float" office:value="9" calcext:value-type="float">
            <text:p>9</text:p>
          </table:table-cell>
          <table:table-cell table:style-name="ce185" office:value-type="float" office:value="1" calcext:value-type="float">
            <text:p>1</text:p>
          </table:table-cell>
          <table:table-cell table:style-name="ce188" table:formula="of:=SUM([.P99:.T99])" office:value-type="float" office:value="10" calcext:value-type="float">
            <text:p>10</text:p>
          </table:table-cell>
          <table:table-cell table:style-name="ce189" table:formula="of:=RANK([.U99];[.$U$4:.$U$133])" office:value-type="float" office:value="65" calcext:value-type="float">
            <text:p>65º</text:p>
          </table:table-cell>
          <table:table-cell table:style-name="ce162"/>
          <table:table-cell table:style-name="ce193" table:formula="of:=COUNTIF([.B99];&quot;&gt;0&quot;)+COUNTIF([.D99];&quot;&gt;0&quot;)+COUNTIF([.F99];&quot;&gt;0&quot;)+COUNTIF([.H99];&quot;&gt;0&quot;)+COUNTIF([.J99];&quot;&gt;0&quot;)" office:value-type="float" office:value="2" calcext:value-type="float">
            <text:p>2</text:p>
          </table:table-cell>
          <table:table-cell table:style-name="ce200" table:formula="of:=[.M99]/[.X99]" office:value-type="float" office:value="0" calcext:value-type="float">
            <text:p>0.0</text:p>
          </table:table-cell>
          <table:table-cell table:style-name="ce204" table:formula="of:=RANK([.Y99];[.$Y$4:.$Y$133])" office:value-type="float" office:value="71" calcext:value-type="float">
            <text:p>71º</text:p>
          </table:table-cell>
          <table:table-cell table:style-name="ce208" table:formula="of:=[.U99]/[.X99]" office:value-type="float" office:value="5" calcext:value-type="float">
            <text:p>5.0</text:p>
          </table:table-cell>
          <table:table-cell table:style-name="ce212" table:formula="of:=RANK([.AA99];[.$AA$4:.$AA$133])" office:value-type="float" office:value="68" calcext:value-type="float">
            <text:p>68º</text:p>
          </table:table-cell>
          <table:table-cell table:number-columns-repeated="996"/>
        </table:table-row>
        <table:table-row table:style-name="ro10">
          <table:table-cell table:style-name="ce129" office:value-type="string" calcext:value-type="string">
            <text:p>MATHIEU</text:p>
          </table:table-cell>
          <table:table-cell table:style-name="ce134" office:value-type="float" office:value="25" calcext:value-type="float">
            <text:p>25º</text:p>
          </table:table-cell>
          <table:table-cell table:style-name="ce139" table:formula="of:=IF([.B100]=20;1;IF([.B100]=19;2;IF([.B100]=19;2;IF([.B100]=18;3;IF([.B100]=17;4;IF([.B100]=16;5;IF([.B100]=15;6;IF([.B100]=14;7;IF([.B100]=13;8;IF([.B100]=12;9;IF([.B100]=11;10;IF([.B100]=10;11;IF([.B100]=9;12;IF([.B100]=8;13;IF([.B100]=7;14;IF([.B100]=6;15;IF([.B100]=5;16;IF([.B100]=4;17;IF([.B100]=3;18;IF([.B100]=2;19;IF([.B100]=1;20;0)))))))))))))))))))))" office:value-type="float" office:value="0" calcext:value-type="float">
            <text:p>0</text:p>
          </table:table-cell>
          <table:table-cell table:style-name="ce134" office:value-type="float" office:value="7" calcext:value-type="float">
            <text:p>7º</text:p>
          </table:table-cell>
          <table:table-cell table:style-name="ce139" table:formula="of:=IF([.D100]=20;1;IF([.D100]=19;2;IF([.D100]=19;2;IF([.D100]=18;3;IF([.D100]=17;4;IF([.D100]=16;5;IF([.D100]=15;6;IF([.D100]=14;7;IF([.D100]=13;8;IF([.D100]=12;9;IF([.D100]=11;10;IF([.D100]=10;11;IF([.D100]=9;12;IF([.D100]=8;13;IF([.D100]=7;14;IF([.D100]=6;15;IF([.D100]=5;16;IF([.D100]=4;17;IF([.D100]=3;18;IF([.D100]=2;19;IF([.D100]=1;20;0)))))))))))))))))))))" office:value-type="float" office:value="14" calcext:value-type="float">
            <text:p>14</text:p>
          </table:table-cell>
          <table:table-cell table:style-name="ce134" office:value-type="float" office:value="4" calcext:value-type="float">
            <text:p>4º</text:p>
          </table:table-cell>
          <table:table-cell table:style-name="ce139" table:formula="of:=IF([.F100]=20;1;IF([.F100]=19;2;IF([.F100]=19;2;IF([.F100]=18;3;IF([.F100]=17;4;IF([.F100]=16;5;IF([.F100]=15;6;IF([.F100]=14;7;IF([.F100]=13;8;IF([.F100]=12;9;IF([.F100]=11;10;IF([.F100]=10;11;IF([.F100]=9;12;IF([.F100]=8;13;IF([.F100]=7;14;IF([.F100]=6;15;IF([.F100]=5;16;IF([.F100]=4;17;IF([.F100]=3;18;IF([.F100]=2;19;IF([.F100]=1;20;0)))))))))))))))))))))" office:value-type="float" office:value="17" calcext:value-type="float">
            <text:p>17</text:p>
          </table:table-cell>
          <table:table-cell table:style-name="ce134"/>
          <table:table-cell table:style-name="ce139" table:formula="of:=IF([.H100]=20;1;IF([.H100]=19;2;IF([.H100]=19;2;IF([.H100]=18;3;IF([.H100]=17;4;IF([.H100]=16;5;IF([.H100]=15;6;IF([.H100]=14;7;IF([.H100]=13;8;IF([.H100]=12;9;IF([.H100]=11;10;IF([.H100]=10;11;IF([.H100]=9;12;IF([.H100]=8;13;IF([.H100]=7;14;IF([.H100]=6;15;IF([.H100]=5;16;IF([.H100]=4;17;IF([.H100]=3;18;IF([.H100]=2;19;IF([.H100]=1;20;0)))))))))))))))))))))" office:value-type="float" office:value="0" calcext:value-type="float">
            <text:p>0</text:p>
          </table:table-cell>
          <table:table-cell table:style-name="ce134"/>
          <table:table-cell table:style-name="ce145" table:formula="of:=IF([.J100]=20;1;IF([.J100]=19;2;IF([.J100]=19;2;IF([.J100]=18;3;IF([.J100]=17;4;IF([.J100]=16;5;IF([.J100]=15;6;IF([.J100]=14;7;IF([.J100]=13;8;IF([.J100]=12;9;IF([.J100]=11;10;IF([.J100]=10;11;IF([.J100]=9;12;IF([.J100]=8;13;IF([.J100]=7;14;IF([.J100]=6;15;IF([.J100]=5;16;IF([.J100]=4;17;IF([.J100]=3;18;IF([.J100]=2;19;IF([.J100]=1;20;0)))))))))))))))))))))" office:value-type="float" office:value="0" calcext:value-type="float">
            <text:p>0</text:p>
          </table:table-cell>
          <table:table-cell table:style-name="ce151"/>
          <table:table-cell table:style-name="ce158" table:formula="of:=SUM([.C100];[.E100];[.G100];[.I100];[.K100])" office:value-type="float" office:value="31" calcext:value-type="float">
            <text:p>31</text:p>
          </table:table-cell>
          <table:table-cell table:style-name="ce160" table:formula="of:=RANK([.M100];[.$M$4:.$M$133])" office:value-type="float" office:value="6" calcext:value-type="float">
            <text:p>6º</text:p>
          </table:table-cell>
          <table:table-cell table:style-name="ce162"/>
          <table:table-cell table:style-name="ce169" office:value-type="float" office:value="7" calcext:value-type="float">
            <text:p>7</text:p>
          </table:table-cell>
          <table:table-cell table:style-name="ce175" office:value-type="float" office:value="12" calcext:value-type="float">
            <text:p>12</text:p>
          </table:table-cell>
          <table:table-cell table:style-name="ce175" office:value-type="float" office:value="8" calcext:value-type="float">
            <text:p>8</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100:.T100])" office:value-type="float" office:value="27" calcext:value-type="float">
            <text:p>27</text:p>
          </table:table-cell>
          <table:table-cell table:style-name="ce189" table:formula="of:=RANK([.U100];[.$U$4:.$U$133])" office:value-type="float" office:value="16" calcext:value-type="float">
            <text:p>16º</text:p>
          </table:table-cell>
          <table:table-cell table:style-name="ce162"/>
          <table:table-cell table:style-name="ce193" table:formula="of:=COUNTIF([.B100];&quot;&gt;0&quot;)+COUNTIF([.D100];&quot;&gt;0&quot;)+COUNTIF([.F100];&quot;&gt;0&quot;)+COUNTIF([.H100];&quot;&gt;0&quot;)+COUNTIF([.J100];&quot;&gt;0&quot;)" office:value-type="float" office:value="3" calcext:value-type="float">
            <text:p>3</text:p>
          </table:table-cell>
          <table:table-cell table:style-name="ce200" table:formula="of:=[.M100]/[.X100]" office:value-type="float" office:value="10.3333333333333" calcext:value-type="float">
            <text:p>10.3</text:p>
          </table:table-cell>
          <table:table-cell table:style-name="ce204" table:formula="of:=RANK([.Y100];[.$Y$4:.$Y$133])" office:value-type="float" office:value="9" calcext:value-type="float">
            <text:p>9º</text:p>
          </table:table-cell>
          <table:table-cell table:style-name="ce208" table:formula="of:=[.U100]/[.X100]" office:value-type="float" office:value="9" calcext:value-type="float">
            <text:p>9.0</text:p>
          </table:table-cell>
          <table:table-cell table:style-name="ce212" table:formula="of:=RANK([.AA100];[.$AA$4:.$AA$133])" office:value-type="float" office:value="1" calcext:value-type="float">
            <text:p>1º</text:p>
          </table:table-cell>
          <table:table-cell table:number-columns-repeated="996"/>
        </table:table-row>
        <table:table-row table:style-name="ro10">
          <table:table-cell table:style-name="ce129" office:value-type="string" calcext:value-type="string">
            <text:p>MAURÍCIO</text:p>
          </table:table-cell>
          <table:table-cell table:style-name="ce134" office:value-type="string" calcext:value-type="string">
            <text:p>-</text:p>
          </table:table-cell>
          <table:table-cell table:style-name="ce139" table:formula="of:=IF([.B101]=20;1;IF([.B101]=19;2;IF([.B101]=19;2;IF([.B101]=18;3;IF([.B101]=17;4;IF([.B101]=16;5;IF([.B101]=15;6;IF([.B101]=14;7;IF([.B101]=13;8;IF([.B101]=12;9;IF([.B101]=11;10;IF([.B101]=10;11;IF([.B101]=9;12;IF([.B101]=8;13;IF([.B101]=7;14;IF([.B101]=6;15;IF([.B101]=5;16;IF([.B101]=4;17;IF([.B101]=3;18;IF([.B101]=2;19;IF([.B101]=1;20;0)))))))))))))))))))))" office:value-type="float" office:value="0" calcext:value-type="float">
            <text:p>0</text:p>
          </table:table-cell>
          <table:table-cell table:style-name="ce134" office:value-type="float" office:value="59" calcext:value-type="float">
            <text:p>59º</text:p>
          </table:table-cell>
          <table:table-cell table:style-name="ce139" table:formula="of:=IF([.D101]=20;1;IF([.D101]=19;2;IF([.D101]=19;2;IF([.D101]=18;3;IF([.D101]=17;4;IF([.D101]=16;5;IF([.D101]=15;6;IF([.D101]=14;7;IF([.D101]=13;8;IF([.D101]=12;9;IF([.D101]=11;10;IF([.D101]=10;11;IF([.D101]=9;12;IF([.D101]=8;13;IF([.D101]=7;14;IF([.D101]=6;15;IF([.D101]=5;16;IF([.D101]=4;17;IF([.D101]=3;18;IF([.D101]=2;19;IF([.D101]=1;20;0)))))))))))))))))))))" office:value-type="float" office:value="0" calcext:value-type="float">
            <text:p>0</text:p>
          </table:table-cell>
          <table:table-cell table:style-name="ce134"/>
          <table:table-cell table:style-name="ce139" table:formula="of:=IF([.F101]=20;1;IF([.F101]=19;2;IF([.F101]=19;2;IF([.F101]=18;3;IF([.F101]=17;4;IF([.F101]=16;5;IF([.F101]=15;6;IF([.F101]=14;7;IF([.F101]=13;8;IF([.F101]=12;9;IF([.F101]=11;10;IF([.F101]=10;11;IF([.F101]=9;12;IF([.F101]=8;13;IF([.F101]=7;14;IF([.F101]=6;15;IF([.F101]=5;16;IF([.F101]=4;17;IF([.F101]=3;18;IF([.F101]=2;19;IF([.F101]=1;20;0)))))))))))))))))))))" office:value-type="float" office:value="0" calcext:value-type="float">
            <text:p>0</text:p>
          </table:table-cell>
          <table:table-cell table:style-name="ce134"/>
          <table:table-cell table:style-name="ce139" table:formula="of:=IF([.H101]=20;1;IF([.H101]=19;2;IF([.H101]=19;2;IF([.H101]=18;3;IF([.H101]=17;4;IF([.H101]=16;5;IF([.H101]=15;6;IF([.H101]=14;7;IF([.H101]=13;8;IF([.H101]=12;9;IF([.H101]=11;10;IF([.H101]=10;11;IF([.H101]=9;12;IF([.H101]=8;13;IF([.H101]=7;14;IF([.H101]=6;15;IF([.H101]=5;16;IF([.H101]=4;17;IF([.H101]=3;18;IF([.H101]=2;19;IF([.H101]=1;20;0)))))))))))))))))))))" office:value-type="float" office:value="0" calcext:value-type="float">
            <text:p>0</text:p>
          </table:table-cell>
          <table:table-cell table:style-name="ce134"/>
          <table:table-cell table:style-name="ce145" table:formula="of:=IF([.J101]=20;1;IF([.J101]=19;2;IF([.J101]=19;2;IF([.J101]=18;3;IF([.J101]=17;4;IF([.J101]=16;5;IF([.J101]=15;6;IF([.J101]=14;7;IF([.J101]=13;8;IF([.J101]=12;9;IF([.J101]=11;10;IF([.J101]=10;11;IF([.J101]=9;12;IF([.J101]=8;13;IF([.J101]=7;14;IF([.J101]=6;15;IF([.J101]=5;16;IF([.J101]=4;17;IF([.J101]=3;18;IF([.J101]=2;19;IF([.J101]=1;20;0)))))))))))))))))))))" office:value-type="float" office:value="0" calcext:value-type="float">
            <text:p>0</text:p>
          </table:table-cell>
          <table:table-cell table:style-name="ce151"/>
          <table:table-cell table:style-name="ce158" table:formula="of:=SUM([.C101];[.E101];[.G101];[.I101];[.K101])" office:value-type="float" office:value="0" calcext:value-type="float">
            <text:p>0</text:p>
          </table:table-cell>
          <table:table-cell table:style-name="ce160" table:formula="of:=RANK([.M101];[.$M$4:.$M$133])" office:value-type="float" office:value="71" calcext:value-type="float">
            <text:p>71º</text:p>
          </table:table-cell>
          <table:table-cell table:style-name="ce162"/>
          <table:table-cell table:style-name="ce169" office:value-type="string" calcext:value-type="string">
            <text:p>-</text:p>
          </table:table-cell>
          <table:table-cell table:style-name="ce175" office:value-type="float" office:value="6" calcext:value-type="float">
            <text:p>6</text:p>
          </table:table-cell>
          <table:table-cell table:style-name="ce175" office:value-type="string" calcext:value-type="string">
            <text:p>-</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101:.T101])" office:value-type="float" office:value="6" calcext:value-type="float">
            <text:p>6</text:p>
          </table:table-cell>
          <table:table-cell table:style-name="ce189" table:formula="of:=RANK([.U101];[.$U$4:.$U$133])" office:value-type="float" office:value="89" calcext:value-type="float">
            <text:p>89º</text:p>
          </table:table-cell>
          <table:table-cell table:style-name="ce162"/>
          <table:table-cell table:style-name="ce193" table:formula="of:=COUNTIF([.B101];&quot;&gt;0&quot;)+COUNTIF([.D101];&quot;&gt;0&quot;)+COUNTIF([.F101];&quot;&gt;0&quot;)+COUNTIF([.H101];&quot;&gt;0&quot;)+COUNTIF([.J101];&quot;&gt;0&quot;)" office:value-type="float" office:value="1" calcext:value-type="float">
            <text:p>1</text:p>
          </table:table-cell>
          <table:table-cell table:style-name="ce200" table:formula="of:=[.M101]/[.X101]" office:value-type="float" office:value="0" calcext:value-type="float">
            <text:p>0.0</text:p>
          </table:table-cell>
          <table:table-cell table:style-name="ce204" table:formula="of:=RANK([.Y101];[.$Y$4:.$Y$133])" office:value-type="float" office:value="71" calcext:value-type="float">
            <text:p>71º</text:p>
          </table:table-cell>
          <table:table-cell table:style-name="ce208" table:formula="of:=[.U101]/[.X101]" office:value-type="float" office:value="6" calcext:value-type="float">
            <text:p>6.0</text:p>
          </table:table-cell>
          <table:table-cell table:style-name="ce212" table:formula="of:=RANK([.AA101];[.$AA$4:.$AA$133])" office:value-type="float" office:value="36" calcext:value-type="float">
            <text:p>36º</text:p>
          </table:table-cell>
          <table:table-cell table:number-columns-repeated="996"/>
        </table:table-row>
        <table:table-row table:style-name="ro10">
          <table:table-cell table:style-name="ce129" office:value-type="string" calcext:value-type="string">
            <text:p>MAURO ROSA</text:p>
          </table:table-cell>
          <table:table-cell table:style-name="ce134" office:value-type="string" calcext:value-type="string">
            <text:p>-</text:p>
          </table:table-cell>
          <table:table-cell table:style-name="ce139" table:formula="of:=IF([.B102]=20;1;IF([.B102]=19;2;IF([.B102]=19;2;IF([.B102]=18;3;IF([.B102]=17;4;IF([.B102]=16;5;IF([.B102]=15;6;IF([.B102]=14;7;IF([.B102]=13;8;IF([.B102]=12;9;IF([.B102]=11;10;IF([.B102]=10;11;IF([.B102]=9;12;IF([.B102]=8;13;IF([.B102]=7;14;IF([.B102]=6;15;IF([.B102]=5;16;IF([.B102]=4;17;IF([.B102]=3;18;IF([.B102]=2;19;IF([.B102]=1;20;0)))))))))))))))))))))" office:value-type="float" office:value="0" calcext:value-type="float">
            <text:p>0</text:p>
          </table:table-cell>
          <table:table-cell table:style-name="ce134" office:value-type="string" calcext:value-type="string">
            <text:p>-</text:p>
          </table:table-cell>
          <table:table-cell table:style-name="ce139" table:formula="of:=IF([.D102]=20;1;IF([.D102]=19;2;IF([.D102]=19;2;IF([.D102]=18;3;IF([.D102]=17;4;IF([.D102]=16;5;IF([.D102]=15;6;IF([.D102]=14;7;IF([.D102]=13;8;IF([.D102]=12;9;IF([.D102]=11;10;IF([.D102]=10;11;IF([.D102]=9;12;IF([.D102]=8;13;IF([.D102]=7;14;IF([.D102]=6;15;IF([.D102]=5;16;IF([.D102]=4;17;IF([.D102]=3;18;IF([.D102]=2;19;IF([.D102]=1;20;0)))))))))))))))))))))" office:value-type="float" office:value="0" calcext:value-type="float">
            <text:p>0</text:p>
          </table:table-cell>
          <table:table-cell table:style-name="ce134" office:value-type="float" office:value="42" calcext:value-type="float">
            <text:p>42º</text:p>
          </table:table-cell>
          <table:table-cell table:style-name="ce139" table:formula="of:=IF([.F102]=20;1;IF([.F102]=19;2;IF([.F102]=19;2;IF([.F102]=18;3;IF([.F102]=17;4;IF([.F102]=16;5;IF([.F102]=15;6;IF([.F102]=14;7;IF([.F102]=13;8;IF([.F102]=12;9;IF([.F102]=11;10;IF([.F102]=10;11;IF([.F102]=9;12;IF([.F102]=8;13;IF([.F102]=7;14;IF([.F102]=6;15;IF([.F102]=5;16;IF([.F102]=4;17;IF([.F102]=3;18;IF([.F102]=2;19;IF([.F102]=1;20;0)))))))))))))))))))))" office:value-type="float" office:value="0" calcext:value-type="float">
            <text:p>0</text:p>
          </table:table-cell>
          <table:table-cell table:style-name="ce134"/>
          <table:table-cell table:style-name="ce139" table:formula="of:=IF([.H102]=20;1;IF([.H102]=19;2;IF([.H102]=19;2;IF([.H102]=18;3;IF([.H102]=17;4;IF([.H102]=16;5;IF([.H102]=15;6;IF([.H102]=14;7;IF([.H102]=13;8;IF([.H102]=12;9;IF([.H102]=11;10;IF([.H102]=10;11;IF([.H102]=9;12;IF([.H102]=8;13;IF([.H102]=7;14;IF([.H102]=6;15;IF([.H102]=5;16;IF([.H102]=4;17;IF([.H102]=3;18;IF([.H102]=2;19;IF([.H102]=1;20;0)))))))))))))))))))))" office:value-type="float" office:value="0" calcext:value-type="float">
            <text:p>0</text:p>
          </table:table-cell>
          <table:table-cell table:style-name="ce134"/>
          <table:table-cell table:style-name="ce145" table:formula="of:=IF([.J102]=20;1;IF([.J102]=19;2;IF([.J102]=19;2;IF([.J102]=18;3;IF([.J102]=17;4;IF([.J102]=16;5;IF([.J102]=15;6;IF([.J102]=14;7;IF([.J102]=13;8;IF([.J102]=12;9;IF([.J102]=11;10;IF([.J102]=10;11;IF([.J102]=9;12;IF([.J102]=8;13;IF([.J102]=7;14;IF([.J102]=6;15;IF([.J102]=5;16;IF([.J102]=4;17;IF([.J102]=3;18;IF([.J102]=2;19;IF([.J102]=1;20;0)))))))))))))))))))))" office:value-type="float" office:value="0" calcext:value-type="float">
            <text:p>0</text:p>
          </table:table-cell>
          <table:table-cell table:style-name="ce151"/>
          <table:table-cell table:style-name="ce158" table:formula="of:=SUM([.C102];[.E102];[.G102];[.I102];[.K102])" office:value-type="float" office:value="0" calcext:value-type="float">
            <text:p>0</text:p>
          </table:table-cell>
          <table:table-cell table:style-name="ce160" table:formula="of:=RANK([.M102];[.$M$4:.$M$133])" office:value-type="float" office:value="71" calcext:value-type="float">
            <text:p>71º</text:p>
          </table:table-cell>
          <table:table-cell table:style-name="ce162"/>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6" calcext:value-type="float">
            <text:p>6</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102:.T102])" office:value-type="float" office:value="6" calcext:value-type="float">
            <text:p>6</text:p>
          </table:table-cell>
          <table:table-cell table:style-name="ce189" table:formula="of:=RANK([.U102];[.$U$4:.$U$133])" office:value-type="float" office:value="89" calcext:value-type="float">
            <text:p>89º</text:p>
          </table:table-cell>
          <table:table-cell table:style-name="ce162"/>
          <table:table-cell table:style-name="ce193" table:formula="of:=COUNTIF([.B102];&quot;&gt;0&quot;)+COUNTIF([.D102];&quot;&gt;0&quot;)+COUNTIF([.F102];&quot;&gt;0&quot;)+COUNTIF([.H102];&quot;&gt;0&quot;)+COUNTIF([.J102];&quot;&gt;0&quot;)" office:value-type="float" office:value="1" calcext:value-type="float">
            <text:p>1</text:p>
          </table:table-cell>
          <table:table-cell table:style-name="ce200" table:formula="of:=[.M102]/[.X102]" office:value-type="float" office:value="0" calcext:value-type="float">
            <text:p>0.0</text:p>
          </table:table-cell>
          <table:table-cell table:style-name="ce204" table:formula="of:=RANK([.Y102];[.$Y$4:.$Y$133])" office:value-type="float" office:value="71" calcext:value-type="float">
            <text:p>71º</text:p>
          </table:table-cell>
          <table:table-cell table:style-name="ce208" table:formula="of:=[.U102]/[.X102]" office:value-type="float" office:value="6" calcext:value-type="float">
            <text:p>6.0</text:p>
          </table:table-cell>
          <table:table-cell table:style-name="ce212" table:formula="of:=RANK([.AA102];[.$AA$4:.$AA$133])" office:value-type="float" office:value="36" calcext:value-type="float">
            <text:p>36º</text:p>
          </table:table-cell>
          <table:table-cell table:number-columns-repeated="996"/>
        </table:table-row>
        <table:table-row table:style-name="ro10">
          <table:table-cell table:style-name="ce129" office:value-type="string" calcext:value-type="string">
            <text:p>MAYUME </text:p>
          </table:table-cell>
          <table:table-cell table:style-name="ce134" office:value-type="float" office:value="28" calcext:value-type="float">
            <text:p>28º</text:p>
          </table:table-cell>
          <table:table-cell table:style-name="ce139" table:formula="of:=IF([.B103]=20;1;IF([.B103]=19;2;IF([.B103]=19;2;IF([.B103]=18;3;IF([.B103]=17;4;IF([.B103]=16;5;IF([.B103]=15;6;IF([.B103]=14;7;IF([.B103]=13;8;IF([.B103]=12;9;IF([.B103]=11;10;IF([.B103]=10;11;IF([.B103]=9;12;IF([.B103]=8;13;IF([.B103]=7;14;IF([.B103]=6;15;IF([.B103]=5;16;IF([.B103]=4;17;IF([.B103]=3;18;IF([.B103]=2;19;IF([.B103]=1;20;0)))))))))))))))))))))" office:value-type="float" office:value="0" calcext:value-type="float">
            <text:p>0</text:p>
          </table:table-cell>
          <table:table-cell table:style-name="ce134" office:value-type="float" office:value="11" calcext:value-type="float">
            <text:p>11º</text:p>
          </table:table-cell>
          <table:table-cell table:style-name="ce139" table:formula="of:=IF([.D103]=20;1;IF([.D103]=19;2;IF([.D103]=19;2;IF([.D103]=18;3;IF([.D103]=17;4;IF([.D103]=16;5;IF([.D103]=15;6;IF([.D103]=14;7;IF([.D103]=13;8;IF([.D103]=12;9;IF([.D103]=11;10;IF([.D103]=10;11;IF([.D103]=9;12;IF([.D103]=8;13;IF([.D103]=7;14;IF([.D103]=6;15;IF([.D103]=5;16;IF([.D103]=4;17;IF([.D103]=3;18;IF([.D103]=2;19;IF([.D103]=1;20;0)))))))))))))))))))))" office:value-type="float" office:value="10" calcext:value-type="float">
            <text:p>10</text:p>
          </table:table-cell>
          <table:table-cell table:style-name="ce134" office:value-type="float" office:value="60" calcext:value-type="float">
            <text:p>60º</text:p>
          </table:table-cell>
          <table:table-cell table:style-name="ce139" table:formula="of:=IF([.F103]=20;1;IF([.F103]=19;2;IF([.F103]=19;2;IF([.F103]=18;3;IF([.F103]=17;4;IF([.F103]=16;5;IF([.F103]=15;6;IF([.F103]=14;7;IF([.F103]=13;8;IF([.F103]=12;9;IF([.F103]=11;10;IF([.F103]=10;11;IF([.F103]=9;12;IF([.F103]=8;13;IF([.F103]=7;14;IF([.F103]=6;15;IF([.F103]=5;16;IF([.F103]=4;17;IF([.F103]=3;18;IF([.F103]=2;19;IF([.F103]=1;20;0)))))))))))))))))))))" office:value-type="float" office:value="0" calcext:value-type="float">
            <text:p>0</text:p>
          </table:table-cell>
          <table:table-cell table:style-name="ce134" office:value-type="float" office:value="26" calcext:value-type="float">
            <text:p>26º</text:p>
          </table:table-cell>
          <table:table-cell table:style-name="ce139" table:formula="of:=IF([.H103]=20;1;IF([.H103]=19;2;IF([.H103]=19;2;IF([.H103]=18;3;IF([.H103]=17;4;IF([.H103]=16;5;IF([.H103]=15;6;IF([.H103]=14;7;IF([.H103]=13;8;IF([.H103]=12;9;IF([.H103]=11;10;IF([.H103]=10;11;IF([.H103]=9;12;IF([.H103]=8;13;IF([.H103]=7;14;IF([.H103]=6;15;IF([.H103]=5;16;IF([.H103]=4;17;IF([.H103]=3;18;IF([.H103]=2;19;IF([.H103]=1;20;0)))))))))))))))))))))" office:value-type="float" office:value="0" calcext:value-type="float">
            <text:p>0</text:p>
          </table:table-cell>
          <table:table-cell table:style-name="ce134" office:value-type="float" office:value="27" calcext:value-type="float">
            <text:p>27º</text:p>
          </table:table-cell>
          <table:table-cell table:style-name="ce145" table:formula="of:=IF([.J103]=20;1;IF([.J103]=19;2;IF([.J103]=19;2;IF([.J103]=18;3;IF([.J103]=17;4;IF([.J103]=16;5;IF([.J103]=15;6;IF([.J103]=14;7;IF([.J103]=13;8;IF([.J103]=12;9;IF([.J103]=11;10;IF([.J103]=10;11;IF([.J103]=9;12;IF([.J103]=8;13;IF([.J103]=7;14;IF([.J103]=6;15;IF([.J103]=5;16;IF([.J103]=4;17;IF([.J103]=3;18;IF([.J103]=2;19;IF([.J103]=1;20;0)))))))))))))))))))))" office:value-type="float" office:value="0" calcext:value-type="float">
            <text:p>0</text:p>
          </table:table-cell>
          <table:table-cell table:style-name="ce151"/>
          <table:table-cell table:style-name="ce158" table:formula="of:=SUM([.C103];[.E103];[.G103];[.I103];[.K103])" office:value-type="float" office:value="10" calcext:value-type="float">
            <text:p>10</text:p>
          </table:table-cell>
          <table:table-cell table:style-name="ce160" table:formula="of:=RANK([.M103];[.$M$4:.$M$133])" office:value-type="float" office:value="46" calcext:value-type="float">
            <text:p>46º</text:p>
          </table:table-cell>
          <table:table-cell table:style-name="ce162"/>
          <table:table-cell table:style-name="ce169" office:value-type="float" office:value="4" calcext:value-type="float">
            <text:p>4</text:p>
          </table:table-cell>
          <table:table-cell table:style-name="ce175" office:value-type="float" office:value="3" calcext:value-type="float">
            <text:p>3</text:p>
          </table:table-cell>
          <table:table-cell table:style-name="ce175" office:value-type="float" office:value="5" calcext:value-type="float">
            <text:p>5</text:p>
          </table:table-cell>
          <table:table-cell table:style-name="ce180" office:value-type="float" office:value="5" calcext:value-type="float">
            <text:p>5</text:p>
          </table:table-cell>
          <table:table-cell table:style-name="ce185" office:value-type="float" office:value="2" calcext:value-type="float">
            <text:p>2</text:p>
          </table:table-cell>
          <table:table-cell table:style-name="ce188" table:formula="of:=SUM([.P103:.T103])" office:value-type="float" office:value="19" calcext:value-type="float">
            <text:p>19</text:p>
          </table:table-cell>
          <table:table-cell table:style-name="ce189" table:formula="of:=RANK([.U103];[.$U$4:.$U$133])" office:value-type="float" office:value="31" calcext:value-type="float">
            <text:p>31º</text:p>
          </table:table-cell>
          <table:table-cell table:style-name="ce162"/>
          <table:table-cell table:style-name="ce193" table:formula="of:=COUNTIF([.B103];&quot;&gt;0&quot;)+COUNTIF([.D103];&quot;&gt;0&quot;)+COUNTIF([.F103];&quot;&gt;0&quot;)+COUNTIF([.H103];&quot;&gt;0&quot;)+COUNTIF([.J103];&quot;&gt;0&quot;)" office:value-type="float" office:value="5" calcext:value-type="float">
            <text:p>5</text:p>
          </table:table-cell>
          <table:table-cell table:style-name="ce200" table:formula="of:=[.M103]/[.X103]" office:value-type="float" office:value="2" calcext:value-type="float">
            <text:p>2.0</text:p>
          </table:table-cell>
          <table:table-cell table:style-name="ce204" table:formula="of:=RANK([.Y103];[.$Y$4:.$Y$133])" office:value-type="float" office:value="57" calcext:value-type="float">
            <text:p>57º</text:p>
          </table:table-cell>
          <table:table-cell table:style-name="ce208" table:formula="of:=[.U103]/[.X103]" office:value-type="float" office:value="3.8" calcext:value-type="float">
            <text:p>3.8</text:p>
          </table:table-cell>
          <table:table-cell table:style-name="ce212" table:formula="of:=RANK([.AA103];[.$AA$4:.$AA$133])" office:value-type="float" office:value="107" calcext:value-type="float">
            <text:p>107º</text:p>
          </table:table-cell>
          <table:table-cell table:number-columns-repeated="996"/>
        </table:table-row>
        <table:table-row table:style-name="ro10">
          <table:table-cell table:style-name="ce129" office:value-type="string" calcext:value-type="string">
            <text:p>MICHEL</text:p>
          </table:table-cell>
          <table:table-cell table:style-name="ce134" office:value-type="string" calcext:value-type="string">
            <text:p>-</text:p>
          </table:table-cell>
          <table:table-cell table:style-name="ce139" table:formula="of:=IF([.B104]=20;1;IF([.B104]=19;2;IF([.B104]=19;2;IF([.B104]=18;3;IF([.B104]=17;4;IF([.B104]=16;5;IF([.B104]=15;6;IF([.B104]=14;7;IF([.B104]=13;8;IF([.B104]=12;9;IF([.B104]=11;10;IF([.B104]=10;11;IF([.B104]=9;12;IF([.B104]=8;13;IF([.B104]=7;14;IF([.B104]=6;15;IF([.B104]=5;16;IF([.B104]=4;17;IF([.B104]=3;18;IF([.B104]=2;19;IF([.B104]=1;20;0)))))))))))))))))))))" office:value-type="float" office:value="0" calcext:value-type="float">
            <text:p>0</text:p>
          </table:table-cell>
          <table:table-cell table:style-name="ce134" office:value-type="float" office:value="32" calcext:value-type="float">
            <text:p>32º</text:p>
          </table:table-cell>
          <table:table-cell table:style-name="ce139" table:formula="of:=IF([.D104]=20;1;IF([.D104]=19;2;IF([.D104]=19;2;IF([.D104]=18;3;IF([.D104]=17;4;IF([.D104]=16;5;IF([.D104]=15;6;IF([.D104]=14;7;IF([.D104]=13;8;IF([.D104]=12;9;IF([.D104]=11;10;IF([.D104]=10;11;IF([.D104]=9;12;IF([.D104]=8;13;IF([.D104]=7;14;IF([.D104]=6;15;IF([.D104]=5;16;IF([.D104]=4;17;IF([.D104]=3;18;IF([.D104]=2;19;IF([.D104]=1;20;0)))))))))))))))))))))" office:value-type="float" office:value="0" calcext:value-type="float">
            <text:p>0</text:p>
          </table:table-cell>
          <table:table-cell table:style-name="ce134" office:value-type="float" office:value="32" calcext:value-type="float">
            <text:p>32º</text:p>
          </table:table-cell>
          <table:table-cell table:style-name="ce139" table:formula="of:=IF([.F104]=20;1;IF([.F104]=19;2;IF([.F104]=19;2;IF([.F104]=18;3;IF([.F104]=17;4;IF([.F104]=16;5;IF([.F104]=15;6;IF([.F104]=14;7;IF([.F104]=13;8;IF([.F104]=12;9;IF([.F104]=11;10;IF([.F104]=10;11;IF([.F104]=9;12;IF([.F104]=8;13;IF([.F104]=7;14;IF([.F104]=6;15;IF([.F104]=5;16;IF([.F104]=4;17;IF([.F104]=3;18;IF([.F104]=2;19;IF([.F104]=1;20;0)))))))))))))))))))))" office:value-type="float" office:value="0" calcext:value-type="float">
            <text:p>0</text:p>
          </table:table-cell>
          <table:table-cell table:style-name="ce134"/>
          <table:table-cell table:style-name="ce139" table:formula="of:=IF([.H104]=20;1;IF([.H104]=19;2;IF([.H104]=19;2;IF([.H104]=18;3;IF([.H104]=17;4;IF([.H104]=16;5;IF([.H104]=15;6;IF([.H104]=14;7;IF([.H104]=13;8;IF([.H104]=12;9;IF([.H104]=11;10;IF([.H104]=10;11;IF([.H104]=9;12;IF([.H104]=8;13;IF([.H104]=7;14;IF([.H104]=6;15;IF([.H104]=5;16;IF([.H104]=4;17;IF([.H104]=3;18;IF([.H104]=2;19;IF([.H104]=1;20;0)))))))))))))))))))))" office:value-type="float" office:value="0" calcext:value-type="float">
            <text:p>0</text:p>
          </table:table-cell>
          <table:table-cell table:style-name="ce134"/>
          <table:table-cell table:style-name="ce145" table:formula="of:=IF([.J104]=20;1;IF([.J104]=19;2;IF([.J104]=19;2;IF([.J104]=18;3;IF([.J104]=17;4;IF([.J104]=16;5;IF([.J104]=15;6;IF([.J104]=14;7;IF([.J104]=13;8;IF([.J104]=12;9;IF([.J104]=11;10;IF([.J104]=10;11;IF([.J104]=9;12;IF([.J104]=8;13;IF([.J104]=7;14;IF([.J104]=6;15;IF([.J104]=5;16;IF([.J104]=4;17;IF([.J104]=3;18;IF([.J104]=2;19;IF([.J104]=1;20;0)))))))))))))))))))))" office:value-type="float" office:value="0" calcext:value-type="float">
            <text:p>0</text:p>
          </table:table-cell>
          <table:table-cell table:style-name="ce151"/>
          <table:table-cell table:style-name="ce158" table:formula="of:=SUM([.C104];[.E104];[.G104];[.I104];[.K104])" office:value-type="float" office:value="0" calcext:value-type="float">
            <text:p>0</text:p>
          </table:table-cell>
          <table:table-cell table:style-name="ce160" table:formula="of:=RANK([.M104];[.$M$4:.$M$133])" office:value-type="float" office:value="71" calcext:value-type="float">
            <text:p>71º</text:p>
          </table:table-cell>
          <table:table-cell table:style-name="ce162"/>
          <table:table-cell table:style-name="ce172" office:value-type="string" calcext:value-type="string">
            <text:p>-</text:p>
          </table:table-cell>
          <table:table-cell table:style-name="ce175" office:value-type="float" office:value="4" calcext:value-type="float">
            <text:p>4</text:p>
          </table:table-cell>
          <table:table-cell table:style-name="ce175" office:value-type="float" office:value="5" calcext:value-type="float">
            <text:p>5</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104:.T104])" office:value-type="float" office:value="9" calcext:value-type="float">
            <text:p>9</text:p>
          </table:table-cell>
          <table:table-cell table:style-name="ce189" table:formula="of:=RANK([.U104];[.$U$4:.$U$133])" office:value-type="float" office:value="71" calcext:value-type="float">
            <text:p>71º</text:p>
          </table:table-cell>
          <table:table-cell table:style-name="ce162"/>
          <table:table-cell table:style-name="ce193" table:formula="of:=COUNTIF([.B104];&quot;&gt;0&quot;)+COUNTIF([.D104];&quot;&gt;0&quot;)+COUNTIF([.F104];&quot;&gt;0&quot;)+COUNTIF([.H104];&quot;&gt;0&quot;)+COUNTIF([.J104];&quot;&gt;0&quot;)" office:value-type="float" office:value="2" calcext:value-type="float">
            <text:p>2</text:p>
          </table:table-cell>
          <table:table-cell table:style-name="ce200" table:formula="of:=[.M104]/[.X104]" office:value-type="float" office:value="0" calcext:value-type="float">
            <text:p>0.0</text:p>
          </table:table-cell>
          <table:table-cell table:style-name="ce204" table:formula="of:=RANK([.Y104];[.$Y$4:.$Y$133])" office:value-type="float" office:value="71" calcext:value-type="float">
            <text:p>71º</text:p>
          </table:table-cell>
          <table:table-cell table:style-name="ce208" table:formula="of:=[.U104]/[.X104]" office:value-type="float" office:value="4.5" calcext:value-type="float">
            <text:p>4.5</text:p>
          </table:table-cell>
          <table:table-cell table:style-name="ce212" table:formula="of:=RANK([.AA104];[.$AA$4:.$AA$133])" office:value-type="float" office:value="91" calcext:value-type="float">
            <text:p>91º</text:p>
          </table:table-cell>
          <table:table-cell table:number-columns-repeated="996"/>
        </table:table-row>
        <table:table-row table:style-name="ro10">
          <table:table-cell table:style-name="ce129" office:value-type="string" calcext:value-type="string">
            <text:p>MIRIAN</text:p>
          </table:table-cell>
          <table:table-cell table:style-name="ce134" office:value-type="string" calcext:value-type="string">
            <text:p>-</text:p>
          </table:table-cell>
          <table:table-cell table:style-name="ce139" table:formula="of:=IF([.B105]=20;1;IF([.B105]=19;2;IF([.B105]=19;2;IF([.B105]=18;3;IF([.B105]=17;4;IF([.B105]=16;5;IF([.B105]=15;6;IF([.B105]=14;7;IF([.B105]=13;8;IF([.B105]=12;9;IF([.B105]=11;10;IF([.B105]=10;11;IF([.B105]=9;12;IF([.B105]=8;13;IF([.B105]=7;14;IF([.B105]=6;15;IF([.B105]=5;16;IF([.B105]=4;17;IF([.B105]=3;18;IF([.B105]=2;19;IF([.B105]=1;20;0)))))))))))))))))))))" office:value-type="float" office:value="0" calcext:value-type="float">
            <text:p>0</text:p>
          </table:table-cell>
          <table:table-cell table:style-name="ce134" office:value-type="float" office:value="45" calcext:value-type="float">
            <text:p>45º</text:p>
          </table:table-cell>
          <table:table-cell table:style-name="ce139" table:formula="of:=IF([.D105]=20;1;IF([.D105]=19;2;IF([.D105]=19;2;IF([.D105]=18;3;IF([.D105]=17;4;IF([.D105]=16;5;IF([.D105]=15;6;IF([.D105]=14;7;IF([.D105]=13;8;IF([.D105]=12;9;IF([.D105]=11;10;IF([.D105]=10;11;IF([.D105]=9;12;IF([.D105]=8;13;IF([.D105]=7;14;IF([.D105]=6;15;IF([.D105]=5;16;IF([.D105]=4;17;IF([.D105]=3;18;IF([.D105]=2;19;IF([.D105]=1;20;0)))))))))))))))))))))" office:value-type="float" office:value="0" calcext:value-type="float">
            <text:p>0</text:p>
          </table:table-cell>
          <table:table-cell table:style-name="ce134"/>
          <table:table-cell table:style-name="ce139" table:formula="of:=IF([.F105]=20;1;IF([.F105]=19;2;IF([.F105]=19;2;IF([.F105]=18;3;IF([.F105]=17;4;IF([.F105]=16;5;IF([.F105]=15;6;IF([.F105]=14;7;IF([.F105]=13;8;IF([.F105]=12;9;IF([.F105]=11;10;IF([.F105]=10;11;IF([.F105]=9;12;IF([.F105]=8;13;IF([.F105]=7;14;IF([.F105]=6;15;IF([.F105]=5;16;IF([.F105]=4;17;IF([.F105]=3;18;IF([.F105]=2;19;IF([.F105]=1;20;0)))))))))))))))))))))" office:value-type="float" office:value="0" calcext:value-type="float">
            <text:p>0</text:p>
          </table:table-cell>
          <table:table-cell table:style-name="ce134"/>
          <table:table-cell table:style-name="ce139" table:formula="of:=IF([.H105]=20;1;IF([.H105]=19;2;IF([.H105]=19;2;IF([.H105]=18;3;IF([.H105]=17;4;IF([.H105]=16;5;IF([.H105]=15;6;IF([.H105]=14;7;IF([.H105]=13;8;IF([.H105]=12;9;IF([.H105]=11;10;IF([.H105]=10;11;IF([.H105]=9;12;IF([.H105]=8;13;IF([.H105]=7;14;IF([.H105]=6;15;IF([.H105]=5;16;IF([.H105]=4;17;IF([.H105]=3;18;IF([.H105]=2;19;IF([.H105]=1;20;0)))))))))))))))))))))" office:value-type="float" office:value="0" calcext:value-type="float">
            <text:p>0</text:p>
          </table:table-cell>
          <table:table-cell table:style-name="ce134"/>
          <table:table-cell table:style-name="ce145" table:formula="of:=IF([.J105]=20;1;IF([.J105]=19;2;IF([.J105]=19;2;IF([.J105]=18;3;IF([.J105]=17;4;IF([.J105]=16;5;IF([.J105]=15;6;IF([.J105]=14;7;IF([.J105]=13;8;IF([.J105]=12;9;IF([.J105]=11;10;IF([.J105]=10;11;IF([.J105]=9;12;IF([.J105]=8;13;IF([.J105]=7;14;IF([.J105]=6;15;IF([.J105]=5;16;IF([.J105]=4;17;IF([.J105]=3;18;IF([.J105]=2;19;IF([.J105]=1;20;0)))))))))))))))))))))" office:value-type="float" office:value="0" calcext:value-type="float">
            <text:p>0</text:p>
          </table:table-cell>
          <table:table-cell table:style-name="ce151"/>
          <table:table-cell table:style-name="ce158" table:formula="of:=SUM([.C105];[.E105];[.G105];[.I105];[.K105])" office:value-type="float" office:value="0" calcext:value-type="float">
            <text:p>0</text:p>
          </table:table-cell>
          <table:table-cell table:style-name="ce160" table:formula="of:=RANK([.M105];[.$M$4:.$M$133])" office:value-type="float" office:value="71" calcext:value-type="float">
            <text:p>71º</text:p>
          </table:table-cell>
          <table:table-cell table:style-name="ce162"/>
          <table:table-cell table:style-name="ce172" office:value-type="string" calcext:value-type="string">
            <text:p>-</text:p>
          </table:table-cell>
          <table:table-cell table:style-name="ce175" office:value-type="float" office:value="5" calcext:value-type="float">
            <text:p>5</text:p>
          </table:table-cell>
          <table:table-cell table:style-name="ce176" office:value-type="string" calcext:value-type="string">
            <text:p>-</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105:.T105])" office:value-type="float" office:value="5" calcext:value-type="float">
            <text:p>5</text:p>
          </table:table-cell>
          <table:table-cell table:style-name="ce189" table:formula="of:=RANK([.U105];[.$U$4:.$U$133])" office:value-type="float" office:value="102" calcext:value-type="float">
            <text:p>102º</text:p>
          </table:table-cell>
          <table:table-cell table:style-name="ce162"/>
          <table:table-cell table:style-name="ce193" table:formula="of:=COUNTIF([.B105];&quot;&gt;0&quot;)+COUNTIF([.D105];&quot;&gt;0&quot;)+COUNTIF([.F105];&quot;&gt;0&quot;)+COUNTIF([.H105];&quot;&gt;0&quot;)+COUNTIF([.J105];&quot;&gt;0&quot;)" office:value-type="float" office:value="1" calcext:value-type="float">
            <text:p>1</text:p>
          </table:table-cell>
          <table:table-cell table:style-name="ce200" table:formula="of:=[.M105]/[.X105]" office:value-type="float" office:value="0" calcext:value-type="float">
            <text:p>0.0</text:p>
          </table:table-cell>
          <table:table-cell table:style-name="ce204" table:formula="of:=RANK([.Y105];[.$Y$4:.$Y$133])" office:value-type="float" office:value="71" calcext:value-type="float">
            <text:p>71º</text:p>
          </table:table-cell>
          <table:table-cell table:style-name="ce208" table:formula="of:=[.U105]/[.X105]" office:value-type="float" office:value="5" calcext:value-type="float">
            <text:p>5.0</text:p>
          </table:table-cell>
          <table:table-cell table:style-name="ce212" table:formula="of:=RANK([.AA105];[.$AA$4:.$AA$133])" office:value-type="float" office:value="68" calcext:value-type="float">
            <text:p>68º</text:p>
          </table:table-cell>
          <table:table-cell table:number-columns-repeated="996"/>
        </table:table-row>
        <table:table-row table:style-name="ro10">
          <table:table-cell table:style-name="ce129" office:value-type="string" calcext:value-type="string">
            <text:p>THIAGO MOUSE</text:p>
          </table:table-cell>
          <table:table-cell table:style-name="ce134" office:value-type="string" calcext:value-type="string">
            <text:p>-</text:p>
          </table:table-cell>
          <table:table-cell table:style-name="ce139" table:formula="of:=IF([.B106]=20;1;IF([.B106]=19;2;IF([.B106]=19;2;IF([.B106]=18;3;IF([.B106]=17;4;IF([.B106]=16;5;IF([.B106]=15;6;IF([.B106]=14;7;IF([.B106]=13;8;IF([.B106]=12;9;IF([.B106]=11;10;IF([.B106]=10;11;IF([.B106]=9;12;IF([.B106]=8;13;IF([.B106]=7;14;IF([.B106]=6;15;IF([.B106]=5;16;IF([.B106]=4;17;IF([.B106]=3;18;IF([.B106]=2;19;IF([.B106]=1;20;0)))))))))))))))))))))" office:value-type="float" office:value="0" calcext:value-type="float">
            <text:p>0</text:p>
          </table:table-cell>
          <table:table-cell table:style-name="ce134" office:value-type="string" calcext:value-type="string">
            <text:p>-</text:p>
          </table:table-cell>
          <table:table-cell table:style-name="ce139" table:formula="of:=IF([.D106]=20;1;IF([.D106]=19;2;IF([.D106]=19;2;IF([.D106]=18;3;IF([.D106]=17;4;IF([.D106]=16;5;IF([.D106]=15;6;IF([.D106]=14;7;IF([.D106]=13;8;IF([.D106]=12;9;IF([.D106]=11;10;IF([.D106]=10;11;IF([.D106]=9;12;IF([.D106]=8;13;IF([.D106]=7;14;IF([.D106]=6;15;IF([.D106]=5;16;IF([.D106]=4;17;IF([.D106]=3;18;IF([.D106]=2;19;IF([.D106]=1;20;0)))))))))))))))))))))" office:value-type="float" office:value="0" calcext:value-type="float">
            <text:p>0</text:p>
          </table:table-cell>
          <table:table-cell table:style-name="ce134" office:value-type="float" office:value="19" calcext:value-type="float">
            <text:p>19º</text:p>
          </table:table-cell>
          <table:table-cell table:style-name="ce139" table:formula="of:=IF([.F106]=20;1;IF([.F106]=19;2;IF([.F106]=19;2;IF([.F106]=18;3;IF([.F106]=17;4;IF([.F106]=16;5;IF([.F106]=15;6;IF([.F106]=14;7;IF([.F106]=13;8;IF([.F106]=12;9;IF([.F106]=11;10;IF([.F106]=10;11;IF([.F106]=9;12;IF([.F106]=8;13;IF([.F106]=7;14;IF([.F106]=6;15;IF([.F106]=5;16;IF([.F106]=4;17;IF([.F106]=3;18;IF([.F106]=2;19;IF([.F106]=1;20;0)))))))))))))))))))))" office:value-type="float" office:value="2" calcext:value-type="float">
            <text:p>2</text:p>
          </table:table-cell>
          <table:table-cell table:style-name="ce134" office:value-type="float" office:value="61" calcext:value-type="float">
            <text:p>61º</text:p>
          </table:table-cell>
          <table:table-cell table:style-name="ce139" table:formula="of:=IF([.H106]=20;1;IF([.H106]=19;2;IF([.H106]=19;2;IF([.H106]=18;3;IF([.H106]=17;4;IF([.H106]=16;5;IF([.H106]=15;6;IF([.H106]=14;7;IF([.H106]=13;8;IF([.H106]=12;9;IF([.H106]=11;10;IF([.H106]=10;11;IF([.H106]=9;12;IF([.H106]=8;13;IF([.H106]=7;14;IF([.H106]=6;15;IF([.H106]=5;16;IF([.H106]=4;17;IF([.H106]=3;18;IF([.H106]=2;19;IF([.H106]=1;20;0)))))))))))))))))))))" office:value-type="float" office:value="0" calcext:value-type="float">
            <text:p>0</text:p>
          </table:table-cell>
          <table:table-cell table:style-name="ce134" office:value-type="string" calcext:value-type="string">
            <text:p>-</text:p>
          </table:table-cell>
          <table:table-cell table:style-name="ce145" table:formula="of:=IF([.J106]=20;1;IF([.J106]=19;2;IF([.J106]=19;2;IF([.J106]=18;3;IF([.J106]=17;4;IF([.J106]=16;5;IF([.J106]=15;6;IF([.J106]=14;7;IF([.J106]=13;8;IF([.J106]=12;9;IF([.J106]=11;10;IF([.J106]=10;11;IF([.J106]=9;12;IF([.J106]=8;13;IF([.J106]=7;14;IF([.J106]=6;15;IF([.J106]=5;16;IF([.J106]=4;17;IF([.J106]=3;18;IF([.J106]=2;19;IF([.J106]=1;20;0)))))))))))))))))))))" office:value-type="float" office:value="0" calcext:value-type="float">
            <text:p>0</text:p>
          </table:table-cell>
          <table:table-cell table:style-name="ce151"/>
          <table:table-cell table:style-name="ce158" table:formula="of:=SUM([.C106];[.E106];[.G106];[.I106];[.K106])" office:value-type="float" office:value="2" calcext:value-type="float">
            <text:p>2</text:p>
          </table:table-cell>
          <table:table-cell table:style-name="ce160" table:formula="of:=RANK([.M106];[.$M$4:.$M$133])" office:value-type="float" office:value="67" calcext:value-type="float">
            <text:p>67º</text:p>
          </table:table-cell>
          <table:table-cell table:style-name="ce162"/>
          <table:table-cell table:style-name="ce172" office:value-type="string" calcext:value-type="string">
            <text:p>-</text:p>
          </table:table-cell>
          <table:table-cell table:style-name="ce176" office:value-type="string" calcext:value-type="string">
            <text:p>-</text:p>
          </table:table-cell>
          <table:table-cell table:style-name="ce180" office:value-type="float" office:value="6" calcext:value-type="float">
            <text:p>6</text:p>
          </table:table-cell>
          <table:table-cell table:style-name="ce180" office:value-type="float" office:value="7" calcext:value-type="float">
            <text:p>7</text:p>
          </table:table-cell>
          <table:table-cell table:style-name="ce185" office:value-type="float" office:value="3" calcext:value-type="float">
            <text:p>3</text:p>
          </table:table-cell>
          <table:table-cell table:style-name="ce188" table:formula="of:=SUM([.P106:.T106])" office:value-type="float" office:value="16" calcext:value-type="float">
            <text:p>16</text:p>
          </table:table-cell>
          <table:table-cell table:style-name="ce189" table:formula="of:=RANK([.U106];[.$U$4:.$U$133])" office:value-type="float" office:value="44" calcext:value-type="float">
            <text:p>44º</text:p>
          </table:table-cell>
          <table:table-cell table:style-name="ce162"/>
          <table:table-cell table:style-name="ce193" table:formula="of:=COUNTIF([.B106];&quot;&gt;0&quot;)+COUNTIF([.D106];&quot;&gt;0&quot;)+COUNTIF([.F106];&quot;&gt;0&quot;)+COUNTIF([.H106];&quot;&gt;0&quot;)+COUNTIF([.J106];&quot;&gt;0&quot;)" office:value-type="float" office:value="2" calcext:value-type="float">
            <text:p>2</text:p>
          </table:table-cell>
          <table:table-cell table:style-name="ce200" table:formula="of:=[.M106]/[.X106]" office:value-type="float" office:value="1" calcext:value-type="float">
            <text:p>1.0</text:p>
          </table:table-cell>
          <table:table-cell table:style-name="ce204" table:formula="of:=RANK([.Y106];[.$Y$4:.$Y$133])" office:value-type="float" office:value="66" calcext:value-type="float">
            <text:p>66º</text:p>
          </table:table-cell>
          <table:table-cell table:style-name="ce208" table:formula="of:=[.U106]/[.X106]" office:value-type="float" office:value="8" calcext:value-type="float">
            <text:p>8.0</text:p>
          </table:table-cell>
          <table:table-cell table:style-name="ce212" table:formula="of:=RANK([.AA106];[.$AA$4:.$AA$133])" office:value-type="float" office:value="6" calcext:value-type="float">
            <text:p>6º</text:p>
          </table:table-cell>
          <table:table-cell table:number-columns-repeated="996"/>
        </table:table-row>
        <table:table-row table:style-name="ro10">
          <table:table-cell table:style-name="ce129" office:value-type="string" calcext:value-type="string">
            <text:p>NEWTON</text:p>
            <draw:frame table:end-cell-address="'Rk Histórico'.A108" table:end-x="74.24pt" table:end-y="13.49pt" draw:z-index="1" draw:name="image3.png" draw:style-name="gr1" draw:text-style-name="P1" svg:width="14.23pt" svg:height="14.23pt" svg:x="60.01pt" svg:y="17.26pt">
              <draw:image xlink:href="Pictures/10000201000002D0000002D03A56A06C9213C946.png" xlink:type="simple" xlink:show="embed" xlink:actuate="onLoad">
                <text:p/>
              </draw:image>
            </draw:frame>
          </table:table-cell>
          <table:table-cell table:style-name="ce134" office:value-type="string" calcext:value-type="string">
            <text:p>-</text:p>
          </table:table-cell>
          <table:table-cell table:style-name="ce139" table:formula="of:=IF([.B107]=20;1;IF([.B107]=19;2;IF([.B107]=19;2;IF([.B107]=18;3;IF([.B107]=17;4;IF([.B107]=16;5;IF([.B107]=15;6;IF([.B107]=14;7;IF([.B107]=13;8;IF([.B107]=12;9;IF([.B107]=11;10;IF([.B107]=10;11;IF([.B107]=9;12;IF([.B107]=8;13;IF([.B107]=7;14;IF([.B107]=6;15;IF([.B107]=5;16;IF([.B107]=4;17;IF([.B107]=3;18;IF([.B107]=2;19;IF([.B107]=1;20;0)))))))))))))))))))))" office:value-type="float" office:value="0" calcext:value-type="float">
            <text:p>0</text:p>
          </table:table-cell>
          <table:table-cell table:style-name="ce134" office:value-type="float" office:value="36" calcext:value-type="float">
            <text:p>36º</text:p>
          </table:table-cell>
          <table:table-cell table:style-name="ce139" table:formula="of:=IF([.D107]=20;1;IF([.D107]=19;2;IF([.D107]=19;2;IF([.D107]=18;3;IF([.D107]=17;4;IF([.D107]=16;5;IF([.D107]=15;6;IF([.D107]=14;7;IF([.D107]=13;8;IF([.D107]=12;9;IF([.D107]=11;10;IF([.D107]=10;11;IF([.D107]=9;12;IF([.D107]=8;13;IF([.D107]=7;14;IF([.D107]=6;15;IF([.D107]=5;16;IF([.D107]=4;17;IF([.D107]=3;18;IF([.D107]=2;19;IF([.D107]=1;20;0)))))))))))))))))))))" office:value-type="float" office:value="0" calcext:value-type="float">
            <text:p>0</text:p>
          </table:table-cell>
          <table:table-cell table:style-name="ce134"/>
          <table:table-cell table:style-name="ce139" table:formula="of:=IF([.F107]=20;1;IF([.F107]=19;2;IF([.F107]=19;2;IF([.F107]=18;3;IF([.F107]=17;4;IF([.F107]=16;5;IF([.F107]=15;6;IF([.F107]=14;7;IF([.F107]=13;8;IF([.F107]=12;9;IF([.F107]=11;10;IF([.F107]=10;11;IF([.F107]=9;12;IF([.F107]=8;13;IF([.F107]=7;14;IF([.F107]=6;15;IF([.F107]=5;16;IF([.F107]=4;17;IF([.F107]=3;18;IF([.F107]=2;19;IF([.F107]=1;20;0)))))))))))))))))))))" office:value-type="float" office:value="0" calcext:value-type="float">
            <text:p>0</text:p>
          </table:table-cell>
          <table:table-cell table:style-name="ce134"/>
          <table:table-cell table:style-name="ce139" table:formula="of:=IF([.H107]=20;1;IF([.H107]=19;2;IF([.H107]=19;2;IF([.H107]=18;3;IF([.H107]=17;4;IF([.H107]=16;5;IF([.H107]=15;6;IF([.H107]=14;7;IF([.H107]=13;8;IF([.H107]=12;9;IF([.H107]=11;10;IF([.H107]=10;11;IF([.H107]=9;12;IF([.H107]=8;13;IF([.H107]=7;14;IF([.H107]=6;15;IF([.H107]=5;16;IF([.H107]=4;17;IF([.H107]=3;18;IF([.H107]=2;19;IF([.H107]=1;20;0)))))))))))))))))))))" office:value-type="float" office:value="0" calcext:value-type="float">
            <text:p>0</text:p>
          </table:table-cell>
          <table:table-cell table:style-name="ce134"/>
          <table:table-cell table:style-name="ce145" table:formula="of:=IF([.J107]=20;1;IF([.J107]=19;2;IF([.J107]=19;2;IF([.J107]=18;3;IF([.J107]=17;4;IF([.J107]=16;5;IF([.J107]=15;6;IF([.J107]=14;7;IF([.J107]=13;8;IF([.J107]=12;9;IF([.J107]=11;10;IF([.J107]=10;11;IF([.J107]=9;12;IF([.J107]=8;13;IF([.J107]=7;14;IF([.J107]=6;15;IF([.J107]=5;16;IF([.J107]=4;17;IF([.J107]=3;18;IF([.J107]=2;19;IF([.J107]=1;20;0)))))))))))))))))))))" office:value-type="float" office:value="0" calcext:value-type="float">
            <text:p>0</text:p>
          </table:table-cell>
          <table:table-cell table:style-name="ce151"/>
          <table:table-cell table:style-name="ce158" table:formula="of:=SUM([.C107];[.E107];[.G107];[.I107];[.K107])" office:value-type="float" office:value="0" calcext:value-type="float">
            <text:p>0</text:p>
          </table:table-cell>
          <table:table-cell table:style-name="ce160" table:formula="of:=RANK([.M107];[.$M$4:.$M$133])" office:value-type="float" office:value="71" calcext:value-type="float">
            <text:p>71º</text:p>
          </table:table-cell>
          <table:table-cell table:style-name="ce162"/>
          <table:table-cell table:style-name="ce169" office:value-type="string" calcext:value-type="string">
            <text:p>-</text:p>
          </table:table-cell>
          <table:table-cell table:style-name="ce175" office:value-type="float" office:value="6" calcext:value-type="float">
            <text:p>6</text:p>
          </table:table-cell>
          <table:table-cell table:style-name="ce175" office:value-type="string" calcext:value-type="string">
            <text:p>-</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107:.T107])" office:value-type="float" office:value="6" calcext:value-type="float">
            <text:p>6</text:p>
          </table:table-cell>
          <table:table-cell table:style-name="ce189" table:formula="of:=RANK([.U107];[.$U$4:.$U$133])" office:value-type="float" office:value="89" calcext:value-type="float">
            <text:p>89º</text:p>
          </table:table-cell>
          <table:table-cell table:style-name="ce162"/>
          <table:table-cell table:style-name="ce193" table:formula="of:=COUNTIF([.B107];&quot;&gt;0&quot;)+COUNTIF([.D107];&quot;&gt;0&quot;)+COUNTIF([.F107];&quot;&gt;0&quot;)+COUNTIF([.H107];&quot;&gt;0&quot;)+COUNTIF([.J107];&quot;&gt;0&quot;)" office:value-type="float" office:value="1" calcext:value-type="float">
            <text:p>1</text:p>
          </table:table-cell>
          <table:table-cell table:style-name="ce200" table:formula="of:=[.M107]/[.X107]" office:value-type="float" office:value="0" calcext:value-type="float">
            <text:p>0.0</text:p>
          </table:table-cell>
          <table:table-cell table:style-name="ce204" table:formula="of:=RANK([.Y107];[.$Y$4:.$Y$133])" office:value-type="float" office:value="71" calcext:value-type="float">
            <text:p>71º</text:p>
          </table:table-cell>
          <table:table-cell table:style-name="ce208" table:formula="of:=[.U107]/[.X107]" office:value-type="float" office:value="6" calcext:value-type="float">
            <text:p>6.0</text:p>
          </table:table-cell>
          <table:table-cell table:style-name="ce212" table:formula="of:=RANK([.AA107];[.$AA$4:.$AA$133])" office:value-type="float" office:value="36" calcext:value-type="float">
            <text:p>36º</text:p>
          </table:table-cell>
          <table:table-cell table:number-columns-repeated="996"/>
        </table:table-row>
        <table:table-row table:style-name="ro10">
          <table:table-cell table:style-name="ce129" office:value-type="string" calcext:value-type="string">
            <text:p>PABLO</text:p>
          </table:table-cell>
          <table:table-cell table:style-name="ce134" office:value-type="float" office:value="20" calcext:value-type="float">
            <text:p>20º</text:p>
          </table:table-cell>
          <table:table-cell table:style-name="ce139" table:formula="of:=IF([.B108]=20;1;IF([.B108]=19;2;IF([.B108]=19;2;IF([.B108]=18;3;IF([.B108]=17;4;IF([.B108]=16;5;IF([.B108]=15;6;IF([.B108]=14;7;IF([.B108]=13;8;IF([.B108]=12;9;IF([.B108]=11;10;IF([.B108]=10;11;IF([.B108]=9;12;IF([.B108]=8;13;IF([.B108]=7;14;IF([.B108]=6;15;IF([.B108]=5;16;IF([.B108]=4;17;IF([.B108]=3;18;IF([.B108]=2;19;IF([.B108]=1;20;0)))))))))))))))))))))" office:value-type="float" office:value="1" calcext:value-type="float">
            <text:p>1</text:p>
          </table:table-cell>
          <table:table-cell table:style-name="ce134" office:value-type="float" office:value="27" calcext:value-type="float">
            <text:p>27º</text:p>
          </table:table-cell>
          <table:table-cell table:style-name="ce139" table:formula="of:=IF([.D108]=20;1;IF([.D108]=19;2;IF([.D108]=19;2;IF([.D108]=18;3;IF([.D108]=17;4;IF([.D108]=16;5;IF([.D108]=15;6;IF([.D108]=14;7;IF([.D108]=13;8;IF([.D108]=12;9;IF([.D108]=11;10;IF([.D108]=10;11;IF([.D108]=9;12;IF([.D108]=8;13;IF([.D108]=7;14;IF([.D108]=6;15;IF([.D108]=5;16;IF([.D108]=4;17;IF([.D108]=3;18;IF([.D108]=2;19;IF([.D108]=1;20;0)))))))))))))))))))))" office:value-type="float" office:value="0" calcext:value-type="float">
            <text:p>0</text:p>
          </table:table-cell>
          <table:table-cell table:style-name="ce134" office:value-type="float" office:value="1" calcext:value-type="float">
            <text:p>1º</text:p>
          </table:table-cell>
          <table:table-cell table:style-name="ce139" table:formula="of:=IF([.F108]=20;1;IF([.F108]=19;2;IF([.F108]=19;2;IF([.F108]=18;3;IF([.F108]=17;4;IF([.F108]=16;5;IF([.F108]=15;6;IF([.F108]=14;7;IF([.F108]=13;8;IF([.F108]=12;9;IF([.F108]=11;10;IF([.F108]=10;11;IF([.F108]=9;12;IF([.F108]=8;13;IF([.F108]=7;14;IF([.F108]=6;15;IF([.F108]=5;16;IF([.F108]=4;17;IF([.F108]=3;18;IF([.F108]=2;19;IF([.F108]=1;20;0)))))))))))))))))))))" office:value-type="float" office:value="20" calcext:value-type="float">
            <text:p>20</text:p>
          </table:table-cell>
          <table:table-cell table:style-name="ce134" office:value-type="float" office:value="99" calcext:value-type="float">
            <text:p>99º</text:p>
          </table:table-cell>
          <table:table-cell table:style-name="ce139" table:formula="of:=IF([.H108]=20;1;IF([.H108]=19;2;IF([.H108]=19;2;IF([.H108]=18;3;IF([.H108]=17;4;IF([.H108]=16;5;IF([.H108]=15;6;IF([.H108]=14;7;IF([.H108]=13;8;IF([.H108]=12;9;IF([.H108]=11;10;IF([.H108]=10;11;IF([.H108]=9;12;IF([.H108]=8;13;IF([.H108]=7;14;IF([.H108]=6;15;IF([.H108]=5;16;IF([.H108]=4;17;IF([.H108]=3;18;IF([.H108]=2;19;IF([.H108]=1;20;0)))))))))))))))))))))" office:value-type="float" office:value="0" calcext:value-type="float">
            <text:p>0</text:p>
          </table:table-cell>
          <table:table-cell table:style-name="ce134" office:value-type="float" office:value="3" calcext:value-type="float">
            <text:p>3º</text:p>
          </table:table-cell>
          <table:table-cell table:style-name="ce145" table:formula="of:=IF([.J108]=20;1;IF([.J108]=19;2;IF([.J108]=19;2;IF([.J108]=18;3;IF([.J108]=17;4;IF([.J108]=16;5;IF([.J108]=15;6;IF([.J108]=14;7;IF([.J108]=13;8;IF([.J108]=12;9;IF([.J108]=11;10;IF([.J108]=10;11;IF([.J108]=9;12;IF([.J108]=8;13;IF([.J108]=7;14;IF([.J108]=6;15;IF([.J108]=5;16;IF([.J108]=4;17;IF([.J108]=3;18;IF([.J108]=2;19;IF([.J108]=1;20;0)))))))))))))))))))))" office:value-type="float" office:value="18" calcext:value-type="float">
            <text:p>18</text:p>
          </table:table-cell>
          <table:table-cell table:style-name="ce151"/>
          <table:table-cell table:style-name="ce158" table:formula="of:=SUM([.C108];[.E108];[.G108];[.I108];[.K108])" office:value-type="float" office:value="39" calcext:value-type="float">
            <text:p>39</text:p>
          </table:table-cell>
          <table:table-cell table:style-name="ce160" table:formula="of:=RANK([.M108];[.$M$4:.$M$133])" office:value-type="float" office:value="3" calcext:value-type="float">
            <text:p>3º</text:p>
          </table:table-cell>
          <table:table-cell table:style-name="ce162"/>
          <table:table-cell table:style-name="ce169" office:value-type="float" office:value="7" calcext:value-type="float">
            <text:p>7</text:p>
          </table:table-cell>
          <table:table-cell table:style-name="ce175" office:value-type="float" office:value="5" calcext:value-type="float">
            <text:p>5</text:p>
          </table:table-cell>
          <table:table-cell table:style-name="ce175" office:value-type="float" office:value="10" calcext:value-type="float">
            <text:p>10</text:p>
          </table:table-cell>
          <table:table-cell table:style-name="ce180" office:value-type="float" office:value="7" calcext:value-type="float">
            <text:p>7</text:p>
          </table:table-cell>
          <table:table-cell table:style-name="ce185" office:value-type="float" office:value="4" calcext:value-type="float">
            <text:p>4</text:p>
          </table:table-cell>
          <table:table-cell table:style-name="ce188" table:formula="of:=SUM([.P108:.T108])" office:value-type="float" office:value="33" calcext:value-type="float">
            <text:p>33</text:p>
          </table:table-cell>
          <table:table-cell table:style-name="ce189" table:formula="of:=RANK([.U108];[.$U$4:.$U$133])" office:value-type="float" office:value="3" calcext:value-type="float">
            <text:p>3º</text:p>
          </table:table-cell>
          <table:table-cell table:style-name="ce162"/>
          <table:table-cell table:style-name="ce193" table:formula="of:=COUNTIF([.B108];&quot;&gt;0&quot;)+COUNTIF([.D108];&quot;&gt;0&quot;)+COUNTIF([.F108];&quot;&gt;0&quot;)+COUNTIF([.H108];&quot;&gt;0&quot;)+COUNTIF([.J108];&quot;&gt;0&quot;)" office:value-type="float" office:value="5" calcext:value-type="float">
            <text:p>5</text:p>
          </table:table-cell>
          <table:table-cell table:style-name="ce200" table:formula="of:=[.M108]/[.X108]" office:value-type="float" office:value="7.8" calcext:value-type="float">
            <text:p>7.8</text:p>
          </table:table-cell>
          <table:table-cell table:style-name="ce204" table:formula="of:=RANK([.Y108];[.$Y$4:.$Y$133])" office:value-type="float" office:value="12" calcext:value-type="float">
            <text:p>12º</text:p>
          </table:table-cell>
          <table:table-cell table:style-name="ce208" table:formula="of:=[.U108]/[.X108]" office:value-type="float" office:value="6.6" calcext:value-type="float">
            <text:p>6.6</text:p>
          </table:table-cell>
          <table:table-cell table:style-name="ce212" table:formula="of:=RANK([.AA108];[.$AA$4:.$AA$133])" office:value-type="float" office:value="25" calcext:value-type="float">
            <text:p>25º</text:p>
          </table:table-cell>
          <table:table-cell table:number-columns-repeated="996"/>
        </table:table-row>
        <table:table-row table:style-name="ro10">
          <table:table-cell table:style-name="ce129" office:value-type="string" calcext:value-type="string">
            <text:p>PAULINHA</text:p>
          </table:table-cell>
          <table:table-cell table:style-name="ce134" office:value-type="string" calcext:value-type="string">
            <text:p>-</text:p>
          </table:table-cell>
          <table:table-cell table:style-name="ce139" table:formula="of:=IF([.B109]=20;1;IF([.B109]=19;2;IF([.B109]=19;2;IF([.B109]=18;3;IF([.B109]=17;4;IF([.B109]=16;5;IF([.B109]=15;6;IF([.B109]=14;7;IF([.B109]=13;8;IF([.B109]=12;9;IF([.B109]=11;10;IF([.B109]=10;11;IF([.B109]=9;12;IF([.B109]=8;13;IF([.B109]=7;14;IF([.B109]=6;15;IF([.B109]=5;16;IF([.B109]=4;17;IF([.B109]=3;18;IF([.B109]=2;19;IF([.B109]=1;20;0)))))))))))))))))))))" office:value-type="float" office:value="0" calcext:value-type="float">
            <text:p>0</text:p>
          </table:table-cell>
          <table:table-cell table:style-name="ce134" office:value-type="float" office:value="9" calcext:value-type="float">
            <text:p>9º</text:p>
          </table:table-cell>
          <table:table-cell table:style-name="ce139" table:formula="of:=IF([.D109]=20;1;IF([.D109]=19;2;IF([.D109]=19;2;IF([.D109]=18;3;IF([.D109]=17;4;IF([.D109]=16;5;IF([.D109]=15;6;IF([.D109]=14;7;IF([.D109]=13;8;IF([.D109]=12;9;IF([.D109]=11;10;IF([.D109]=10;11;IF([.D109]=9;12;IF([.D109]=8;13;IF([.D109]=7;14;IF([.D109]=6;15;IF([.D109]=5;16;IF([.D109]=4;17;IF([.D109]=3;18;IF([.D109]=2;19;IF([.D109]=1;20;0)))))))))))))))))))))" office:value-type="float" office:value="12" calcext:value-type="float">
            <text:p>12</text:p>
          </table:table-cell>
          <table:table-cell table:style-name="ce134" office:value-type="float" office:value="70" calcext:value-type="float">
            <text:p>70º</text:p>
          </table:table-cell>
          <table:table-cell table:style-name="ce139" table:formula="of:=IF([.F109]=20;1;IF([.F109]=19;2;IF([.F109]=19;2;IF([.F109]=18;3;IF([.F109]=17;4;IF([.F109]=16;5;IF([.F109]=15;6;IF([.F109]=14;7;IF([.F109]=13;8;IF([.F109]=12;9;IF([.F109]=11;10;IF([.F109]=10;11;IF([.F109]=9;12;IF([.F109]=8;13;IF([.F109]=7;14;IF([.F109]=6;15;IF([.F109]=5;16;IF([.F109]=4;17;IF([.F109]=3;18;IF([.F109]=2;19;IF([.F109]=1;20;0)))))))))))))))))))))" office:value-type="float" office:value="0" calcext:value-type="float">
            <text:p>0</text:p>
          </table:table-cell>
          <table:table-cell table:style-name="ce134" office:value-type="float" office:value="101" calcext:value-type="float">
            <text:p>101º</text:p>
          </table:table-cell>
          <table:table-cell table:style-name="ce139" table:formula="of:=IF([.H109]=20;1;IF([.H109]=19;2;IF([.H109]=19;2;IF([.H109]=18;3;IF([.H109]=17;4;IF([.H109]=16;5;IF([.H109]=15;6;IF([.H109]=14;7;IF([.H109]=13;8;IF([.H109]=12;9;IF([.H109]=11;10;IF([.H109]=10;11;IF([.H109]=9;12;IF([.H109]=8;13;IF([.H109]=7;14;IF([.H109]=6;15;IF([.H109]=5;16;IF([.H109]=4;17;IF([.H109]=3;18;IF([.H109]=2;19;IF([.H109]=1;20;0)))))))))))))))))))))" office:value-type="float" office:value="0" calcext:value-type="float">
            <text:p>0</text:p>
          </table:table-cell>
          <table:table-cell table:style-name="ce134" office:value-type="string" calcext:value-type="string">
            <text:p>-</text:p>
          </table:table-cell>
          <table:table-cell table:style-name="ce145" table:formula="of:=IF([.J109]=20;1;IF([.J109]=19;2;IF([.J109]=19;2;IF([.J109]=18;3;IF([.J109]=17;4;IF([.J109]=16;5;IF([.J109]=15;6;IF([.J109]=14;7;IF([.J109]=13;8;IF([.J109]=12;9;IF([.J109]=11;10;IF([.J109]=10;11;IF([.J109]=9;12;IF([.J109]=8;13;IF([.J109]=7;14;IF([.J109]=6;15;IF([.J109]=5;16;IF([.J109]=4;17;IF([.J109]=3;18;IF([.J109]=2;19;IF([.J109]=1;20;0)))))))))))))))))))))" office:value-type="float" office:value="0" calcext:value-type="float">
            <text:p>0</text:p>
          </table:table-cell>
          <table:table-cell table:style-name="ce151"/>
          <table:table-cell table:style-name="ce158" table:formula="of:=SUM([.C109];[.E109];[.G109];[.I109];[.K109])" office:value-type="float" office:value="12" calcext:value-type="float">
            <text:p>12</text:p>
          </table:table-cell>
          <table:table-cell table:style-name="ce160" table:formula="of:=RANK([.M109];[.$M$4:.$M$133])" office:value-type="float" office:value="41" calcext:value-type="float">
            <text:p>41º</text:p>
          </table:table-cell>
          <table:table-cell table:style-name="ce162"/>
          <table:table-cell table:style-name="ce169" office:value-type="string" calcext:value-type="string">
            <text:p>-</text:p>
          </table:table-cell>
          <table:table-cell table:style-name="ce175" office:value-type="float" office:value="7" calcext:value-type="float">
            <text:p>7</text:p>
          </table:table-cell>
          <table:table-cell table:style-name="ce180" office:value-type="float" office:value="6" calcext:value-type="float">
            <text:p>6</text:p>
          </table:table-cell>
          <table:table-cell table:style-name="ce180" office:value-type="float" office:value="4" calcext:value-type="float">
            <text:p>4</text:p>
          </table:table-cell>
          <table:table-cell table:style-name="ce185" office:value-type="string" calcext:value-type="string">
            <text:p>-</text:p>
          </table:table-cell>
          <table:table-cell table:style-name="ce188" table:formula="of:=SUM([.P109:.T109])" office:value-type="float" office:value="17" calcext:value-type="float">
            <text:p>17</text:p>
          </table:table-cell>
          <table:table-cell table:style-name="ce189" table:formula="of:=RANK([.U109];[.$U$4:.$U$133])" office:value-type="float" office:value="38" calcext:value-type="float">
            <text:p>38º</text:p>
          </table:table-cell>
          <table:table-cell table:style-name="ce162"/>
          <table:table-cell table:style-name="ce193" table:formula="of:=COUNTIF([.B109];&quot;&gt;0&quot;)+COUNTIF([.D109];&quot;&gt;0&quot;)+COUNTIF([.F109];&quot;&gt;0&quot;)+COUNTIF([.H109];&quot;&gt;0&quot;)+COUNTIF([.J109];&quot;&gt;0&quot;)" office:value-type="float" office:value="3" calcext:value-type="float">
            <text:p>3</text:p>
          </table:table-cell>
          <table:table-cell table:style-name="ce200" table:formula="of:=[.M109]/[.X109]" office:value-type="float" office:value="4" calcext:value-type="float">
            <text:p>4.0</text:p>
          </table:table-cell>
          <table:table-cell table:style-name="ce204" table:formula="of:=RANK([.Y109];[.$Y$4:.$Y$133])" office:value-type="float" office:value="39" calcext:value-type="float">
            <text:p>39º</text:p>
          </table:table-cell>
          <table:table-cell table:style-name="ce208" table:formula="of:=[.U109]/[.X109]" office:value-type="float" office:value="5.66666666666667" calcext:value-type="float">
            <text:p>5.7</text:p>
          </table:table-cell>
          <table:table-cell table:style-name="ce212" table:formula="of:=RANK([.AA109];[.$AA$4:.$AA$133])" office:value-type="float" office:value="54" calcext:value-type="float">
            <text:p>54º</text:p>
          </table:table-cell>
          <table:table-cell table:number-columns-repeated="996"/>
        </table:table-row>
        <table:table-row table:style-name="ro10">
          <table:table-cell table:style-name="ce129" office:value-type="string" calcext:value-type="string">
            <text:p>PAULO</text:p>
          </table:table-cell>
          <table:table-cell table:style-name="ce134" office:value-type="string" calcext:value-type="string">
            <text:p>-</text:p>
          </table:table-cell>
          <table:table-cell table:style-name="ce139" table:formula="of:=IF([.B110]=20;1;IF([.B110]=19;2;IF([.B110]=19;2;IF([.B110]=18;3;IF([.B110]=17;4;IF([.B110]=16;5;IF([.B110]=15;6;IF([.B110]=14;7;IF([.B110]=13;8;IF([.B110]=12;9;IF([.B110]=11;10;IF([.B110]=10;11;IF([.B110]=9;12;IF([.B110]=8;13;IF([.B110]=7;14;IF([.B110]=6;15;IF([.B110]=5;16;IF([.B110]=4;17;IF([.B110]=3;18;IF([.B110]=2;19;IF([.B110]=1;20;0)))))))))))))))))))))" office:value-type="float" office:value="0" calcext:value-type="float">
            <text:p>0</text:p>
          </table:table-cell>
          <table:table-cell table:style-name="ce134" office:value-type="float" office:value="57" calcext:value-type="float">
            <text:p>57º</text:p>
          </table:table-cell>
          <table:table-cell table:style-name="ce139" table:formula="of:=IF([.D110]=20;1;IF([.D110]=19;2;IF([.D110]=19;2;IF([.D110]=18;3;IF([.D110]=17;4;IF([.D110]=16;5;IF([.D110]=15;6;IF([.D110]=14;7;IF([.D110]=13;8;IF([.D110]=12;9;IF([.D110]=11;10;IF([.D110]=10;11;IF([.D110]=9;12;IF([.D110]=8;13;IF([.D110]=7;14;IF([.D110]=6;15;IF([.D110]=5;16;IF([.D110]=4;17;IF([.D110]=3;18;IF([.D110]=2;19;IF([.D110]=1;20;0)))))))))))))))))))))" office:value-type="float" office:value="0" calcext:value-type="float">
            <text:p>0</text:p>
          </table:table-cell>
          <table:table-cell table:style-name="ce134" office:value-type="float" office:value="35" calcext:value-type="float">
            <text:p>35º</text:p>
          </table:table-cell>
          <table:table-cell table:style-name="ce139" table:formula="of:=IF([.F110]=20;1;IF([.F110]=19;2;IF([.F110]=19;2;IF([.F110]=18;3;IF([.F110]=17;4;IF([.F110]=16;5;IF([.F110]=15;6;IF([.F110]=14;7;IF([.F110]=13;8;IF([.F110]=12;9;IF([.F110]=11;10;IF([.F110]=10;11;IF([.F110]=9;12;IF([.F110]=8;13;IF([.F110]=7;14;IF([.F110]=6;15;IF([.F110]=5;16;IF([.F110]=4;17;IF([.F110]=3;18;IF([.F110]=2;19;IF([.F110]=1;20;0)))))))))))))))))))))" office:value-type="float" office:value="0" calcext:value-type="float">
            <text:p>0</text:p>
          </table:table-cell>
          <table:table-cell table:style-name="ce134" office:value-type="float" office:value="91" calcext:value-type="float">
            <text:p>91º</text:p>
          </table:table-cell>
          <table:table-cell table:style-name="ce139" table:formula="of:=IF([.H110]=20;1;IF([.H110]=19;2;IF([.H110]=19;2;IF([.H110]=18;3;IF([.H110]=17;4;IF([.H110]=16;5;IF([.H110]=15;6;IF([.H110]=14;7;IF([.H110]=13;8;IF([.H110]=12;9;IF([.H110]=11;10;IF([.H110]=10;11;IF([.H110]=9;12;IF([.H110]=8;13;IF([.H110]=7;14;IF([.H110]=6;15;IF([.H110]=5;16;IF([.H110]=4;17;IF([.H110]=3;18;IF([.H110]=2;19;IF([.H110]=1;20;0)))))))))))))))))))))" office:value-type="float" office:value="0" calcext:value-type="float">
            <text:p>0</text:p>
          </table:table-cell>
          <table:table-cell table:style-name="ce134" office:value-type="string" calcext:value-type="string">
            <text:p>-</text:p>
          </table:table-cell>
          <table:table-cell table:style-name="ce145" table:formula="of:=IF([.J110]=20;1;IF([.J110]=19;2;IF([.J110]=19;2;IF([.J110]=18;3;IF([.J110]=17;4;IF([.J110]=16;5;IF([.J110]=15;6;IF([.J110]=14;7;IF([.J110]=13;8;IF([.J110]=12;9;IF([.J110]=11;10;IF([.J110]=10;11;IF([.J110]=9;12;IF([.J110]=8;13;IF([.J110]=7;14;IF([.J110]=6;15;IF([.J110]=5;16;IF([.J110]=4;17;IF([.J110]=3;18;IF([.J110]=2;19;IF([.J110]=1;20;0)))))))))))))))))))))" office:value-type="float" office:value="0" calcext:value-type="float">
            <text:p>0</text:p>
          </table:table-cell>
          <table:table-cell table:style-name="ce151"/>
          <table:table-cell table:style-name="ce158" table:formula="of:=SUM([.C110];[.E110];[.G110];[.I110];[.K110])" office:value-type="float" office:value="0" calcext:value-type="float">
            <text:p>0</text:p>
          </table:table-cell>
          <table:table-cell table:style-name="ce160" table:formula="of:=RANK([.M110];[.$M$4:.$M$133])" office:value-type="float" office:value="71" calcext:value-type="float">
            <text:p>71º</text:p>
          </table:table-cell>
          <table:table-cell table:style-name="ce162"/>
          <table:table-cell table:style-name="ce169" office:value-type="string" calcext:value-type="string">
            <text:p>-</text:p>
          </table:table-cell>
          <table:table-cell table:style-name="ce175" office:value-type="float" office:value="4" calcext:value-type="float">
            <text:p>4</text:p>
          </table:table-cell>
          <table:table-cell table:style-name="ce180" office:value-type="float" office:value="7" calcext:value-type="float">
            <text:p>7</text:p>
          </table:table-cell>
          <table:table-cell table:style-name="ce180" office:value-type="float" office:value="1" calcext:value-type="float">
            <text:p>1</text:p>
          </table:table-cell>
          <table:table-cell table:style-name="ce185" office:value-type="string" calcext:value-type="string">
            <text:p>-</text:p>
          </table:table-cell>
          <table:table-cell table:style-name="ce188" table:formula="of:=SUM([.P110:.T110])" office:value-type="float" office:value="12" calcext:value-type="float">
            <text:p>12</text:p>
          </table:table-cell>
          <table:table-cell table:style-name="ce189" table:formula="of:=RANK([.U110];[.$U$4:.$U$133])" office:value-type="float" office:value="56" calcext:value-type="float">
            <text:p>56º</text:p>
          </table:table-cell>
          <table:table-cell table:style-name="ce162"/>
          <table:table-cell table:style-name="ce193" table:formula="of:=COUNTIF([.B110];&quot;&gt;0&quot;)+COUNTIF([.D110];&quot;&gt;0&quot;)+COUNTIF([.F110];&quot;&gt;0&quot;)+COUNTIF([.H110];&quot;&gt;0&quot;)+COUNTIF([.J110];&quot;&gt;0&quot;)" office:value-type="float" office:value="3" calcext:value-type="float">
            <text:p>3</text:p>
          </table:table-cell>
          <table:table-cell table:style-name="ce200" table:formula="of:=[.M110]/[.X110]" office:value-type="float" office:value="0" calcext:value-type="float">
            <text:p>0.0</text:p>
          </table:table-cell>
          <table:table-cell table:style-name="ce204" table:formula="of:=RANK([.Y110];[.$Y$4:.$Y$133])" office:value-type="float" office:value="71" calcext:value-type="float">
            <text:p>71º</text:p>
          </table:table-cell>
          <table:table-cell table:style-name="ce208" table:formula="of:=[.U110]/[.X110]" office:value-type="float" office:value="4" calcext:value-type="float">
            <text:p>4.0</text:p>
          </table:table-cell>
          <table:table-cell table:style-name="ce212" table:formula="of:=RANK([.AA110];[.$AA$4:.$AA$133])" office:value-type="float" office:value="98" calcext:value-type="float">
            <text:p>98º</text:p>
          </table:table-cell>
          <table:table-cell table:number-columns-repeated="996"/>
        </table:table-row>
        <table:table-row table:style-name="ro10">
          <table:table-cell table:style-name="ce129" office:value-type="string" calcext:value-type="string">
            <text:p>PEDRO BACALTCHUK</text:p>
          </table:table-cell>
          <table:table-cell table:style-name="ce134" office:value-type="string" calcext:value-type="string">
            <text:p>-</text:p>
          </table:table-cell>
          <table:table-cell table:style-name="ce139" table:formula="of:=IF([.B111]=20;1;IF([.B111]=19;2;IF([.B111]=19;2;IF([.B111]=18;3;IF([.B111]=17;4;IF([.B111]=16;5;IF([.B111]=15;6;IF([.B111]=14;7;IF([.B111]=13;8;IF([.B111]=12;9;IF([.B111]=11;10;IF([.B111]=10;11;IF([.B111]=9;12;IF([.B111]=8;13;IF([.B111]=7;14;IF([.B111]=6;15;IF([.B111]=5;16;IF([.B111]=4;17;IF([.B111]=3;18;IF([.B111]=2;19;IF([.B111]=1;20;0)))))))))))))))))))))" office:value-type="float" office:value="0" calcext:value-type="float">
            <text:p>0</text:p>
          </table:table-cell>
          <table:table-cell table:style-name="ce134" office:value-type="string" calcext:value-type="string">
            <text:p>-</text:p>
          </table:table-cell>
          <table:table-cell table:style-name="ce139" table:formula="of:=IF([.D111]=20;1;IF([.D111]=19;2;IF([.D111]=19;2;IF([.D111]=18;3;IF([.D111]=17;4;IF([.D111]=16;5;IF([.D111]=15;6;IF([.D111]=14;7;IF([.D111]=13;8;IF([.D111]=12;9;IF([.D111]=11;10;IF([.D111]=10;11;IF([.D111]=9;12;IF([.D111]=8;13;IF([.D111]=7;14;IF([.D111]=6;15;IF([.D111]=5;16;IF([.D111]=4;17;IF([.D111]=3;18;IF([.D111]=2;19;IF([.D111]=1;20;0)))))))))))))))))))))" office:value-type="float" office:value="0" calcext:value-type="float">
            <text:p>0</text:p>
          </table:table-cell>
          <table:table-cell table:style-name="ce134" office:value-type="string" calcext:value-type="string">
            <text:p>-</text:p>
          </table:table-cell>
          <table:table-cell table:style-name="ce139" table:formula="of:=IF([.F111]=20;1;IF([.F111]=19;2;IF([.F111]=19;2;IF([.F111]=18;3;IF([.F111]=17;4;IF([.F111]=16;5;IF([.F111]=15;6;IF([.F111]=14;7;IF([.F111]=13;8;IF([.F111]=12;9;IF([.F111]=11;10;IF([.F111]=10;11;IF([.F111]=9;12;IF([.F111]=8;13;IF([.F111]=7;14;IF([.F111]=6;15;IF([.F111]=5;16;IF([.F111]=4;17;IF([.F111]=3;18;IF([.F111]=2;19;IF([.F111]=1;20;0)))))))))))))))))))))" office:value-type="float" office:value="0" calcext:value-type="float">
            <text:p>0</text:p>
          </table:table-cell>
          <table:table-cell table:style-name="ce134" office:value-type="float" office:value="93" calcext:value-type="float">
            <text:p>93º</text:p>
          </table:table-cell>
          <table:table-cell table:style-name="ce139" table:formula="of:=IF([.H111]=20;1;IF([.H111]=19;2;IF([.H111]=19;2;IF([.H111]=18;3;IF([.H111]=17;4;IF([.H111]=16;5;IF([.H111]=15;6;IF([.H111]=14;7;IF([.H111]=13;8;IF([.H111]=12;9;IF([.H111]=11;10;IF([.H111]=10;11;IF([.H111]=9;12;IF([.H111]=8;13;IF([.H111]=7;14;IF([.H111]=6;15;IF([.H111]=5;16;IF([.H111]=4;17;IF([.H111]=3;18;IF([.H111]=2;19;IF([.H111]=1;20;0)))))))))))))))))))))" office:value-type="float" office:value="0" calcext:value-type="float">
            <text:p>0</text:p>
          </table:table-cell>
          <table:table-cell table:style-name="ce134" office:value-type="float" office:value="35" calcext:value-type="float">
            <text:p>35º</text:p>
          </table:table-cell>
          <table:table-cell table:style-name="ce145" table:formula="of:=IF([.J111]=20;1;IF([.J111]=19;2;IF([.J111]=19;2;IF([.J111]=18;3;IF([.J111]=17;4;IF([.J111]=16;5;IF([.J111]=15;6;IF([.J111]=14;7;IF([.J111]=13;8;IF([.J111]=12;9;IF([.J111]=11;10;IF([.J111]=10;11;IF([.J111]=9;12;IF([.J111]=8;13;IF([.J111]=7;14;IF([.J111]=6;15;IF([.J111]=5;16;IF([.J111]=4;17;IF([.J111]=3;18;IF([.J111]=2;19;IF([.J111]=1;20;0)))))))))))))))))))))" office:value-type="float" office:value="0" calcext:value-type="float">
            <text:p>0</text:p>
          </table:table-cell>
          <table:table-cell table:style-name="ce151"/>
          <table:table-cell table:style-name="ce158" table:formula="of:=SUM([.C111];[.E111];[.G111];[.I111];[.K111])" office:value-type="float" office:value="0" calcext:value-type="float">
            <text:p>0</text:p>
          </table:table-cell>
          <table:table-cell table:style-name="ce160" table:formula="of:=RANK([.M111];[.$M$4:.$M$133])" office:value-type="float" office:value="71" calcext:value-type="float">
            <text:p>71º</text:p>
          </table:table-cell>
          <table:table-cell table:style-name="ce162"/>
          <table:table-cell table:style-name="ce172" office:value-type="string" calcext:value-type="string">
            <text:p>-</text:p>
          </table:table-cell>
          <table:table-cell table:number-columns-repeated="2" table:style-name="ce176" office:value-type="string" calcext:value-type="string">
            <text:p>-</text:p>
          </table:table-cell>
          <table:table-cell table:style-name="ce180" office:value-type="float" office:value="3" calcext:value-type="float">
            <text:p>3</text:p>
          </table:table-cell>
          <table:table-cell table:style-name="ce185" office:value-type="float" office:value="1" calcext:value-type="float">
            <text:p>1</text:p>
          </table:table-cell>
          <table:table-cell table:style-name="ce188" table:formula="of:=SUM([.P111:.T111])" office:value-type="float" office:value="4" calcext:value-type="float">
            <text:p>4</text:p>
          </table:table-cell>
          <table:table-cell table:style-name="ce189" table:formula="of:=RANK([.U111];[.$U$4:.$U$133])" office:value-type="float" office:value="113" calcext:value-type="float">
            <text:p>113º</text:p>
          </table:table-cell>
          <table:table-cell table:style-name="ce162"/>
          <table:table-cell table:style-name="ce193" table:formula="of:=COUNTIF([.B111];&quot;&gt;0&quot;)+COUNTIF([.D111];&quot;&gt;0&quot;)+COUNTIF([.F111];&quot;&gt;0&quot;)+COUNTIF([.H111];&quot;&gt;0&quot;)+COUNTIF([.J111];&quot;&gt;0&quot;)" office:value-type="float" office:value="2" calcext:value-type="float">
            <text:p>2</text:p>
          </table:table-cell>
          <table:table-cell table:style-name="ce200" table:formula="of:=[.M111]/[.X111]" office:value-type="float" office:value="0" calcext:value-type="float">
            <text:p>0.0</text:p>
          </table:table-cell>
          <table:table-cell table:style-name="ce204" table:formula="of:=RANK([.Y111];[.$Y$4:.$Y$133])" office:value-type="float" office:value="71" calcext:value-type="float">
            <text:p>71º</text:p>
          </table:table-cell>
          <table:table-cell table:style-name="ce208" table:formula="of:=[.U111]/[.X111]" office:value-type="float" office:value="2" calcext:value-type="float">
            <text:p>2.0</text:p>
          </table:table-cell>
          <table:table-cell table:style-name="ce212" table:formula="of:=RANK([.AA111];[.$AA$4:.$AA$133])" office:value-type="float" office:value="121" calcext:value-type="float">
            <text:p>121º</text:p>
          </table:table-cell>
          <table:table-cell table:number-columns-repeated="996"/>
        </table:table-row>
        <table:table-row table:style-name="ro10">
          <table:table-cell table:style-name="ce129" office:value-type="string" calcext:value-type="string">
            <text:p>PEDRO e CORA</text:p>
          </table:table-cell>
          <table:table-cell table:style-name="ce134" office:value-type="string" calcext:value-type="string">
            <text:p>-</text:p>
          </table:table-cell>
          <table:table-cell table:style-name="ce139" table:formula="of:=IF([.B112]=20;1;IF([.B112]=19;2;IF([.B112]=19;2;IF([.B112]=18;3;IF([.B112]=17;4;IF([.B112]=16;5;IF([.B112]=15;6;IF([.B112]=14;7;IF([.B112]=13;8;IF([.B112]=12;9;IF([.B112]=11;10;IF([.B112]=10;11;IF([.B112]=9;12;IF([.B112]=8;13;IF([.B112]=7;14;IF([.B112]=6;15;IF([.B112]=5;16;IF([.B112]=4;17;IF([.B112]=3;18;IF([.B112]=2;19;IF([.B112]=1;20;0)))))))))))))))))))))" office:value-type="float" office:value="0" calcext:value-type="float">
            <text:p>0</text:p>
          </table:table-cell>
          <table:table-cell table:style-name="ce134" office:value-type="string" calcext:value-type="string">
            <text:p>-</text:p>
          </table:table-cell>
          <table:table-cell table:style-name="ce139" table:formula="of:=IF([.D112]=20;1;IF([.D112]=19;2;IF([.D112]=19;2;IF([.D112]=18;3;IF([.D112]=17;4;IF([.D112]=16;5;IF([.D112]=15;6;IF([.D112]=14;7;IF([.D112]=13;8;IF([.D112]=12;9;IF([.D112]=11;10;IF([.D112]=10;11;IF([.D112]=9;12;IF([.D112]=8;13;IF([.D112]=7;14;IF([.D112]=6;15;IF([.D112]=5;16;IF([.D112]=4;17;IF([.D112]=3;18;IF([.D112]=2;19;IF([.D112]=1;20;0)))))))))))))))))))))" office:value-type="float" office:value="0" calcext:value-type="float">
            <text:p>0</text:p>
          </table:table-cell>
          <table:table-cell table:style-name="ce134" office:value-type="float" office:value="68" calcext:value-type="float">
            <text:p>68º</text:p>
          </table:table-cell>
          <table:table-cell table:style-name="ce139" table:formula="of:=IF([.F112]=20;1;IF([.F112]=19;2;IF([.F112]=19;2;IF([.F112]=18;3;IF([.F112]=17;4;IF([.F112]=16;5;IF([.F112]=15;6;IF([.F112]=14;7;IF([.F112]=13;8;IF([.F112]=12;9;IF([.F112]=11;10;IF([.F112]=10;11;IF([.F112]=9;12;IF([.F112]=8;13;IF([.F112]=7;14;IF([.F112]=6;15;IF([.F112]=5;16;IF([.F112]=4;17;IF([.F112]=3;18;IF([.F112]=2;19;IF([.F112]=1;20;0)))))))))))))))))))))" office:value-type="float" office:value="0" calcext:value-type="float">
            <text:p>0</text:p>
          </table:table-cell>
          <table:table-cell table:style-name="ce134" office:value-type="float" office:value="19" calcext:value-type="float">
            <text:p>19º</text:p>
          </table:table-cell>
          <table:table-cell table:style-name="ce139" table:formula="of:=IF([.H112]=20;1;IF([.H112]=19;2;IF([.H112]=19;2;IF([.H112]=18;3;IF([.H112]=17;4;IF([.H112]=16;5;IF([.H112]=15;6;IF([.H112]=14;7;IF([.H112]=13;8;IF([.H112]=12;9;IF([.H112]=11;10;IF([.H112]=10;11;IF([.H112]=9;12;IF([.H112]=8;13;IF([.H112]=7;14;IF([.H112]=6;15;IF([.H112]=5;16;IF([.H112]=4;17;IF([.H112]=3;18;IF([.H112]=2;19;IF([.H112]=1;20;0)))))))))))))))))))))" office:value-type="float" office:value="2" calcext:value-type="float">
            <text:p>2</text:p>
          </table:table-cell>
          <table:table-cell table:style-name="ce134" office:value-type="string" calcext:value-type="string">
            <text:p>-</text:p>
          </table:table-cell>
          <table:table-cell table:style-name="ce145" table:formula="of:=IF([.J112]=20;1;IF([.J112]=19;2;IF([.J112]=19;2;IF([.J112]=18;3;IF([.J112]=17;4;IF([.J112]=16;5;IF([.J112]=15;6;IF([.J112]=14;7;IF([.J112]=13;8;IF([.J112]=12;9;IF([.J112]=11;10;IF([.J112]=10;11;IF([.J112]=9;12;IF([.J112]=8;13;IF([.J112]=7;14;IF([.J112]=6;15;IF([.J112]=5;16;IF([.J112]=4;17;IF([.J112]=3;18;IF([.J112]=2;19;IF([.J112]=1;20;0)))))))))))))))))))))" office:value-type="float" office:value="0" calcext:value-type="float">
            <text:p>0</text:p>
          </table:table-cell>
          <table:table-cell table:style-name="ce151"/>
          <table:table-cell table:style-name="ce158" table:formula="of:=SUM([.C112];[.E112];[.G112];[.I112];[.K112])" office:value-type="float" office:value="2" calcext:value-type="float">
            <text:p>2</text:p>
          </table:table-cell>
          <table:table-cell table:style-name="ce160" table:formula="of:=RANK([.M112];[.$M$4:.$M$133])" office:value-type="float" office:value="67" calcext:value-type="float">
            <text:p>67º</text:p>
          </table:table-cell>
          <table:table-cell table:style-name="ce162"/>
          <table:table-cell table:style-name="ce172" office:value-type="string" calcext:value-type="string">
            <text:p>-</text:p>
          </table:table-cell>
          <table:table-cell table:style-name="ce176" office:value-type="string" calcext:value-type="string">
            <text:p>-</text:p>
          </table:table-cell>
          <table:table-cell table:style-name="ce180" office:value-type="float" office:value="2" calcext:value-type="float">
            <text:p>2</text:p>
          </table:table-cell>
          <table:table-cell table:style-name="ce180" office:value-type="float" office:value="7" calcext:value-type="float">
            <text:p>7</text:p>
          </table:table-cell>
          <table:table-cell table:style-name="ce185" office:value-type="string" calcext:value-type="string">
            <text:p>-</text:p>
          </table:table-cell>
          <table:table-cell table:style-name="ce188" table:formula="of:=SUM([.P112:.T112])" office:value-type="float" office:value="9" calcext:value-type="float">
            <text:p>9</text:p>
          </table:table-cell>
          <table:table-cell table:style-name="ce189" table:formula="of:=RANK([.U112];[.$U$4:.$U$133])" office:value-type="float" office:value="71" calcext:value-type="float">
            <text:p>71º</text:p>
          </table:table-cell>
          <table:table-cell table:style-name="ce162"/>
          <table:table-cell table:style-name="ce193" table:formula="of:=COUNTIF([.B112];&quot;&gt;0&quot;)+COUNTIF([.D112];&quot;&gt;0&quot;)+COUNTIF([.F112];&quot;&gt;0&quot;)+COUNTIF([.H112];&quot;&gt;0&quot;)+COUNTIF([.J112];&quot;&gt;0&quot;)" office:value-type="float" office:value="2" calcext:value-type="float">
            <text:p>2</text:p>
          </table:table-cell>
          <table:table-cell table:style-name="ce200" table:formula="of:=[.M112]/[.X112]" office:value-type="float" office:value="1" calcext:value-type="float">
            <text:p>1.0</text:p>
          </table:table-cell>
          <table:table-cell table:style-name="ce204" table:formula="of:=RANK([.Y112];[.$Y$4:.$Y$133])" office:value-type="float" office:value="66" calcext:value-type="float">
            <text:p>66º</text:p>
          </table:table-cell>
          <table:table-cell table:style-name="ce208" table:formula="of:=[.U112]/[.X112]" office:value-type="float" office:value="4.5" calcext:value-type="float">
            <text:p>4.5</text:p>
          </table:table-cell>
          <table:table-cell table:style-name="ce212" table:formula="of:=RANK([.AA112];[.$AA$4:.$AA$133])" office:value-type="float" office:value="91" calcext:value-type="float">
            <text:p>91º</text:p>
          </table:table-cell>
          <table:table-cell table:number-columns-repeated="996"/>
        </table:table-row>
        <table:table-row table:style-name="ro10">
          <table:table-cell table:style-name="ce129" office:value-type="string" calcext:value-type="string">
            <text:p>PEDRO LUÍS ROSA</text:p>
          </table:table-cell>
          <table:table-cell table:style-name="ce134" office:value-type="string" calcext:value-type="string">
            <text:p>-</text:p>
          </table:table-cell>
          <table:table-cell table:style-name="ce139" table:formula="of:=IF([.B113]=20;1;IF([.B113]=19;2;IF([.B113]=19;2;IF([.B113]=18;3;IF([.B113]=17;4;IF([.B113]=16;5;IF([.B113]=15;6;IF([.B113]=14;7;IF([.B113]=13;8;IF([.B113]=12;9;IF([.B113]=11;10;IF([.B113]=10;11;IF([.B113]=9;12;IF([.B113]=8;13;IF([.B113]=7;14;IF([.B113]=6;15;IF([.B113]=5;16;IF([.B113]=4;17;IF([.B113]=3;18;IF([.B113]=2;19;IF([.B113]=1;20;0)))))))))))))))))))))" office:value-type="float" office:value="0" calcext:value-type="float">
            <text:p>0</text:p>
          </table:table-cell>
          <table:table-cell table:style-name="ce134" office:value-type="string" calcext:value-type="string">
            <text:p>-</text:p>
          </table:table-cell>
          <table:table-cell table:style-name="ce139" table:formula="of:=IF([.D113]=20;1;IF([.D113]=19;2;IF([.D113]=19;2;IF([.D113]=18;3;IF([.D113]=17;4;IF([.D113]=16;5;IF([.D113]=15;6;IF([.D113]=14;7;IF([.D113]=13;8;IF([.D113]=12;9;IF([.D113]=11;10;IF([.D113]=10;11;IF([.D113]=9;12;IF([.D113]=8;13;IF([.D113]=7;14;IF([.D113]=6;15;IF([.D113]=5;16;IF([.D113]=4;17;IF([.D113]=3;18;IF([.D113]=2;19;IF([.D113]=1;20;0)))))))))))))))))))))" office:value-type="float" office:value="0" calcext:value-type="float">
            <text:p>0</text:p>
          </table:table-cell>
          <table:table-cell table:style-name="ce134" office:value-type="string" calcext:value-type="string">
            <text:p>-</text:p>
          </table:table-cell>
          <table:table-cell table:style-name="ce139" table:formula="of:=IF([.F113]=20;1;IF([.F113]=19;2;IF([.F113]=19;2;IF([.F113]=18;3;IF([.F113]=17;4;IF([.F113]=16;5;IF([.F113]=15;6;IF([.F113]=14;7;IF([.F113]=13;8;IF([.F113]=12;9;IF([.F113]=11;10;IF([.F113]=10;11;IF([.F113]=9;12;IF([.F113]=8;13;IF([.F113]=7;14;IF([.F113]=6;15;IF([.F113]=5;16;IF([.F113]=4;17;IF([.F113]=3;18;IF([.F113]=2;19;IF([.F113]=1;20;0)))))))))))))))))))))" office:value-type="float" office:value="0" calcext:value-type="float">
            <text:p>0</text:p>
          </table:table-cell>
          <table:table-cell table:style-name="ce134" office:value-type="float" office:value="46" calcext:value-type="float">
            <text:p>46º</text:p>
          </table:table-cell>
          <table:table-cell table:style-name="ce139" table:formula="of:=IF([.H113]=20;1;IF([.H113]=19;2;IF([.H113]=19;2;IF([.H113]=18;3;IF([.H113]=17;4;IF([.H113]=16;5;IF([.H113]=15;6;IF([.H113]=14;7;IF([.H113]=13;8;IF([.H113]=12;9;IF([.H113]=11;10;IF([.H113]=10;11;IF([.H113]=9;12;IF([.H113]=8;13;IF([.H113]=7;14;IF([.H113]=6;15;IF([.H113]=5;16;IF([.H113]=4;17;IF([.H113]=3;18;IF([.H113]=2;19;IF([.H113]=1;20;0)))))))))))))))))))))" office:value-type="float" office:value="0" calcext:value-type="float">
            <text:p>0</text:p>
          </table:table-cell>
          <table:table-cell table:style-name="ce134" office:value-type="string" calcext:value-type="string">
            <text:p>-</text:p>
          </table:table-cell>
          <table:table-cell table:style-name="ce145" table:formula="of:=IF([.J113]=20;1;IF([.J113]=19;2;IF([.J113]=19;2;IF([.J113]=18;3;IF([.J113]=17;4;IF([.J113]=16;5;IF([.J113]=15;6;IF([.J113]=14;7;IF([.J113]=13;8;IF([.J113]=12;9;IF([.J113]=11;10;IF([.J113]=10;11;IF([.J113]=9;12;IF([.J113]=8;13;IF([.J113]=7;14;IF([.J113]=6;15;IF([.J113]=5;16;IF([.J113]=4;17;IF([.J113]=3;18;IF([.J113]=2;19;IF([.J113]=1;20;0)))))))))))))))))))))" office:value-type="float" office:value="0" calcext:value-type="float">
            <text:p>0</text:p>
          </table:table-cell>
          <table:table-cell table:style-name="ce151"/>
          <table:table-cell table:style-name="ce158" table:formula="of:=SUM([.C113];[.E113];[.G113];[.I113];[.K113])" office:value-type="float" office:value="0" calcext:value-type="float">
            <text:p>0</text:p>
          </table:table-cell>
          <table:table-cell table:style-name="ce160" table:formula="of:=RANK([.M113];[.$M$4:.$M$133])" office:value-type="float" office:value="71" calcext:value-type="float">
            <text:p>71º</text:p>
          </table:table-cell>
          <table:table-cell table:style-name="ce162"/>
          <table:table-cell table:style-name="ce172" office:value-type="string" calcext:value-type="string">
            <text:p>-</text:p>
          </table:table-cell>
          <table:table-cell table:number-columns-repeated="2" table:style-name="ce176" office:value-type="string" calcext:value-type="string">
            <text:p>-</text:p>
          </table:table-cell>
          <table:table-cell table:style-name="ce180" office:value-type="float" office:value="7" calcext:value-type="float">
            <text:p>7</text:p>
          </table:table-cell>
          <table:table-cell table:style-name="ce185" office:value-type="string" calcext:value-type="string">
            <text:p>-</text:p>
          </table:table-cell>
          <table:table-cell table:style-name="ce188" table:formula="of:=SUM([.P113:.T113])" office:value-type="float" office:value="7" calcext:value-type="float">
            <text:p>7</text:p>
          </table:table-cell>
          <table:table-cell table:style-name="ce189" table:formula="of:=RANK([.U113];[.$U$4:.$U$133])" office:value-type="float" office:value="77" calcext:value-type="float">
            <text:p>77º</text:p>
          </table:table-cell>
          <table:table-cell table:style-name="ce162"/>
          <table:table-cell table:style-name="ce193" table:formula="of:=COUNTIF([.B113];&quot;&gt;0&quot;)+COUNTIF([.D113];&quot;&gt;0&quot;)+COUNTIF([.F113];&quot;&gt;0&quot;)+COUNTIF([.H113];&quot;&gt;0&quot;)+COUNTIF([.J113];&quot;&gt;0&quot;)" office:value-type="float" office:value="1" calcext:value-type="float">
            <text:p>1</text:p>
          </table:table-cell>
          <table:table-cell table:style-name="ce200" table:formula="of:=[.M113]/[.X113]" office:value-type="float" office:value="0" calcext:value-type="float">
            <text:p>0.0</text:p>
          </table:table-cell>
          <table:table-cell table:style-name="ce204" table:formula="of:=RANK([.Y113];[.$Y$4:.$Y$133])" office:value-type="float" office:value="71" calcext:value-type="float">
            <text:p>71º</text:p>
          </table:table-cell>
          <table:table-cell table:style-name="ce208" table:formula="of:=[.U113]/[.X113]" office:value-type="float" office:value="7" calcext:value-type="float">
            <text:p>7.0</text:p>
          </table:table-cell>
          <table:table-cell table:style-name="ce212" table:formula="of:=RANK([.AA113];[.$AA$4:.$AA$133])" office:value-type="float" office:value="11" calcext:value-type="float">
            <text:p>11º</text:p>
          </table:table-cell>
          <table:table-cell table:number-columns-repeated="996"/>
        </table:table-row>
        <table:table-row table:style-name="ro10">
          <table:table-cell table:style-name="ce129" office:value-type="string" calcext:value-type="string">
            <text:p>PRISCILA PEREIRA</text:p>
          </table:table-cell>
          <table:table-cell table:style-name="ce134" office:value-type="string" calcext:value-type="string">
            <text:p>-</text:p>
          </table:table-cell>
          <table:table-cell table:style-name="ce139" table:formula="of:=IF([.B114]=20;1;IF([.B114]=19;2;IF([.B114]=19;2;IF([.B114]=18;3;IF([.B114]=17;4;IF([.B114]=16;5;IF([.B114]=15;6;IF([.B114]=14;7;IF([.B114]=13;8;IF([.B114]=12;9;IF([.B114]=11;10;IF([.B114]=10;11;IF([.B114]=9;12;IF([.B114]=8;13;IF([.B114]=7;14;IF([.B114]=6;15;IF([.B114]=5;16;IF([.B114]=4;17;IF([.B114]=3;18;IF([.B114]=2;19;IF([.B114]=1;20;0)))))))))))))))))))))" office:value-type="float" office:value="0" calcext:value-type="float">
            <text:p>0</text:p>
          </table:table-cell>
          <table:table-cell table:style-name="ce134" office:value-type="float" office:value="16" calcext:value-type="float">
            <text:p>16º</text:p>
          </table:table-cell>
          <table:table-cell table:style-name="ce139" table:formula="of:=IF([.D114]=20;1;IF([.D114]=19;2;IF([.D114]=19;2;IF([.D114]=18;3;IF([.D114]=17;4;IF([.D114]=16;5;IF([.D114]=15;6;IF([.D114]=14;7;IF([.D114]=13;8;IF([.D114]=12;9;IF([.D114]=11;10;IF([.D114]=10;11;IF([.D114]=9;12;IF([.D114]=8;13;IF([.D114]=7;14;IF([.D114]=6;15;IF([.D114]=5;16;IF([.D114]=4;17;IF([.D114]=3;18;IF([.D114]=2;19;IF([.D114]=1;20;0)))))))))))))))))))))" office:value-type="float" office:value="5" calcext:value-type="float">
            <text:p>5</text:p>
          </table:table-cell>
          <table:table-cell table:style-name="ce134"/>
          <table:table-cell table:style-name="ce139" table:formula="of:=IF([.F114]=20;1;IF([.F114]=19;2;IF([.F114]=19;2;IF([.F114]=18;3;IF([.F114]=17;4;IF([.F114]=16;5;IF([.F114]=15;6;IF([.F114]=14;7;IF([.F114]=13;8;IF([.F114]=12;9;IF([.F114]=11;10;IF([.F114]=10;11;IF([.F114]=9;12;IF([.F114]=8;13;IF([.F114]=7;14;IF([.F114]=6;15;IF([.F114]=5;16;IF([.F114]=4;17;IF([.F114]=3;18;IF([.F114]=2;19;IF([.F114]=1;20;0)))))))))))))))))))))" office:value-type="float" office:value="0" calcext:value-type="float">
            <text:p>0</text:p>
          </table:table-cell>
          <table:table-cell table:style-name="ce134"/>
          <table:table-cell table:style-name="ce139" table:formula="of:=IF([.H114]=20;1;IF([.H114]=19;2;IF([.H114]=19;2;IF([.H114]=18;3;IF([.H114]=17;4;IF([.H114]=16;5;IF([.H114]=15;6;IF([.H114]=14;7;IF([.H114]=13;8;IF([.H114]=12;9;IF([.H114]=11;10;IF([.H114]=10;11;IF([.H114]=9;12;IF([.H114]=8;13;IF([.H114]=7;14;IF([.H114]=6;15;IF([.H114]=5;16;IF([.H114]=4;17;IF([.H114]=3;18;IF([.H114]=2;19;IF([.H114]=1;20;0)))))))))))))))))))))" office:value-type="float" office:value="0" calcext:value-type="float">
            <text:p>0</text:p>
          </table:table-cell>
          <table:table-cell table:style-name="ce134"/>
          <table:table-cell table:style-name="ce145" table:formula="of:=IF([.J114]=20;1;IF([.J114]=19;2;IF([.J114]=19;2;IF([.J114]=18;3;IF([.J114]=17;4;IF([.J114]=16;5;IF([.J114]=15;6;IF([.J114]=14;7;IF([.J114]=13;8;IF([.J114]=12;9;IF([.J114]=11;10;IF([.J114]=10;11;IF([.J114]=9;12;IF([.J114]=8;13;IF([.J114]=7;14;IF([.J114]=6;15;IF([.J114]=5;16;IF([.J114]=4;17;IF([.J114]=3;18;IF([.J114]=2;19;IF([.J114]=1;20;0)))))))))))))))))))))" office:value-type="float" office:value="0" calcext:value-type="float">
            <text:p>0</text:p>
          </table:table-cell>
          <table:table-cell table:style-name="ce151"/>
          <table:table-cell table:style-name="ce158" table:formula="of:=SUM([.C114];[.E114];[.G114];[.I114];[.K114])" office:value-type="float" office:value="5" calcext:value-type="float">
            <text:p>5</text:p>
          </table:table-cell>
          <table:table-cell table:style-name="ce160" table:formula="of:=RANK([.M114];[.$M$4:.$M$133])" office:value-type="float" office:value="58" calcext:value-type="float">
            <text:p>58º</text:p>
          </table:table-cell>
          <table:table-cell table:style-name="ce162"/>
          <table:table-cell table:style-name="ce172" office:value-type="string" calcext:value-type="string">
            <text:p>-</text:p>
          </table:table-cell>
          <table:table-cell table:style-name="ce175" office:value-type="float" office:value="7" calcext:value-type="float">
            <text:p>7</text:p>
          </table:table-cell>
          <table:table-cell table:style-name="ce176" office:value-type="string" calcext:value-type="string">
            <text:p>-</text:p>
          </table:table-cell>
          <table:table-cell table:style-name="ce180" office:value-type="string" calcext:value-type="string">
            <text:p>-</text:p>
          </table:table-cell>
          <table:table-cell table:style-name="ce185" office:value-type="string" calcext:value-type="string">
            <text:p>-</text:p>
          </table:table-cell>
          <table:table-cell table:style-name="ce188" table:formula="of:=SUM([.P114:.T114])" office:value-type="float" office:value="7" calcext:value-type="float">
            <text:p>7</text:p>
          </table:table-cell>
          <table:table-cell table:style-name="ce189" table:formula="of:=RANK([.U114];[.$U$4:.$U$133])" office:value-type="float" office:value="77" calcext:value-type="float">
            <text:p>77º</text:p>
          </table:table-cell>
          <table:table-cell table:style-name="ce162"/>
          <table:table-cell table:style-name="ce193" table:formula="of:=COUNTIF([.B114];&quot;&gt;0&quot;)+COUNTIF([.D114];&quot;&gt;0&quot;)+COUNTIF([.F114];&quot;&gt;0&quot;)+COUNTIF([.H114];&quot;&gt;0&quot;)+COUNTIF([.J114];&quot;&gt;0&quot;)" office:value-type="float" office:value="1" calcext:value-type="float">
            <text:p>1</text:p>
          </table:table-cell>
          <table:table-cell table:style-name="ce200" table:formula="of:=[.M114]/[.X114]" office:value-type="float" office:value="5" calcext:value-type="float">
            <text:p>5.0</text:p>
          </table:table-cell>
          <table:table-cell table:style-name="ce204" table:formula="of:=RANK([.Y114];[.$Y$4:.$Y$133])" office:value-type="float" office:value="26" calcext:value-type="float">
            <text:p>26º</text:p>
          </table:table-cell>
          <table:table-cell table:style-name="ce208" table:formula="of:=[.U114]/[.X114]" office:value-type="float" office:value="7" calcext:value-type="float">
            <text:p>7.0</text:p>
          </table:table-cell>
          <table:table-cell table:style-name="ce212" table:formula="of:=RANK([.AA114];[.$AA$4:.$AA$133])" office:value-type="float" office:value="11" calcext:value-type="float">
            <text:p>11º</text:p>
          </table:table-cell>
          <table:table-cell table:number-columns-repeated="996"/>
        </table:table-row>
        <table:table-row table:style-name="ro10">
          <table:table-cell table:style-name="ce129" office:value-type="string" calcext:value-type="string">
            <text:p>RAMON </text:p>
          </table:table-cell>
          <table:table-cell table:style-name="ce134" office:value-type="string" calcext:value-type="string">
            <text:p>-</text:p>
          </table:table-cell>
          <table:table-cell table:style-name="ce139" table:formula="of:=IF([.B115]=20;1;IF([.B115]=19;2;IF([.B115]=19;2;IF([.B115]=18;3;IF([.B115]=17;4;IF([.B115]=16;5;IF([.B115]=15;6;IF([.B115]=14;7;IF([.B115]=13;8;IF([.B115]=12;9;IF([.B115]=11;10;IF([.B115]=10;11;IF([.B115]=9;12;IF([.B115]=8;13;IF([.B115]=7;14;IF([.B115]=6;15;IF([.B115]=5;16;IF([.B115]=4;17;IF([.B115]=3;18;IF([.B115]=2;19;IF([.B115]=1;20;0)))))))))))))))))))))" office:value-type="float" office:value="0" calcext:value-type="float">
            <text:p>0</text:p>
          </table:table-cell>
          <table:table-cell table:style-name="ce134" office:value-type="float" office:value="56" calcext:value-type="float">
            <text:p>56º</text:p>
          </table:table-cell>
          <table:table-cell table:style-name="ce139" table:formula="of:=IF([.D115]=20;1;IF([.D115]=19;2;IF([.D115]=19;2;IF([.D115]=18;3;IF([.D115]=17;4;IF([.D115]=16;5;IF([.D115]=15;6;IF([.D115]=14;7;IF([.D115]=13;8;IF([.D115]=12;9;IF([.D115]=11;10;IF([.D115]=10;11;IF([.D115]=9;12;IF([.D115]=8;13;IF([.D115]=7;14;IF([.D115]=6;15;IF([.D115]=5;16;IF([.D115]=4;17;IF([.D115]=3;18;IF([.D115]=2;19;IF([.D115]=1;20;0)))))))))))))))))))))" office:value-type="float" office:value="0" calcext:value-type="float">
            <text:p>0</text:p>
          </table:table-cell>
          <table:table-cell table:style-name="ce134" office:value-type="string" calcext:value-type="string">
            <text:p>-</text:p>
          </table:table-cell>
          <table:table-cell table:style-name="ce139" table:formula="of:=IF([.F115]=20;1;IF([.F115]=19;2;IF([.F115]=19;2;IF([.F115]=18;3;IF([.F115]=17;4;IF([.F115]=16;5;IF([.F115]=15;6;IF([.F115]=14;7;IF([.F115]=13;8;IF([.F115]=12;9;IF([.F115]=11;10;IF([.F115]=10;11;IF([.F115]=9;12;IF([.F115]=8;13;IF([.F115]=7;14;IF([.F115]=6;15;IF([.F115]=5;16;IF([.F115]=4;17;IF([.F115]=3;18;IF([.F115]=2;19;IF([.F115]=1;20;0)))))))))))))))))))))" office:value-type="float" office:value="0" calcext:value-type="float">
            <text:p>0</text:p>
          </table:table-cell>
          <table:table-cell table:style-name="ce134" office:value-type="float" office:value="71" calcext:value-type="float">
            <text:p>71º</text:p>
          </table:table-cell>
          <table:table-cell table:style-name="ce139" table:formula="of:=IF([.H115]=20;1;IF([.H115]=19;2;IF([.H115]=19;2;IF([.H115]=18;3;IF([.H115]=17;4;IF([.H115]=16;5;IF([.H115]=15;6;IF([.H115]=14;7;IF([.H115]=13;8;IF([.H115]=12;9;IF([.H115]=11;10;IF([.H115]=10;11;IF([.H115]=9;12;IF([.H115]=8;13;IF([.H115]=7;14;IF([.H115]=6;15;IF([.H115]=5;16;IF([.H115]=4;17;IF([.H115]=3;18;IF([.H115]=2;19;IF([.H115]=1;20;0)))))))))))))))))))))" office:value-type="float" office:value="0" calcext:value-type="float">
            <text:p>0</text:p>
          </table:table-cell>
          <table:table-cell table:style-name="ce134" office:value-type="string" calcext:value-type="string">
            <text:p>-</text:p>
          </table:table-cell>
          <table:table-cell table:style-name="ce145" table:formula="of:=IF([.J115]=20;1;IF([.J115]=19;2;IF([.J115]=19;2;IF([.J115]=18;3;IF([.J115]=17;4;IF([.J115]=16;5;IF([.J115]=15;6;IF([.J115]=14;7;IF([.J115]=13;8;IF([.J115]=12;9;IF([.J115]=11;10;IF([.J115]=10;11;IF([.J115]=9;12;IF([.J115]=8;13;IF([.J115]=7;14;IF([.J115]=6;15;IF([.J115]=5;16;IF([.J115]=4;17;IF([.J115]=3;18;IF([.J115]=2;19;IF([.J115]=1;20;0)))))))))))))))))))))" office:value-type="float" office:value="0" calcext:value-type="float">
            <text:p>0</text:p>
          </table:table-cell>
          <table:table-cell table:style-name="ce151"/>
          <table:table-cell table:style-name="ce158" table:formula="of:=SUM([.C115];[.E115];[.G115];[.I115];[.K115])" office:value-type="float" office:value="0" calcext:value-type="float">
            <text:p>0</text:p>
          </table:table-cell>
          <table:table-cell table:style-name="ce160" table:formula="of:=RANK([.M115];[.$M$4:.$M$133])" office:value-type="float" office:value="71" calcext:value-type="float">
            <text:p>71º</text:p>
          </table:table-cell>
          <table:table-cell table:style-name="ce162"/>
          <table:table-cell table:style-name="ce172" office:value-type="string" calcext:value-type="string">
            <text:p>-</text:p>
          </table:table-cell>
          <table:table-cell table:style-name="ce175" office:value-type="float" office:value="3" calcext:value-type="float">
            <text:p>3</text:p>
          </table:table-cell>
          <table:table-cell table:style-name="ce176" office:value-type="string" calcext:value-type="string">
            <text:p>-</text:p>
          </table:table-cell>
          <table:table-cell table:style-name="ce180" office:value-type="float" office:value="3" calcext:value-type="float">
            <text:p>3</text:p>
          </table:table-cell>
          <table:table-cell table:style-name="ce185" office:value-type="string" calcext:value-type="string">
            <text:p>-</text:p>
          </table:table-cell>
          <table:table-cell table:style-name="ce188" table:formula="of:=SUM([.P115:.T115])" office:value-type="float" office:value="6" calcext:value-type="float">
            <text:p>6</text:p>
          </table:table-cell>
          <table:table-cell table:style-name="ce189" table:formula="of:=RANK([.U115];[.$U$4:.$U$133])" office:value-type="float" office:value="89" calcext:value-type="float">
            <text:p>89º</text:p>
          </table:table-cell>
          <table:table-cell table:style-name="ce162"/>
          <table:table-cell table:style-name="ce193" table:formula="of:=COUNTIF([.B115];&quot;&gt;0&quot;)+COUNTIF([.D115];&quot;&gt;0&quot;)+COUNTIF([.F115];&quot;&gt;0&quot;)+COUNTIF([.H115];&quot;&gt;0&quot;)+COUNTIF([.J115];&quot;&gt;0&quot;)" office:value-type="float" office:value="2" calcext:value-type="float">
            <text:p>2</text:p>
          </table:table-cell>
          <table:table-cell table:style-name="ce200" table:formula="of:=[.M115]/[.X115]" office:value-type="float" office:value="0" calcext:value-type="float">
            <text:p>0.0</text:p>
          </table:table-cell>
          <table:table-cell table:style-name="ce204" table:formula="of:=RANK([.Y115];[.$Y$4:.$Y$133])" office:value-type="float" office:value="71" calcext:value-type="float">
            <text:p>71º</text:p>
          </table:table-cell>
          <table:table-cell table:style-name="ce208" table:formula="of:=[.U115]/[.X115]" office:value-type="float" office:value="3" calcext:value-type="float">
            <text:p>3.0</text:p>
          </table:table-cell>
          <table:table-cell table:style-name="ce212" table:formula="of:=RANK([.AA115];[.$AA$4:.$AA$133])" office:value-type="float" office:value="113" calcext:value-type="float">
            <text:p>113º</text:p>
          </table:table-cell>
          <table:table-cell table:number-columns-repeated="996"/>
        </table:table-row>
        <table:table-row table:style-name="ro10">
          <table:table-cell table:style-name="ce129" office:value-type="string" calcext:value-type="string">
            <text:p>RENATA</text:p>
          </table:table-cell>
          <table:table-cell table:style-name="ce134" office:value-type="string" calcext:value-type="string">
            <text:p>-</text:p>
          </table:table-cell>
          <table:table-cell table:style-name="ce139" table:formula="of:=IF([.B116]=20;1;IF([.B116]=19;2;IF([.B116]=19;2;IF([.B116]=18;3;IF([.B116]=17;4;IF([.B116]=16;5;IF([.B116]=15;6;IF([.B116]=14;7;IF([.B116]=13;8;IF([.B116]=12;9;IF([.B116]=11;10;IF([.B116]=10;11;IF([.B116]=9;12;IF([.B116]=8;13;IF([.B116]=7;14;IF([.B116]=6;15;IF([.B116]=5;16;IF([.B116]=4;17;IF([.B116]=3;18;IF([.B116]=2;19;IF([.B116]=1;20;0)))))))))))))))))))))" office:value-type="float" office:value="0" calcext:value-type="float">
            <text:p>0</text:p>
          </table:table-cell>
          <table:table-cell table:style-name="ce134" office:value-type="string" calcext:value-type="string">
            <text:p>-</text:p>
          </table:table-cell>
          <table:table-cell table:style-name="ce139" table:formula="of:=IF([.D116]=20;1;IF([.D116]=19;2;IF([.D116]=19;2;IF([.D116]=18;3;IF([.D116]=17;4;IF([.D116]=16;5;IF([.D116]=15;6;IF([.D116]=14;7;IF([.D116]=13;8;IF([.D116]=12;9;IF([.D116]=11;10;IF([.D116]=10;11;IF([.D116]=9;12;IF([.D116]=8;13;IF([.D116]=7;14;IF([.D116]=6;15;IF([.D116]=5;16;IF([.D116]=4;17;IF([.D116]=3;18;IF([.D116]=2;19;IF([.D116]=1;20;0)))))))))))))))))))))" office:value-type="float" office:value="0" calcext:value-type="float">
            <text:p>0</text:p>
          </table:table-cell>
          <table:table-cell table:style-name="ce134" office:value-type="float" office:value="57" calcext:value-type="float">
            <text:p>57º</text:p>
          </table:table-cell>
          <table:table-cell table:style-name="ce139" table:formula="of:=IF([.F116]=20;1;IF([.F116]=19;2;IF([.F116]=19;2;IF([.F116]=18;3;IF([.F116]=17;4;IF([.F116]=16;5;IF([.F116]=15;6;IF([.F116]=14;7;IF([.F116]=13;8;IF([.F116]=12;9;IF([.F116]=11;10;IF([.F116]=10;11;IF([.F116]=9;12;IF([.F116]=8;13;IF([.F116]=7;14;IF([.F116]=6;15;IF([.F116]=5;16;IF([.F116]=4;17;IF([.F116]=3;18;IF([.F116]=2;19;IF([.F116]=1;20;0)))))))))))))))))))))" office:value-type="float" office:value="0" calcext:value-type="float">
            <text:p>0</text:p>
          </table:table-cell>
          <table:table-cell table:style-name="ce134" office:value-type="float" office:value="44" calcext:value-type="float">
            <text:p>44º</text:p>
          </table:table-cell>
          <table:table-cell table:style-name="ce139" table:formula="of:=IF([.H116]=20;1;IF([.H116]=19;2;IF([.H116]=19;2;IF([.H116]=18;3;IF([.H116]=17;4;IF([.H116]=16;5;IF([.H116]=15;6;IF([.H116]=14;7;IF([.H116]=13;8;IF([.H116]=12;9;IF([.H116]=11;10;IF([.H116]=10;11;IF([.H116]=9;12;IF([.H116]=8;13;IF([.H116]=7;14;IF([.H116]=6;15;IF([.H116]=5;16;IF([.H116]=4;17;IF([.H116]=3;18;IF([.H116]=2;19;IF([.H116]=1;20;0)))))))))))))))))))))" office:value-type="float" office:value="0" calcext:value-type="float">
            <text:p>0</text:p>
          </table:table-cell>
          <table:table-cell table:style-name="ce134" office:value-type="float" office:value="7" calcext:value-type="float">
            <text:p>7º</text:p>
          </table:table-cell>
          <table:table-cell table:style-name="ce145" table:formula="of:=IF([.J116]=20;1;IF([.J116]=19;2;IF([.J116]=19;2;IF([.J116]=18;3;IF([.J116]=17;4;IF([.J116]=16;5;IF([.J116]=15;6;IF([.J116]=14;7;IF([.J116]=13;8;IF([.J116]=12;9;IF([.J116]=11;10;IF([.J116]=10;11;IF([.J116]=9;12;IF([.J116]=8;13;IF([.J116]=7;14;IF([.J116]=6;15;IF([.J116]=5;16;IF([.J116]=4;17;IF([.J116]=3;18;IF([.J116]=2;19;IF([.J116]=1;20;0)))))))))))))))))))))" office:value-type="float" office:value="14" calcext:value-type="float">
            <text:p>14</text:p>
          </table:table-cell>
          <table:table-cell table:style-name="ce151"/>
          <table:table-cell table:style-name="ce158" table:formula="of:=SUM([.C116];[.E116];[.G116];[.I116];[.K116])" office:value-type="float" office:value="14" calcext:value-type="float">
            <text:p>14</text:p>
          </table:table-cell>
          <table:table-cell table:style-name="ce160" table:formula="of:=RANK([.M116];[.$M$4:.$M$133])" office:value-type="float" office:value="37" calcext:value-type="float">
            <text:p>37º</text:p>
          </table:table-cell>
          <table:table-cell table:style-name="ce162"/>
          <table:table-cell table:style-name="ce172" office:value-type="string" calcext:value-type="string">
            <text:p>-</text:p>
          </table:table-cell>
          <table:table-cell table:style-name="ce176" office:value-type="string" calcext:value-type="string">
            <text:p>-</text:p>
          </table:table-cell>
          <table:table-cell table:style-name="ce180" office:value-type="float" office:value="3" calcext:value-type="float">
            <text:p>3</text:p>
          </table:table-cell>
          <table:table-cell table:style-name="ce180" office:value-type="float" office:value="8" calcext:value-type="float">
            <text:p>8</text:p>
          </table:table-cell>
          <table:table-cell table:style-name="ce185" office:value-type="float" office:value="7" calcext:value-type="float">
            <text:p>7</text:p>
          </table:table-cell>
          <table:table-cell table:style-name="ce188" table:formula="of:=SUM([.P116:.T116])" office:value-type="float" office:value="18" calcext:value-type="float">
            <text:p>18</text:p>
          </table:table-cell>
          <table:table-cell table:style-name="ce189" table:formula="of:=RANK([.U116];[.$U$4:.$U$133])" office:value-type="float" office:value="34" calcext:value-type="float">
            <text:p>34º</text:p>
          </table:table-cell>
          <table:table-cell table:style-name="ce162"/>
          <table:table-cell table:style-name="ce193" table:formula="of:=COUNTIF([.B116];&quot;&gt;0&quot;)+COUNTIF([.D116];&quot;&gt;0&quot;)+COUNTIF([.F116];&quot;&gt;0&quot;)+COUNTIF([.H116];&quot;&gt;0&quot;)+COUNTIF([.J116];&quot;&gt;0&quot;)" office:value-type="float" office:value="3" calcext:value-type="float">
            <text:p>3</text:p>
          </table:table-cell>
          <table:table-cell table:style-name="ce200" table:formula="of:=[.M116]/[.X116]" office:value-type="float" office:value="4.66666666666667" calcext:value-type="float">
            <text:p>4.7</text:p>
          </table:table-cell>
          <table:table-cell table:style-name="ce204" table:formula="of:=RANK([.Y116];[.$Y$4:.$Y$133])" office:value-type="float" office:value="33" calcext:value-type="float">
            <text:p>33º</text:p>
          </table:table-cell>
          <table:table-cell table:style-name="ce208" table:formula="of:=[.U116]/[.X116]" office:value-type="float" office:value="6" calcext:value-type="float">
            <text:p>6.0</text:p>
          </table:table-cell>
          <table:table-cell table:style-name="ce212" table:formula="of:=RANK([.AA116];[.$AA$4:.$AA$133])" office:value-type="float" office:value="36" calcext:value-type="float">
            <text:p>36º</text:p>
          </table:table-cell>
          <table:table-cell table:number-columns-repeated="996"/>
        </table:table-row>
        <table:table-row table:style-name="ro10">
          <table:table-cell table:style-name="ce129" office:value-type="string" calcext:value-type="string">
            <text:p>RICARDO </text:p>
          </table:table-cell>
          <table:table-cell table:style-name="ce134" office:value-type="float" office:value="15" calcext:value-type="float">
            <text:p>15º</text:p>
          </table:table-cell>
          <table:table-cell table:style-name="ce139" table:formula="of:=IF([.B117]=20;1;IF([.B117]=19;2;IF([.B117]=19;2;IF([.B117]=18;3;IF([.B117]=17;4;IF([.B117]=16;5;IF([.B117]=15;6;IF([.B117]=14;7;IF([.B117]=13;8;IF([.B117]=12;9;IF([.B117]=11;10;IF([.B117]=10;11;IF([.B117]=9;12;IF([.B117]=8;13;IF([.B117]=7;14;IF([.B117]=6;15;IF([.B117]=5;16;IF([.B117]=4;17;IF([.B117]=3;18;IF([.B117]=2;19;IF([.B117]=1;20;0)))))))))))))))))))))" office:value-type="float" office:value="6" calcext:value-type="float">
            <text:p>6</text:p>
          </table:table-cell>
          <table:table-cell table:style-name="ce134" office:value-type="float" office:value="42" calcext:value-type="float">
            <text:p>42º</text:p>
          </table:table-cell>
          <table:table-cell table:style-name="ce139" table:formula="of:=IF([.D117]=20;1;IF([.D117]=19;2;IF([.D117]=19;2;IF([.D117]=18;3;IF([.D117]=17;4;IF([.D117]=16;5;IF([.D117]=15;6;IF([.D117]=14;7;IF([.D117]=13;8;IF([.D117]=12;9;IF([.D117]=11;10;IF([.D117]=10;11;IF([.D117]=9;12;IF([.D117]=8;13;IF([.D117]=7;14;IF([.D117]=6;15;IF([.D117]=5;16;IF([.D117]=4;17;IF([.D117]=3;18;IF([.D117]=2;19;IF([.D117]=1;20;0)))))))))))))))))))))" office:value-type="float" office:value="0" calcext:value-type="float">
            <text:p>0</text:p>
          </table:table-cell>
          <table:table-cell table:style-name="ce134" office:value-type="string" calcext:value-type="string">
            <text:p>-</text:p>
          </table:table-cell>
          <table:table-cell table:style-name="ce139" table:formula="of:=IF([.F117]=20;1;IF([.F117]=19;2;IF([.F117]=19;2;IF([.F117]=18;3;IF([.F117]=17;4;IF([.F117]=16;5;IF([.F117]=15;6;IF([.F117]=14;7;IF([.F117]=13;8;IF([.F117]=12;9;IF([.F117]=11;10;IF([.F117]=10;11;IF([.F117]=9;12;IF([.F117]=8;13;IF([.F117]=7;14;IF([.F117]=6;15;IF([.F117]=5;16;IF([.F117]=4;17;IF([.F117]=3;18;IF([.F117]=2;19;IF([.F117]=1;20;0)))))))))))))))))))))" office:value-type="float" office:value="0" calcext:value-type="float">
            <text:p>0</text:p>
          </table:table-cell>
          <table:table-cell table:style-name="ce134" office:value-type="float" office:value="77" calcext:value-type="float">
            <text:p>77º</text:p>
          </table:table-cell>
          <table:table-cell table:style-name="ce139" table:formula="of:=IF([.H117]=20;1;IF([.H117]=19;2;IF([.H117]=19;2;IF([.H117]=18;3;IF([.H117]=17;4;IF([.H117]=16;5;IF([.H117]=15;6;IF([.H117]=14;7;IF([.H117]=13;8;IF([.H117]=12;9;IF([.H117]=11;10;IF([.H117]=10;11;IF([.H117]=9;12;IF([.H117]=8;13;IF([.H117]=7;14;IF([.H117]=6;15;IF([.H117]=5;16;IF([.H117]=4;17;IF([.H117]=3;18;IF([.H117]=2;19;IF([.H117]=1;20;0)))))))))))))))))))))" office:value-type="float" office:value="0" calcext:value-type="float">
            <text:p>0</text:p>
          </table:table-cell>
          <table:table-cell table:style-name="ce134" office:value-type="string" calcext:value-type="string">
            <text:p>-</text:p>
          </table:table-cell>
          <table:table-cell table:style-name="ce145" table:formula="of:=IF([.J117]=20;1;IF([.J117]=19;2;IF([.J117]=19;2;IF([.J117]=18;3;IF([.J117]=17;4;IF([.J117]=16;5;IF([.J117]=15;6;IF([.J117]=14;7;IF([.J117]=13;8;IF([.J117]=12;9;IF([.J117]=11;10;IF([.J117]=10;11;IF([.J117]=9;12;IF([.J117]=8;13;IF([.J117]=7;14;IF([.J117]=6;15;IF([.J117]=5;16;IF([.J117]=4;17;IF([.J117]=3;18;IF([.J117]=2;19;IF([.J117]=1;20;0)))))))))))))))))))))" office:value-type="float" office:value="0" calcext:value-type="float">
            <text:p>0</text:p>
          </table:table-cell>
          <table:table-cell table:style-name="ce151"/>
          <table:table-cell table:style-name="ce158" table:formula="of:=SUM([.C117];[.E117];[.G117];[.I117];[.K117])" office:value-type="float" office:value="6" calcext:value-type="float">
            <text:p>6</text:p>
          </table:table-cell>
          <table:table-cell table:style-name="ce160" table:formula="of:=RANK([.M117];[.$M$4:.$M$133])" office:value-type="float" office:value="56" calcext:value-type="float">
            <text:p>56º</text:p>
          </table:table-cell>
          <table:table-cell table:style-name="ce162"/>
          <table:table-cell table:style-name="ce172" office:value-type="string" calcext:value-type="string">
            <text:p>-</text:p>
          </table:table-cell>
          <table:table-cell table:number-columns-repeated="2" table:style-name="ce176" office:value-type="string" calcext:value-type="string">
            <text:p>-</text:p>
          </table:table-cell>
          <table:table-cell table:style-name="ce180" office:value-type="float" office:value="6" calcext:value-type="float">
            <text:p>6</text:p>
          </table:table-cell>
          <table:table-cell table:style-name="ce185" office:value-type="string" calcext:value-type="string">
            <text:p>-</text:p>
          </table:table-cell>
          <table:table-cell table:style-name="ce188" table:formula="of:=SUM([.P117:.T117])" office:value-type="float" office:value="6" calcext:value-type="float">
            <text:p>6</text:p>
          </table:table-cell>
          <table:table-cell table:style-name="ce189" table:formula="of:=RANK([.U117];[.$U$4:.$U$133])" office:value-type="float" office:value="89" calcext:value-type="float">
            <text:p>89º</text:p>
          </table:table-cell>
          <table:table-cell table:style-name="ce162"/>
          <table:table-cell table:style-name="ce193" table:formula="of:=COUNTIF([.B117];&quot;&gt;0&quot;)+COUNTIF([.D117];&quot;&gt;0&quot;)+COUNTIF([.F117];&quot;&gt;0&quot;)+COUNTIF([.H117];&quot;&gt;0&quot;)+COUNTIF([.J117];&quot;&gt;0&quot;)" office:value-type="float" office:value="3" calcext:value-type="float">
            <text:p>3</text:p>
          </table:table-cell>
          <table:table-cell table:style-name="ce200" table:formula="of:=[.M117]/[.X117]" office:value-type="float" office:value="2" calcext:value-type="float">
            <text:p>2.0</text:p>
          </table:table-cell>
          <table:table-cell table:style-name="ce204" table:formula="of:=RANK([.Y117];[.$Y$4:.$Y$133])" office:value-type="float" office:value="57" calcext:value-type="float">
            <text:p>57º</text:p>
          </table:table-cell>
          <table:table-cell table:style-name="ce208" table:formula="of:=[.U117]/[.X117]" office:value-type="float" office:value="2" calcext:value-type="float">
            <text:p>2.0</text:p>
          </table:table-cell>
          <table:table-cell table:style-name="ce212" table:formula="of:=RANK([.AA117];[.$AA$4:.$AA$133])" office:value-type="float" office:value="121" calcext:value-type="float">
            <text:p>121º</text:p>
          </table:table-cell>
          <table:table-cell table:number-columns-repeated="996"/>
        </table:table-row>
        <table:table-row table:style-name="ro10">
          <table:table-cell table:style-name="ce129" office:value-type="string" calcext:value-type="string">
            <text:p>ROBERSON</text:p>
          </table:table-cell>
          <table:table-cell table:style-name="ce134" office:value-type="string" calcext:value-type="string">
            <text:p>-</text:p>
          </table:table-cell>
          <table:table-cell table:style-name="ce139" table:formula="of:=IF([.B118]=20;1;IF([.B118]=19;2;IF([.B118]=19;2;IF([.B118]=18;3;IF([.B118]=17;4;IF([.B118]=16;5;IF([.B118]=15;6;IF([.B118]=14;7;IF([.B118]=13;8;IF([.B118]=12;9;IF([.B118]=11;10;IF([.B118]=10;11;IF([.B118]=9;12;IF([.B118]=8;13;IF([.B118]=7;14;IF([.B118]=6;15;IF([.B118]=5;16;IF([.B118]=4;17;IF([.B118]=3;18;IF([.B118]=2;19;IF([.B118]=1;20;0)))))))))))))))))))))" office:value-type="float" office:value="0" calcext:value-type="float">
            <text:p>0</text:p>
          </table:table-cell>
          <table:table-cell table:style-name="ce134" office:value-type="float" office:value="36" calcext:value-type="float">
            <text:p>36º</text:p>
          </table:table-cell>
          <table:table-cell table:style-name="ce139" table:formula="of:=IF([.D118]=20;1;IF([.D118]=19;2;IF([.D118]=19;2;IF([.D118]=18;3;IF([.D118]=17;4;IF([.D118]=16;5;IF([.D118]=15;6;IF([.D118]=14;7;IF([.D118]=13;8;IF([.D118]=12;9;IF([.D118]=11;10;IF([.D118]=10;11;IF([.D118]=9;12;IF([.D118]=8;13;IF([.D118]=7;14;IF([.D118]=6;15;IF([.D118]=5;16;IF([.D118]=4;17;IF([.D118]=3;18;IF([.D118]=2;19;IF([.D118]=1;20;0)))))))))))))))))))))" office:value-type="float" office:value="0" calcext:value-type="float">
            <text:p>0</text:p>
          </table:table-cell>
          <table:table-cell table:style-name="ce134" office:value-type="float" office:value="8" calcext:value-type="float">
            <text:p>8º</text:p>
          </table:table-cell>
          <table:table-cell table:style-name="ce139" table:formula="of:=IF([.F118]=20;1;IF([.F118]=19;2;IF([.F118]=19;2;IF([.F118]=18;3;IF([.F118]=17;4;IF([.F118]=16;5;IF([.F118]=15;6;IF([.F118]=14;7;IF([.F118]=13;8;IF([.F118]=12;9;IF([.F118]=11;10;IF([.F118]=10;11;IF([.F118]=9;12;IF([.F118]=8;13;IF([.F118]=7;14;IF([.F118]=6;15;IF([.F118]=5;16;IF([.F118]=4;17;IF([.F118]=3;18;IF([.F118]=2;19;IF([.F118]=1;20;0)))))))))))))))))))))" office:value-type="float" office:value="13" calcext:value-type="float">
            <text:p>13</text:p>
          </table:table-cell>
          <table:table-cell table:style-name="ce134" office:value-type="float" office:value="37" calcext:value-type="float">
            <text:p>37º</text:p>
          </table:table-cell>
          <table:table-cell table:style-name="ce139" table:formula="of:=IF([.H118]=20;1;IF([.H118]=19;2;IF([.H118]=19;2;IF([.H118]=18;3;IF([.H118]=17;4;IF([.H118]=16;5;IF([.H118]=15;6;IF([.H118]=14;7;IF([.H118]=13;8;IF([.H118]=12;9;IF([.H118]=11;10;IF([.H118]=10;11;IF([.H118]=9;12;IF([.H118]=8;13;IF([.H118]=7;14;IF([.H118]=6;15;IF([.H118]=5;16;IF([.H118]=4;17;IF([.H118]=3;18;IF([.H118]=2;19;IF([.H118]=1;20;0)))))))))))))))))))))" office:value-type="float" office:value="0" calcext:value-type="float">
            <text:p>0</text:p>
          </table:table-cell>
          <table:table-cell table:style-name="ce134" office:value-type="string" calcext:value-type="string">
            <text:p>-</text:p>
          </table:table-cell>
          <table:table-cell table:style-name="ce145" table:formula="of:=IF([.J118]=20;1;IF([.J118]=19;2;IF([.J118]=19;2;IF([.J118]=18;3;IF([.J118]=17;4;IF([.J118]=16;5;IF([.J118]=15;6;IF([.J118]=14;7;IF([.J118]=13;8;IF([.J118]=12;9;IF([.J118]=11;10;IF([.J118]=10;11;IF([.J118]=9;12;IF([.J118]=8;13;IF([.J118]=7;14;IF([.J118]=6;15;IF([.J118]=5;16;IF([.J118]=4;17;IF([.J118]=3;18;IF([.J118]=2;19;IF([.J118]=1;20;0)))))))))))))))))))))" office:value-type="float" office:value="0" calcext:value-type="float">
            <text:p>0</text:p>
          </table:table-cell>
          <table:table-cell table:style-name="ce151"/>
          <table:table-cell table:style-name="ce158" table:formula="of:=SUM([.C118];[.E118];[.G118];[.I118];[.K118])" office:value-type="float" office:value="13" calcext:value-type="float">
            <text:p>13</text:p>
          </table:table-cell>
          <table:table-cell table:style-name="ce160" table:formula="of:=RANK([.M118];[.$M$4:.$M$133])" office:value-type="float" office:value="40" calcext:value-type="float">
            <text:p>40º</text:p>
          </table:table-cell>
          <table:table-cell table:style-name="ce162"/>
          <table:table-cell table:style-name="ce169" office:value-type="string" calcext:value-type="string">
            <text:p>-</text:p>
          </table:table-cell>
          <table:table-cell table:style-name="ce175" office:value-type="float" office:value="6" calcext:value-type="float">
            <text:p>6</text:p>
          </table:table-cell>
          <table:table-cell table:style-name="ce180" office:value-type="float" office:value="11" calcext:value-type="float">
            <text:p>11</text:p>
          </table:table-cell>
          <table:table-cell table:style-name="ce180" office:value-type="float" office:value="5" calcext:value-type="float">
            <text:p>5</text:p>
          </table:table-cell>
          <table:table-cell table:style-name="ce185" office:value-type="string" calcext:value-type="string">
            <text:p>-</text:p>
          </table:table-cell>
          <table:table-cell table:style-name="ce188" table:formula="of:=SUM([.P118:.T118])" office:value-type="float" office:value="22" calcext:value-type="float">
            <text:p>22</text:p>
          </table:table-cell>
          <table:table-cell table:style-name="ce189" table:formula="of:=RANK([.U118];[.$U$4:.$U$133])" office:value-type="float" office:value="25" calcext:value-type="float">
            <text:p>25º</text:p>
          </table:table-cell>
          <table:table-cell table:style-name="ce162"/>
          <table:table-cell table:style-name="ce193" table:formula="of:=COUNTIF([.B118];&quot;&gt;0&quot;)+COUNTIF([.D118];&quot;&gt;0&quot;)+COUNTIF([.F118];&quot;&gt;0&quot;)+COUNTIF([.H118];&quot;&gt;0&quot;)+COUNTIF([.J118];&quot;&gt;0&quot;)" office:value-type="float" office:value="3" calcext:value-type="float">
            <text:p>3</text:p>
          </table:table-cell>
          <table:table-cell table:style-name="ce200" table:formula="of:=[.M118]/[.X118]" office:value-type="float" office:value="4.33333333333333" calcext:value-type="float">
            <text:p>4.3</text:p>
          </table:table-cell>
          <table:table-cell table:style-name="ce204" table:formula="of:=RANK([.Y118];[.$Y$4:.$Y$133])" office:value-type="float" office:value="36" calcext:value-type="float">
            <text:p>36º</text:p>
          </table:table-cell>
          <table:table-cell table:style-name="ce208" table:formula="of:=[.U118]/[.X118]" office:value-type="float" office:value="7.33333333333333" calcext:value-type="float">
            <text:p>7.3</text:p>
          </table:table-cell>
          <table:table-cell table:style-name="ce212" table:formula="of:=RANK([.AA118];[.$AA$4:.$AA$133])" office:value-type="float" office:value="10" calcext:value-type="float">
            <text:p>10º</text:p>
          </table:table-cell>
          <table:table-cell table:number-columns-repeated="996"/>
        </table:table-row>
        <table:table-row table:style-name="ro10">
          <table:table-cell table:style-name="ce129" office:value-type="string" calcext:value-type="string">
            <text:p>RODRIGO LUCE</text:p>
          </table:table-cell>
          <table:table-cell table:style-name="ce134" office:value-type="float" office:value="6" calcext:value-type="float">
            <text:p>6º</text:p>
          </table:table-cell>
          <table:table-cell table:style-name="ce139" table:formula="of:=IF([.B119]=20;1;IF([.B119]=19;2;IF([.B119]=19;2;IF([.B119]=18;3;IF([.B119]=17;4;IF([.B119]=16;5;IF([.B119]=15;6;IF([.B119]=14;7;IF([.B119]=13;8;IF([.B119]=12;9;IF([.B119]=11;10;IF([.B119]=10;11;IF([.B119]=9;12;IF([.B119]=8;13;IF([.B119]=7;14;IF([.B119]=6;15;IF([.B119]=5;16;IF([.B119]=4;17;IF([.B119]=3;18;IF([.B119]=2;19;IF([.B119]=1;20;0)))))))))))))))))))))" office:value-type="float" office:value="15" calcext:value-type="float">
            <text:p>15</text:p>
          </table:table-cell>
          <table:table-cell table:style-name="ce134" office:value-type="float" office:value="12" calcext:value-type="float">
            <text:p>12º</text:p>
          </table:table-cell>
          <table:table-cell table:style-name="ce139" table:formula="of:=IF([.D119]=20;1;IF([.D119]=19;2;IF([.D119]=19;2;IF([.D119]=18;3;IF([.D119]=17;4;IF([.D119]=16;5;IF([.D119]=15;6;IF([.D119]=14;7;IF([.D119]=13;8;IF([.D119]=12;9;IF([.D119]=11;10;IF([.D119]=10;11;IF([.D119]=9;12;IF([.D119]=8;13;IF([.D119]=7;14;IF([.D119]=6;15;IF([.D119]=5;16;IF([.D119]=4;17;IF([.D119]=3;18;IF([.D119]=2;19;IF([.D119]=1;20;0)))))))))))))))))))))" office:value-type="float" office:value="9" calcext:value-type="float">
            <text:p>9</text:p>
          </table:table-cell>
          <table:table-cell table:style-name="ce134" office:value-type="float" office:value="69" calcext:value-type="float">
            <text:p>69º</text:p>
          </table:table-cell>
          <table:table-cell table:style-name="ce139" table:formula="of:=IF([.F119]=20;1;IF([.F119]=19;2;IF([.F119]=19;2;IF([.F119]=18;3;IF([.F119]=17;4;IF([.F119]=16;5;IF([.F119]=15;6;IF([.F119]=14;7;IF([.F119]=13;8;IF([.F119]=12;9;IF([.F119]=11;10;IF([.F119]=10;11;IF([.F119]=9;12;IF([.F119]=8;13;IF([.F119]=7;14;IF([.F119]=6;15;IF([.F119]=5;16;IF([.F119]=4;17;IF([.F119]=3;18;IF([.F119]=2;19;IF([.F119]=1;20;0)))))))))))))))))))))" office:value-type="float" office:value="0" calcext:value-type="float">
            <text:p>0</text:p>
          </table:table-cell>
          <table:table-cell table:style-name="ce134" office:value-type="float" office:value="69" calcext:value-type="float">
            <text:p>69º</text:p>
          </table:table-cell>
          <table:table-cell table:style-name="ce139" table:formula="of:=IF([.H119]=20;1;IF([.H119]=19;2;IF([.H119]=19;2;IF([.H119]=18;3;IF([.H119]=17;4;IF([.H119]=16;5;IF([.H119]=15;6;IF([.H119]=14;7;IF([.H119]=13;8;IF([.H119]=12;9;IF([.H119]=11;10;IF([.H119]=10;11;IF([.H119]=9;12;IF([.H119]=8;13;IF([.H119]=7;14;IF([.H119]=6;15;IF([.H119]=5;16;IF([.H119]=4;17;IF([.H119]=3;18;IF([.H119]=2;19;IF([.H119]=1;20;0)))))))))))))))))))))" office:value-type="float" office:value="0" calcext:value-type="float">
            <text:p>0</text:p>
          </table:table-cell>
          <table:table-cell table:style-name="ce134" office:value-type="float" office:value="36" calcext:value-type="float">
            <text:p>36º</text:p>
          </table:table-cell>
          <table:table-cell table:style-name="ce145" table:formula="of:=IF([.J119]=20;1;IF([.J119]=19;2;IF([.J119]=19;2;IF([.J119]=18;3;IF([.J119]=17;4;IF([.J119]=16;5;IF([.J119]=15;6;IF([.J119]=14;7;IF([.J119]=13;8;IF([.J119]=12;9;IF([.J119]=11;10;IF([.J119]=10;11;IF([.J119]=9;12;IF([.J119]=8;13;IF([.J119]=7;14;IF([.J119]=6;15;IF([.J119]=5;16;IF([.J119]=4;17;IF([.J119]=3;18;IF([.J119]=2;19;IF([.J119]=1;20;0)))))))))))))))))))))" office:value-type="float" office:value="0" calcext:value-type="float">
            <text:p>0</text:p>
          </table:table-cell>
          <table:table-cell table:style-name="ce151"/>
          <table:table-cell table:style-name="ce158" table:formula="of:=SUM([.C119];[.E119];[.G119];[.I119];[.K119])" office:value-type="float" office:value="24" calcext:value-type="float">
            <text:p>24</text:p>
          </table:table-cell>
          <table:table-cell table:style-name="ce160" table:formula="of:=RANK([.M119];[.$M$4:.$M$133])" office:value-type="float" office:value="14" calcext:value-type="float">
            <text:p>14º</text:p>
          </table:table-cell>
          <table:table-cell table:style-name="ce162"/>
          <table:table-cell table:style-name="ce169" office:value-type="float" office:value="11" calcext:value-type="float">
            <text:p>11</text:p>
          </table:table-cell>
          <table:table-cell table:style-name="ce175" office:value-type="float" office:value="8" calcext:value-type="float">
            <text:p>8</text:p>
          </table:table-cell>
          <table:table-cell table:number-columns-repeated="2" table:style-name="ce180" office:value-type="float" office:value="5" calcext:value-type="float">
            <text:p>5</text:p>
          </table:table-cell>
          <table:table-cell table:style-name="ce185" office:value-type="float" office:value="2" calcext:value-type="float">
            <text:p>2</text:p>
          </table:table-cell>
          <table:table-cell table:style-name="ce188" table:formula="of:=SUM([.P119:.T119])" office:value-type="float" office:value="31" calcext:value-type="float">
            <text:p>31</text:p>
          </table:table-cell>
          <table:table-cell table:style-name="ce189" table:formula="of:=RANK([.U119];[.$U$4:.$U$133])" office:value-type="float" office:value="5" calcext:value-type="float">
            <text:p>5º</text:p>
          </table:table-cell>
          <table:table-cell table:style-name="ce162"/>
          <table:table-cell table:style-name="ce193" table:formula="of:=COUNTIF([.B119];&quot;&gt;0&quot;)+COUNTIF([.D119];&quot;&gt;0&quot;)+COUNTIF([.F119];&quot;&gt;0&quot;)+COUNTIF([.H119];&quot;&gt;0&quot;)+COUNTIF([.J119];&quot;&gt;0&quot;)" office:value-type="float" office:value="5" calcext:value-type="float">
            <text:p>5</text:p>
          </table:table-cell>
          <table:table-cell table:style-name="ce200" table:formula="of:=[.M119]/[.X119]" office:value-type="float" office:value="4.8" calcext:value-type="float">
            <text:p>4.8</text:p>
          </table:table-cell>
          <table:table-cell table:style-name="ce204" table:formula="of:=RANK([.Y119];[.$Y$4:.$Y$133])" office:value-type="float" office:value="30" calcext:value-type="float">
            <text:p>30º</text:p>
          </table:table-cell>
          <table:table-cell table:style-name="ce208" table:formula="of:=[.U119]/[.X119]" office:value-type="float" office:value="6.2" calcext:value-type="float">
            <text:p>6.2</text:p>
          </table:table-cell>
          <table:table-cell table:style-name="ce212" table:formula="of:=RANK([.AA119];[.$AA$4:.$AA$133])" office:value-type="float" office:value="33" calcext:value-type="float">
            <text:p>33º</text:p>
          </table:table-cell>
          <table:table-cell table:number-columns-repeated="996"/>
        </table:table-row>
        <table:table-row table:style-name="ro10">
          <table:table-cell table:style-name="ce129" office:value-type="string" calcext:value-type="string">
            <text:p>SAMANTA</text:p>
          </table:table-cell>
          <table:table-cell table:style-name="ce134" office:value-type="float" office:value="8" calcext:value-type="float">
            <text:p>8º</text:p>
          </table:table-cell>
          <table:table-cell table:style-name="ce139" table:formula="of:=IF([.B120]=20;1;IF([.B120]=19;2;IF([.B120]=19;2;IF([.B120]=18;3;IF([.B120]=17;4;IF([.B120]=16;5;IF([.B120]=15;6;IF([.B120]=14;7;IF([.B120]=13;8;IF([.B120]=12;9;IF([.B120]=11;10;IF([.B120]=10;11;IF([.B120]=9;12;IF([.B120]=8;13;IF([.B120]=7;14;IF([.B120]=6;15;IF([.B120]=5;16;IF([.B120]=4;17;IF([.B120]=3;18;IF([.B120]=2;19;IF([.B120]=1;20;0)))))))))))))))))))))" office:value-type="float" office:value="13" calcext:value-type="float">
            <text:p>13</text:p>
          </table:table-cell>
          <table:table-cell table:style-name="ce134" office:value-type="float" office:value="26" calcext:value-type="float">
            <text:p>26º</text:p>
          </table:table-cell>
          <table:table-cell table:style-name="ce139" table:formula="of:=IF([.D120]=20;1;IF([.D120]=19;2;IF([.D120]=19;2;IF([.D120]=18;3;IF([.D120]=17;4;IF([.D120]=16;5;IF([.D120]=15;6;IF([.D120]=14;7;IF([.D120]=13;8;IF([.D120]=12;9;IF([.D120]=11;10;IF([.D120]=10;11;IF([.D120]=9;12;IF([.D120]=8;13;IF([.D120]=7;14;IF([.D120]=6;15;IF([.D120]=5;16;IF([.D120]=4;17;IF([.D120]=3;18;IF([.D120]=2;19;IF([.D120]=1;20;0)))))))))))))))))))))" office:value-type="float" office:value="0" calcext:value-type="float">
            <text:p>0</text:p>
          </table:table-cell>
          <table:table-cell table:style-name="ce134" office:value-type="float" office:value="55" calcext:value-type="float">
            <text:p>55º</text:p>
          </table:table-cell>
          <table:table-cell table:style-name="ce139" table:formula="of:=IF([.F120]=20;1;IF([.F120]=19;2;IF([.F120]=19;2;IF([.F120]=18;3;IF([.F120]=17;4;IF([.F120]=16;5;IF([.F120]=15;6;IF([.F120]=14;7;IF([.F120]=13;8;IF([.F120]=12;9;IF([.F120]=11;10;IF([.F120]=10;11;IF([.F120]=9;12;IF([.F120]=8;13;IF([.F120]=7;14;IF([.F120]=6;15;IF([.F120]=5;16;IF([.F120]=4;17;IF([.F120]=3;18;IF([.F120]=2;19;IF([.F120]=1;20;0)))))))))))))))))))))" office:value-type="float" office:value="0" calcext:value-type="float">
            <text:p>0</text:p>
          </table:table-cell>
          <table:table-cell table:style-name="ce134" office:value-type="float" office:value="15" calcext:value-type="float">
            <text:p>15º</text:p>
          </table:table-cell>
          <table:table-cell table:style-name="ce139" table:formula="of:=IF([.H120]=20;1;IF([.H120]=19;2;IF([.H120]=19;2;IF([.H120]=18;3;IF([.H120]=17;4;IF([.H120]=16;5;IF([.H120]=15;6;IF([.H120]=14;7;IF([.H120]=13;8;IF([.H120]=12;9;IF([.H120]=11;10;IF([.H120]=10;11;IF([.H120]=9;12;IF([.H120]=8;13;IF([.H120]=7;14;IF([.H120]=6;15;IF([.H120]=5;16;IF([.H120]=4;17;IF([.H120]=3;18;IF([.H120]=2;19;IF([.H120]=1;20;0)))))))))))))))))))))" office:value-type="float" office:value="6" calcext:value-type="float">
            <text:p>6</text:p>
          </table:table-cell>
          <table:table-cell table:style-name="ce134" office:value-type="float" office:value="23" calcext:value-type="float">
            <text:p>23º</text:p>
          </table:table-cell>
          <table:table-cell table:style-name="ce145" table:formula="of:=IF([.J120]=20;1;IF([.J120]=19;2;IF([.J120]=19;2;IF([.J120]=18;3;IF([.J120]=17;4;IF([.J120]=16;5;IF([.J120]=15;6;IF([.J120]=14;7;IF([.J120]=13;8;IF([.J120]=12;9;IF([.J120]=11;10;IF([.J120]=10;11;IF([.J120]=9;12;IF([.J120]=8;13;IF([.J120]=7;14;IF([.J120]=6;15;IF([.J120]=5;16;IF([.J120]=4;17;IF([.J120]=3;18;IF([.J120]=2;19;IF([.J120]=1;20;0)))))))))))))))))))))" office:value-type="float" office:value="0" calcext:value-type="float">
            <text:p>0</text:p>
          </table:table-cell>
          <table:table-cell table:style-name="ce151"/>
          <table:table-cell table:style-name="ce158" table:formula="of:=SUM([.C120];[.E120];[.G120];[.I120];[.K120])" office:value-type="float" office:value="19" calcext:value-type="float">
            <text:p>19</text:p>
          </table:table-cell>
          <table:table-cell table:style-name="ce160" table:formula="of:=RANK([.M120];[.$M$4:.$M$133])" office:value-type="float" office:value="20" calcext:value-type="float">
            <text:p>20º</text:p>
          </table:table-cell>
          <table:table-cell table:style-name="ce162"/>
          <table:table-cell table:style-name="ce169" office:value-type="float" office:value="8" calcext:value-type="float">
            <text:p>8</text:p>
          </table:table-cell>
          <table:table-cell table:style-name="ce175" office:value-type="float" office:value="4" calcext:value-type="float">
            <text:p>4</text:p>
          </table:table-cell>
          <table:table-cell table:style-name="ce180" office:value-type="float" office:value="5" calcext:value-type="float">
            <text:p>5</text:p>
          </table:table-cell>
          <table:table-cell table:style-name="ce180" office:value-type="float" office:value="8" calcext:value-type="float">
            <text:p>8</text:p>
          </table:table-cell>
          <table:table-cell table:style-name="ce185" office:value-type="float" office:value="3" calcext:value-type="float">
            <text:p>3</text:p>
          </table:table-cell>
          <table:table-cell table:style-name="ce188" table:formula="of:=SUM([.P120:.T120])" office:value-type="float" office:value="28" calcext:value-type="float">
            <text:p>28</text:p>
          </table:table-cell>
          <table:table-cell table:style-name="ce189" table:formula="of:=RANK([.U120];[.$U$4:.$U$133])" office:value-type="float" office:value="10" calcext:value-type="float">
            <text:p>10º</text:p>
          </table:table-cell>
          <table:table-cell table:style-name="ce162"/>
          <table:table-cell table:style-name="ce193" table:formula="of:=COUNTIF([.B120];&quot;&gt;0&quot;)+COUNTIF([.D120];&quot;&gt;0&quot;)+COUNTIF([.F120];&quot;&gt;0&quot;)+COUNTIF([.H120];&quot;&gt;0&quot;)+COUNTIF([.J120];&quot;&gt;0&quot;)" office:value-type="float" office:value="5" calcext:value-type="float">
            <text:p>5</text:p>
          </table:table-cell>
          <table:table-cell table:style-name="ce200" table:formula="of:=[.M120]/[.X120]" office:value-type="float" office:value="3.8" calcext:value-type="float">
            <text:p>3.8</text:p>
          </table:table-cell>
          <table:table-cell table:style-name="ce204" table:formula="of:=RANK([.Y120];[.$Y$4:.$Y$133])" office:value-type="float" office:value="46" calcext:value-type="float">
            <text:p>46º</text:p>
          </table:table-cell>
          <table:table-cell table:style-name="ce208" table:formula="of:=[.U120]/[.X120]" office:value-type="float" office:value="5.6" calcext:value-type="float">
            <text:p>5.6</text:p>
          </table:table-cell>
          <table:table-cell table:style-name="ce212" table:formula="of:=RANK([.AA120];[.$AA$4:.$AA$133])" office:value-type="float" office:value="57" calcext:value-type="float">
            <text:p>57º</text:p>
          </table:table-cell>
          <table:table-cell table:number-columns-repeated="996"/>
        </table:table-row>
        <table:table-row table:style-name="ro10">
          <table:table-cell table:style-name="ce129" office:value-type="string" calcext:value-type="string">
            <text:p>ZÉZINHO</text:p>
          </table:table-cell>
          <table:table-cell table:style-name="ce134" office:value-type="string" calcext:value-type="string">
            <text:p>-</text:p>
          </table:table-cell>
          <table:table-cell table:style-name="ce139" table:formula="of:=IF([.B121]=20;1;IF([.B121]=19;2;IF([.B121]=19;2;IF([.B121]=18;3;IF([.B121]=17;4;IF([.B121]=16;5;IF([.B121]=15;6;IF([.B121]=14;7;IF([.B121]=13;8;IF([.B121]=12;9;IF([.B121]=11;10;IF([.B121]=10;11;IF([.B121]=9;12;IF([.B121]=8;13;IF([.B121]=7;14;IF([.B121]=6;15;IF([.B121]=5;16;IF([.B121]=4;17;IF([.B121]=3;18;IF([.B121]=2;19;IF([.B121]=1;20;0)))))))))))))))))))))" office:value-type="float" office:value="0" calcext:value-type="float">
            <text:p>0</text:p>
          </table:table-cell>
          <table:table-cell table:style-name="ce134" office:value-type="float" office:value="17" calcext:value-type="float">
            <text:p>17º</text:p>
          </table:table-cell>
          <table:table-cell table:style-name="ce139" table:formula="of:=IF([.D121]=20;1;IF([.D121]=19;2;IF([.D121]=19;2;IF([.D121]=18;3;IF([.D121]=17;4;IF([.D121]=16;5;IF([.D121]=15;6;IF([.D121]=14;7;IF([.D121]=13;8;IF([.D121]=12;9;IF([.D121]=11;10;IF([.D121]=10;11;IF([.D121]=9;12;IF([.D121]=8;13;IF([.D121]=7;14;IF([.D121]=6;15;IF([.D121]=5;16;IF([.D121]=4;17;IF([.D121]=3;18;IF([.D121]=2;19;IF([.D121]=1;20;0)))))))))))))))))))))" office:value-type="float" office:value="4" calcext:value-type="float">
            <text:p>4</text:p>
          </table:table-cell>
          <table:table-cell table:style-name="ce134" office:value-type="float" office:value="59" calcext:value-type="float">
            <text:p>59º</text:p>
          </table:table-cell>
          <table:table-cell table:style-name="ce139" table:formula="of:=IF([.F121]=20;1;IF([.F121]=19;2;IF([.F121]=19;2;IF([.F121]=18;3;IF([.F121]=17;4;IF([.F121]=16;5;IF([.F121]=15;6;IF([.F121]=14;7;IF([.F121]=13;8;IF([.F121]=12;9;IF([.F121]=11;10;IF([.F121]=10;11;IF([.F121]=9;12;IF([.F121]=8;13;IF([.F121]=7;14;IF([.F121]=6;15;IF([.F121]=5;16;IF([.F121]=4;17;IF([.F121]=3;18;IF([.F121]=2;19;IF([.F121]=1;20;0)))))))))))))))))))))" office:value-type="float" office:value="0" calcext:value-type="float">
            <text:p>0</text:p>
          </table:table-cell>
          <table:table-cell table:style-name="ce134" office:value-type="float" office:value="79" calcext:value-type="float">
            <text:p>79º</text:p>
          </table:table-cell>
          <table:table-cell table:style-name="ce139" table:formula="of:=IF([.H121]=20;1;IF([.H121]=19;2;IF([.H121]=19;2;IF([.H121]=18;3;IF([.H121]=17;4;IF([.H121]=16;5;IF([.H121]=15;6;IF([.H121]=14;7;IF([.H121]=13;8;IF([.H121]=12;9;IF([.H121]=11;10;IF([.H121]=10;11;IF([.H121]=9;12;IF([.H121]=8;13;IF([.H121]=7;14;IF([.H121]=6;15;IF([.H121]=5;16;IF([.H121]=4;17;IF([.H121]=3;18;IF([.H121]=2;19;IF([.H121]=1;20;0)))))))))))))))))))))" office:value-type="float" office:value="0" calcext:value-type="float">
            <text:p>0</text:p>
          </table:table-cell>
          <table:table-cell table:style-name="ce134" office:value-type="string" calcext:value-type="string">
            <text:p>-</text:p>
          </table:table-cell>
          <table:table-cell table:style-name="ce145" table:formula="of:=IF([.J121]=20;1;IF([.J121]=19;2;IF([.J121]=19;2;IF([.J121]=18;3;IF([.J121]=17;4;IF([.J121]=16;5;IF([.J121]=15;6;IF([.J121]=14;7;IF([.J121]=13;8;IF([.J121]=12;9;IF([.J121]=11;10;IF([.J121]=10;11;IF([.J121]=9;12;IF([.J121]=8;13;IF([.J121]=7;14;IF([.J121]=6;15;IF([.J121]=5;16;IF([.J121]=4;17;IF([.J121]=3;18;IF([.J121]=2;19;IF([.J121]=1;20;0)))))))))))))))))))))" office:value-type="float" office:value="0" calcext:value-type="float">
            <text:p>0</text:p>
          </table:table-cell>
          <table:table-cell table:style-name="ce151"/>
          <table:table-cell table:style-name="ce158" table:formula="of:=SUM([.C121];[.E121];[.G121];[.I121];[.K121])" office:value-type="float" office:value="4" calcext:value-type="float">
            <text:p>4</text:p>
          </table:table-cell>
          <table:table-cell table:style-name="ce160" table:formula="of:=RANK([.M121];[.$M$4:.$M$133])" office:value-type="float" office:value="59" calcext:value-type="float">
            <text:p>59º</text:p>
          </table:table-cell>
          <table:table-cell table:style-name="ce162"/>
          <table:table-cell table:style-name="ce169" office:value-type="string" calcext:value-type="string">
            <text:p>-</text:p>
          </table:table-cell>
          <table:table-cell table:style-name="ce175" office:value-type="float" office:value="6" calcext:value-type="float">
            <text:p>6</text:p>
          </table:table-cell>
          <table:table-cell table:style-name="ce180" office:value-type="float" office:value="2" calcext:value-type="float">
            <text:p>2</text:p>
          </table:table-cell>
          <table:table-cell table:style-name="ce180" office:value-type="float" office:value="7" calcext:value-type="float">
            <text:p>7</text:p>
          </table:table-cell>
          <table:table-cell table:style-name="ce185" office:value-type="string" calcext:value-type="string">
            <text:p>-</text:p>
          </table:table-cell>
          <table:table-cell table:style-name="ce188" table:formula="of:=SUM([.P121:.T121])" office:value-type="float" office:value="15" calcext:value-type="float">
            <text:p>15</text:p>
          </table:table-cell>
          <table:table-cell table:style-name="ce189" table:formula="of:=RANK([.U121];[.$U$4:.$U$133])" office:value-type="float" office:value="48" calcext:value-type="float">
            <text:p>48º</text:p>
          </table:table-cell>
          <table:table-cell table:style-name="ce162"/>
          <table:table-cell table:style-name="ce193" table:formula="of:=COUNTIF([.B121];&quot;&gt;0&quot;)+COUNTIF([.D121];&quot;&gt;0&quot;)+COUNTIF([.F121];&quot;&gt;0&quot;)+COUNTIF([.H121];&quot;&gt;0&quot;)+COUNTIF([.J121];&quot;&gt;0&quot;)" office:value-type="float" office:value="3" calcext:value-type="float">
            <text:p>3</text:p>
          </table:table-cell>
          <table:table-cell table:style-name="ce200" table:formula="of:=[.M121]/[.X121]" office:value-type="float" office:value="1.33333333333333" calcext:value-type="float">
            <text:p>1.3</text:p>
          </table:table-cell>
          <table:table-cell table:style-name="ce204" table:formula="of:=RANK([.Y121];[.$Y$4:.$Y$133])" office:value-type="float" office:value="64" calcext:value-type="float">
            <text:p>64º</text:p>
          </table:table-cell>
          <table:table-cell table:style-name="ce208" table:formula="of:=[.U121]/[.X121]" office:value-type="float" office:value="5" calcext:value-type="float">
            <text:p>5.0</text:p>
          </table:table-cell>
          <table:table-cell table:style-name="ce212" table:formula="of:=RANK([.AA121];[.$AA$4:.$AA$133])" office:value-type="float" office:value="68" calcext:value-type="float">
            <text:p>68º</text:p>
          </table:table-cell>
          <table:table-cell table:number-columns-repeated="996"/>
        </table:table-row>
        <table:table-row table:style-name="ro10">
          <table:table-cell table:style-name="ce129" office:value-type="string" calcext:value-type="string">
            <text:p>SANTIAGO </text:p>
          </table:table-cell>
          <table:table-cell table:style-name="ce134" office:value-type="float" office:value="15" calcext:value-type="float">
            <text:p>15º</text:p>
          </table:table-cell>
          <table:table-cell table:style-name="ce139" table:formula="of:=IF([.B122]=20;1;IF([.B122]=19;2;IF([.B122]=19;2;IF([.B122]=18;3;IF([.B122]=17;4;IF([.B122]=16;5;IF([.B122]=15;6;IF([.B122]=14;7;IF([.B122]=13;8;IF([.B122]=12;9;IF([.B122]=11;10;IF([.B122]=10;11;IF([.B122]=9;12;IF([.B122]=8;13;IF([.B122]=7;14;IF([.B122]=6;15;IF([.B122]=5;16;IF([.B122]=4;17;IF([.B122]=3;18;IF([.B122]=2;19;IF([.B122]=1;20;0)))))))))))))))))))))" office:value-type="float" office:value="6" calcext:value-type="float">
            <text:p>6</text:p>
          </table:table-cell>
          <table:table-cell table:style-name="ce134" office:value-type="float" office:value="34" calcext:value-type="float">
            <text:p>34º</text:p>
          </table:table-cell>
          <table:table-cell table:style-name="ce139" table:formula="of:=IF([.D122]=20;1;IF([.D122]=19;2;IF([.D122]=19;2;IF([.D122]=18;3;IF([.D122]=17;4;IF([.D122]=16;5;IF([.D122]=15;6;IF([.D122]=14;7;IF([.D122]=13;8;IF([.D122]=12;9;IF([.D122]=11;10;IF([.D122]=10;11;IF([.D122]=9;12;IF([.D122]=8;13;IF([.D122]=7;14;IF([.D122]=6;15;IF([.D122]=5;16;IF([.D122]=4;17;IF([.D122]=3;18;IF([.D122]=2;19;IF([.D122]=1;20;0)))))))))))))))))))))" office:value-type="float" office:value="0" calcext:value-type="float">
            <text:p>0</text:p>
          </table:table-cell>
          <table:table-cell table:style-name="ce134" office:value-type="float" office:value="16" calcext:value-type="float">
            <text:p>16º</text:p>
          </table:table-cell>
          <table:table-cell table:style-name="ce139" table:formula="of:=IF([.F122]=20;1;IF([.F122]=19;2;IF([.F122]=19;2;IF([.F122]=18;3;IF([.F122]=17;4;IF([.F122]=16;5;IF([.F122]=15;6;IF([.F122]=14;7;IF([.F122]=13;8;IF([.F122]=12;9;IF([.F122]=11;10;IF([.F122]=10;11;IF([.F122]=9;12;IF([.F122]=8;13;IF([.F122]=7;14;IF([.F122]=6;15;IF([.F122]=5;16;IF([.F122]=4;17;IF([.F122]=3;18;IF([.F122]=2;19;IF([.F122]=1;20;0)))))))))))))))))))))" office:value-type="float" office:value="5" calcext:value-type="float">
            <text:p>5</text:p>
          </table:table-cell>
          <table:table-cell table:style-name="ce134" office:value-type="float" office:value="63" calcext:value-type="float">
            <text:p>63º</text:p>
          </table:table-cell>
          <table:table-cell table:style-name="ce139" table:formula="of:=IF([.H122]=20;1;IF([.H122]=19;2;IF([.H122]=19;2;IF([.H122]=18;3;IF([.H122]=17;4;IF([.H122]=16;5;IF([.H122]=15;6;IF([.H122]=14;7;IF([.H122]=13;8;IF([.H122]=12;9;IF([.H122]=11;10;IF([.H122]=10;11;IF([.H122]=9;12;IF([.H122]=8;13;IF([.H122]=7;14;IF([.H122]=6;15;IF([.H122]=5;16;IF([.H122]=4;17;IF([.H122]=3;18;IF([.H122]=2;19;IF([.H122]=1;20;0)))))))))))))))))))))" office:value-type="float" office:value="0" calcext:value-type="float">
            <text:p>0</text:p>
          </table:table-cell>
          <table:table-cell table:style-name="ce134" office:value-type="string" calcext:value-type="string">
            <text:p>-</text:p>
          </table:table-cell>
          <table:table-cell table:style-name="ce145" table:formula="of:=IF([.J122]=20;1;IF([.J122]=19;2;IF([.J122]=19;2;IF([.J122]=18;3;IF([.J122]=17;4;IF([.J122]=16;5;IF([.J122]=15;6;IF([.J122]=14;7;IF([.J122]=13;8;IF([.J122]=12;9;IF([.J122]=11;10;IF([.J122]=10;11;IF([.J122]=9;12;IF([.J122]=8;13;IF([.J122]=7;14;IF([.J122]=6;15;IF([.J122]=5;16;IF([.J122]=4;17;IF([.J122]=3;18;IF([.J122]=2;19;IF([.J122]=1;20;0)))))))))))))))))))))" office:value-type="float" office:value="0" calcext:value-type="float">
            <text:p>0</text:p>
          </table:table-cell>
          <table:table-cell table:style-name="ce151"/>
          <table:table-cell table:style-name="ce158" table:formula="of:=SUM([.C122];[.E122];[.G122];[.I122];[.K122])" office:value-type="float" office:value="11" calcext:value-type="float">
            <text:p>11</text:p>
          </table:table-cell>
          <table:table-cell table:style-name="ce160" table:formula="of:=RANK([.M122];[.$M$4:.$M$133])" office:value-type="float" office:value="43" calcext:value-type="float">
            <text:p>43º</text:p>
          </table:table-cell>
          <table:table-cell table:style-name="ce162"/>
          <table:table-cell table:style-name="ce169" office:value-type="float" office:value="6" calcext:value-type="float">
            <text:p>6</text:p>
          </table:table-cell>
          <table:table-cell table:style-name="ce175" office:value-type="float" office:value="6" calcext:value-type="float">
            <text:p>6</text:p>
          </table:table-cell>
          <table:table-cell table:style-name="ce180" office:value-type="float" office:value="8" calcext:value-type="float">
            <text:p>8</text:p>
          </table:table-cell>
          <table:table-cell table:style-name="ce180" office:value-type="float" office:value="3" calcext:value-type="float">
            <text:p>3</text:p>
          </table:table-cell>
          <table:table-cell table:style-name="ce185" office:value-type="string" calcext:value-type="string">
            <text:p>-</text:p>
          </table:table-cell>
          <table:table-cell table:style-name="ce188" table:formula="of:=SUM([.P122:.T122])" office:value-type="float" office:value="23" calcext:value-type="float">
            <text:p>23</text:p>
          </table:table-cell>
          <table:table-cell table:style-name="ce189" table:formula="of:=RANK([.U122];[.$U$4:.$U$133])" office:value-type="float" office:value="22" calcext:value-type="float">
            <text:p>22º</text:p>
          </table:table-cell>
          <table:table-cell table:style-name="ce162"/>
          <table:table-cell table:style-name="ce193" table:formula="of:=COUNTIF([.B122];&quot;&gt;0&quot;)+COUNTIF([.D122];&quot;&gt;0&quot;)+COUNTIF([.F122];&quot;&gt;0&quot;)+COUNTIF([.H122];&quot;&gt;0&quot;)+COUNTIF([.J122];&quot;&gt;0&quot;)" office:value-type="float" office:value="4" calcext:value-type="float">
            <text:p>4</text:p>
          </table:table-cell>
          <table:table-cell table:style-name="ce200" table:formula="of:=[.M122]/[.X122]" office:value-type="float" office:value="2.75" calcext:value-type="float">
            <text:p>2.8</text:p>
          </table:table-cell>
          <table:table-cell table:style-name="ce204" table:formula="of:=RANK([.Y122];[.$Y$4:.$Y$133])" office:value-type="float" office:value="54" calcext:value-type="float">
            <text:p>54º</text:p>
          </table:table-cell>
          <table:table-cell table:style-name="ce208" table:formula="of:=[.U122]/[.X122]" office:value-type="float" office:value="5.75" calcext:value-type="float">
            <text:p>5.8</text:p>
          </table:table-cell>
          <table:table-cell table:style-name="ce212" table:formula="of:=RANK([.AA122];[.$AA$4:.$AA$133])" office:value-type="float" office:value="52" calcext:value-type="float">
            <text:p>52º</text:p>
          </table:table-cell>
          <table:table-cell table:number-columns-repeated="996"/>
        </table:table-row>
        <table:table-row table:style-name="ro10">
          <table:table-cell table:style-name="ce129" office:value-type="string" calcext:value-type="string">
            <text:p>SIMONE</text:p>
          </table:table-cell>
          <table:table-cell table:style-name="ce134" office:value-type="string" calcext:value-type="string">
            <text:p>-</text:p>
          </table:table-cell>
          <table:table-cell table:style-name="ce139" table:formula="of:=IF([.B123]=20;1;IF([.B123]=19;2;IF([.B123]=19;2;IF([.B123]=18;3;IF([.B123]=17;4;IF([.B123]=16;5;IF([.B123]=15;6;IF([.B123]=14;7;IF([.B123]=13;8;IF([.B123]=12;9;IF([.B123]=11;10;IF([.B123]=10;11;IF([.B123]=9;12;IF([.B123]=8;13;IF([.B123]=7;14;IF([.B123]=6;15;IF([.B123]=5;16;IF([.B123]=4;17;IF([.B123]=3;18;IF([.B123]=2;19;IF([.B123]=1;20;0)))))))))))))))))))))" office:value-type="float" office:value="0" calcext:value-type="float">
            <text:p>0</text:p>
          </table:table-cell>
          <table:table-cell table:style-name="ce134" office:value-type="string" calcext:value-type="string">
            <text:p>-</text:p>
          </table:table-cell>
          <table:table-cell table:style-name="ce139" table:formula="of:=IF([.D123]=20;1;IF([.D123]=19;2;IF([.D123]=19;2;IF([.D123]=18;3;IF([.D123]=17;4;IF([.D123]=16;5;IF([.D123]=15;6;IF([.D123]=14;7;IF([.D123]=13;8;IF([.D123]=12;9;IF([.D123]=11;10;IF([.D123]=10;11;IF([.D123]=9;12;IF([.D123]=8;13;IF([.D123]=7;14;IF([.D123]=6;15;IF([.D123]=5;16;IF([.D123]=4;17;IF([.D123]=3;18;IF([.D123]=2;19;IF([.D123]=1;20;0)))))))))))))))))))))" office:value-type="float" office:value="0" calcext:value-type="float">
            <text:p>0</text:p>
          </table:table-cell>
          <table:table-cell table:style-name="ce134" office:value-type="float" office:value="47" calcext:value-type="float">
            <text:p>47º</text:p>
          </table:table-cell>
          <table:table-cell table:style-name="ce139" table:formula="of:=IF([.F123]=20;1;IF([.F123]=19;2;IF([.F123]=19;2;IF([.F123]=18;3;IF([.F123]=17;4;IF([.F123]=16;5;IF([.F123]=15;6;IF([.F123]=14;7;IF([.F123]=13;8;IF([.F123]=12;9;IF([.F123]=11;10;IF([.F123]=10;11;IF([.F123]=9;12;IF([.F123]=8;13;IF([.F123]=7;14;IF([.F123]=6;15;IF([.F123]=5;16;IF([.F123]=4;17;IF([.F123]=3;18;IF([.F123]=2;19;IF([.F123]=1;20;0)))))))))))))))))))))" office:value-type="float" office:value="0" calcext:value-type="float">
            <text:p>0</text:p>
          </table:table-cell>
          <table:table-cell table:style-name="ce134" office:value-type="string" calcext:value-type="string">
            <text:p>-</text:p>
          </table:table-cell>
          <table:table-cell table:style-name="ce139" table:formula="of:=IF([.H123]=20;1;IF([.H123]=19;2;IF([.H123]=19;2;IF([.H123]=18;3;IF([.H123]=17;4;IF([.H123]=16;5;IF([.H123]=15;6;IF([.H123]=14;7;IF([.H123]=13;8;IF([.H123]=12;9;IF([.H123]=11;10;IF([.H123]=10;11;IF([.H123]=9;12;IF([.H123]=8;13;IF([.H123]=7;14;IF([.H123]=6;15;IF([.H123]=5;16;IF([.H123]=4;17;IF([.H123]=3;18;IF([.H123]=2;19;IF([.H123]=1;20;0)))))))))))))))))))))" office:value-type="float" office:value="0" calcext:value-type="float">
            <text:p>0</text:p>
          </table:table-cell>
          <table:table-cell table:style-name="ce134" office:value-type="string" calcext:value-type="string">
            <text:p>-</text:p>
          </table:table-cell>
          <table:table-cell table:style-name="ce145" table:formula="of:=IF([.J123]=20;1;IF([.J123]=19;2;IF([.J123]=19;2;IF([.J123]=18;3;IF([.J123]=17;4;IF([.J123]=16;5;IF([.J123]=15;6;IF([.J123]=14;7;IF([.J123]=13;8;IF([.J123]=12;9;IF([.J123]=11;10;IF([.J123]=10;11;IF([.J123]=9;12;IF([.J123]=8;13;IF([.J123]=7;14;IF([.J123]=6;15;IF([.J123]=5;16;IF([.J123]=4;17;IF([.J123]=3;18;IF([.J123]=2;19;IF([.J123]=1;20;0)))))))))))))))))))))" office:value-type="float" office:value="0" calcext:value-type="float">
            <text:p>0</text:p>
          </table:table-cell>
          <table:table-cell table:style-name="ce150"/>
          <table:table-cell table:style-name="ce158" table:formula="of:=SUM([.C123];[.E123];[.G123];[.I123];[.K123])" office:value-type="float" office:value="0" calcext:value-type="float">
            <text:p>0</text:p>
          </table:table-cell>
          <table:table-cell table:style-name="ce160" table:formula="of:=RANK([.M123];[.$M$4:.$M$133])" office:value-type="float" office:value="71" calcext:value-type="float">
            <text:p>71º</text:p>
          </table:table-cell>
          <table:table-cell table:style-name="ce161"/>
          <table:table-cell table:style-name="ce169"/>
          <table:table-cell table:style-name="ce175"/>
          <table:table-cell table:style-name="ce175" office:value-type="float" office:value="6" calcext:value-type="float">
            <text:p>6</text:p>
          </table:table-cell>
          <table:table-cell table:style-name="ce180"/>
          <table:table-cell table:style-name="ce185" office:value-type="string" calcext:value-type="string">
            <text:p>-</text:p>
          </table:table-cell>
          <table:table-cell table:style-name="ce188" table:formula="of:=SUM([.P123:.T123])" office:value-type="float" office:value="6" calcext:value-type="float">
            <text:p>6</text:p>
          </table:table-cell>
          <table:table-cell table:style-name="ce189" table:formula="of:=RANK([.U123];[.$U$4:.$U$133])" office:value-type="float" office:value="89" calcext:value-type="float">
            <text:p>89º</text:p>
          </table:table-cell>
          <table:table-cell table:style-name="ce161"/>
          <table:table-cell table:style-name="ce193" table:formula="of:=COUNTIF([.B123];&quot;&gt;0&quot;)+COUNTIF([.D123];&quot;&gt;0&quot;)+COUNTIF([.F123];&quot;&gt;0&quot;)+COUNTIF([.H123];&quot;&gt;0&quot;)+COUNTIF([.J123];&quot;&gt;0&quot;)" office:value-type="float" office:value="1" calcext:value-type="float">
            <text:p>1</text:p>
          </table:table-cell>
          <table:table-cell table:style-name="ce200" table:formula="of:=[.M123]/[.X123]" office:value-type="float" office:value="0" calcext:value-type="float">
            <text:p>0.0</text:p>
          </table:table-cell>
          <table:table-cell table:style-name="ce204" table:formula="of:=RANK([.Y123];[.$Y$4:.$Y$133])" office:value-type="float" office:value="71" calcext:value-type="float">
            <text:p>71º</text:p>
          </table:table-cell>
          <table:table-cell table:style-name="ce208" table:formula="of:=[.U123]/[.X123]" office:value-type="float" office:value="6" calcext:value-type="float">
            <text:p>6.0</text:p>
          </table:table-cell>
          <table:table-cell table:style-name="ce212" table:formula="of:=RANK([.AA123];[.$AA$4:.$AA$133])" office:value-type="float" office:value="36" calcext:value-type="float">
            <text:p>36º</text:p>
          </table:table-cell>
          <table:table-cell table:number-columns-repeated="996"/>
        </table:table-row>
        <table:table-row table:style-name="ro10">
          <table:table-cell table:style-name="ce129" office:value-type="string" calcext:value-type="string">
            <text:p>STHEFAN</text:p>
          </table:table-cell>
          <table:table-cell table:style-name="ce134" office:value-type="string" calcext:value-type="string">
            <text:p>-</text:p>
          </table:table-cell>
          <table:table-cell table:style-name="ce139" table:formula="of:=IF([.B124]=20;1;IF([.B124]=19;2;IF([.B124]=19;2;IF([.B124]=18;3;IF([.B124]=17;4;IF([.B124]=16;5;IF([.B124]=15;6;IF([.B124]=14;7;IF([.B124]=13;8;IF([.B124]=12;9;IF([.B124]=11;10;IF([.B124]=10;11;IF([.B124]=9;12;IF([.B124]=8;13;IF([.B124]=7;14;IF([.B124]=6;15;IF([.B124]=5;16;IF([.B124]=4;17;IF([.B124]=3;18;IF([.B124]=2;19;IF([.B124]=1;20;0)))))))))))))))))))))" office:value-type="float" office:value="0" calcext:value-type="float">
            <text:p>0</text:p>
          </table:table-cell>
          <table:table-cell table:style-name="ce134" office:value-type="string" calcext:value-type="string">
            <text:p>-</text:p>
          </table:table-cell>
          <table:table-cell table:style-name="ce139" table:formula="of:=IF([.D124]=20;1;IF([.D124]=19;2;IF([.D124]=19;2;IF([.D124]=18;3;IF([.D124]=17;4;IF([.D124]=16;5;IF([.D124]=15;6;IF([.D124]=14;7;IF([.D124]=13;8;IF([.D124]=12;9;IF([.D124]=11;10;IF([.D124]=10;11;IF([.D124]=9;12;IF([.D124]=8;13;IF([.D124]=7;14;IF([.D124]=6;15;IF([.D124]=5;16;IF([.D124]=4;17;IF([.D124]=3;18;IF([.D124]=2;19;IF([.D124]=1;20;0)))))))))))))))))))))" office:value-type="float" office:value="0" calcext:value-type="float">
            <text:p>0</text:p>
          </table:table-cell>
          <table:table-cell table:style-name="ce134" office:value-type="float" office:value="49" calcext:value-type="float">
            <text:p>49º</text:p>
          </table:table-cell>
          <table:table-cell table:style-name="ce139" table:formula="of:=IF([.F124]=20;1;IF([.F124]=19;2;IF([.F124]=19;2;IF([.F124]=18;3;IF([.F124]=17;4;IF([.F124]=16;5;IF([.F124]=15;6;IF([.F124]=14;7;IF([.F124]=13;8;IF([.F124]=12;9;IF([.F124]=11;10;IF([.F124]=10;11;IF([.F124]=9;12;IF([.F124]=8;13;IF([.F124]=7;14;IF([.F124]=6;15;IF([.F124]=5;16;IF([.F124]=4;17;IF([.F124]=3;18;IF([.F124]=2;19;IF([.F124]=1;20;0)))))))))))))))))))))" office:value-type="float" office:value="0" calcext:value-type="float">
            <text:p>0</text:p>
          </table:table-cell>
          <table:table-cell table:style-name="ce134" office:value-type="string" calcext:value-type="string">
            <text:p>-</text:p>
          </table:table-cell>
          <table:table-cell table:style-name="ce139" table:formula="of:=IF([.H124]=20;1;IF([.H124]=19;2;IF([.H124]=19;2;IF([.H124]=18;3;IF([.H124]=17;4;IF([.H124]=16;5;IF([.H124]=15;6;IF([.H124]=14;7;IF([.H124]=13;8;IF([.H124]=12;9;IF([.H124]=11;10;IF([.H124]=10;11;IF([.H124]=9;12;IF([.H124]=8;13;IF([.H124]=7;14;IF([.H124]=6;15;IF([.H124]=5;16;IF([.H124]=4;17;IF([.H124]=3;18;IF([.H124]=2;19;IF([.H124]=1;20;0)))))))))))))))))))))" office:value-type="float" office:value="0" calcext:value-type="float">
            <text:p>0</text:p>
          </table:table-cell>
          <table:table-cell table:style-name="ce134" office:value-type="string" calcext:value-type="string">
            <text:p>-</text:p>
          </table:table-cell>
          <table:table-cell table:style-name="ce145" table:formula="of:=IF([.J124]=20;1;IF([.J124]=19;2;IF([.J124]=19;2;IF([.J124]=18;3;IF([.J124]=17;4;IF([.J124]=16;5;IF([.J124]=15;6;IF([.J124]=14;7;IF([.J124]=13;8;IF([.J124]=12;9;IF([.J124]=11;10;IF([.J124]=10;11;IF([.J124]=9;12;IF([.J124]=8;13;IF([.J124]=7;14;IF([.J124]=6;15;IF([.J124]=5;16;IF([.J124]=4;17;IF([.J124]=3;18;IF([.J124]=2;19;IF([.J124]=1;20;0)))))))))))))))))))))" office:value-type="float" office:value="0" calcext:value-type="float">
            <text:p>0</text:p>
          </table:table-cell>
          <table:table-cell table:style-name="ce150"/>
          <table:table-cell table:style-name="ce158" table:formula="of:=SUM([.C124];[.E124];[.G124];[.I124];[.K124])" office:value-type="float" office:value="0" calcext:value-type="float">
            <text:p>0</text:p>
          </table:table-cell>
          <table:table-cell table:style-name="ce160" table:formula="of:=RANK([.M124];[.$M$4:.$M$133])" office:value-type="float" office:value="71" calcext:value-type="float">
            <text:p>71º</text:p>
          </table:table-cell>
          <table:table-cell table:style-name="ce161"/>
          <table:table-cell table:style-name="ce169"/>
          <table:table-cell table:style-name="ce175"/>
          <table:table-cell table:style-name="ce175" office:value-type="float" office:value="3" calcext:value-type="float">
            <text:p>3</text:p>
          </table:table-cell>
          <table:table-cell table:style-name="ce180"/>
          <table:table-cell table:style-name="ce185" office:value-type="string" calcext:value-type="string">
            <text:p>-</text:p>
          </table:table-cell>
          <table:table-cell table:style-name="ce188" table:formula="of:=SUM([.P124:.T124])" office:value-type="float" office:value="3" calcext:value-type="float">
            <text:p>3</text:p>
          </table:table-cell>
          <table:table-cell table:style-name="ce189" table:formula="of:=RANK([.U124];[.$U$4:.$U$133])" office:value-type="float" office:value="119" calcext:value-type="float">
            <text:p>119º</text:p>
          </table:table-cell>
          <table:table-cell table:style-name="ce161"/>
          <table:table-cell table:style-name="ce193" table:formula="of:=COUNTIF([.B124];&quot;&gt;0&quot;)+COUNTIF([.D124];&quot;&gt;0&quot;)+COUNTIF([.F124];&quot;&gt;0&quot;)+COUNTIF([.H124];&quot;&gt;0&quot;)+COUNTIF([.J124];&quot;&gt;0&quot;)" office:value-type="float" office:value="1" calcext:value-type="float">
            <text:p>1</text:p>
          </table:table-cell>
          <table:table-cell table:style-name="ce200" table:formula="of:=[.M124]/[.X124]" office:value-type="float" office:value="0" calcext:value-type="float">
            <text:p>0.0</text:p>
          </table:table-cell>
          <table:table-cell table:style-name="ce204" table:formula="of:=RANK([.Y124];[.$Y$4:.$Y$133])" office:value-type="float" office:value="71" calcext:value-type="float">
            <text:p>71º</text:p>
          </table:table-cell>
          <table:table-cell table:style-name="ce208" table:formula="of:=[.U124]/[.X124]" office:value-type="float" office:value="3" calcext:value-type="float">
            <text:p>3.0</text:p>
          </table:table-cell>
          <table:table-cell table:style-name="ce212" table:formula="of:=RANK([.AA124];[.$AA$4:.$AA$133])" office:value-type="float" office:value="113" calcext:value-type="float">
            <text:p>113º</text:p>
          </table:table-cell>
          <table:table-cell table:number-columns-repeated="996"/>
        </table:table-row>
        <table:table-row table:style-name="ro10">
          <table:table-cell table:style-name="ce129" office:value-type="string" calcext:value-type="string">
            <text:p>MARCO CAMINHA</text:p>
          </table:table-cell>
          <table:table-cell table:style-name="ce134" office:value-type="float" office:value="34" calcext:value-type="float">
            <text:p>34º</text:p>
          </table:table-cell>
          <table:table-cell table:style-name="ce139" table:formula="of:=IF([.B125]=20;1;IF([.B125]=19;2;IF([.B125]=19;2;IF([.B125]=18;3;IF([.B125]=17;4;IF([.B125]=16;5;IF([.B125]=15;6;IF([.B125]=14;7;IF([.B125]=13;8;IF([.B125]=12;9;IF([.B125]=11;10;IF([.B125]=10;11;IF([.B125]=9;12;IF([.B125]=8;13;IF([.B125]=7;14;IF([.B125]=6;15;IF([.B125]=5;16;IF([.B125]=4;17;IF([.B125]=3;18;IF([.B125]=2;19;IF([.B125]=1;20;0)))))))))))))))))))))" office:value-type="float" office:value="0" calcext:value-type="float">
            <text:p>0</text:p>
          </table:table-cell>
          <table:table-cell table:style-name="ce134" office:value-type="float" office:value="68" calcext:value-type="float">
            <text:p>68º</text:p>
          </table:table-cell>
          <table:table-cell table:style-name="ce139" table:formula="of:=IF([.D125]=20;1;IF([.D125]=19;2;IF([.D125]=19;2;IF([.D125]=18;3;IF([.D125]=17;4;IF([.D125]=16;5;IF([.D125]=15;6;IF([.D125]=14;7;IF([.D125]=13;8;IF([.D125]=12;9;IF([.D125]=11;10;IF([.D125]=10;11;IF([.D125]=9;12;IF([.D125]=8;13;IF([.D125]=7;14;IF([.D125]=6;15;IF([.D125]=5;16;IF([.D125]=4;17;IF([.D125]=3;18;IF([.D125]=2;19;IF([.D125]=1;20;0)))))))))))))))))))))" office:value-type="float" office:value="0" calcext:value-type="float">
            <text:p>0</text:p>
          </table:table-cell>
          <table:table-cell table:style-name="ce134" office:value-type="float" office:value="21" calcext:value-type="float">
            <text:p>21º</text:p>
          </table:table-cell>
          <table:table-cell table:style-name="ce139" table:formula="of:=IF([.F125]=20;1;IF([.F125]=19;2;IF([.F125]=19;2;IF([.F125]=18;3;IF([.F125]=17;4;IF([.F125]=16;5;IF([.F125]=15;6;IF([.F125]=14;7;IF([.F125]=13;8;IF([.F125]=12;9;IF([.F125]=11;10;IF([.F125]=10;11;IF([.F125]=9;12;IF([.F125]=8;13;IF([.F125]=7;14;IF([.F125]=6;15;IF([.F125]=5;16;IF([.F125]=4;17;IF([.F125]=3;18;IF([.F125]=2;19;IF([.F125]=1;20;0)))))))))))))))))))))" office:value-type="float" office:value="0" calcext:value-type="float">
            <text:p>0</text:p>
          </table:table-cell>
          <table:table-cell table:style-name="ce134" office:value-type="float" office:value="100" calcext:value-type="float">
            <text:p>100º</text:p>
          </table:table-cell>
          <table:table-cell table:style-name="ce139" table:formula="of:=IF([.H125]=20;1;IF([.H125]=19;2;IF([.H125]=19;2;IF([.H125]=18;3;IF([.H125]=17;4;IF([.H125]=16;5;IF([.H125]=15;6;IF([.H125]=14;7;IF([.H125]=13;8;IF([.H125]=12;9;IF([.H125]=11;10;IF([.H125]=10;11;IF([.H125]=9;12;IF([.H125]=8;13;IF([.H125]=7;14;IF([.H125]=6;15;IF([.H125]=5;16;IF([.H125]=4;17;IF([.H125]=3;18;IF([.H125]=2;19;IF([.H125]=1;20;0)))))))))))))))))))))" office:value-type="float" office:value="0" calcext:value-type="float">
            <text:p>0</text:p>
          </table:table-cell>
          <table:table-cell table:style-name="ce134" office:value-type="string" calcext:value-type="string">
            <text:p>-</text:p>
          </table:table-cell>
          <table:table-cell table:style-name="ce145" table:formula="of:=IF([.J125]=20;1;IF([.J125]=19;2;IF([.J125]=19;2;IF([.J125]=18;3;IF([.J125]=17;4;IF([.J125]=16;5;IF([.J125]=15;6;IF([.J125]=14;7;IF([.J125]=13;8;IF([.J125]=12;9;IF([.J125]=11;10;IF([.J125]=10;11;IF([.J125]=9;12;IF([.J125]=8;13;IF([.J125]=7;14;IF([.J125]=6;15;IF([.J125]=5;16;IF([.J125]=4;17;IF([.J125]=3;18;IF([.J125]=2;19;IF([.J125]=1;20;0)))))))))))))))))))))" office:value-type="float" office:value="0" calcext:value-type="float">
            <text:p>0</text:p>
          </table:table-cell>
          <table:table-cell table:style-name="ce150"/>
          <table:table-cell table:style-name="ce158" table:formula="of:=SUM([.C125];[.E125];[.G125];[.I125];[.K125])" office:value-type="float" office:value="0" calcext:value-type="float">
            <text:p>0</text:p>
          </table:table-cell>
          <table:table-cell table:style-name="ce160" table:formula="of:=RANK([.M125];[.$M$4:.$M$133])" office:value-type="float" office:value="71" calcext:value-type="float">
            <text:p>71º</text:p>
          </table:table-cell>
          <table:table-cell table:style-name="ce161"/>
          <table:table-cell table:style-name="ce169" office:value-type="float" office:value="5" calcext:value-type="float">
            <text:p>5</text:p>
          </table:table-cell>
          <table:table-cell table:style-name="ce175" office:value-type="float" office:value="4" calcext:value-type="float">
            <text:p>4</text:p>
          </table:table-cell>
          <table:table-cell table:style-name="ce175" office:value-type="float" office:value="8" calcext:value-type="float">
            <text:p>8</text:p>
          </table:table-cell>
          <table:table-cell table:style-name="ce180" office:value-type="float" office:value="3" calcext:value-type="float">
            <text:p>3</text:p>
          </table:table-cell>
          <table:table-cell table:style-name="ce185" office:value-type="float" office:value="3" calcext:value-type="float">
            <text:p>3</text:p>
          </table:table-cell>
          <table:table-cell table:style-name="ce188" table:formula="of:=SUM([.P125:.T125])" office:value-type="float" office:value="23" calcext:value-type="float">
            <text:p>23</text:p>
          </table:table-cell>
          <table:table-cell table:style-name="ce189" table:formula="of:=RANK([.U125];[.$U$4:.$U$133])" office:value-type="float" office:value="22" calcext:value-type="float">
            <text:p>22º</text:p>
          </table:table-cell>
          <table:table-cell table:style-name="ce161"/>
          <table:table-cell table:style-name="ce193" table:formula="of:=COUNTIF([.B125];&quot;&gt;0&quot;)+COUNTIF([.D125];&quot;&gt;0&quot;)+COUNTIF([.F125];&quot;&gt;0&quot;)+COUNTIF([.H125];&quot;&gt;0&quot;)+COUNTIF([.J125];&quot;&gt;0&quot;)" office:value-type="float" office:value="4" calcext:value-type="float">
            <text:p>4</text:p>
          </table:table-cell>
          <table:table-cell table:style-name="ce200" table:formula="of:=[.M125]/[.X125]" office:value-type="float" office:value="0" calcext:value-type="float">
            <text:p>0.0</text:p>
          </table:table-cell>
          <table:table-cell table:style-name="ce204" table:formula="of:=RANK([.Y125];[.$Y$4:.$Y$133])" office:value-type="float" office:value="71" calcext:value-type="float">
            <text:p>71º</text:p>
          </table:table-cell>
          <table:table-cell table:style-name="ce208" table:formula="of:=[.U125]/[.X125]" office:value-type="float" office:value="5.75" calcext:value-type="float">
            <text:p>5.8</text:p>
          </table:table-cell>
          <table:table-cell table:style-name="ce212" table:formula="of:=RANK([.AA125];[.$AA$4:.$AA$133])" office:value-type="float" office:value="52" calcext:value-type="float">
            <text:p>52º</text:p>
          </table:table-cell>
          <table:table-cell table:number-columns-repeated="996"/>
        </table:table-row>
        <table:table-row table:style-name="ro10">
          <table:table-cell table:style-name="ce126" office:value-type="string" calcext:value-type="string">
            <text:p>VANESSA</text:p>
          </table:table-cell>
          <table:table-cell table:style-name="ce134" office:value-type="string" calcext:value-type="string">
            <text:p>-</text:p>
          </table:table-cell>
          <table:table-cell table:style-name="ce139" table:formula="of:=IF([.B126]=20;1;IF([.B126]=19;2;IF([.B126]=19;2;IF([.B126]=18;3;IF([.B126]=17;4;IF([.B126]=16;5;IF([.B126]=15;6;IF([.B126]=14;7;IF([.B126]=13;8;IF([.B126]=12;9;IF([.B126]=11;10;IF([.B126]=10;11;IF([.B126]=9;12;IF([.B126]=8;13;IF([.B126]=7;14;IF([.B126]=6;15;IF([.B126]=5;16;IF([.B126]=4;17;IF([.B126]=3;18;IF([.B126]=2;19;IF([.B126]=1;20;0)))))))))))))))))))))" office:value-type="float" office:value="0" calcext:value-type="float">
            <text:p>0</text:p>
          </table:table-cell>
          <table:table-cell table:style-name="ce134" office:value-type="string" calcext:value-type="string">
            <text:p>-</text:p>
          </table:table-cell>
          <table:table-cell table:style-name="ce139" table:formula="of:=IF([.D126]=20;1;IF([.D126]=19;2;IF([.D126]=19;2;IF([.D126]=18;3;IF([.D126]=17;4;IF([.D126]=16;5;IF([.D126]=15;6;IF([.D126]=14;7;IF([.D126]=13;8;IF([.D126]=12;9;IF([.D126]=11;10;IF([.D126]=10;11;IF([.D126]=9;12;IF([.D126]=8;13;IF([.D126]=7;14;IF([.D126]=6;15;IF([.D126]=5;16;IF([.D126]=4;17;IF([.D126]=3;18;IF([.D126]=2;19;IF([.D126]=1;20;0)))))))))))))))))))))" office:value-type="float" office:value="0" calcext:value-type="float">
            <text:p>0</text:p>
          </table:table-cell>
          <table:table-cell table:style-name="ce134" office:value-type="string" calcext:value-type="string">
            <text:p>-</text:p>
          </table:table-cell>
          <table:table-cell table:style-name="ce139" table:formula="of:=IF([.F126]=20;1;IF([.F126]=19;2;IF([.F126]=19;2;IF([.F126]=18;3;IF([.F126]=17;4;IF([.F126]=16;5;IF([.F126]=15;6;IF([.F126]=14;7;IF([.F126]=13;8;IF([.F126]=12;9;IF([.F126]=11;10;IF([.F126]=10;11;IF([.F126]=9;12;IF([.F126]=8;13;IF([.F126]=7;14;IF([.F126]=6;15;IF([.F126]=5;16;IF([.F126]=4;17;IF([.F126]=3;18;IF([.F126]=2;19;IF([.F126]=1;20;0)))))))))))))))))))))" office:value-type="float" office:value="0" calcext:value-type="float">
            <text:p>0</text:p>
          </table:table-cell>
          <table:table-cell table:style-name="ce134" office:value-type="float" office:value="4" calcext:value-type="float">
            <text:p>4º</text:p>
          </table:table-cell>
          <table:table-cell table:style-name="ce139" table:formula="of:=IF([.H126]=20;1;IF([.H126]=19;2;IF([.H126]=19;2;IF([.H126]=18;3;IF([.H126]=17;4;IF([.H126]=16;5;IF([.H126]=15;6;IF([.H126]=14;7;IF([.H126]=13;8;IF([.H126]=12;9;IF([.H126]=11;10;IF([.H126]=10;11;IF([.H126]=9;12;IF([.H126]=8;13;IF([.H126]=7;14;IF([.H126]=6;15;IF([.H126]=5;16;IF([.H126]=4;17;IF([.H126]=3;18;IF([.H126]=2;19;IF([.H126]=1;20;0)))))))))))))))))))))" office:value-type="float" office:value="17" calcext:value-type="float">
            <text:p>17</text:p>
          </table:table-cell>
          <table:table-cell table:style-name="ce134" office:value-type="string" calcext:value-type="string">
            <text:p>-</text:p>
          </table:table-cell>
          <table:table-cell table:style-name="ce145" table:formula="of:=IF([.J126]=20;1;IF([.J126]=19;2;IF([.J126]=19;2;IF([.J126]=18;3;IF([.J126]=17;4;IF([.J126]=16;5;IF([.J126]=15;6;IF([.J126]=14;7;IF([.J126]=13;8;IF([.J126]=12;9;IF([.J126]=11;10;IF([.J126]=10;11;IF([.J126]=9;12;IF([.J126]=8;13;IF([.J126]=7;14;IF([.J126]=6;15;IF([.J126]=5;16;IF([.J126]=4;17;IF([.J126]=3;18;IF([.J126]=2;19;IF([.J126]=1;20;0)))))))))))))))))))))" office:value-type="float" office:value="0" calcext:value-type="float">
            <text:p>0</text:p>
          </table:table-cell>
          <table:table-cell table:style-name="ce151"/>
          <table:table-cell table:style-name="ce158" table:formula="of:=SUM([.C126];[.E126];[.G126];[.I126];[.K126])" office:value-type="float" office:value="17" calcext:value-type="float">
            <text:p>17</text:p>
          </table:table-cell>
          <table:table-cell table:style-name="ce160" table:formula="of:=RANK([.M126];[.$M$4:.$M$133])" office:value-type="float" office:value="29" calcext:value-type="float">
            <text:p>29º</text:p>
          </table:table-cell>
          <table:table-cell table:style-name="ce162"/>
          <table:table-cell table:style-name="ce172" office:value-type="string" calcext:value-type="string">
            <text:p>-</text:p>
          </table:table-cell>
          <table:table-cell table:number-columns-repeated="2" table:style-name="ce176" office:value-type="string" calcext:value-type="string">
            <text:p>-</text:p>
          </table:table-cell>
          <table:table-cell table:style-name="ce180" office:value-type="float" office:value="5" calcext:value-type="float">
            <text:p>5</text:p>
          </table:table-cell>
          <table:table-cell table:style-name="ce185" office:value-type="string" calcext:value-type="string">
            <text:p>-</text:p>
          </table:table-cell>
          <table:table-cell table:style-name="ce188" table:formula="of:=SUM([.P126:.T126])" office:value-type="float" office:value="5" calcext:value-type="float">
            <text:p>5</text:p>
          </table:table-cell>
          <table:table-cell table:style-name="ce189" table:formula="of:=RANK([.U126];[.$U$4:.$U$133])" office:value-type="float" office:value="102" calcext:value-type="float">
            <text:p>102º</text:p>
          </table:table-cell>
          <table:table-cell table:style-name="ce162"/>
          <table:table-cell table:style-name="ce193" table:formula="of:=COUNTIF([.B126];&quot;&gt;0&quot;)+COUNTIF([.D126];&quot;&gt;0&quot;)+COUNTIF([.F126];&quot;&gt;0&quot;)+COUNTIF([.H126];&quot;&gt;0&quot;)+COUNTIF([.J126];&quot;&gt;0&quot;)" office:value-type="float" office:value="1" calcext:value-type="float">
            <text:p>1</text:p>
          </table:table-cell>
          <table:table-cell table:style-name="ce200" table:formula="of:=[.M126]/[.X126]" office:value-type="float" office:value="17" calcext:value-type="float">
            <text:p>17.0</text:p>
          </table:table-cell>
          <table:table-cell table:style-name="ce204" table:formula="of:=RANK([.Y126];[.$Y$4:.$Y$133])" office:value-type="float" office:value="4" calcext:value-type="float">
            <text:p>4º</text:p>
          </table:table-cell>
          <table:table-cell table:style-name="ce208" table:formula="of:=[.U126]/[.X126]" office:value-type="float" office:value="5" calcext:value-type="float">
            <text:p>5.0</text:p>
          </table:table-cell>
          <table:table-cell table:style-name="ce212" table:formula="of:=RANK([.AA126];[.$AA$4:.$AA$133])" office:value-type="float" office:value="68" calcext:value-type="float">
            <text:p>68º</text:p>
          </table:table-cell>
          <table:table-cell table:number-columns-repeated="996"/>
        </table:table-row>
        <table:table-row table:style-name="ro10">
          <table:table-cell table:style-name="ce126" office:value-type="string" calcext:value-type="string">
            <text:p>VICENTE CUNDA</text:p>
          </table:table-cell>
          <table:table-cell table:style-name="ce134"/>
          <table:table-cell table:style-name="ce139" table:formula="of:=IF([.B127]=20;1;IF([.B127]=19;2;IF([.B127]=19;2;IF([.B127]=18;3;IF([.B127]=17;4;IF([.B127]=16;5;IF([.B127]=15;6;IF([.B127]=14;7;IF([.B127]=13;8;IF([.B127]=12;9;IF([.B127]=11;10;IF([.B127]=10;11;IF([.B127]=9;12;IF([.B127]=8;13;IF([.B127]=7;14;IF([.B127]=6;15;IF([.B127]=5;16;IF([.B127]=4;17;IF([.B127]=3;18;IF([.B127]=2;19;IF([.B127]=1;20;0)))))))))))))))))))))" office:value-type="float" office:value="0" calcext:value-type="float">
            <text:p>0</text:p>
          </table:table-cell>
          <table:table-cell table:style-name="ce134"/>
          <table:table-cell table:style-name="ce139" table:formula="of:=IF([.D127]=20;1;IF([.D127]=19;2;IF([.D127]=19;2;IF([.D127]=18;3;IF([.D127]=17;4;IF([.D127]=16;5;IF([.D127]=15;6;IF([.D127]=14;7;IF([.D127]=13;8;IF([.D127]=12;9;IF([.D127]=11;10;IF([.D127]=10;11;IF([.D127]=9;12;IF([.D127]=8;13;IF([.D127]=7;14;IF([.D127]=6;15;IF([.D127]=5;16;IF([.D127]=4;17;IF([.D127]=3;18;IF([.D127]=2;19;IF([.D127]=1;20;0)))))))))))))))))))))" office:value-type="float" office:value="0" calcext:value-type="float">
            <text:p>0</text:p>
          </table:table-cell>
          <table:table-cell table:style-name="ce134" office:value-type="float" office:value="46" calcext:value-type="float">
            <text:p>46º</text:p>
          </table:table-cell>
          <table:table-cell table:style-name="ce139" table:formula="of:=IF([.F127]=20;1;IF([.F127]=19;2;IF([.F127]=19;2;IF([.F127]=18;3;IF([.F127]=17;4;IF([.F127]=16;5;IF([.F127]=15;6;IF([.F127]=14;7;IF([.F127]=13;8;IF([.F127]=12;9;IF([.F127]=11;10;IF([.F127]=10;11;IF([.F127]=9;12;IF([.F127]=8;13;IF([.F127]=7;14;IF([.F127]=6;15;IF([.F127]=5;16;IF([.F127]=4;17;IF([.F127]=3;18;IF([.F127]=2;19;IF([.F127]=1;20;0)))))))))))))))))))))" office:value-type="float" office:value="0" calcext:value-type="float">
            <text:p>0</text:p>
          </table:table-cell>
          <table:table-cell table:style-name="ce134" office:value-type="float" office:value="52" calcext:value-type="float">
            <text:p>52º</text:p>
          </table:table-cell>
          <table:table-cell table:style-name="ce139" table:formula="of:=IF([.H127]=20;1;IF([.H127]=19;2;IF([.H127]=19;2;IF([.H127]=18;3;IF([.H127]=17;4;IF([.H127]=16;5;IF([.H127]=15;6;IF([.H127]=14;7;IF([.H127]=13;8;IF([.H127]=12;9;IF([.H127]=11;10;IF([.H127]=10;11;IF([.H127]=9;12;IF([.H127]=8;13;IF([.H127]=7;14;IF([.H127]=6;15;IF([.H127]=5;16;IF([.H127]=4;17;IF([.H127]=3;18;IF([.H127]=2;19;IF([.H127]=1;20;0)))))))))))))))))))))" office:value-type="float" office:value="0" calcext:value-type="float">
            <text:p>0</text:p>
          </table:table-cell>
          <table:table-cell table:style-name="ce134" office:value-type="float" office:value="14" calcext:value-type="float">
            <text:p>14º</text:p>
          </table:table-cell>
          <table:table-cell table:style-name="ce145" table:formula="of:=IF([.J127]=20;1;IF([.J127]=19;2;IF([.J127]=19;2;IF([.J127]=18;3;IF([.J127]=17;4;IF([.J127]=16;5;IF([.J127]=15;6;IF([.J127]=14;7;IF([.J127]=13;8;IF([.J127]=12;9;IF([.J127]=11;10;IF([.J127]=10;11;IF([.J127]=9;12;IF([.J127]=8;13;IF([.J127]=7;14;IF([.J127]=6;15;IF([.J127]=5;16;IF([.J127]=4;17;IF([.J127]=3;18;IF([.J127]=2;19;IF([.J127]=1;20;0)))))))))))))))))))))" office:value-type="float" office:value="7" calcext:value-type="float">
            <text:p>7</text:p>
          </table:table-cell>
          <table:table-cell table:style-name="ce150"/>
          <table:table-cell table:style-name="ce158" table:formula="of:=SUM([.C127];[.E127];[.G127];[.I127];[.K127])" office:value-type="float" office:value="7" calcext:value-type="float">
            <text:p>7</text:p>
          </table:table-cell>
          <table:table-cell table:style-name="ce160" table:formula="of:=RANK([.M127];[.$M$4:.$M$133])" office:value-type="float" office:value="54" calcext:value-type="float">
            <text:p>54º</text:p>
          </table:table-cell>
          <table:table-cell table:style-name="ce161"/>
          <table:table-cell table:style-name="ce169" office:value-type="string" calcext:value-type="string">
            <text:p>-</text:p>
          </table:table-cell>
          <table:table-cell table:style-name="ce175" office:value-type="string" calcext:value-type="string">
            <text:p>-</text:p>
          </table:table-cell>
          <table:table-cell table:style-name="ce175" office:value-type="float" office:value="5" calcext:value-type="float">
            <text:p>5</text:p>
          </table:table-cell>
          <table:table-cell table:style-name="ce180" office:value-type="float" office:value="4" calcext:value-type="float">
            <text:p>4</text:p>
          </table:table-cell>
          <table:table-cell table:style-name="ce185" office:value-type="float" office:value="3" calcext:value-type="float">
            <text:p>3</text:p>
          </table:table-cell>
          <table:table-cell table:style-name="ce188" table:formula="of:=SUM([.P127:.T127])" office:value-type="float" office:value="12" calcext:value-type="float">
            <text:p>12</text:p>
          </table:table-cell>
          <table:table-cell table:style-name="ce189" table:formula="of:=RANK([.U127];[.$U$4:.$U$133])" office:value-type="float" office:value="56" calcext:value-type="float">
            <text:p>56º</text:p>
          </table:table-cell>
          <table:table-cell table:style-name="ce161"/>
          <table:table-cell table:style-name="ce193" table:formula="of:=COUNTIF([.B127];&quot;&gt;0&quot;)+COUNTIF([.D127];&quot;&gt;0&quot;)+COUNTIF([.F127];&quot;&gt;0&quot;)+COUNTIF([.H127];&quot;&gt;0&quot;)+COUNTIF([.J127];&quot;&gt;0&quot;)" office:value-type="float" office:value="3" calcext:value-type="float">
            <text:p>3</text:p>
          </table:table-cell>
          <table:table-cell table:style-name="ce200" table:formula="of:=[.M127]/[.X127]" office:value-type="float" office:value="2.33333333333333" calcext:value-type="float">
            <text:p>2.3</text:p>
          </table:table-cell>
          <table:table-cell table:style-name="ce204" table:formula="of:=RANK([.Y127];[.$Y$4:.$Y$133])" office:value-type="float" office:value="56" calcext:value-type="float">
            <text:p>56º</text:p>
          </table:table-cell>
          <table:table-cell table:style-name="ce208" table:formula="of:=[.U127]/[.X127]" office:value-type="float" office:value="4" calcext:value-type="float">
            <text:p>4.0</text:p>
          </table:table-cell>
          <table:table-cell table:style-name="ce212" table:formula="of:=RANK([.AA127];[.$AA$4:.$AA$133])" office:value-type="float" office:value="98" calcext:value-type="float">
            <text:p>98º</text:p>
          </table:table-cell>
          <table:table-cell table:number-columns-repeated="996"/>
        </table:table-row>
        <table:table-row table:style-name="ro10">
          <table:table-cell table:style-name="ce126" office:value-type="string" calcext:value-type="string">
            <text:p>VICENTE MADEIRA</text:p>
          </table:table-cell>
          <table:table-cell table:style-name="ce134" office:value-type="float" office:value="20" calcext:value-type="float">
            <text:p>20º</text:p>
          </table:table-cell>
          <table:table-cell table:style-name="ce139" table:formula="of:=IF([.B128]=20;1;IF([.B128]=19;2;IF([.B128]=19;2;IF([.B128]=18;3;IF([.B128]=17;4;IF([.B128]=16;5;IF([.B128]=15;6;IF([.B128]=14;7;IF([.B128]=13;8;IF([.B128]=12;9;IF([.B128]=11;10;IF([.B128]=10;11;IF([.B128]=9;12;IF([.B128]=8;13;IF([.B128]=7;14;IF([.B128]=6;15;IF([.B128]=5;16;IF([.B128]=4;17;IF([.B128]=3;18;IF([.B128]=2;19;IF([.B128]=1;20;0)))))))))))))))))))))" office:value-type="float" office:value="1" calcext:value-type="float">
            <text:p>1</text:p>
          </table:table-cell>
          <table:table-cell table:style-name="ce134" office:value-type="float" office:value="64" calcext:value-type="float">
            <text:p>64º</text:p>
          </table:table-cell>
          <table:table-cell table:style-name="ce139" table:formula="of:=IF([.D128]=20;1;IF([.D128]=19;2;IF([.D128]=19;2;IF([.D128]=18;3;IF([.D128]=17;4;IF([.D128]=16;5;IF([.D128]=15;6;IF([.D128]=14;7;IF([.D128]=13;8;IF([.D128]=12;9;IF([.D128]=11;10;IF([.D128]=10;11;IF([.D128]=9;12;IF([.D128]=8;13;IF([.D128]=7;14;IF([.D128]=6;15;IF([.D128]=5;16;IF([.D128]=4;17;IF([.D128]=3;18;IF([.D128]=2;19;IF([.D128]=1;20;0)))))))))))))))))))))" office:value-type="float" office:value="0" calcext:value-type="float">
            <text:p>0</text:p>
          </table:table-cell>
          <table:table-cell table:style-name="ce134"/>
          <table:table-cell table:style-name="ce139" table:formula="of:=IF([.F128]=20;1;IF([.F128]=19;2;IF([.F128]=19;2;IF([.F128]=18;3;IF([.F128]=17;4;IF([.F128]=16;5;IF([.F128]=15;6;IF([.F128]=14;7;IF([.F128]=13;8;IF([.F128]=12;9;IF([.F128]=11;10;IF([.F128]=10;11;IF([.F128]=9;12;IF([.F128]=8;13;IF([.F128]=7;14;IF([.F128]=6;15;IF([.F128]=5;16;IF([.F128]=4;17;IF([.F128]=3;18;IF([.F128]=2;19;IF([.F128]=1;20;0)))))))))))))))))))))" office:value-type="float" office:value="0" calcext:value-type="float">
            <text:p>0</text:p>
          </table:table-cell>
          <table:table-cell table:style-name="ce134"/>
          <table:table-cell table:style-name="ce139" table:formula="of:=IF([.H128]=20;1;IF([.H128]=19;2;IF([.H128]=19;2;IF([.H128]=18;3;IF([.H128]=17;4;IF([.H128]=16;5;IF([.H128]=15;6;IF([.H128]=14;7;IF([.H128]=13;8;IF([.H128]=12;9;IF([.H128]=11;10;IF([.H128]=10;11;IF([.H128]=9;12;IF([.H128]=8;13;IF([.H128]=7;14;IF([.H128]=6;15;IF([.H128]=5;16;IF([.H128]=4;17;IF([.H128]=3;18;IF([.H128]=2;19;IF([.H128]=1;20;0)))))))))))))))))))))" office:value-type="float" office:value="0" calcext:value-type="float">
            <text:p>0</text:p>
          </table:table-cell>
          <table:table-cell table:style-name="ce134"/>
          <table:table-cell table:style-name="ce145" table:formula="of:=IF([.J128]=20;1;IF([.J128]=19;2;IF([.J128]=19;2;IF([.J128]=18;3;IF([.J128]=17;4;IF([.J128]=16;5;IF([.J128]=15;6;IF([.J128]=14;7;IF([.J128]=13;8;IF([.J128]=12;9;IF([.J128]=11;10;IF([.J128]=10;11;IF([.J128]=9;12;IF([.J128]=8;13;IF([.J128]=7;14;IF([.J128]=6;15;IF([.J128]=5;16;IF([.J128]=4;17;IF([.J128]=3;18;IF([.J128]=2;19;IF([.J128]=1;20;0)))))))))))))))))))))" office:value-type="float" office:value="0" calcext:value-type="float">
            <text:p>0</text:p>
          </table:table-cell>
          <table:table-cell table:style-name="ce151"/>
          <table:table-cell table:style-name="ce158" table:formula="of:=SUM([.C128];[.E128];[.G128];[.I128];[.K128])" office:value-type="float" office:value="1" calcext:value-type="float">
            <text:p>1</text:p>
          </table:table-cell>
          <table:table-cell table:style-name="ce160" table:formula="of:=RANK([.M128];[.$M$4:.$M$133])" office:value-type="float" office:value="69" calcext:value-type="float">
            <text:p>69º</text:p>
          </table:table-cell>
          <table:table-cell table:style-name="ce162"/>
          <table:table-cell table:style-name="ce169" office:value-type="float" office:value="5" calcext:value-type="float">
            <text:p>5</text:p>
          </table:table-cell>
          <table:table-cell table:style-name="ce176" office:value-type="string" calcext:value-type="string">
            <text:p>-</text:p>
          </table:table-cell>
          <table:table-cell table:number-columns-repeated="2" table:style-name="ce180" office:value-type="string" calcext:value-type="string">
            <text:p>-</text:p>
          </table:table-cell>
          <table:table-cell table:style-name="ce185" office:value-type="string" calcext:value-type="string">
            <text:p>-</text:p>
          </table:table-cell>
          <table:table-cell table:style-name="ce188" table:formula="of:=SUM([.P128:.T128])" office:value-type="float" office:value="5" calcext:value-type="float">
            <text:p>5</text:p>
          </table:table-cell>
          <table:table-cell table:style-name="ce189" table:formula="of:=RANK([.U128];[.$U$4:.$U$133])" office:value-type="float" office:value="102" calcext:value-type="float">
            <text:p>102º</text:p>
          </table:table-cell>
          <table:table-cell table:style-name="ce162"/>
          <table:table-cell table:style-name="ce193" table:formula="of:=COUNTIF([.B128];&quot;&gt;0&quot;)+COUNTIF([.D128];&quot;&gt;0&quot;)+COUNTIF([.F128];&quot;&gt;0&quot;)+COUNTIF([.H128];&quot;&gt;0&quot;)+COUNTIF([.J128];&quot;&gt;0&quot;)" office:value-type="float" office:value="2" calcext:value-type="float">
            <text:p>2</text:p>
          </table:table-cell>
          <table:table-cell table:style-name="ce200" table:formula="of:=[.M128]/[.X128]" office:value-type="float" office:value="0.5" calcext:value-type="float">
            <text:p>0.5</text:p>
          </table:table-cell>
          <table:table-cell table:style-name="ce204" table:formula="of:=RANK([.Y128];[.$Y$4:.$Y$133])" office:value-type="float" office:value="69" calcext:value-type="float">
            <text:p>69º</text:p>
          </table:table-cell>
          <table:table-cell table:style-name="ce208" table:formula="of:=[.U128]/[.X128]" office:value-type="float" office:value="2.5" calcext:value-type="float">
            <text:p>2.5</text:p>
          </table:table-cell>
          <table:table-cell table:style-name="ce212" table:formula="of:=RANK([.AA128];[.$AA$4:.$AA$133])" office:value-type="float" office:value="120" calcext:value-type="float">
            <text:p>120º</text:p>
          </table:table-cell>
          <table:table-cell table:number-columns-repeated="996"/>
        </table:table-row>
        <table:table-row table:style-name="ro10">
          <table:table-cell table:style-name="ce126" office:value-type="string" calcext:value-type="string">
            <text:p>VICTOR</text:p>
          </table:table-cell>
          <table:table-cell table:style-name="ce134" office:value-type="string" calcext:value-type="string">
            <text:p>-</text:p>
          </table:table-cell>
          <table:table-cell table:style-name="ce139" table:formula="of:=IF([.B129]=20;1;IF([.B129]=19;2;IF([.B129]=19;2;IF([.B129]=18;3;IF([.B129]=17;4;IF([.B129]=16;5;IF([.B129]=15;6;IF([.B129]=14;7;IF([.B129]=13;8;IF([.B129]=12;9;IF([.B129]=11;10;IF([.B129]=10;11;IF([.B129]=9;12;IF([.B129]=8;13;IF([.B129]=7;14;IF([.B129]=6;15;IF([.B129]=5;16;IF([.B129]=4;17;IF([.B129]=3;18;IF([.B129]=2;19;IF([.B129]=1;20;0)))))))))))))))))))))" office:value-type="float" office:value="0" calcext:value-type="float">
            <text:p>0</text:p>
          </table:table-cell>
          <table:table-cell table:style-name="ce134" office:value-type="string" calcext:value-type="string">
            <text:p>-</text:p>
          </table:table-cell>
          <table:table-cell table:style-name="ce139" table:formula="of:=IF([.D129]=20;1;IF([.D129]=19;2;IF([.D129]=19;2;IF([.D129]=18;3;IF([.D129]=17;4;IF([.D129]=16;5;IF([.D129]=15;6;IF([.D129]=14;7;IF([.D129]=13;8;IF([.D129]=12;9;IF([.D129]=11;10;IF([.D129]=10;11;IF([.D129]=9;12;IF([.D129]=8;13;IF([.D129]=7;14;IF([.D129]=6;15;IF([.D129]=5;16;IF([.D129]=4;17;IF([.D129]=3;18;IF([.D129]=2;19;IF([.D129]=1;20;0)))))))))))))))))))))" office:value-type="float" office:value="0" calcext:value-type="float">
            <text:p>0</text:p>
          </table:table-cell>
          <table:table-cell table:style-name="ce134" office:value-type="float" office:value="38" calcext:value-type="float">
            <text:p>38º</text:p>
          </table:table-cell>
          <table:table-cell table:style-name="ce139" table:formula="of:=IF([.F129]=20;1;IF([.F129]=19;2;IF([.F129]=19;2;IF([.F129]=18;3;IF([.F129]=17;4;IF([.F129]=16;5;IF([.F129]=15;6;IF([.F129]=14;7;IF([.F129]=13;8;IF([.F129]=12;9;IF([.F129]=11;10;IF([.F129]=10;11;IF([.F129]=9;12;IF([.F129]=8;13;IF([.F129]=7;14;IF([.F129]=6;15;IF([.F129]=5;16;IF([.F129]=4;17;IF([.F129]=3;18;IF([.F129]=2;19;IF([.F129]=1;20;0)))))))))))))))))))))" office:value-type="float" office:value="0" calcext:value-type="float">
            <text:p>0</text:p>
          </table:table-cell>
          <table:table-cell table:style-name="ce134" office:value-type="float" office:value="75" calcext:value-type="float">
            <text:p>75º</text:p>
          </table:table-cell>
          <table:table-cell table:style-name="ce139" table:formula="of:=IF([.H129]=20;1;IF([.H129]=19;2;IF([.H129]=19;2;IF([.H129]=18;3;IF([.H129]=17;4;IF([.H129]=16;5;IF([.H129]=15;6;IF([.H129]=14;7;IF([.H129]=13;8;IF([.H129]=12;9;IF([.H129]=11;10;IF([.H129]=10;11;IF([.H129]=9;12;IF([.H129]=8;13;IF([.H129]=7;14;IF([.H129]=6;15;IF([.H129]=5;16;IF([.H129]=4;17;IF([.H129]=3;18;IF([.H129]=2;19;IF([.H129]=1;20;0)))))))))))))))))))))" office:value-type="float" office:value="0" calcext:value-type="float">
            <text:p>0</text:p>
          </table:table-cell>
          <table:table-cell table:style-name="ce134" office:value-type="string" calcext:value-type="string">
            <text:p>-</text:p>
          </table:table-cell>
          <table:table-cell table:style-name="ce145" table:formula="of:=IF([.J129]=20;1;IF([.J129]=19;2;IF([.J129]=19;2;IF([.J129]=18;3;IF([.J129]=17;4;IF([.J129]=16;5;IF([.J129]=15;6;IF([.J129]=14;7;IF([.J129]=13;8;IF([.J129]=12;9;IF([.J129]=11;10;IF([.J129]=10;11;IF([.J129]=9;12;IF([.J129]=8;13;IF([.J129]=7;14;IF([.J129]=6;15;IF([.J129]=5;16;IF([.J129]=4;17;IF([.J129]=3;18;IF([.J129]=2;19;IF([.J129]=1;20;0)))))))))))))))))))))" office:value-type="float" office:value="0" calcext:value-type="float">
            <text:p>0</text:p>
          </table:table-cell>
          <table:table-cell table:style-name="ce151"/>
          <table:table-cell table:style-name="ce158" table:formula="of:=SUM([.C129];[.E129];[.G129];[.I129];[.K129])" office:value-type="float" office:value="0" calcext:value-type="float">
            <text:p>0</text:p>
          </table:table-cell>
          <table:table-cell table:style-name="ce160" table:formula="of:=RANK([.M129];[.$M$4:.$M$133])" office:value-type="float" office:value="71" calcext:value-type="float">
            <text:p>71º</text:p>
          </table:table-cell>
          <table:table-cell table:style-name="ce162"/>
          <table:table-cell table:style-name="ce172" office:value-type="string" calcext:value-type="string">
            <text:p>-</text:p>
          </table:table-cell>
          <table:table-cell table:style-name="ce176" office:value-type="string" calcext:value-type="string">
            <text:p>-</text:p>
          </table:table-cell>
          <table:table-cell table:style-name="ce180" office:value-type="float" office:value="6" calcext:value-type="float">
            <text:p>6</text:p>
          </table:table-cell>
          <table:table-cell table:style-name="ce180" office:value-type="float" office:value="7" calcext:value-type="float">
            <text:p>7</text:p>
          </table:table-cell>
          <table:table-cell table:style-name="ce185" office:value-type="string" calcext:value-type="string">
            <text:p>-</text:p>
          </table:table-cell>
          <table:table-cell table:style-name="ce188" table:formula="of:=SUM([.P129:.T129])" office:value-type="float" office:value="13" calcext:value-type="float">
            <text:p>13</text:p>
          </table:table-cell>
          <table:table-cell table:style-name="ce189" table:formula="of:=RANK([.U129];[.$U$4:.$U$133])" office:value-type="float" office:value="53" calcext:value-type="float">
            <text:p>53º</text:p>
          </table:table-cell>
          <table:table-cell table:style-name="ce162"/>
          <table:table-cell table:style-name="ce193" table:formula="of:=COUNTIF([.B129];&quot;&gt;0&quot;)+COUNTIF([.D129];&quot;&gt;0&quot;)+COUNTIF([.F129];&quot;&gt;0&quot;)+COUNTIF([.H129];&quot;&gt;0&quot;)+COUNTIF([.J129];&quot;&gt;0&quot;)" office:value-type="float" office:value="2" calcext:value-type="float">
            <text:p>2</text:p>
          </table:table-cell>
          <table:table-cell table:style-name="ce200" table:formula="of:=[.M129]/[.X129]" office:value-type="float" office:value="0" calcext:value-type="float">
            <text:p>0.0</text:p>
          </table:table-cell>
          <table:table-cell table:style-name="ce204" table:formula="of:=RANK([.Y129];[.$Y$4:.$Y$133])" office:value-type="float" office:value="71" calcext:value-type="float">
            <text:p>71º</text:p>
          </table:table-cell>
          <table:table-cell table:style-name="ce208" table:formula="of:=[.U129]/[.X129]" office:value-type="float" office:value="6.5" calcext:value-type="float">
            <text:p>6.5</text:p>
          </table:table-cell>
          <table:table-cell table:style-name="ce212" table:formula="of:=RANK([.AA129];[.$AA$4:.$AA$133])" office:value-type="float" office:value="26" calcext:value-type="float">
            <text:p>26º</text:p>
          </table:table-cell>
          <table:table-cell table:number-columns-repeated="996"/>
        </table:table-row>
        <table:table-row table:style-name="ro10">
          <table:table-cell table:style-name="ce129" office:value-type="string" calcext:value-type="string">
            <text:p>VITOR HAUSEN</text:p>
          </table:table-cell>
          <table:table-cell table:style-name="ce134" office:value-type="string" calcext:value-type="string">
            <text:p>-</text:p>
          </table:table-cell>
          <table:table-cell table:style-name="ce139" table:formula="of:=IF([.B130]=20;1;IF([.B130]=19;2;IF([.B130]=19;2;IF([.B130]=18;3;IF([.B130]=17;4;IF([.B130]=16;5;IF([.B130]=15;6;IF([.B130]=14;7;IF([.B130]=13;8;IF([.B130]=12;9;IF([.B130]=11;10;IF([.B130]=10;11;IF([.B130]=9;12;IF([.B130]=8;13;IF([.B130]=7;14;IF([.B130]=6;15;IF([.B130]=5;16;IF([.B130]=4;17;IF([.B130]=3;18;IF([.B130]=2;19;IF([.B130]=1;20;0)))))))))))))))))))))" office:value-type="float" office:value="0" calcext:value-type="float">
            <text:p>0</text:p>
          </table:table-cell>
          <table:table-cell table:style-name="ce134" office:value-type="string" calcext:value-type="string">
            <text:p>-</text:p>
          </table:table-cell>
          <table:table-cell table:style-name="ce139" table:formula="of:=IF([.D130]=20;1;IF([.D130]=19;2;IF([.D130]=19;2;IF([.D130]=18;3;IF([.D130]=17;4;IF([.D130]=16;5;IF([.D130]=15;6;IF([.D130]=14;7;IF([.D130]=13;8;IF([.D130]=12;9;IF([.D130]=11;10;IF([.D130]=10;11;IF([.D130]=9;12;IF([.D130]=8;13;IF([.D130]=7;14;IF([.D130]=6;15;IF([.D130]=5;16;IF([.D130]=4;17;IF([.D130]=3;18;IF([.D130]=2;19;IF([.D130]=1;20;0)))))))))))))))))))))" office:value-type="float" office:value="0" calcext:value-type="float">
            <text:p>0</text:p>
          </table:table-cell>
          <table:table-cell table:style-name="ce134" office:value-type="string" calcext:value-type="string">
            <text:p>-</text:p>
          </table:table-cell>
          <table:table-cell table:style-name="ce139" table:formula="of:=IF([.F130]=20;1;IF([.F130]=19;2;IF([.F130]=19;2;IF([.F130]=18;3;IF([.F130]=17;4;IF([.F130]=16;5;IF([.F130]=15;6;IF([.F130]=14;7;IF([.F130]=13;8;IF([.F130]=12;9;IF([.F130]=11;10;IF([.F130]=10;11;IF([.F130]=9;12;IF([.F130]=8;13;IF([.F130]=7;14;IF([.F130]=6;15;IF([.F130]=5;16;IF([.F130]=4;17;IF([.F130]=3;18;IF([.F130]=2;19;IF([.F130]=1;20;0)))))))))))))))))))))" office:value-type="float" office:value="0" calcext:value-type="float">
            <text:p>0</text:p>
          </table:table-cell>
          <table:table-cell table:style-name="ce134" office:value-type="float" office:value="24" calcext:value-type="float">
            <text:p>24º</text:p>
          </table:table-cell>
          <table:table-cell table:style-name="ce139" table:formula="of:=IF([.H130]=20;1;IF([.H130]=19;2;IF([.H130]=19;2;IF([.H130]=18;3;IF([.H130]=17;4;IF([.H130]=16;5;IF([.H130]=15;6;IF([.H130]=14;7;IF([.H130]=13;8;IF([.H130]=12;9;IF([.H130]=11;10;IF([.H130]=10;11;IF([.H130]=9;12;IF([.H130]=8;13;IF([.H130]=7;14;IF([.H130]=6;15;IF([.H130]=5;16;IF([.H130]=4;17;IF([.H130]=3;18;IF([.H130]=2;19;IF([.H130]=1;20;0)))))))))))))))))))))" office:value-type="float" office:value="0" calcext:value-type="float">
            <text:p>0</text:p>
          </table:table-cell>
          <table:table-cell table:style-name="ce134" office:value-type="string" calcext:value-type="string">
            <text:p>-</text:p>
          </table:table-cell>
          <table:table-cell table:style-name="ce145" table:formula="of:=IF([.J130]=20;1;IF([.J130]=19;2;IF([.J130]=19;2;IF([.J130]=18;3;IF([.J130]=17;4;IF([.J130]=16;5;IF([.J130]=15;6;IF([.J130]=14;7;IF([.J130]=13;8;IF([.J130]=12;9;IF([.J130]=11;10;IF([.J130]=10;11;IF([.J130]=9;12;IF([.J130]=8;13;IF([.J130]=7;14;IF([.J130]=6;15;IF([.J130]=5;16;IF([.J130]=4;17;IF([.J130]=3;18;IF([.J130]=2;19;IF([.J130]=1;20;0)))))))))))))))))))))" office:value-type="float" office:value="0" calcext:value-type="float">
            <text:p>0</text:p>
          </table:table-cell>
          <table:table-cell table:style-name="ce151"/>
          <table:table-cell table:style-name="ce158" table:formula="of:=SUM([.C130];[.E130];[.G130];[.I130];[.K130])" office:value-type="float" office:value="0" calcext:value-type="float">
            <text:p>0</text:p>
          </table:table-cell>
          <table:table-cell table:style-name="ce160" table:formula="of:=RANK([.M130];[.$M$4:.$M$133])" office:value-type="float" office:value="71" calcext:value-type="float">
            <text:p>71º</text:p>
          </table:table-cell>
          <table:table-cell table:style-name="ce162"/>
          <table:table-cell table:style-name="ce172" office:value-type="string" calcext:value-type="string">
            <text:p>-</text:p>
          </table:table-cell>
          <table:table-cell table:number-columns-repeated="2" table:style-name="ce176" office:value-type="string" calcext:value-type="string">
            <text:p>-</text:p>
          </table:table-cell>
          <table:table-cell table:style-name="ce180" office:value-type="float" office:value="6" calcext:value-type="float">
            <text:p>6</text:p>
          </table:table-cell>
          <table:table-cell table:style-name="ce185" office:value-type="string" calcext:value-type="string">
            <text:p>-</text:p>
          </table:table-cell>
          <table:table-cell table:style-name="ce188" table:formula="of:=SUM([.P130:.T130])" office:value-type="float" office:value="6" calcext:value-type="float">
            <text:p>6</text:p>
          </table:table-cell>
          <table:table-cell table:style-name="ce189" table:formula="of:=RANK([.U130];[.$U$4:.$U$133])" office:value-type="float" office:value="89" calcext:value-type="float">
            <text:p>89º</text:p>
          </table:table-cell>
          <table:table-cell table:style-name="ce162"/>
          <table:table-cell table:style-name="ce193" table:formula="of:=COUNTIF([.B130];&quot;&gt;0&quot;)+COUNTIF([.D130];&quot;&gt;0&quot;)+COUNTIF([.F130];&quot;&gt;0&quot;)+COUNTIF([.H130];&quot;&gt;0&quot;)+COUNTIF([.J130];&quot;&gt;0&quot;)" office:value-type="float" office:value="1" calcext:value-type="float">
            <text:p>1</text:p>
          </table:table-cell>
          <table:table-cell table:style-name="ce200" table:formula="of:=[.M130]/[.X130]" office:value-type="float" office:value="0" calcext:value-type="float">
            <text:p>0.0</text:p>
          </table:table-cell>
          <table:table-cell table:style-name="ce204" table:formula="of:=RANK([.Y130];[.$Y$4:.$Y$133])" office:value-type="float" office:value="71" calcext:value-type="float">
            <text:p>71º</text:p>
          </table:table-cell>
          <table:table-cell table:style-name="ce208" table:formula="of:=[.U130]/[.X130]" office:value-type="float" office:value="6" calcext:value-type="float">
            <text:p>6.0</text:p>
          </table:table-cell>
          <table:table-cell table:style-name="ce212" table:formula="of:=RANK([.AA130];[.$AA$4:.$AA$133])" office:value-type="float" office:value="36" calcext:value-type="float">
            <text:p>36º</text:p>
          </table:table-cell>
          <table:table-cell table:number-columns-repeated="996"/>
        </table:table-row>
        <table:table-row table:style-name="ro10">
          <table:table-cell table:style-name="ce126" office:value-type="string" calcext:value-type="string">
            <text:p>VOLMAR</text:p>
          </table:table-cell>
          <table:table-cell table:style-name="ce134" office:value-type="float" office:value="5" calcext:value-type="float">
            <text:p>5º</text:p>
          </table:table-cell>
          <table:table-cell table:style-name="ce139" table:formula="of:=IF([.B131]=20;1;IF([.B131]=19;2;IF([.B131]=19;2;IF([.B131]=18;3;IF([.B131]=17;4;IF([.B131]=16;5;IF([.B131]=15;6;IF([.B131]=14;7;IF([.B131]=13;8;IF([.B131]=12;9;IF([.B131]=11;10;IF([.B131]=10;11;IF([.B131]=9;12;IF([.B131]=8;13;IF([.B131]=7;14;IF([.B131]=6;15;IF([.B131]=5;16;IF([.B131]=4;17;IF([.B131]=3;18;IF([.B131]=2;19;IF([.B131]=1;20;0)))))))))))))))))))))" office:value-type="float" office:value="16" calcext:value-type="float">
            <text:p>16</text:p>
          </table:table-cell>
          <table:table-cell table:style-name="ce134" office:value-type="float" office:value="66" calcext:value-type="float">
            <text:p>66º</text:p>
          </table:table-cell>
          <table:table-cell table:style-name="ce139" table:formula="of:=IF([.D131]=20;1;IF([.D131]=19;2;IF([.D131]=19;2;IF([.D131]=18;3;IF([.D131]=17;4;IF([.D131]=16;5;IF([.D131]=15;6;IF([.D131]=14;7;IF([.D131]=13;8;IF([.D131]=12;9;IF([.D131]=11;10;IF([.D131]=10;11;IF([.D131]=9;12;IF([.D131]=8;13;IF([.D131]=7;14;IF([.D131]=6;15;IF([.D131]=5;16;IF([.D131]=4;17;IF([.D131]=3;18;IF([.D131]=2;19;IF([.D131]=1;20;0)))))))))))))))))))))" office:value-type="float" office:value="0" calcext:value-type="float">
            <text:p>0</text:p>
          </table:table-cell>
          <table:table-cell table:style-name="ce134" office:value-type="float" office:value="48" calcext:value-type="float">
            <text:p>48º</text:p>
          </table:table-cell>
          <table:table-cell table:style-name="ce139" table:formula="of:=IF([.F131]=20;1;IF([.F131]=19;2;IF([.F131]=19;2;IF([.F131]=18;3;IF([.F131]=17;4;IF([.F131]=16;5;IF([.F131]=15;6;IF([.F131]=14;7;IF([.F131]=13;8;IF([.F131]=12;9;IF([.F131]=11;10;IF([.F131]=10;11;IF([.F131]=9;12;IF([.F131]=8;13;IF([.F131]=7;14;IF([.F131]=6;15;IF([.F131]=5;16;IF([.F131]=4;17;IF([.F131]=3;18;IF([.F131]=2;19;IF([.F131]=1;20;0)))))))))))))))))))))" office:value-type="float" office:value="0" calcext:value-type="float">
            <text:p>0</text:p>
          </table:table-cell>
          <table:table-cell table:style-name="ce134" office:value-type="float" office:value="20" calcext:value-type="float">
            <text:p>20º</text:p>
          </table:table-cell>
          <table:table-cell table:style-name="ce139" table:formula="of:=IF([.H131]=20;1;IF([.H131]=19;2;IF([.H131]=19;2;IF([.H131]=18;3;IF([.H131]=17;4;IF([.H131]=16;5;IF([.H131]=15;6;IF([.H131]=14;7;IF([.H131]=13;8;IF([.H131]=12;9;IF([.H131]=11;10;IF([.H131]=10;11;IF([.H131]=9;12;IF([.H131]=8;13;IF([.H131]=7;14;IF([.H131]=6;15;IF([.H131]=5;16;IF([.H131]=4;17;IF([.H131]=3;18;IF([.H131]=2;19;IF([.H131]=1;20;0)))))))))))))))))))))" office:value-type="float" office:value="1" calcext:value-type="float">
            <text:p>1</text:p>
          </table:table-cell>
          <table:table-cell table:style-name="ce134" office:value-type="string" calcext:value-type="string">
            <text:p>-</text:p>
          </table:table-cell>
          <table:table-cell table:style-name="ce145" table:formula="of:=IF([.J131]=20;1;IF([.J131]=19;2;IF([.J131]=19;2;IF([.J131]=18;3;IF([.J131]=17;4;IF([.J131]=16;5;IF([.J131]=15;6;IF([.J131]=14;7;IF([.J131]=13;8;IF([.J131]=12;9;IF([.J131]=11;10;IF([.J131]=10;11;IF([.J131]=9;12;IF([.J131]=8;13;IF([.J131]=7;14;IF([.J131]=6;15;IF([.J131]=5;16;IF([.J131]=4;17;IF([.J131]=3;18;IF([.J131]=2;19;IF([.J131]=1;20;0)))))))))))))))))))))" office:value-type="float" office:value="0" calcext:value-type="float">
            <text:p>0</text:p>
          </table:table-cell>
          <table:table-cell table:style-name="ce155"/>
          <table:table-cell table:style-name="ce158" table:formula="of:=SUM([.C131];[.E131];[.G131];[.I131];[.K131])" office:value-type="float" office:value="17" calcext:value-type="float">
            <text:p>17</text:p>
          </table:table-cell>
          <table:table-cell table:style-name="ce160" table:formula="of:=RANK([.M131];[.$M$4:.$M$133])" office:value-type="float" office:value="29" calcext:value-type="float">
            <text:p>29º</text:p>
          </table:table-cell>
          <table:table-cell table:style-name="ce164"/>
          <table:table-cell table:style-name="ce169" office:value-type="float" office:value="9" calcext:value-type="float">
            <text:p>9</text:p>
          </table:table-cell>
          <table:table-cell table:style-name="ce175" office:value-type="float" office:value="5" calcext:value-type="float">
            <text:p>5</text:p>
          </table:table-cell>
          <table:table-cell table:style-name="ce180" office:value-type="float" office:value="8" calcext:value-type="float">
            <text:p>8</text:p>
          </table:table-cell>
          <table:table-cell table:style-name="ce180" office:value-type="float" office:value="6" calcext:value-type="float">
            <text:p>6</text:p>
          </table:table-cell>
          <table:table-cell table:style-name="ce185" office:value-type="string" calcext:value-type="string">
            <text:p>-</text:p>
          </table:table-cell>
          <table:table-cell table:style-name="ce188" table:formula="of:=SUM([.P131:.T131])" office:value-type="float" office:value="28" calcext:value-type="float">
            <text:p>28</text:p>
          </table:table-cell>
          <table:table-cell table:style-name="ce189" table:formula="of:=RANK([.U131];[.$U$4:.$U$133])" office:value-type="float" office:value="10" calcext:value-type="float">
            <text:p>10º</text:p>
          </table:table-cell>
          <table:table-cell table:style-name="ce164"/>
          <table:table-cell table:style-name="ce193" table:formula="of:=COUNTIF([.B131];&quot;&gt;0&quot;)+COUNTIF([.D131];&quot;&gt;0&quot;)+COUNTIF([.F131];&quot;&gt;0&quot;)+COUNTIF([.H131];&quot;&gt;0&quot;)+COUNTIF([.J131];&quot;&gt;0&quot;)" office:value-type="float" office:value="4" calcext:value-type="float">
            <text:p>4</text:p>
          </table:table-cell>
          <table:table-cell table:style-name="ce200" table:formula="of:=[.M131]/[.X131]" office:value-type="float" office:value="4.25" calcext:value-type="float">
            <text:p>4.3</text:p>
          </table:table-cell>
          <table:table-cell table:style-name="ce204" table:formula="of:=RANK([.Y131];[.$Y$4:.$Y$133])" office:value-type="float" office:value="37" calcext:value-type="float">
            <text:p>37º</text:p>
          </table:table-cell>
          <table:table-cell table:style-name="ce208" table:formula="of:=[.U131]/[.X131]" office:value-type="float" office:value="7" calcext:value-type="float">
            <text:p>7.0</text:p>
          </table:table-cell>
          <table:table-cell table:style-name="ce212" table:formula="of:=RANK([.AA131];[.$AA$4:.$AA$133])" office:value-type="float" office:value="11" calcext:value-type="float">
            <text:p>11º</text:p>
          </table:table-cell>
          <table:table-cell table:number-columns-repeated="996"/>
        </table:table-row>
        <table:table-row table:style-name="ro10">
          <table:table-cell table:style-name="ce126" office:value-type="string" calcext:value-type="string">
            <text:p>ZÉ DAMICO</text:p>
          </table:table-cell>
          <table:table-cell table:style-name="ce134" office:value-type="string" calcext:value-type="string">
            <text:p>-</text:p>
          </table:table-cell>
          <table:table-cell table:style-name="ce139" table:formula="of:=IF([.B132]=20;1;IF([.B132]=19;2;IF([.B132]=19;2;IF([.B132]=18;3;IF([.B132]=17;4;IF([.B132]=16;5;IF([.B132]=15;6;IF([.B132]=14;7;IF([.B132]=13;8;IF([.B132]=12;9;IF([.B132]=11;10;IF([.B132]=10;11;IF([.B132]=9;12;IF([.B132]=8;13;IF([.B132]=7;14;IF([.B132]=6;15;IF([.B132]=5;16;IF([.B132]=4;17;IF([.B132]=3;18;IF([.B132]=2;19;IF([.B132]=1;20;0)))))))))))))))))))))" office:value-type="float" office:value="0" calcext:value-type="float">
            <text:p>0</text:p>
          </table:table-cell>
          <table:table-cell table:style-name="ce134" office:value-type="string" calcext:value-type="string">
            <text:p>-</text:p>
          </table:table-cell>
          <table:table-cell table:style-name="ce139" table:formula="of:=IF([.D132]=20;1;IF([.D132]=19;2;IF([.D132]=19;2;IF([.D132]=18;3;IF([.D132]=17;4;IF([.D132]=16;5;IF([.D132]=15;6;IF([.D132]=14;7;IF([.D132]=13;8;IF([.D132]=12;9;IF([.D132]=11;10;IF([.D132]=10;11;IF([.D132]=9;12;IF([.D132]=8;13;IF([.D132]=7;14;IF([.D132]=6;15;IF([.D132]=5;16;IF([.D132]=4;17;IF([.D132]=3;18;IF([.D132]=2;19;IF([.D132]=1;20;0)))))))))))))))))))))" office:value-type="float" office:value="0" calcext:value-type="float">
            <text:p>0</text:p>
          </table:table-cell>
          <table:table-cell table:style-name="ce134" office:value-type="float" office:value="24" calcext:value-type="float">
            <text:p>24º</text:p>
          </table:table-cell>
          <table:table-cell table:style-name="ce139" table:formula="of:=IF([.F132]=20;1;IF([.F132]=19;2;IF([.F132]=19;2;IF([.F132]=18;3;IF([.F132]=17;4;IF([.F132]=16;5;IF([.F132]=15;6;IF([.F132]=14;7;IF([.F132]=13;8;IF([.F132]=12;9;IF([.F132]=11;10;IF([.F132]=10;11;IF([.F132]=9;12;IF([.F132]=8;13;IF([.F132]=7;14;IF([.F132]=6;15;IF([.F132]=5;16;IF([.F132]=4;17;IF([.F132]=3;18;IF([.F132]=2;19;IF([.F132]=1;20;0)))))))))))))))))))))" office:value-type="float" office:value="0" calcext:value-type="float">
            <text:p>0</text:p>
          </table:table-cell>
          <table:table-cell table:style-name="ce134" office:value-type="float" office:value="13" calcext:value-type="float">
            <text:p>13º</text:p>
          </table:table-cell>
          <table:table-cell table:style-name="ce139" table:formula="of:=IF([.H132]=20;1;IF([.H132]=19;2;IF([.H132]=19;2;IF([.H132]=18;3;IF([.H132]=17;4;IF([.H132]=16;5;IF([.H132]=15;6;IF([.H132]=14;7;IF([.H132]=13;8;IF([.H132]=12;9;IF([.H132]=11;10;IF([.H132]=10;11;IF([.H132]=9;12;IF([.H132]=8;13;IF([.H132]=7;14;IF([.H132]=6;15;IF([.H132]=5;16;IF([.H132]=4;17;IF([.H132]=3;18;IF([.H132]=2;19;IF([.H132]=1;20;0)))))))))))))))))))))" office:value-type="float" office:value="8" calcext:value-type="float">
            <text:p>8</text:p>
          </table:table-cell>
          <table:table-cell table:style-name="ce134" office:value-type="string" calcext:value-type="string">
            <text:p>-</text:p>
          </table:table-cell>
          <table:table-cell table:style-name="ce145" table:formula="of:=IF([.J132]=20;1;IF([.J132]=19;2;IF([.J132]=19;2;IF([.J132]=18;3;IF([.J132]=17;4;IF([.J132]=16;5;IF([.J132]=15;6;IF([.J132]=14;7;IF([.J132]=13;8;IF([.J132]=12;9;IF([.J132]=11;10;IF([.J132]=10;11;IF([.J132]=9;12;IF([.J132]=8;13;IF([.J132]=7;14;IF([.J132]=6;15;IF([.J132]=5;16;IF([.J132]=4;17;IF([.J132]=3;18;IF([.J132]=2;19;IF([.J132]=1;20;0)))))))))))))))))))))" office:value-type="float" office:value="0" calcext:value-type="float">
            <text:p>0</text:p>
          </table:table-cell>
          <table:table-cell table:style-name="ce155"/>
          <table:table-cell table:style-name="ce158" table:formula="of:=SUM([.C132];[.E132];[.G132];[.I132];[.K132])" office:value-type="float" office:value="8" calcext:value-type="float">
            <text:p>8</text:p>
          </table:table-cell>
          <table:table-cell table:style-name="ce160" table:formula="of:=RANK([.M132];[.$M$4:.$M$133])" office:value-type="float" office:value="51" calcext:value-type="float">
            <text:p>51º</text:p>
          </table:table-cell>
          <table:table-cell table:style-name="ce164"/>
          <table:table-cell table:style-name="ce172" office:value-type="string" calcext:value-type="string">
            <text:p>-</text:p>
          </table:table-cell>
          <table:table-cell table:style-name="ce176" office:value-type="string" calcext:value-type="string">
            <text:p>-</text:p>
          </table:table-cell>
          <table:table-cell table:style-name="ce180" office:value-type="float" office:value="4" calcext:value-type="float">
            <text:p>4</text:p>
          </table:table-cell>
          <table:table-cell table:style-name="ce180" office:value-type="float" office:value="6" calcext:value-type="float">
            <text:p>6</text:p>
          </table:table-cell>
          <table:table-cell table:style-name="ce185" office:value-type="string" calcext:value-type="string">
            <text:p>-</text:p>
          </table:table-cell>
          <table:table-cell table:style-name="ce188" table:formula="of:=SUM([.P132:.T132])" office:value-type="float" office:value="10" calcext:value-type="float">
            <text:p>10</text:p>
          </table:table-cell>
          <table:table-cell table:style-name="ce189" table:formula="of:=RANK([.U132];[.$U$4:.$U$133])" office:value-type="float" office:value="65" calcext:value-type="float">
            <text:p>65º</text:p>
          </table:table-cell>
          <table:table-cell table:style-name="ce164"/>
          <table:table-cell table:style-name="ce193" table:formula="of:=COUNTIF([.B132];&quot;&gt;0&quot;)+COUNTIF([.D132];&quot;&gt;0&quot;)+COUNTIF([.F132];&quot;&gt;0&quot;)+COUNTIF([.H132];&quot;&gt;0&quot;)+COUNTIF([.J132];&quot;&gt;0&quot;)" office:value-type="float" office:value="2" calcext:value-type="float">
            <text:p>2</text:p>
          </table:table-cell>
          <table:table-cell table:style-name="ce200" table:formula="of:=[.M132]/[.X132]" office:value-type="float" office:value="4" calcext:value-type="float">
            <text:p>4.0</text:p>
          </table:table-cell>
          <table:table-cell table:style-name="ce204" table:formula="of:=RANK([.Y132];[.$Y$4:.$Y$133])" office:value-type="float" office:value="39" calcext:value-type="float">
            <text:p>39º</text:p>
          </table:table-cell>
          <table:table-cell table:style-name="ce208" table:formula="of:=[.U132]/[.X132]" office:value-type="float" office:value="5" calcext:value-type="float">
            <text:p>5.0</text:p>
          </table:table-cell>
          <table:table-cell table:style-name="ce212" table:formula="of:=RANK([.AA132];[.$AA$4:.$AA$133])" office:value-type="float" office:value="68" calcext:value-type="float">
            <text:p>68º</text:p>
          </table:table-cell>
          <table:table-cell table:number-columns-repeated="996"/>
        </table:table-row>
        <table:table-row table:style-name="ro10">
          <table:table-cell table:style-name="ce126" office:value-type="string" calcext:value-type="string">
            <text:p>ZÉCA</text:p>
          </table:table-cell>
          <table:table-cell table:style-name="ce134" office:value-type="float" office:value="4" calcext:value-type="float">
            <text:p>4º</text:p>
          </table:table-cell>
          <table:table-cell table:style-name="ce139" table:formula="of:=IF([.B133]=20;1;IF([.B133]=19;2;IF([.B133]=19;2;IF([.B133]=18;3;IF([.B133]=17;4;IF([.B133]=16;5;IF([.B133]=15;6;IF([.B133]=14;7;IF([.B133]=13;8;IF([.B133]=12;9;IF([.B133]=11;10;IF([.B133]=10;11;IF([.B133]=9;12;IF([.B133]=8;13;IF([.B133]=7;14;IF([.B133]=6;15;IF([.B133]=5;16;IF([.B133]=4;17;IF([.B133]=3;18;IF([.B133]=2;19;IF([.B133]=1;20;0)))))))))))))))))))))" office:value-type="float" office:value="17" calcext:value-type="float">
            <text:p>17</text:p>
          </table:table-cell>
          <table:table-cell table:style-name="ce134" office:value-type="float" office:value="46" calcext:value-type="float">
            <text:p>46º</text:p>
          </table:table-cell>
          <table:table-cell table:style-name="ce139" table:formula="of:=IF([.D133]=20;1;IF([.D133]=19;2;IF([.D133]=19;2;IF([.D133]=18;3;IF([.D133]=17;4;IF([.D133]=16;5;IF([.D133]=15;6;IF([.D133]=14;7;IF([.D133]=13;8;IF([.D133]=12;9;IF([.D133]=11;10;IF([.D133]=10;11;IF([.D133]=9;12;IF([.D133]=8;13;IF([.D133]=7;14;IF([.D133]=6;15;IF([.D133]=5;16;IF([.D133]=4;17;IF([.D133]=3;18;IF([.D133]=2;19;IF([.D133]=1;20;0)))))))))))))))))))))" office:value-type="float" office:value="0" calcext:value-type="float">
            <text:p>0</text:p>
          </table:table-cell>
          <table:table-cell table:style-name="ce134" office:value-type="float" office:value="71" calcext:value-type="float">
            <text:p>71º</text:p>
          </table:table-cell>
          <table:table-cell table:style-name="ce139" table:formula="of:=IF([.F133]=20;1;IF([.F133]=19;2;IF([.F133]=19;2;IF([.F133]=18;3;IF([.F133]=17;4;IF([.F133]=16;5;IF([.F133]=15;6;IF([.F133]=14;7;IF([.F133]=13;8;IF([.F133]=12;9;IF([.F133]=11;10;IF([.F133]=10;11;IF([.F133]=9;12;IF([.F133]=8;13;IF([.F133]=7;14;IF([.F133]=6;15;IF([.F133]=5;16;IF([.F133]=4;17;IF([.F133]=3;18;IF([.F133]=2;19;IF([.F133]=1;20;0)))))))))))))))))))))" office:value-type="float" office:value="0" calcext:value-type="float">
            <text:p>0</text:p>
          </table:table-cell>
          <table:table-cell table:style-name="ce134" office:value-type="float" office:value="60" calcext:value-type="float">
            <text:p>60º</text:p>
          </table:table-cell>
          <table:table-cell table:style-name="ce139" table:formula="of:=IF([.H133]=20;1;IF([.H133]=19;2;IF([.H133]=19;2;IF([.H133]=18;3;IF([.H133]=17;4;IF([.H133]=16;5;IF([.H133]=15;6;IF([.H133]=14;7;IF([.H133]=13;8;IF([.H133]=12;9;IF([.H133]=11;10;IF([.H133]=10;11;IF([.H133]=9;12;IF([.H133]=8;13;IF([.H133]=7;14;IF([.H133]=6;15;IF([.H133]=5;16;IF([.H133]=4;17;IF([.H133]=3;18;IF([.H133]=2;19;IF([.H133]=1;20;0)))))))))))))))))))))" office:value-type="float" office:value="0" calcext:value-type="float">
            <text:p>0</text:p>
          </table:table-cell>
          <table:table-cell table:style-name="ce134" office:value-type="float" office:value="11" calcext:value-type="float">
            <text:p>11º</text:p>
          </table:table-cell>
          <table:table-cell table:style-name="ce145" table:formula="of:=IF([.J133]=20;1;IF([.J133]=19;2;IF([.J133]=19;2;IF([.J133]=18;3;IF([.J133]=17;4;IF([.J133]=16;5;IF([.J133]=15;6;IF([.J133]=14;7;IF([.J133]=13;8;IF([.J133]=12;9;IF([.J133]=11;10;IF([.J133]=10;11;IF([.J133]=9;12;IF([.J133]=8;13;IF([.J133]=7;14;IF([.J133]=6;15;IF([.J133]=5;16;IF([.J133]=4;17;IF([.J133]=3;18;IF([.J133]=2;19;IF([.J133]=1;20;0)))))))))))))))))))))" office:value-type="float" office:value="10" calcext:value-type="float">
            <text:p>10</text:p>
          </table:table-cell>
          <table:table-cell table:style-name="ce155"/>
          <table:table-cell table:style-name="ce158" table:formula="of:=SUM([.C133];[.E133];[.G133];[.I133];[.K133])" office:value-type="float" office:value="27" calcext:value-type="float">
            <text:p>27</text:p>
          </table:table-cell>
          <table:table-cell table:style-name="ce160" table:formula="of:=RANK([.M133];[.$M$4:.$M$133])" office:value-type="float" office:value="8" calcext:value-type="float">
            <text:p>8º</text:p>
          </table:table-cell>
          <table:table-cell table:style-name="ce164"/>
          <table:table-cell table:style-name="ce169" office:value-type="float" office:value="9" calcext:value-type="float">
            <text:p>9</text:p>
          </table:table-cell>
          <table:table-cell table:style-name="ce175" office:value-type="float" office:value="3" calcext:value-type="float">
            <text:p>3</text:p>
          </table:table-cell>
          <table:table-cell table:style-name="ce180" office:value-type="float" office:value="1" calcext:value-type="float">
            <text:p>1</text:p>
          </table:table-cell>
          <table:table-cell table:style-name="ce180" office:value-type="float" office:value="5" calcext:value-type="float">
            <text:p>5</text:p>
          </table:table-cell>
          <table:table-cell table:style-name="ce185" office:value-type="float" office:value="4" calcext:value-type="float">
            <text:p>4</text:p>
          </table:table-cell>
          <table:table-cell table:style-name="ce188" table:formula="of:=SUM([.P133:.T133])" office:value-type="float" office:value="22" calcext:value-type="float">
            <text:p>22</text:p>
          </table:table-cell>
          <table:table-cell table:style-name="ce189" table:formula="of:=RANK([.U133];[.$U$4:.$U$133])" office:value-type="float" office:value="25" calcext:value-type="float">
            <text:p>25º</text:p>
          </table:table-cell>
          <table:table-cell table:style-name="ce164"/>
          <table:table-cell table:style-name="ce193" table:formula="of:=COUNTIF([.B133];&quot;&gt;0&quot;)+COUNTIF([.D133];&quot;&gt;0&quot;)+COUNTIF([.F133];&quot;&gt;0&quot;)+COUNTIF([.H133];&quot;&gt;0&quot;)+COUNTIF([.J133];&quot;&gt;0&quot;)" office:value-type="float" office:value="5" calcext:value-type="float">
            <text:p>5</text:p>
          </table:table-cell>
          <table:table-cell table:style-name="ce200" table:formula="of:=[.M133]/[.X133]" office:value-type="float" office:value="5.4" calcext:value-type="float">
            <text:p>5.4</text:p>
          </table:table-cell>
          <table:table-cell table:style-name="ce204" table:formula="of:=RANK([.Y133];[.$Y$4:.$Y$133])" office:value-type="float" office:value="20" calcext:value-type="float">
            <text:p>20º</text:p>
          </table:table-cell>
          <table:table-cell table:style-name="ce208" table:formula="of:=[.U133]/[.X133]" office:value-type="float" office:value="4.4" calcext:value-type="float">
            <text:p>4.4</text:p>
          </table:table-cell>
          <table:table-cell table:style-name="ce212" table:formula="of:=RANK([.AA133];[.$AA$4:.$AA$133])" office:value-type="float" office:value="94" calcext:value-type="float">
            <text:p>94º</text:p>
          </table:table-cell>
          <table:table-cell table:number-columns-repeated="996"/>
        </table:table-row>
        <table:table-row table:style-name="ro3" table:number-rows-repeated="1048442">
          <table:table-cell table:number-columns-repeated="1024"/>
        </table:table-row>
        <table:table-row table:style-name="ro3">
          <table:table-cell table:number-columns-repeated="1024"/>
        </table:table-row>
      </table:table>
      <table:table table:name="Resultados Oficiais" table:style-name="ta5">
        <table:table-column table:style-name="co7" table:default-cell-style-name="Default"/>
        <table:table-column table:style-name="co36" table:default-cell-style-name="Default"/>
        <table:table-column table:style-name="co4" table:default-cell-style-name="Default"/>
        <table:table-column table:style-name="co37" table:default-cell-style-name="Default"/>
        <table:table-column table:style-name="co36" table:number-columns-repeated="2" table:default-cell-style-name="Default"/>
        <table:table-column table:style-name="co37" table:default-cell-style-name="Default"/>
        <table:table-column table:style-name="co4" table:default-cell-style-name="Default"/>
        <table:table-column table:style-name="co38" table:default-cell-style-name="Default"/>
        <table:table-column table:style-name="co36" table:default-cell-style-name="Default"/>
        <table:table-column table:style-name="co4" table:default-cell-style-name="Default"/>
        <table:table-column table:style-name="co39" table:default-cell-style-name="Default"/>
        <table:table-column table:style-name="co36" table:number-columns-repeated="2" table:default-cell-style-name="Default"/>
        <table:table-column table:style-name="co39" table:default-cell-style-name="Default"/>
        <table:table-column table:style-name="co4" table:default-cell-style-name="Default"/>
        <table:table-column table:style-name="co40" table:default-cell-style-name="Default"/>
        <table:table-column table:style-name="co38" table:default-cell-style-name="Default"/>
        <table:table-column table:style-name="co36" table:number-columns-repeated="2" table:default-cell-style-name="Default"/>
        <table:table-column table:style-name="co39" table:default-cell-style-name="Default"/>
        <table:table-column table:style-name="co36" table:number-columns-repeated="2" table:default-cell-style-name="Default"/>
        <table:table-column table:style-name="co39" table:default-cell-style-name="Default"/>
        <table:table-column table:style-name="co36" table:default-cell-style-name="Default"/>
        <table:table-column table:style-name="co41" table:default-cell-style-name="Default"/>
        <table:table-column table:style-name="co42" table:default-cell-style-name="Default"/>
        <table:table-column table:style-name="co43" table:default-cell-style-name="Default"/>
        <table:table-column table:style-name="co13" table:number-columns-repeated="996" table:default-cell-style-name="Default"/>
        <table:table-row table:style-name="ro7">
          <table:table-cell table:style-name="ce215" office:value-type="float" office:value="2" calcext:value-type="float">
            <text:p>2</text:p>
          </table:table-cell>
          <table:table-cell table:style-name="ce220" office:value-type="string" calcext:value-type="string" table:number-columns-spanned="5" table:number-rows-spanned="1">
            <text:p>RESULTADOS OFICIAIS</text:p>
          </table:table-cell>
          <table:covered-table-cell table:number-columns-repeated="4"/>
          <table:table-cell table:style-name="ce246" table:number-columns-repeated="3"/>
          <table:table-cell table:style-name="ce260" office:value-type="string" calcext:value-type="string" table:number-columns-spanned="3" table:number-rows-spanned="1">
            <text:p>Jogos disputados</text:p>
          </table:table-cell>
          <table:covered-table-cell table:number-columns-repeated="2"/>
          <table:table-cell table:style-name="ce268" office:value-type="float" office:value="0" calcext:value-type="float" table:number-columns-spanned="2" table:number-rows-spanned="1">
            <text:p>0</text:p>
          </table:table-cell>
          <table:covered-table-cell table:style-name="ce270"/>
          <table:table-cell table:style-name="ce272" table:formula="of:=[.M1]/64" office:value-type="percentage" office:value="0" calcext:value-type="percentage">
            <text:p>0.00%</text:p>
          </table:table-cell>
          <table:table-cell table:style-name="ce274" table:number-columns-repeated="2"/>
          <table:table-cell table:style-name="ce276" office:value-type="string" calcext:value-type="string" table:number-columns-spanned="6" table:number-rows-spanned="1">
            <text:p>Pontos do Bolão já disputados</text:p>
          </table:table-cell>
          <table:covered-table-cell table:number-columns-repeated="4" table:style-name="ce23"/>
          <table:covered-table-cell table:style-name="ce28"/>
          <table:table-cell table:style-name="ce313" table:formula="of:=SUMIF(#REF!;1;[.I4:.I30])+SUMIF(#REF!;1;[.Q3:.Q30])+SUMIF([.AB4:.AB30];1;[.AA4:.AA30])" office:value-type="float" office:value="0" calcext:value-type="float" table:number-columns-spanned="2" table:number-rows-spanned="1">
            <office:annotation draw:style-name="gr4" draw:text-style-name="P3" svg:width="127.16pt" svg:height="39.29pt" svg:x="776.83pt" svg:y="3.6pt" draw:caption-point-x="10.01pt" draw:caption-point-y="-3.32pt">
              <dc:date>2026-05-01T00:00:00</dc:date>
              <text:p text:style-name="P2">Considerando a pontuação máxima possível para cada jogo.</text:p>
            </office:annotation>
            <text:p>0</text:p>
          </table:table-cell>
          <table:covered-table-cell table:style-name="ce320"/>
          <table:table-cell table:style-name="ce331" table:formula="of:=[.X1]/[$Regras.I25]" office:value-type="percentage" office:value="0" calcext:value-type="percentage" table:number-columns-spanned="2" table:number-rows-spanned="1">
            <text:p>0.00%</text:p>
          </table:table-cell>
          <table:covered-table-cell table:style-name="ce28"/>
          <table:table-cell table:number-columns-repeated="997"/>
        </table:table-row>
        <table:table-row table:style-name="ro11">
          <table:table-cell table:style-name="ce216" table:number-columns-repeated="5"/>
          <table:table-cell table:style-name="ce244" table:formula="of:=SUM([.I4:.I9];[.I11:.I16];[.I18:.I23];[.I25:.I30];[.Q3:.Q8];[.Q11:.Q16];[.Q18:.Q23];[.Q25:.Q30])" office:value-type="float" office:value="0" calcext:value-type="float">
            <text:p>0</text:p>
          </table:table-cell>
          <table:table-cell table:style-name="ce247" office:value-type="string" calcext:value-type="string" table:number-columns-spanned="6" table:number-rows-spanned="1">
            <office:annotation draw:style-name="gr5" draw:text-style-name="P3" svg:width="75.03pt" svg:height="84.08pt" svg:x="247.49pt" svg:y="-4.54pt" draw:caption-point-x="130.17pt" draw:caption-point-y="16.04pt">
              <dc:date>2026-05-01T00:00:00</dc:date>
              <text:p text:style-name="P2">PONTOS da PRIMEIRA FASE:</text:p>
              <text:p text:style-name="P2">Bucha: 25 pontos</text:p>
              <text:p text:style-name="P2">Demais: 18,15, 12 e 5</text:p>
            </office:annotation>
            <text:p>Primeira Fase</text:p>
          </table:table-cell>
          <table:covered-table-cell table:number-columns-repeated="5"/>
          <table:table-cell table:style-name="ce216" table:number-columns-repeated="2"/>
          <table:table-cell table:style-name="ce234"/>
          <table:table-cell table:style-name="ce259" table:number-columns-repeated="2"/>
          <table:table-cell table:style-name="ce277"/>
          <table:table-cell table:style-name="ce284" office:value-type="string" calcext:value-type="string" table:number-columns-spanned="7" table:number-rows-spanned="1">
            <office:annotation draw:style-name="gr6" draw:text-style-name="P3" svg:width="131.3pt" svg:height="95.27pt" svg:x="578.89pt" svg:y="1.11pt" draw:caption-point-x="207.95pt" draw:caption-point-y="10.4pt">
              <dc:date>2026-05-01T00:00:00</dc:date>
              <text:p text:style-name="P2">PONTOS da FASE 16 AVOS DE FINAL</text:p>
              <text:p text:style-name="P2">&gt;&gt; Aposta para 90 minutos + eventual prorrogação!</text:p>
              <text:p text:style-name="P2"/>
              <text:p text:style-name="P2">Bucha: 50 pontos.</text:p>
              <text:p text:style-name="P2">Demais: 35, 30, 25, 10</text:p>
              <text:p text:style-name="P2">Pênaltis: 25 pontos.</text:p>
            </office:annotation>
            <text:p>Dezesseis Avos</text:p>
          </table:table-cell>
          <table:covered-table-cell table:number-columns-repeated="6"/>
          <table:table-cell table:style-name="ce259"/>
          <table:table-cell table:style-name="ce332" office:value-type="string" calcext:value-type="string">
            <office:annotation draw:style-name="gr7" draw:text-style-name="P3" svg:width="222.94pt" svg:height="50.49pt" svg:x="891.5pt" svg:y="4.76pt" draw:caption-point-x="-11.54pt" draw:caption-point-y="6.75pt">
              <dc:date>2026-05-01T00:00:00</dc:date>
              <text:p text:style-name="P2">Os pênaltis terão pontuação EXTRA, independente da aposta feita no tempo de jogo. Ou seja: se o jogo for para os pênaltis, quem vence?</text:p>
            </office:annotation>
            <text:p>Pênaltis</text:p>
          </table:table-cell>
          <table:table-cell table:number-columns-repeated="997"/>
        </table:table-row>
        <table:table-row table:style-name="ro12">
          <table:table-cell table:style-name="ce217"/>
          <table:table-cell table:style-name="ce221" table:number-columns-repeated="2"/>
          <table:table-cell table:style-name="ce230"/>
          <table:table-cell table:style-name="ce236" office:value-type="string" calcext:value-type="string" table:number-columns-spanned="2" table:number-rows-spanned="1">
            <text:p>Grupo A</text:p>
          </table:table-cell>
          <table:covered-table-cell/>
          <table:table-cell table:style-name="ce230"/>
          <table:table-cell table:style-name="ce253" table:number-columns-repeated="2"/>
          <table:table-cell table:style-name="ce221" table:number-columns-repeated="2"/>
          <table:table-cell table:style-name="ce230"/>
          <table:table-cell table:style-name="ce236" office:value-type="string" calcext:value-type="string" table:number-columns-spanned="2" table:number-rows-spanned="1">
            <text:p>Grupo B</text:p>
          </table:table-cell>
          <table:covered-table-cell/>
          <table:table-cell table:style-name="ce230"/>
          <table:table-cell table:style-name="ce253" table:number-columns-repeated="2"/>
          <table:table-cell table:style-name="ce278" office:value-type="float" office:value="1" calcext:value-type="float">
            <text:p>1</text:p>
          </table:table-cell>
          <table:table-cell table:style-name="ce285" office:value-type="date" office:date-value="2025-06-29" calcext:value-type="date">
            <text:p>29-06</text:p>
          </table:table-cell>
          <table:table-cell table:style-name="ce295"/>
          <table:table-cell table:style-name="ce300" office:value-type="string" calcext:value-type="string">
            <text:p>1º do Grupo E</text:p>
          </table:table-cell>
          <table:table-cell table:style-name="ce240" table:number-columns-repeated="2"/>
          <table:table-cell table:style-name="ce314" office:value-type="string" calcext:value-type="string">
            <text:p>3º ABCDF</text:p>
          </table:table-cell>
          <table:table-cell table:style-name="ce321"/>
          <table:table-cell table:style-name="ce253"/>
          <table:table-cell table:style-name="ce333" table:content-validation-name="val3"/>
          <table:table-cell table:number-columns-repeated="997"/>
        </table:table-row>
        <table:table-row table:style-name="ro12">
          <table:table-cell table:style-name="ce218" table:formula="of:=IF(COUNTBLANK([$'Resultados Oficiais'.M4:.N4])&gt;0;&quot;&quot;;IF(COUNTBLANK([.M3:.N3])&gt;0;&quot;&quot;; IF(AND([.M3]=[$'Resultados Oficiais'.M4];[$'Resultados Oficiais'.N4]=[.N3]);30;IF([.M3]-[.N3]=[$'Resultados Oficiais'.M4]-[$'Resultados Oficiais'.N4];21;IF(OR(AND([.M3]-[.N3]&gt;0;[$'Resultados Oficiais'.M4]-[$'Resultados Oficiais'.N4]&gt;0);AND([.M3]-[.N3]&lt;0;[$'Resultados Oficiais'.M4]-[$'Resultados Oficiais'.N4]&lt;0));IF(OR([.M3]=[$'Resultados Oficiais'.M4];[$'Resultados Oficiais'.N4]=[.N3]);18;15);IF(OR([.M3]=[$'Resultados Oficiais'.M4];[$'Resultados Oficiais'.N4]=[.N3]);6;0))))))">
            <text:p/>
          </table:table-cell>
          <table:table-cell table:style-name="ce222" office:value-type="date" office:date-value="2025-06-11" calcext:value-type="date">
            <text:p>11-06</text:p>
          </table:table-cell>
          <table:table-cell table:style-name="ce226"/>
          <table:table-cell table:style-name="ce231" office:value-type="string" calcext:value-type="string">
            <text:p>México</text:p>
          </table:table-cell>
          <table:table-cell table:style-name="ce237" table:number-columns-repeated="2"/>
          <table:table-cell table:style-name="ce248" office:value-type="string" calcext:value-type="string">
            <text:p>África S.</text:p>
            <draw:frame table:end-cell-address="'Resultados Oficiais'.H7" table:end-x="5.02pt" table:end-y="3.74pt" draw:z-index="6" draw:name="image5.png" draw:style-name="gr1" draw:text-style-name="P1" svg:width="27.72pt" svg:height="20.98pt" svg:x="50.26pt" svg:y="5.24pt">
              <draw:image xlink:href="Pictures/100002010000029B000002D058F00F5457A07490.png" xlink:type="simple" xlink:show="embed" xlink:actuate="onLoad">
                <text:p/>
              </draw:image>
            </draw:frame>
          </table:table-cell>
          <table:table-cell table:style-name="ce254" office:value-type="string" calcext:value-type="string">
            <office:annotation draw:style-name="gr7" draw:text-style-name="P3" svg:width="123.65pt" svg:height="39.29pt" svg:x="265.55pt" svg:y="25.34pt" draw:caption-point-x="-11.54pt" draw:caption-point-y="-0.31pt">
              <dc:date>2026-05-01T00:00:00</dc:date>
              <text:p text:style-name="P2">Multiplica 2X os pontos em caso de aposta e VITÓRIA da ZEBRA.</text:p>
            </office:annotation>
            <text:p>2X</text:p>
          </table:table-cell>
          <table:table-cell table:style-name="ce253"/>
          <table:table-cell table:style-name="ce222" office:value-type="date" office:date-value="2025-06-12" calcext:value-type="date">
            <text:p>12-06</text:p>
          </table:table-cell>
          <table:table-cell table:style-name="ce226"/>
          <table:table-cell table:style-name="ce231" office:value-type="string" calcext:value-type="string">
            <text:p>Canadá</text:p>
          </table:table-cell>
          <table:table-cell table:style-name="ce240" table:number-columns-repeated="2"/>
          <table:table-cell table:style-name="ce249" office:value-type="string" calcext:value-type="string">
            <text:p>Bósnia</text:p>
          </table:table-cell>
          <table:table-cell table:style-name="ce255"/>
          <table:table-cell table:style-name="ce253"/>
          <table:table-cell table:style-name="ce278" office:value-type="float" office:value="2" calcext:value-type="float">
            <text:p>2</text:p>
          </table:table-cell>
          <table:table-cell table:style-name="ce285" office:value-type="date" office:date-value="2025-06-30" calcext:value-type="date">
            <text:p>30-06</text:p>
          </table:table-cell>
          <table:table-cell table:style-name="ce295"/>
          <table:table-cell table:style-name="ce300" office:value-type="string" calcext:value-type="string">
            <text:p>1º do Grupo I</text:p>
          </table:table-cell>
          <table:table-cell table:style-name="ce240" table:number-columns-repeated="2"/>
          <table:table-cell table:style-name="ce315" office:value-type="string" calcext:value-type="string">
            <text:p>3º CDFGH</text:p>
          </table:table-cell>
          <table:table-cell table:style-name="ce321"/>
          <table:table-cell table:style-name="ce253"/>
          <table:table-cell table:style-name="ce333" table:content-validation-name="val3"/>
          <table:table-cell table:number-columns-repeated="997"/>
        </table:table-row>
        <table:table-row table:style-name="ro12">
          <table:table-cell table:style-name="ce218" table:formula="of:=IF(COUNTBLANK([$'Resultados Oficiais'.V5:.W5])&gt;0;&quot;&quot;;IF(COUNTBLANK([.V22:.W22])&gt;0;&quot;&quot;;IF(AND([.V22]=[$'Resultados Oficiais'.V5];[$'Resultados Oficiais'.W5]=[.W22]);100;IF([.V22]-[.W22]=[$'Resultados Oficiais'.V5]-[$'Resultados Oficiais'.W5];70;IF(OR(AND([.V22]-[.W22]&gt;0;[$'Resultados Oficiais'.V5]-[$'Resultados Oficiais'.W5]&gt;0);AND([.V22]-[.W22]&lt;0;[$'Resultados Oficiais'.V5]-[$'Resultados Oficiais'.W5]&lt;0));IF(OR([.V22]=[$'Resultados Oficiais'.V5];[$'Resultados Oficiais'.W5]=[.W22]);60;50);IF(OR([.V22]=[$'Resultados Oficiais'.V5];[$'Resultados Oficiais'.W5]=[.W22]);20;0))))))">
            <text:p/>
          </table:table-cell>
          <table:table-cell table:style-name="ce222" office:value-type="date" office:date-value="2025-06-11" calcext:value-type="date">
            <text:p>11-06</text:p>
          </table:table-cell>
          <table:table-cell table:style-name="ce226"/>
          <table:table-cell table:style-name="ce231" office:value-type="string" calcext:value-type="string">
            <text:p>Coréia do Sul</text:p>
          </table:table-cell>
          <table:table-cell table:style-name="ce237" table:number-columns-repeated="2"/>
          <table:table-cell table:style-name="ce249" office:value-type="string" calcext:value-type="string">
            <text:p>República Tcheca</text:p>
          </table:table-cell>
          <table:table-cell table:style-name="ce255"/>
          <table:table-cell table:style-name="ce253"/>
          <table:table-cell table:style-name="ce222" office:value-type="date" office:date-value="2025-06-13" calcext:value-type="date">
            <text:p>13-06</text:p>
          </table:table-cell>
          <table:table-cell table:style-name="ce229" office:value-type="string" calcext:value-type="string">
            <office:annotation draw:style-name="gr7" draw:text-style-name="P3" svg:width="176.4pt" svg:height="28.09pt" svg:x="322.53pt" svg:y="38.47pt" draw:caption-point-x="-11.54pt" draw:caption-point-y="-5.95pt">
              <dc:date>2026-05-01T00:00:00</dc:date>
              <text:p text:style-name="P2">Multiplica 2X os pontos em caso de aposta e VITÓRIA da ZEBRA.</text:p>
            </office:annotation>
            <text:p>3X</text:p>
          </table:table-cell>
          <table:table-cell table:style-name="ce232" office:value-type="string" calcext:value-type="string">
            <text:p>Qatar</text:p>
            <draw:frame table:end-cell-address="'Resultados Oficiais'.L8" table:end-x="30.73pt" table:end-y="4.48pt" draw:z-index="4" draw:name="image5.png" draw:style-name="gr1" draw:text-style-name="P1" svg:width="27.72pt" svg:height="20.98pt" svg:x="3pt" svg:y="6.01pt">
              <draw:image xlink:href="Pictures/100002010000029B000002D058F00F5457A07490.png" xlink:type="simple" xlink:show="embed" xlink:actuate="onLoad">
                <text:p/>
              </draw:image>
            </draw:frame>
          </table:table-cell>
          <table:table-cell table:style-name="ce240" table:number-columns-repeated="2"/>
          <table:table-cell table:style-name="ce249" office:value-type="string" calcext:value-type="string">
            <text:p>Suiça</text:p>
          </table:table-cell>
          <table:table-cell table:style-name="ce255"/>
          <table:table-cell table:style-name="ce253"/>
          <table:table-cell table:style-name="ce278" office:value-type="float" office:value="3" calcext:value-type="float">
            <text:p>3</text:p>
          </table:table-cell>
          <table:table-cell table:style-name="ce285" office:value-type="date" office:date-value="2025-06-28" calcext:value-type="date">
            <text:p>28-06</text:p>
          </table:table-cell>
          <table:table-cell table:style-name="ce295"/>
          <table:table-cell table:style-name="ce300" office:value-type="string" calcext:value-type="string">
            <text:p>2º do Grupo A</text:p>
          </table:table-cell>
          <table:table-cell table:style-name="ce240" table:number-columns-repeated="2"/>
          <table:table-cell table:style-name="ce314" office:value-type="string" calcext:value-type="string">
            <text:p>2º do Grupo B</text:p>
          </table:table-cell>
          <table:table-cell table:style-name="ce321"/>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6-18" calcext:value-type="date">
            <text:p>18-06</text:p>
          </table:table-cell>
          <table:table-cell table:style-name="ce226"/>
          <table:table-cell table:style-name="ce231" office:value-type="string" calcext:value-type="string">
            <text:p>República Tcheca</text:p>
          </table:table-cell>
          <table:table-cell table:style-name="ce237" table:number-columns-repeated="2"/>
          <table:table-cell table:style-name="ce249" office:value-type="string" calcext:value-type="string">
            <text:p>África do Sul</text:p>
          </table:table-cell>
          <table:table-cell table:style-name="ce255"/>
          <table:table-cell table:style-name="ce253"/>
          <table:table-cell table:style-name="ce222" office:value-type="date" office:date-value="2025-06-18" calcext:value-type="date">
            <text:p>18-06</text:p>
          </table:table-cell>
          <table:table-cell table:style-name="ce226"/>
          <table:table-cell table:style-name="ce231" office:value-type="string" calcext:value-type="string">
            <text:p>Suíça</text:p>
          </table:table-cell>
          <table:table-cell table:style-name="ce240" table:number-columns-repeated="2"/>
          <table:table-cell table:style-name="ce249" office:value-type="string" calcext:value-type="string">
            <text:p>Bósnia</text:p>
          </table:table-cell>
          <table:table-cell table:style-name="ce255"/>
          <table:table-cell table:style-name="ce253"/>
          <table:table-cell table:style-name="ce278" office:value-type="float" office:value="4" calcext:value-type="float">
            <text:p>4</text:p>
          </table:table-cell>
          <table:table-cell table:style-name="ce285" office:value-type="date" office:date-value="2025-06-29" calcext:value-type="date">
            <text:p>29-06</text:p>
          </table:table-cell>
          <table:table-cell table:style-name="ce295"/>
          <table:table-cell table:style-name="ce300" office:value-type="string" calcext:value-type="string">
            <text:p>1º do Grupo F</text:p>
          </table:table-cell>
          <table:table-cell table:style-name="ce240" table:number-columns-repeated="2"/>
          <table:table-cell table:style-name="ce315" office:value-type="string" calcext:value-type="string">
            <text:p>2º do Grupo C</text:p>
          </table:table-cell>
          <table:table-cell table:style-name="ce321"/>
          <table:table-cell table:style-name="ce253"/>
          <table:table-cell table:style-name="ce333" table:content-validation-name="val3"/>
          <table:table-cell table:number-columns-repeated="997"/>
        </table:table-row>
        <table:table-row table:style-name="ro12">
          <table:table-cell table:style-name="ce218" table:formula="of:=IF(COUNTBLANK([$'Resultados Oficiais'.V7:.W7])&gt;0;&quot;&quot;;IF(COUNTBLANK([.V24:.W24])&gt;0;&quot;&quot;;IF(AND([.V24]=[$'Resultados Oficiais'.V7];[$'Resultados Oficiais'.W7]=[.W24]);100;IF([.V24]-[.W24]=[$'Resultados Oficiais'.V7]-[$'Resultados Oficiais'.W7];70;IF(OR(AND([.V24]-[.W24]&gt;0;[$'Resultados Oficiais'.V7]-[$'Resultados Oficiais'.W7]&gt;0);AND([.V24]-[.W24]&lt;0;[$'Resultados Oficiais'.V7]-[$'Resultados Oficiais'.W7]&lt;0));IF(OR([.V24]=[$'Resultados Oficiais'.V7];[$'Resultados Oficiais'.W7]=[.W24]);60;50);IF(OR([.V24]=[$'Resultados Oficiais'.V7];[$'Resultados Oficiais'.W7]=[.W24]);20;0))))))">
            <text:p/>
          </table:table-cell>
          <table:table-cell table:style-name="ce222" office:value-type="date" office:date-value="2025-06-18" calcext:value-type="date">
            <text:p>18-06</text:p>
          </table:table-cell>
          <table:table-cell table:style-name="ce226"/>
          <table:table-cell table:style-name="ce231" office:value-type="string" calcext:value-type="string">
            <text:p>México</text:p>
          </table:table-cell>
          <table:table-cell table:style-name="ce237" table:number-columns-repeated="2"/>
          <table:table-cell table:style-name="ce249" office:value-type="string" calcext:value-type="string">
            <text:p>Coréia do Sul</text:p>
          </table:table-cell>
          <table:table-cell table:style-name="ce255"/>
          <table:table-cell table:style-name="ce253"/>
          <table:table-cell table:style-name="ce222" office:value-type="date" office:date-value="2025-06-18" calcext:value-type="date">
            <text:p>18-06</text:p>
          </table:table-cell>
          <table:table-cell table:style-name="ce226"/>
          <table:table-cell table:style-name="ce231" office:value-type="string" calcext:value-type="string">
            <text:p>Canadá</text:p>
          </table:table-cell>
          <table:table-cell table:style-name="ce240" table:number-columns-repeated="2"/>
          <table:table-cell table:style-name="ce249" office:value-type="string" calcext:value-type="string">
            <text:p>Qatar</text:p>
          </table:table-cell>
          <table:table-cell table:style-name="ce255"/>
          <table:table-cell table:style-name="ce253"/>
          <table:table-cell table:style-name="ce278" office:value-type="float" office:value="5" calcext:value-type="float">
            <text:p>5</text:p>
          </table:table-cell>
          <table:table-cell table:style-name="ce285" office:value-type="date" office:date-value="2025-07-02" calcext:value-type="date">
            <text:p>2-07</text:p>
          </table:table-cell>
          <table:table-cell table:style-name="ce295"/>
          <table:table-cell table:style-name="ce300" office:value-type="string" calcext:value-type="string">
            <text:p>2º do Grupo K</text:p>
          </table:table-cell>
          <table:table-cell table:style-name="ce240" table:number-columns-repeated="2"/>
          <table:table-cell table:style-name="ce315" office:value-type="string" calcext:value-type="string">
            <text:p>2º do Grupo L</text:p>
          </table:table-cell>
          <table:table-cell table:style-name="ce321"/>
          <table:table-cell table:style-name="ce253"/>
          <table:table-cell table:style-name="ce333" table:content-validation-name="val3"/>
          <table:table-cell table:number-columns-repeated="997"/>
        </table:table-row>
        <table:table-row table:style-name="ro12">
          <table:table-cell table:style-name="ce218" table:formula="of:=IF(COUNTBLANK([$'Resultados Oficiais'.E8:.F8])&gt;0;&quot;&quot;;IF(COUNTBLANK([.E8:.F8])&gt;0;&quot;&quot;; IF(AND([.E8]=[$'Resultados Oficiais'.E8];[$'Resultados Oficiais'.F8]=[.F8]);30;IF([.E8]-[.F8]=[$'Resultados Oficiais'.E8]-[$'Resultados Oficiais'.F8];21;IF(OR(AND([.E8]-[.F8]&gt;0;[$'Resultados Oficiais'.E8]-[$'Resultados Oficiais'.F8]&gt;0);AND([.E8]-[.F8]&lt;0;[$'Resultados Oficiais'.E8]-[$'Resultados Oficiais'.F8]&lt;0));IF(OR([.E8]=[$'Resultados Oficiais'.E8];[$'Resultados Oficiais'.F8]=[.F8]);18;15);IF(OR([.E8]=[$'Resultados Oficiais'.E8];[$'Resultados Oficiais'.F8]=[.F8]);6;0))))))">
            <text:p/>
          </table:table-cell>
          <table:table-cell table:style-name="ce222" office:value-type="date" office:date-value="2025-06-24" calcext:value-type="date">
            <text:p>24-06</text:p>
          </table:table-cell>
          <table:table-cell table:style-name="ce226"/>
          <table:table-cell table:style-name="ce231" office:value-type="string" calcext:value-type="string">
            <text:p>República Tcheca</text:p>
          </table:table-cell>
          <table:table-cell table:style-name="ce237" table:number-columns-repeated="2"/>
          <table:table-cell table:style-name="ce249" office:value-type="string" calcext:value-type="string">
            <text:p>México</text:p>
          </table:table-cell>
          <table:table-cell table:style-name="ce255"/>
          <table:table-cell table:style-name="ce253"/>
          <table:table-cell table:style-name="ce222" office:value-type="date" office:date-value="2025-06-24" calcext:value-type="date">
            <text:p>24-06</text:p>
          </table:table-cell>
          <table:table-cell table:style-name="ce226"/>
          <table:table-cell table:style-name="ce231" office:value-type="string" calcext:value-type="string">
            <text:p>Qatar</text:p>
          </table:table-cell>
          <table:table-cell table:style-name="ce240" table:number-columns-repeated="2"/>
          <table:table-cell table:style-name="ce249" office:value-type="string" calcext:value-type="string">
            <text:p>Bósnia</text:p>
          </table:table-cell>
          <table:table-cell table:style-name="ce255"/>
          <table:table-cell table:style-name="ce253"/>
          <table:table-cell table:style-name="ce278" office:value-type="float" office:value="6" calcext:value-type="float">
            <text:p>6</text:p>
          </table:table-cell>
          <table:table-cell table:style-name="ce285" office:value-type="date" office:date-value="2025-07-02" calcext:value-type="date">
            <text:p>2-07</text:p>
          </table:table-cell>
          <table:table-cell table:style-name="ce295"/>
          <table:table-cell table:style-name="ce300" office:value-type="string" calcext:value-type="string">
            <text:p>1º do Grupo H</text:p>
          </table:table-cell>
          <table:table-cell table:style-name="ce240" table:number-columns-repeated="2"/>
          <table:table-cell table:style-name="ce315" office:value-type="string" calcext:value-type="string">
            <text:p>2º do Grupo J</text:p>
          </table:table-cell>
          <table:table-cell table:style-name="ce321"/>
          <table:table-cell table:style-name="ce253"/>
          <table:table-cell table:style-name="ce333" table:content-validation-name="val3"/>
          <table:table-cell table:number-columns-repeated="997"/>
        </table:table-row>
        <table:table-row table:style-name="ro12">
          <table:table-cell table:style-name="ce218" table:formula="of:=IF(COUNTBLANK([$'Resultados Oficiais'.V9:.W9])&gt;0;&quot;&quot;;IF(COUNTBLANK([.V26:.W26])&gt;0;&quot;&quot;;IF(AND([.V26]=[$'Resultados Oficiais'.V9];[$'Resultados Oficiais'.W9]=[.W26]);100;IF([.V26]-[.W26]=[$'Resultados Oficiais'.V9]-[$'Resultados Oficiais'.W9];70;IF(OR(AND([.V26]-[.W26]&gt;0;[$'Resultados Oficiais'.V9]-[$'Resultados Oficiais'.W9]&gt;0);AND([.V26]-[.W26]&lt;0;[$'Resultados Oficiais'.V9]-[$'Resultados Oficiais'.W9]&lt;0));IF(OR([.V26]=[$'Resultados Oficiais'.V9];[$'Resultados Oficiais'.W9]=[.W26]);60;50);IF(OR([.V26]=[$'Resultados Oficiais'.V9];[$'Resultados Oficiais'.W9]=[.W26]);20;0))))))">
            <text:p/>
          </table:table-cell>
          <table:table-cell table:style-name="ce222" office:value-type="date" office:date-value="2025-06-24" calcext:value-type="date">
            <text:p>24-06</text:p>
          </table:table-cell>
          <table:table-cell table:style-name="ce226"/>
          <table:table-cell table:style-name="ce231" office:value-type="string" calcext:value-type="string">
            <text:p>África do Sul</text:p>
          </table:table-cell>
          <table:table-cell table:style-name="ce237" table:number-columns-repeated="2"/>
          <table:table-cell table:style-name="ce249" office:value-type="string" calcext:value-type="string">
            <text:p>Coréia do Sul</text:p>
          </table:table-cell>
          <table:table-cell table:style-name="ce255"/>
          <table:table-cell table:style-name="ce253"/>
          <table:table-cell table:style-name="ce222" office:value-type="date" office:date-value="2025-06-24" calcext:value-type="date">
            <text:p>24-06</text:p>
          </table:table-cell>
          <table:table-cell table:style-name="ce226"/>
          <table:table-cell table:style-name="ce231" office:value-type="string" calcext:value-type="string">
            <text:p>Canadá</text:p>
          </table:table-cell>
          <table:table-cell table:style-name="ce240" table:number-columns-repeated="2"/>
          <table:table-cell table:style-name="ce249" office:value-type="string" calcext:value-type="string">
            <text:p>Suiça</text:p>
          </table:table-cell>
          <table:table-cell table:style-name="ce255"/>
          <table:table-cell table:style-name="ce253"/>
          <table:table-cell table:style-name="ce278" office:value-type="float" office:value="7" calcext:value-type="float">
            <text:p>7</text:p>
          </table:table-cell>
          <table:table-cell table:style-name="ce285" office:value-type="date" office:date-value="2025-07-01" calcext:value-type="date">
            <text:p>1-07</text:p>
          </table:table-cell>
          <table:table-cell table:style-name="ce295"/>
          <table:table-cell table:style-name="ce300" office:value-type="string" calcext:value-type="string">
            <text:p>1º do Grupo D</text:p>
          </table:table-cell>
          <table:table-cell table:style-name="ce240" table:number-columns-repeated="2"/>
          <table:table-cell table:style-name="ce316" office:value-type="string" calcext:value-type="string">
            <text:p>3º BEFIJ</text:p>
          </table:table-cell>
          <table:table-cell table:style-name="ce321"/>
          <table:table-cell table:style-name="ce253"/>
          <table:table-cell table:style-name="ce333" table:content-validation-name="val3"/>
          <table:table-cell table:number-columns-repeated="997"/>
        </table:table-row>
        <table:table-row table:style-name="ro12">
          <table:table-cell table:style-name="ce217"/>
          <table:table-cell table:style-name="ce221" table:number-columns-repeated="2"/>
          <table:table-cell table:style-name="ce230"/>
          <table:table-cell table:style-name="ce236" office:value-type="string" calcext:value-type="string" table:number-columns-spanned="2" table:number-rows-spanned="1">
            <text:p>Grupo C</text:p>
          </table:table-cell>
          <table:covered-table-cell/>
          <table:table-cell table:style-name="ce230"/>
          <table:table-cell table:style-name="ce253" table:number-columns-repeated="2"/>
          <table:table-cell table:style-name="ce221" table:number-columns-repeated="2"/>
          <table:table-cell table:style-name="ce230"/>
          <table:table-cell table:style-name="ce236" office:value-type="string" calcext:value-type="string" table:number-columns-spanned="2" table:number-rows-spanned="1">
            <text:p>Grupo D</text:p>
          </table:table-cell>
          <table:covered-table-cell/>
          <table:table-cell table:style-name="ce230"/>
          <table:table-cell table:style-name="ce253" table:number-columns-repeated="2"/>
          <table:table-cell table:style-name="ce278" office:value-type="float" office:value="8" calcext:value-type="float">
            <text:p>8</text:p>
          </table:table-cell>
          <table:table-cell table:style-name="ce285" office:value-type="date" office:date-value="2025-07-01" calcext:value-type="date">
            <text:p>1-07</text:p>
          </table:table-cell>
          <table:table-cell table:style-name="ce295"/>
          <table:table-cell table:style-name="ce300" office:value-type="string" calcext:value-type="string">
            <text:p>1º do Grupo G</text:p>
          </table:table-cell>
          <table:table-cell table:style-name="ce240" table:number-columns-repeated="2"/>
          <table:table-cell table:style-name="ce316" office:value-type="string" calcext:value-type="string">
            <text:p>3º AEHIJ</text:p>
          </table:table-cell>
          <table:table-cell table:style-name="ce321"/>
          <table:table-cell table:style-name="ce253"/>
          <table:table-cell table:style-name="ce333" table:content-validation-name="val3"/>
          <table:table-cell table:number-columns-repeated="997"/>
        </table:table-row>
        <table:table-row table:style-name="ro12">
          <table:table-cell table:style-name="ce218" table:formula="of:=IF(COUNTBLANK([$'Resultados Oficiais'.E11:.F11])&gt;0;&quot;&quot;;IF(COUNTBLANK([.E11:.F11])&gt;0;&quot;&quot;; IF(AND([.E11]=[$'Resultados Oficiais'.E11];[$'Resultados Oficiais'.F11]=[.F11]);30;IF([.E11]-[.F11]=[$'Resultados Oficiais'.E11]-[$'Resultados Oficiais'.F11];21;IF(OR(AND([.E11]-[.F11]&gt;0;[$'Resultados Oficiais'.E11]-[$'Resultados Oficiais'.F11]&gt;0);AND([.E11]-[.F11]&lt;0;[$'Resultados Oficiais'.E11]-[$'Resultados Oficiais'.F11]&lt;0));IF(OR([.E11]=[$'Resultados Oficiais'.E11];[$'Resultados Oficiais'.F11]=[.F11]);18;15);IF(OR([.E11]=[$'Resultados Oficiais'.E11];[$'Resultados Oficiais'.F11]=[.F11]);6;0))))))">
            <text:p/>
          </table:table-cell>
          <table:table-cell table:style-name="ce222" office:value-type="date" office:date-value="2025-06-13" calcext:value-type="date">
            <text:p>13-06</text:p>
          </table:table-cell>
          <table:table-cell table:style-name="ce227"/>
          <table:table-cell table:style-name="ce231" office:value-type="string" calcext:value-type="string">
            <text:p>Brasil</text:p>
          </table:table-cell>
          <table:table-cell table:style-name="ce238" table:number-columns-repeated="2"/>
          <table:table-cell table:style-name="ce249" office:value-type="string" calcext:value-type="string">
            <text:p>Marrocos</text:p>
          </table:table-cell>
          <table:table-cell table:style-name="ce255"/>
          <table:table-cell table:style-name="ce253"/>
          <table:table-cell table:style-name="ce222" office:value-type="date" office:date-value="2025-06-12" calcext:value-type="date">
            <text:p>12-06</text:p>
          </table:table-cell>
          <table:table-cell table:style-name="ce226"/>
          <table:table-cell table:style-name="ce231" office:value-type="string" calcext:value-type="string">
            <text:p>Estados Unidos</text:p>
          </table:table-cell>
          <table:table-cell table:style-name="ce240" table:number-columns-repeated="2"/>
          <table:table-cell table:style-name="ce249" office:value-type="string" calcext:value-type="string">
            <text:p>Paraguai</text:p>
          </table:table-cell>
          <table:table-cell table:style-name="ce255"/>
          <table:table-cell table:style-name="ce253"/>
          <table:table-cell table:style-name="ce278" office:value-type="float" office:value="9" calcext:value-type="float">
            <text:p>9</text:p>
          </table:table-cell>
          <table:table-cell table:style-name="ce285" office:value-type="date" office:date-value="2025-06-29" calcext:value-type="date">
            <text:p>29-06</text:p>
          </table:table-cell>
          <table:table-cell table:style-name="ce296"/>
          <table:table-cell table:style-name="ce301" office:value-type="string" calcext:value-type="string">
            <text:p>1º do Grupo C</text:p>
          </table:table-cell>
          <table:table-cell table:style-name="ce240" table:number-columns-repeated="2"/>
          <table:table-cell table:style-name="ce315" office:value-type="string" calcext:value-type="string">
            <text:p>2º do Grupo F</text:p>
          </table:table-cell>
          <table:table-cell table:style-name="ce322"/>
          <table:table-cell table:style-name="ce253"/>
          <table:table-cell table:style-name="ce333" table:content-validation-name="val3"/>
          <table:table-cell table:number-columns-repeated="997"/>
        </table:table-row>
        <table:table-row table:style-name="ro12">
          <table:table-cell table:style-name="ce218" table:formula="of:=IF(COUNTBLANK([$'Resultados Oficiais'.M12:.N12])&gt;0;&quot;&quot;;IF(COUNTBLANK([.M12:.N12])&gt;0;&quot;&quot;; IF(AND([.M12]=[$'Resultados Oficiais'.M12];[$'Resultados Oficiais'.N12]=[.N12]);30;IF([.M12]-[.N12]=[$'Resultados Oficiais'.M12]-[$'Resultados Oficiais'.N12];21;IF(OR(AND([.M12]-[.N12]&gt;0;[$'Resultados Oficiais'.M12]-[$'Resultados Oficiais'.N12]&gt;0);AND([.M12]-[.N12]&lt;0;[$'Resultados Oficiais'.M12]-[$'Resultados Oficiais'.N12]&lt;0));IF(OR([.M12]=[$'Resultados Oficiais'.M12];[$'Resultados Oficiais'.N12]=[.N12]);18;15);IF(OR([.M12]=[$'Resultados Oficiais'.M12];[$'Resultados Oficiais'.N12]=[.N12]);6;0))))))">
            <text:p/>
          </table:table-cell>
          <table:table-cell table:style-name="ce223" office:value-type="date" office:date-value="2025-06-13" calcext:value-type="date">
            <text:p>13/06</text:p>
          </table:table-cell>
          <table:table-cell table:style-name="ce228"/>
          <table:table-cell table:style-name="ce231" office:value-type="string" calcext:value-type="string">
            <text:p>Haiti</text:p>
          </table:table-cell>
          <table:table-cell table:style-name="ce238" table:number-columns-repeated="2"/>
          <table:table-cell table:style-name="ce249" office:value-type="string" calcext:value-type="string">
            <text:p>Escócia</text:p>
          </table:table-cell>
          <table:table-cell table:style-name="ce255"/>
          <table:table-cell table:style-name="ce253"/>
          <table:table-cell table:style-name="ce222" office:value-type="date" office:date-value="2025-06-12" calcext:value-type="date">
            <text:p>12-06</text:p>
          </table:table-cell>
          <table:table-cell table:style-name="ce261" office:value-type="string" calcext:value-type="string">
            <office:annotation draw:style-name="gr7" draw:text-style-name="P3" svg:width="176.4pt" svg:height="28.09pt" svg:x="322.53pt" svg:y="90.96pt" draw:caption-point-x="-11.54pt" draw:caption-point-y="-5.95pt">
              <dc:date>2026-05-01T00:00:00</dc:date>
              <text:p text:style-name="P2">Multiplica 2X os pontos em caso de aposta e VITÓRIA da ZEBRA.</text:p>
            </office:annotation>
            <text:p>2X</text:p>
            <draw:frame table:end-cell-address="'Resultados Oficiais'.L15" table:end-x="26.96pt" table:end-y="4.48pt" draw:z-index="7" draw:name="image5.png" draw:style-name="gr1" draw:text-style-name="P1" svg:width="27.72pt" svg:height="20.98pt" svg:x="17.26pt" svg:y="6.01pt">
              <draw:image xlink:href="Pictures/100002010000029B000002D058F00F5457A07490.png" xlink:type="simple" xlink:show="embed" xlink:actuate="onLoad">
                <text:p/>
              </draw:image>
            </draw:frame>
          </table:table-cell>
          <table:table-cell table:style-name="ce263" office:value-type="string" calcext:value-type="string">
            <text:p>Austrália</text:p>
          </table:table-cell>
          <table:table-cell table:style-name="ce240" table:number-columns-repeated="2"/>
          <table:table-cell table:style-name="ce249" office:value-type="string" calcext:value-type="string">
            <text:p>Turquia</text:p>
          </table:table-cell>
          <table:table-cell table:style-name="ce255"/>
          <table:table-cell table:style-name="ce253"/>
          <table:table-cell table:style-name="ce278" office:value-type="float" office:value="10" calcext:value-type="float">
            <text:p>10</text:p>
          </table:table-cell>
          <table:table-cell table:style-name="ce285" office:value-type="date" office:date-value="2025-06-30" calcext:value-type="date">
            <text:p>30-06</text:p>
          </table:table-cell>
          <table:table-cell table:style-name="ce295"/>
          <table:table-cell table:style-name="ce300" office:value-type="string" calcext:value-type="string">
            <text:p>2º do Grupo E</text:p>
          </table:table-cell>
          <table:table-cell table:style-name="ce240" table:number-columns-repeated="2"/>
          <table:table-cell table:style-name="ce315" office:value-type="string" calcext:value-type="string">
            <text:p>2º do Grupo I</text:p>
          </table:table-cell>
          <table:table-cell table:style-name="ce321"/>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9-19" calcext:value-type="date">
            <text:p>19-09</text:p>
          </table:table-cell>
          <table:table-cell table:style-name="ce227"/>
          <table:table-cell table:style-name="ce231" office:value-type="string" calcext:value-type="string">
            <text:p>Escócia</text:p>
          </table:table-cell>
          <table:table-cell table:style-name="ce238" table:number-columns-repeated="2"/>
          <table:table-cell table:style-name="ce249" office:value-type="string" calcext:value-type="string">
            <text:p>Marrocos</text:p>
          </table:table-cell>
          <table:table-cell table:style-name="ce255"/>
          <table:table-cell table:style-name="ce253"/>
          <table:table-cell table:style-name="ce222" office:value-type="date" office:date-value="2025-06-19" calcext:value-type="date">
            <text:p>19-06</text:p>
          </table:table-cell>
          <table:table-cell table:style-name="ce226"/>
          <table:table-cell table:style-name="ce231" office:value-type="string" calcext:value-type="string">
            <text:p>Turquia</text:p>
          </table:table-cell>
          <table:table-cell table:style-name="ce240" table:number-columns-repeated="2"/>
          <table:table-cell table:style-name="ce249" office:value-type="string" calcext:value-type="string">
            <text:p>Paraguai</text:p>
          </table:table-cell>
          <table:table-cell table:style-name="ce255"/>
          <table:table-cell table:style-name="ce253"/>
          <table:table-cell table:style-name="ce278" office:value-type="float" office:value="11" calcext:value-type="float">
            <text:p>11</text:p>
          </table:table-cell>
          <table:table-cell table:style-name="ce285" office:value-type="date" office:date-value="2025-06-30" calcext:value-type="date">
            <text:p>30-06</text:p>
          </table:table-cell>
          <table:table-cell table:style-name="ce296"/>
          <table:table-cell table:style-name="ce301" office:value-type="string" calcext:value-type="string">
            <text:p>1º do Grupo A</text:p>
          </table:table-cell>
          <table:table-cell table:style-name="ce240" table:number-columns-repeated="2"/>
          <table:table-cell table:style-name="ce317" office:value-type="string" calcext:value-type="string">
            <text:p>3º CEFHI</text:p>
          </table:table-cell>
          <table:table-cell table:style-name="ce322"/>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6-19" calcext:value-type="date">
            <text:p>19-06</text:p>
          </table:table-cell>
          <table:table-cell table:style-name="ce227"/>
          <table:table-cell table:style-name="ce231" office:value-type="string" calcext:value-type="string">
            <text:p>Brasil</text:p>
          </table:table-cell>
          <table:table-cell table:style-name="ce238" table:number-columns-repeated="2"/>
          <table:table-cell table:style-name="ce250" office:value-type="string" calcext:value-type="string">
            <text:p>Haiti</text:p>
          </table:table-cell>
          <table:table-cell table:style-name="ce256" office:value-type="string" calcext:value-type="string">
            <office:annotation draw:style-name="gr7" draw:text-style-name="P3" svg:width="123.65pt" svg:height="39.29pt" svg:x="265.55pt" svg:y="100.35pt" draw:caption-point-x="-11.54pt" draw:caption-point-y="-0.34pt">
              <dc:date>2026-05-01T00:00:00</dc:date>
              <text:p text:style-name="P2">Multiplica 4X os pontos em caso de aposta e VITÓRIA da ZEBRA.</text:p>
            </office:annotation>
            <text:p>4X</text:p>
          </table:table-cell>
          <table:table-cell table:style-name="ce253"/>
          <table:table-cell table:style-name="ce222" office:value-type="date" office:date-value="2025-06-19" calcext:value-type="date">
            <text:p>19-06</text:p>
          </table:table-cell>
          <table:table-cell table:style-name="ce226"/>
          <table:table-cell table:style-name="ce231" office:value-type="string" calcext:value-type="string">
            <text:p>Estados Unidos</text:p>
          </table:table-cell>
          <table:table-cell table:style-name="ce240" table:number-columns-repeated="2"/>
          <table:table-cell table:style-name="ce249" office:value-type="string" calcext:value-type="string">
            <text:p>Austrália</text:p>
          </table:table-cell>
          <table:table-cell table:style-name="ce255"/>
          <table:table-cell table:style-name="ce253"/>
          <table:table-cell table:style-name="ce278" office:value-type="float" office:value="12" calcext:value-type="float">
            <text:p>12</text:p>
          </table:table-cell>
          <table:table-cell table:style-name="ce285" office:value-type="date" office:date-value="2025-07-01" calcext:value-type="date">
            <text:p>1-07</text:p>
          </table:table-cell>
          <table:table-cell table:style-name="ce296"/>
          <table:table-cell table:style-name="ce301" office:value-type="string" calcext:value-type="string">
            <text:p>1º do Grupo L</text:p>
          </table:table-cell>
          <table:table-cell table:style-name="ce240" table:number-columns-repeated="2"/>
          <table:table-cell table:style-name="ce317" office:value-type="string" calcext:value-type="string">
            <text:p>3º EHIJK</text:p>
          </table:table-cell>
          <table:table-cell table:style-name="ce322"/>
          <table:table-cell table:style-name="ce253"/>
          <table:table-cell table:style-name="ce333" table:content-validation-name="val3"/>
          <table:table-cell table:number-columns-repeated="997"/>
        </table:table-row>
        <table:table-row table:style-name="ro12">
          <table:table-cell table:style-name="ce218" table:formula="of:=IF(COUNTBLANK([$'Resultados Oficiais'.V15:.W15])&gt;0;&quot;&quot;;IF(COUNTBLANK([.V32:.W32])&gt;0;&quot;&quot;;IF(AND([.V32]=[$'Resultados Oficiais'.V15];[$'Resultados Oficiais'.W15]=[.W32]);200;IF([.V32]-[.W32]=[$'Resultados Oficiais'.V15]-[$'Resultados Oficiais'.W15];140;IF(OR(AND([.V32]-[.W32]&gt;0;[$'Resultados Oficiais'.V15]-[$'Resultados Oficiais'.W15]&gt;0);AND([.V32]-[.W32]&lt;0;[$'Resultados Oficiais'.V15]-[$'Resultados Oficiais'.W15]&lt;0));IF(OR([.V32]=[$'Resultados Oficiais'.V15];[$'Resultados Oficiais'.W15]=[.W32]);120;100);IF(OR([.V32]=[$'Resultados Oficiais'.V15];[$'Resultados Oficiais'.W15]=[.W32]);40;0))))))">
            <text:p/>
          </table:table-cell>
          <table:table-cell table:style-name="ce222" office:value-type="date" office:date-value="2025-06-24" calcext:value-type="date">
            <text:p>24-06</text:p>
          </table:table-cell>
          <table:table-cell table:style-name="ce227"/>
          <table:table-cell table:style-name="ce231" office:value-type="string" calcext:value-type="string">
            <text:p>Escócia</text:p>
          </table:table-cell>
          <table:table-cell table:style-name="ce238" table:number-columns-repeated="2"/>
          <table:table-cell table:style-name="ce249" office:value-type="string" calcext:value-type="string">
            <text:p>Brasil</text:p>
            <draw:frame table:end-cell-address="'Resultados Oficiais'.H17" table:end-x="2.01pt" table:end-y="5.98pt" draw:z-index="3" draw:name="image5.png" draw:style-name="gr1" draw:text-style-name="P1" svg:width="27.72pt" svg:height="20.98pt" svg:x="47.25pt" svg:y="0pt">
              <draw:image xlink:href="Pictures/100002010000029B000002D058F00F5457A07490.png" xlink:type="simple" xlink:show="embed" xlink:actuate="onLoad">
                <text:p/>
              </draw:image>
            </draw:frame>
          </table:table-cell>
          <table:table-cell table:style-name="ce255"/>
          <table:table-cell table:style-name="ce253"/>
          <table:table-cell table:style-name="ce222" office:value-type="date" office:date-value="2025-06-25" calcext:value-type="date">
            <text:p>25-06</text:p>
          </table:table-cell>
          <table:table-cell table:style-name="ce226"/>
          <table:table-cell table:style-name="ce231" office:value-type="string" calcext:value-type="string">
            <text:p>Turquia</text:p>
          </table:table-cell>
          <table:table-cell table:style-name="ce240" table:number-columns-repeated="2"/>
          <table:table-cell table:style-name="ce249" office:value-type="string" calcext:value-type="string">
            <text:p>Estados Unidos</text:p>
          </table:table-cell>
          <table:table-cell table:style-name="ce255"/>
          <table:table-cell table:style-name="ce253"/>
          <table:table-cell table:style-name="ce278" office:value-type="float" office:value="13" calcext:value-type="float">
            <text:p>13</text:p>
          </table:table-cell>
          <table:table-cell table:style-name="ce285" office:value-type="date" office:date-value="2025-07-03" calcext:value-type="date">
            <text:p>3-07</text:p>
          </table:table-cell>
          <table:table-cell table:style-name="ce296"/>
          <table:table-cell table:style-name="ce301" office:value-type="string" calcext:value-type="string">
            <text:p>1º do Grupo J</text:p>
          </table:table-cell>
          <table:table-cell table:style-name="ce240" table:number-columns-repeated="2"/>
          <table:table-cell table:style-name="ce315" office:value-type="string" calcext:value-type="string">
            <text:p>2º do Grupo H</text:p>
          </table:table-cell>
          <table:table-cell table:style-name="ce322"/>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6-24" calcext:value-type="date">
            <text:p>24-06</text:p>
          </table:table-cell>
          <table:table-cell table:style-name="ce227"/>
          <table:table-cell table:style-name="ce231" office:value-type="string" calcext:value-type="string">
            <text:p>Marrocos</text:p>
          </table:table-cell>
          <table:table-cell table:style-name="ce238" table:number-columns-repeated="2"/>
          <table:table-cell table:style-name="ce249" office:value-type="string" calcext:value-type="string">
            <text:p>Haiti</text:p>
          </table:table-cell>
          <table:table-cell table:style-name="ce255"/>
          <table:table-cell table:style-name="ce253"/>
          <table:table-cell table:style-name="ce222" office:value-type="date" office:date-value="2025-06-25" calcext:value-type="date">
            <text:p>25-06</text:p>
          </table:table-cell>
          <table:table-cell table:style-name="ce226"/>
          <table:table-cell table:style-name="ce231" office:value-type="string" calcext:value-type="string">
            <text:p>Paraguai</text:p>
          </table:table-cell>
          <table:table-cell table:style-name="ce240" table:number-columns-repeated="2"/>
          <table:table-cell table:style-name="ce249" office:value-type="string" calcext:value-type="string">
            <text:p>Austrália</text:p>
          </table:table-cell>
          <table:table-cell table:style-name="ce255"/>
          <table:table-cell table:style-name="ce253"/>
          <table:table-cell table:style-name="ce278" office:value-type="float" office:value="14" calcext:value-type="float">
            <text:p>14</text:p>
          </table:table-cell>
          <table:table-cell table:style-name="ce285" office:value-type="date" office:date-value="2025-07-03" calcext:value-type="date">
            <text:p>3-07</text:p>
          </table:table-cell>
          <table:table-cell table:style-name="ce295"/>
          <table:table-cell table:style-name="ce300" office:value-type="string" calcext:value-type="string">
            <text:p>2º do Grupo D</text:p>
          </table:table-cell>
          <table:table-cell table:style-name="ce240" table:number-columns-repeated="2"/>
          <table:table-cell table:style-name="ce315" office:value-type="string" calcext:value-type="string">
            <text:p>2º do Grupo G</text:p>
          </table:table-cell>
          <table:table-cell table:style-name="ce321"/>
          <table:table-cell table:style-name="ce253"/>
          <table:table-cell table:style-name="ce333" table:content-validation-name="val3"/>
          <table:table-cell table:number-columns-repeated="997"/>
        </table:table-row>
        <table:table-row table:style-name="ro12">
          <table:table-cell table:style-name="ce217" table:formula="of:=IF(COUNTBLANK([$'Resultados Oficiais'.V17:.W17])&gt;0;&quot;&quot;;IF(COUNTBLANK([.V34:.W34])&gt;0;&quot;&quot;;IF(AND([.V34]=[$'Resultados Oficiais'.V17];[$'Resultados Oficiais'.W17]=[.W34]);200;IF([.V34]-[.W34]=[$'Resultados Oficiais'.V17]-[$'Resultados Oficiais'.W17];140;IF(OR(AND([.V34]-[.W34]&gt;0;[$'Resultados Oficiais'.V17]-[$'Resultados Oficiais'.W17]&gt;0);AND([.V34]-[.W34]&lt;0;[$'Resultados Oficiais'.V17]-[$'Resultados Oficiais'.W17]&lt;0));IF(OR([.V34]=[$'Resultados Oficiais'.V17];[$'Resultados Oficiais'.W17]=[.W34]);120;100);IF(OR([.V34]=[$'Resultados Oficiais'.V17];[$'Resultados Oficiais'.W17]=[.W34]);40;0))))))">
            <text:p/>
          </table:table-cell>
          <table:table-cell table:style-name="ce221" table:number-columns-repeated="2"/>
          <table:table-cell table:style-name="ce230"/>
          <table:table-cell table:style-name="ce236" office:value-type="string" calcext:value-type="string" table:number-columns-spanned="2" table:number-rows-spanned="1">
            <text:p>Grupo E</text:p>
          </table:table-cell>
          <table:covered-table-cell/>
          <table:table-cell table:style-name="ce230"/>
          <table:table-cell table:style-name="ce253" table:number-columns-repeated="2"/>
          <table:table-cell table:style-name="ce221" table:number-columns-repeated="2"/>
          <table:table-cell table:style-name="ce230"/>
          <table:table-cell table:style-name="ce236" office:value-type="string" calcext:value-type="string" table:number-columns-spanned="2" table:number-rows-spanned="1">
            <text:p>Grupo F</text:p>
          </table:table-cell>
          <table:covered-table-cell/>
          <table:table-cell table:style-name="ce230"/>
          <table:table-cell table:style-name="ce253" table:number-columns-repeated="2"/>
          <table:table-cell table:style-name="ce278" office:value-type="float" office:value="15" calcext:value-type="float">
            <text:p>15</text:p>
          </table:table-cell>
          <table:table-cell table:style-name="ce285" office:value-type="date" office:date-value="2025-07-03" calcext:value-type="date">
            <text:p>3-07</text:p>
          </table:table-cell>
          <table:table-cell table:style-name="ce296"/>
          <table:table-cell table:style-name="ce301" office:value-type="string" calcext:value-type="string">
            <text:p>1º do Grupo B</text:p>
          </table:table-cell>
          <table:table-cell table:style-name="ce240" table:number-columns-repeated="2"/>
          <table:table-cell table:style-name="ce317" office:value-type="string" calcext:value-type="string">
            <text:p>3º EFGIJ</text:p>
          </table:table-cell>
          <table:table-cell table:style-name="ce322"/>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6-14" calcext:value-type="date">
            <text:p>14-06</text:p>
          </table:table-cell>
          <table:table-cell table:style-name="ce227"/>
          <table:table-cell table:style-name="ce231" office:value-type="string" calcext:value-type="string">
            <text:p>Alemanha</text:p>
          </table:table-cell>
          <table:table-cell table:style-name="ce239" table:number-columns-repeated="2"/>
          <table:table-cell table:style-name="ce251" office:value-type="string" calcext:value-type="string">
            <text:p>Curaçao</text:p>
          </table:table-cell>
          <table:table-cell table:style-name="ce256" office:value-type="string" calcext:value-type="string">
            <office:annotation draw:style-name="gr8" draw:text-style-name="P3" svg:width="123.65pt" svg:height="39.29pt" svg:x="265.55pt" svg:y="130.37pt" draw:caption-point-x="-11.54pt" draw:caption-point-y="-0.34pt">
              <dc:date>2026-05-01T00:00:00</dc:date>
              <text:p text:style-name="P2">Multiplica 4X os pontos em caso de aposta e VITÓRIA da ZEBRA.</text:p>
            </office:annotation>
            <text:p>4X</text:p>
          </table:table-cell>
          <table:table-cell table:style-name="ce253"/>
          <table:table-cell table:style-name="ce222" office:value-type="date" office:date-value="2025-06-14" calcext:value-type="date">
            <text:p>14-06</text:p>
          </table:table-cell>
          <table:table-cell table:style-name="ce226"/>
          <table:table-cell table:style-name="ce231" office:value-type="string" calcext:value-type="string">
            <text:p>Holanda</text:p>
          </table:table-cell>
          <table:table-cell table:style-name="ce240" table:number-columns-repeated="2"/>
          <table:table-cell table:style-name="ce249" office:value-type="string" calcext:value-type="string">
            <text:p>Japão</text:p>
          </table:table-cell>
          <table:table-cell table:style-name="ce255"/>
          <table:table-cell table:style-name="ce253"/>
          <table:table-cell table:style-name="ce278" office:value-type="float" office:value="16" calcext:value-type="float">
            <text:p>16</text:p>
          </table:table-cell>
          <table:table-cell table:style-name="ce285" office:value-type="date" office:date-value="2025-07-03" calcext:value-type="date">
            <text:p>3-07</text:p>
          </table:table-cell>
          <table:table-cell table:style-name="ce296"/>
          <table:table-cell table:style-name="ce301" office:value-type="string" calcext:value-type="string">
            <text:p>1º do Grupo K</text:p>
          </table:table-cell>
          <table:table-cell table:style-name="ce240" table:number-columns-repeated="2"/>
          <table:table-cell table:style-name="ce317" office:value-type="string" calcext:value-type="string">
            <text:p>3º DEIJL</text:p>
          </table:table-cell>
          <table:table-cell table:style-name="ce322"/>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6-14" calcext:value-type="date">
            <text:p>14-06</text:p>
          </table:table-cell>
          <table:table-cell table:style-name="ce228"/>
          <table:table-cell table:style-name="ce231" office:value-type="string" calcext:value-type="string">
            <text:p>Costa do Marfim</text:p>
          </table:table-cell>
          <table:table-cell table:style-name="ce239" table:number-columns-repeated="2"/>
          <table:table-cell table:style-name="ce252" office:value-type="string" calcext:value-type="string">
            <text:p>Equador</text:p>
            <draw:frame table:end-cell-address="'Resultados Oficiais'.H21" table:end-x="2.01pt" table:end-y="5.95pt" draw:z-index="0" draw:name="image5.png" draw:style-name="gr1" draw:text-style-name="P1" svg:width="27.72pt" svg:height="20.98pt" svg:x="47.25pt" svg:y="0pt">
              <draw:image xlink:href="Pictures/100002010000029B000002D058F00F5457A07490.png" xlink:type="simple" xlink:show="embed" xlink:actuate="onLoad">
                <text:p/>
              </draw:image>
            </draw:frame>
          </table:table-cell>
          <table:table-cell table:style-name="ce255"/>
          <table:table-cell table:style-name="ce253"/>
          <table:table-cell table:style-name="ce222" office:value-type="date" office:date-value="2025-06-14" calcext:value-type="date">
            <text:p>14-06</text:p>
          </table:table-cell>
          <table:table-cell table:style-name="ce226"/>
          <table:table-cell table:style-name="ce231" office:value-type="string" calcext:value-type="string">
            <text:p>Suécia</text:p>
          </table:table-cell>
          <table:table-cell table:style-name="ce240" table:number-columns-repeated="2"/>
          <table:table-cell table:style-name="ce249" office:value-type="string" calcext:value-type="string">
            <text:p>Tunísia</text:p>
          </table:table-cell>
          <table:table-cell table:style-name="ce255"/>
          <table:table-cell table:style-name="ce253"/>
          <table:table-cell table:style-name="ce279"/>
          <table:table-cell table:number-columns-repeated="7"/>
          <table:table-cell table:style-name="ce253"/>
          <table:table-cell table:number-columns-repeated="998"/>
        </table:table-row>
        <table:table-row table:style-name="ro12">
          <table:table-cell table:style-name="ce218"/>
          <table:table-cell table:style-name="ce222" office:value-type="date" office:date-value="2025-06-20" calcext:value-type="date">
            <text:p>20-06</text:p>
          </table:table-cell>
          <table:table-cell table:style-name="ce227"/>
          <table:table-cell table:style-name="ce231" office:value-type="string" calcext:value-type="string">
            <text:p>Alemanha</text:p>
          </table:table-cell>
          <table:table-cell table:style-name="ce239" table:number-columns-repeated="2"/>
          <table:table-cell table:style-name="ce252" office:value-type="string" calcext:value-type="string">
            <text:p>Costa do Marfim</text:p>
          </table:table-cell>
          <table:table-cell table:style-name="ce255"/>
          <table:table-cell table:style-name="ce253"/>
          <table:table-cell table:style-name="ce222" office:value-type="date" office:date-value="2025-06-20" calcext:value-type="date">
            <text:p>20-06</text:p>
          </table:table-cell>
          <table:table-cell table:style-name="ce226"/>
          <table:table-cell table:style-name="ce231" office:value-type="string" calcext:value-type="string">
            <text:p>Holanda</text:p>
          </table:table-cell>
          <table:table-cell table:style-name="ce240" table:number-columns-repeated="2"/>
          <table:table-cell table:style-name="ce249" office:value-type="string" calcext:value-type="string">
            <text:p>Suécia</text:p>
          </table:table-cell>
          <table:table-cell table:style-name="ce255"/>
          <table:table-cell table:style-name="ce253"/>
          <table:table-cell table:style-name="ce280" table:formula="of:=IF(COUNTBLANK([$'Resultados Oficiais'.V21:.W21])&gt;0;&quot;&quot;;IF(COUNTBLANK([.V38:.W38])&gt;0;&quot;&quot;;IF(AND([.V38]=[$'Resultados Oficiais'.V21];[$'Resultados Oficiais'.W21]=[.W38]);300;IF([.V38]-[.W38]=[$'Resultados Oficiais'.V21]-[$'Resultados Oficiais'.W21];210;IF(OR(AND([.V38]-[.W38]&gt;0;[$'Resultados Oficiais'.V21]-[$'Resultados Oficiais'.W21]&gt;0);AND([.V38]-[.W38]&lt;0;[$'Resultados Oficiais'.V21]-[$'Resultados Oficiais'.W21]&lt;0));IF(OR([.V38]=[$'Resultados Oficiais'.V21];[$'Resultados Oficiais'.W21]=[.W38]);180;150);IF(OR([.V38]=[$'Resultados Oficiais'.V21];[$'Resultados Oficiais'.W21]=[.W38]);60;0))))))">
            <text:p/>
          </table:table-cell>
          <table:table-cell table:style-name="ce286" table:number-columns-repeated="2"/>
          <table:table-cell table:style-name="ce284" office:value-type="string" calcext:value-type="string" table:number-columns-spanned="4" table:number-rows-spanned="1">
            <office:annotation draw:style-name="gr6" draw:text-style-name="P3" svg:width="131.3pt" svg:height="84.08pt" svg:x="667.08pt" svg:y="141.73pt" draw:caption-point-x="98.22pt" draw:caption-point-y="3.29pt">
              <dc:date>2026-05-01T00:00:00</dc:date>
              <text:p text:style-name="P2">OITAVAS </text:p>
              <text:p text:style-name="P2">&gt;&gt; Aposta para 90 minutos + eventual prorrogação!</text:p>
              <text:p text:style-name="P2"/>
              <text:p text:style-name="P2">Bucha: 100 pontos.</text:p>
              <text:p text:style-name="P2">Demais: 70, 60, 50, 20.</text:p>
              <text:p text:style-name="P2">Pênaltis: 50 pontos.</text:p>
            </office:annotation>
            <text:p>Oitavas</text:p>
          </table:table-cell>
          <table:covered-table-cell table:number-columns-repeated="3"/>
          <table:table-cell table:style-name="ce271"/>
          <table:table-cell table:style-name="ce253"/>
          <table:table-cell table:style-name="ce332" office:value-type="string" calcext:value-type="string">
            <office:annotation draw:style-name="gr7" draw:text-style-name="P3" svg:width="222.94pt" svg:height="50.49pt" svg:x="891.5pt" svg:y="139.78pt" draw:caption-point-x="-11.54pt" draw:caption-point-y="5.24pt">
              <dc:date>2026-05-01T00:00:00</dc:date>
              <text:p text:style-name="P2">Os pênaltis terão pontuação EXTRA, independente da aposta feita no tempo de jogo. Ou seja: se o jogo for para os pênaltis, quem vence?</text:p>
            </office:annotation>
            <text:p>Pênaltis</text:p>
          </table:table-cell>
          <table:table-cell table:number-columns-repeated="997"/>
        </table:table-row>
        <table:table-row table:style-name="ro12">
          <table:table-cell table:style-name="ce218" table:formula="of:=IF(COUNTBLANK([$'Resultados Oficiais'.M21:.N21])&gt;0;&quot;&quot;;IF(COUNTBLANK([.M21:.N21])&gt;0;&quot;&quot;; IF(AND([.M21]=[$'Resultados Oficiais'.M21];[$'Resultados Oficiais'.N21]=[.N21]);30;IF([.M21]-[.N21]=[$'Resultados Oficiais'.M21]-[$'Resultados Oficiais'.N21];21;IF(OR(AND([.M21]-[.N21]&gt;0;[$'Resultados Oficiais'.M21]-[$'Resultados Oficiais'.N21]&gt;0);AND([.M21]-[.N21]&lt;0;[$'Resultados Oficiais'.M21]-[$'Resultados Oficiais'.N21]&lt;0));IF(OR([.M21]=[$'Resultados Oficiais'.M21];[$'Resultados Oficiais'.N21]=[.N21]);18;15);IF(OR([.M21]=[$'Resultados Oficiais'.M21];[$'Resultados Oficiais'.N21]=[.N21]);6;0))))))">
            <text:p/>
          </table:table-cell>
          <table:table-cell table:style-name="ce222" office:value-type="date" office:date-value="2025-06-20" calcext:value-type="date">
            <text:p>20-06</text:p>
          </table:table-cell>
          <table:table-cell table:style-name="ce227"/>
          <table:table-cell table:style-name="ce231" office:value-type="string" calcext:value-type="string">
            <text:p>Equador</text:p>
          </table:table-cell>
          <table:table-cell table:style-name="ce239" table:number-columns-repeated="2"/>
          <table:table-cell table:style-name="ce252" office:value-type="string" calcext:value-type="string">
            <text:p>Curaçao</text:p>
          </table:table-cell>
          <table:table-cell table:style-name="ce255"/>
          <table:table-cell table:style-name="ce253"/>
          <table:table-cell table:style-name="ce222" office:value-type="date" office:date-value="2025-06-21" calcext:value-type="date">
            <text:p>21-06</text:p>
          </table:table-cell>
          <table:table-cell table:style-name="ce226"/>
          <table:table-cell table:style-name="ce264" office:value-type="string" calcext:value-type="string">
            <text:p>Tunísia</text:p>
          </table:table-cell>
          <table:table-cell table:style-name="ce240" table:number-columns-repeated="2"/>
          <table:table-cell table:style-name="ce249" office:value-type="string" calcext:value-type="string">
            <text:p>Japão</text:p>
          </table:table-cell>
          <table:table-cell table:style-name="ce255"/>
          <table:table-cell table:style-name="ce253"/>
          <table:table-cell table:style-name="ce278" office:value-type="string" calcext:value-type="string">
            <text:p>O1</text:p>
          </table:table-cell>
          <table:table-cell table:style-name="ce285" office:value-type="date" office:date-value="2025-07-04" calcext:value-type="date">
            <text:p>4-07</text:p>
          </table:table-cell>
          <table:table-cell table:style-name="ce297"/>
          <table:table-cell table:style-name="ce302" office:value-type="string" calcext:value-type="string">
            <text:p>Vencedor do 1</text:p>
          </table:table-cell>
          <table:table-cell table:style-name="ce309"/>
          <table:table-cell table:style-name="ce238"/>
          <table:table-cell table:style-name="ce314" office:value-type="string" calcext:value-type="string">
            <text:p>Vencedor do 2</text:p>
          </table:table-cell>
          <table:table-cell table:style-name="ce323"/>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6-25" calcext:value-type="date">
            <text:p>25-06</text:p>
          </table:table-cell>
          <table:table-cell table:style-name="ce227"/>
          <table:table-cell table:style-name="ce231" office:value-type="string" calcext:value-type="string">
            <text:p>Equador</text:p>
          </table:table-cell>
          <table:table-cell table:style-name="ce239" table:number-columns-repeated="2"/>
          <table:table-cell table:style-name="ce252" office:value-type="string" calcext:value-type="string">
            <text:p>Alemanha</text:p>
          </table:table-cell>
          <table:table-cell table:style-name="ce255"/>
          <table:table-cell table:style-name="ce253"/>
          <table:table-cell table:style-name="ce222" office:value-type="date" office:date-value="2025-06-25" calcext:value-type="date">
            <text:p>25-06</text:p>
          </table:table-cell>
          <table:table-cell table:style-name="ce261" office:value-type="string" calcext:value-type="string">
            <office:annotation draw:style-name="gr7" draw:text-style-name="P3" svg:width="176.4pt" svg:height="28.09pt" svg:x="322.53pt" svg:y="165.97pt" draw:caption-point-x="-11.54pt" draw:caption-point-y="-5.95pt">
              <dc:date>2026-05-01T00:00:00</dc:date>
              <text:p text:style-name="P2">Multiplica 2X os pontos em caso de aposta e VITÓRIA da ZEBRA.</text:p>
            </office:annotation>
            <text:p>2X</text:p>
          </table:table-cell>
          <table:table-cell table:style-name="ce265" office:value-type="string" calcext:value-type="string">
            <text:p>Tunísia</text:p>
            <draw:frame table:end-cell-address="'Resultados Oficiais'.L25" table:end-x="28.43pt" table:end-y="4.48pt" draw:z-index="2" draw:name="image5.png" draw:style-name="gr1" draw:text-style-name="P1" svg:width="27.72pt" svg:height="20.98pt" svg:x="0.71pt" svg:y="6.01pt">
              <draw:image xlink:href="Pictures/100002010000029B000002D058F00F5457A07490.png" xlink:type="simple" xlink:show="embed" xlink:actuate="onLoad">
                <text:p/>
              </draw:image>
            </draw:frame>
          </table:table-cell>
          <table:table-cell table:style-name="ce240" table:number-columns-repeated="2"/>
          <table:table-cell table:style-name="ce249" office:value-type="string" calcext:value-type="string">
            <text:p>Holanda</text:p>
          </table:table-cell>
          <table:table-cell table:style-name="ce255"/>
          <table:table-cell table:style-name="ce253"/>
          <table:table-cell table:style-name="ce278" office:value-type="string" calcext:value-type="string">
            <text:p>O2</text:p>
          </table:table-cell>
          <table:table-cell table:style-name="ce285" office:value-type="date" office:date-value="2025-07-04" calcext:value-type="date">
            <text:p>4-07</text:p>
          </table:table-cell>
          <table:table-cell table:style-name="ce297"/>
          <table:table-cell table:style-name="ce302" office:value-type="string" calcext:value-type="string">
            <text:p>Vencedor do 3</text:p>
          </table:table-cell>
          <table:table-cell table:style-name="ce309"/>
          <table:table-cell table:style-name="ce238"/>
          <table:table-cell table:style-name="ce314" office:value-type="string" calcext:value-type="string">
            <text:p>Vencedor do 4</text:p>
          </table:table-cell>
          <table:table-cell table:style-name="ce324"/>
          <table:table-cell table:style-name="ce253"/>
          <table:table-cell table:style-name="ce333" table:content-validation-name="val3"/>
          <table:table-cell table:number-columns-repeated="997"/>
        </table:table-row>
        <table:table-row table:style-name="ro12">
          <table:table-cell table:style-name="ce218" table:formula="of:=IF(COUNTBLANK([$'Resultados Oficiais'.E23:.F23])&gt;0;&quot;&quot;;IF(COUNTBLANK([.E23:.F23])&gt;0;&quot;&quot;; IF(AND([.E23]=[$'Resultados Oficiais'.E23];[$'Resultados Oficiais'.F23]=[.F23]);30;IF([.E23]-[.F23]=[$'Resultados Oficiais'.E23]-[$'Resultados Oficiais'.F23];21;IF(OR(AND([.E23]-[.F23]&gt;0;[$'Resultados Oficiais'.E23]-[$'Resultados Oficiais'.F23]&gt;0);AND([.E23]-[.F23]&lt;0;[$'Resultados Oficiais'.E23]-[$'Resultados Oficiais'.F23]&lt;0));IF(OR([.E23]=[$'Resultados Oficiais'.E23];[$'Resultados Oficiais'.F23]=[.F23]);18;15);IF(OR([.E23]=[$'Resultados Oficiais'.E23];[$'Resultados Oficiais'.F23]=[.F23]);6;0))))))">
            <text:p/>
          </table:table-cell>
          <table:table-cell table:style-name="ce222" office:value-type="date" office:date-value="2025-06-25" calcext:value-type="date">
            <text:p>25-06</text:p>
          </table:table-cell>
          <table:table-cell table:style-name="ce227"/>
          <table:table-cell table:style-name="ce231" office:value-type="string" calcext:value-type="string">
            <text:p>Curaçao</text:p>
          </table:table-cell>
          <table:table-cell table:style-name="ce239" table:number-columns-repeated="2"/>
          <table:table-cell table:style-name="ce252" office:value-type="string" calcext:value-type="string">
            <text:p>Costa do Marfim</text:p>
          </table:table-cell>
          <table:table-cell table:style-name="ce255"/>
          <table:table-cell table:style-name="ce253"/>
          <table:table-cell table:style-name="ce222" office:value-type="date" office:date-value="2025-06-25" calcext:value-type="date">
            <text:p>25-06</text:p>
          </table:table-cell>
          <table:table-cell table:style-name="ce226"/>
          <table:table-cell table:style-name="ce266" office:value-type="string" calcext:value-type="string">
            <text:p>Japão</text:p>
          </table:table-cell>
          <table:table-cell table:style-name="ce240" table:number-columns-repeated="2"/>
          <table:table-cell table:style-name="ce249" office:value-type="string" calcext:value-type="string">
            <text:p>Suécia</text:p>
          </table:table-cell>
          <table:table-cell table:style-name="ce255"/>
          <table:table-cell table:style-name="ce253"/>
          <table:table-cell table:style-name="ce278" office:value-type="string" calcext:value-type="string">
            <text:p>O3</text:p>
          </table:table-cell>
          <table:table-cell table:style-name="ce285" office:value-type="date" office:date-value="2025-07-06" calcext:value-type="date">
            <text:p>6-07</text:p>
          </table:table-cell>
          <table:table-cell table:style-name="ce297"/>
          <table:table-cell table:style-name="ce302" office:value-type="string" calcext:value-type="string">
            <text:p>Vencedor do 5</text:p>
          </table:table-cell>
          <table:table-cell table:style-name="ce309"/>
          <table:table-cell table:style-name="ce238"/>
          <table:table-cell table:style-name="ce316" office:value-type="string" calcext:value-type="string">
            <text:p>Vencedor do 6</text:p>
          </table:table-cell>
          <table:table-cell table:style-name="ce324"/>
          <table:table-cell table:style-name="ce253"/>
          <table:table-cell table:style-name="ce333" table:content-validation-name="val3"/>
          <table:table-cell table:number-columns-repeated="997"/>
        </table:table-row>
        <table:table-row table:style-name="ro12">
          <table:table-cell table:style-name="ce217"/>
          <table:table-cell table:style-name="ce221" table:number-columns-repeated="2"/>
          <table:table-cell table:style-name="ce230"/>
          <table:table-cell table:style-name="ce236" office:value-type="string" calcext:value-type="string" table:number-columns-spanned="2" table:number-rows-spanned="1">
            <text:p>Grupo G</text:p>
          </table:table-cell>
          <table:covered-table-cell/>
          <table:table-cell table:style-name="ce230"/>
          <table:table-cell table:style-name="ce253" table:number-columns-repeated="2"/>
          <table:table-cell table:style-name="ce221" table:number-columns-repeated="2"/>
          <table:table-cell table:style-name="ce230"/>
          <table:table-cell table:style-name="ce236" office:value-type="string" calcext:value-type="string" table:number-columns-spanned="2" table:number-rows-spanned="1">
            <text:p>Grupo H</text:p>
          </table:table-cell>
          <table:covered-table-cell/>
          <table:table-cell table:style-name="ce230"/>
          <table:table-cell table:style-name="ce253" table:number-columns-repeated="2"/>
          <table:table-cell table:style-name="ce278" office:value-type="string" calcext:value-type="string">
            <text:p>O4</text:p>
          </table:table-cell>
          <table:table-cell table:style-name="ce285" office:value-type="date" office:date-value="2025-07-06" calcext:value-type="date">
            <text:p>6-07</text:p>
          </table:table-cell>
          <table:table-cell table:style-name="ce297"/>
          <table:table-cell table:style-name="ce302" office:value-type="string" calcext:value-type="string">
            <text:p>Vencedor do 7</text:p>
          </table:table-cell>
          <table:table-cell table:style-name="ce309"/>
          <table:table-cell table:style-name="ce238"/>
          <table:table-cell table:style-name="ce317" office:value-type="string" calcext:value-type="string">
            <text:p>Vencedor do 8</text:p>
          </table:table-cell>
          <table:table-cell table:style-name="ce324"/>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6-15" calcext:value-type="date">
            <text:p>15-06</text:p>
          </table:table-cell>
          <table:table-cell table:style-name="ce226"/>
          <table:table-cell table:style-name="ce231" office:value-type="string" calcext:value-type="string">
            <text:p>Bélgica</text:p>
          </table:table-cell>
          <table:table-cell table:style-name="ce240" table:number-columns-repeated="2"/>
          <table:table-cell table:style-name="ce249" office:value-type="string" calcext:value-type="string">
            <text:p>Egito</text:p>
          </table:table-cell>
          <table:table-cell table:style-name="ce255"/>
          <table:table-cell table:style-name="ce253"/>
          <table:table-cell table:style-name="ce222" office:value-type="date" office:date-value="2025-06-15" calcext:value-type="date">
            <text:p>15-06</text:p>
          </table:table-cell>
          <table:table-cell table:style-name="ce226"/>
          <table:table-cell table:style-name="ce231" office:value-type="string" calcext:value-type="string">
            <text:p>Espanha</text:p>
          </table:table-cell>
          <table:table-cell table:style-name="ce240" table:number-columns-repeated="2"/>
          <table:table-cell table:style-name="ce249" office:value-type="string" calcext:value-type="string">
            <text:p>Cabo Verde</text:p>
          </table:table-cell>
          <table:table-cell table:style-name="ce255"/>
          <table:table-cell table:style-name="ce253"/>
          <table:table-cell table:style-name="ce278" office:value-type="string" calcext:value-type="string">
            <text:p>O5</text:p>
          </table:table-cell>
          <table:table-cell table:style-name="ce285" office:value-type="date" office:date-value="2025-07-05" calcext:value-type="date">
            <text:p>5-07</text:p>
          </table:table-cell>
          <table:table-cell table:style-name="ce297"/>
          <table:table-cell table:style-name="ce302" office:value-type="string" calcext:value-type="string">
            <text:p>Vencedor do 9</text:p>
          </table:table-cell>
          <table:table-cell table:style-name="ce309"/>
          <table:table-cell table:style-name="ce238"/>
          <table:table-cell table:style-name="ce316" office:value-type="string" calcext:value-type="string">
            <text:p>Vencedor do 10</text:p>
          </table:table-cell>
          <table:table-cell table:style-name="ce324"/>
          <table:table-cell table:style-name="ce253"/>
          <table:table-cell table:style-name="ce333" table:content-validation-name="val3"/>
          <table:table-cell table:number-columns-repeated="997"/>
        </table:table-row>
        <table:table-row table:style-name="ro12">
          <table:table-cell table:style-name="ce218" table:formula="of:=IF(COUNTBLANK([$'Resultados Oficiais'.E26:.F26])&gt;0;&quot;&quot;;IF(COUNTBLANK([.E26:.F26])&gt;0;&quot;&quot;; IF(AND([.E26]=[$'Resultados Oficiais'.E26];[$'Resultados Oficiais'.F26]=[.F26]);30;IF([.E26]-[.F26]=[$'Resultados Oficiais'.E26]-[$'Resultados Oficiais'.F26];21;IF(OR(AND([.E26]-[.F26]&gt;0;[$'Resultados Oficiais'.E26]-[$'Resultados Oficiais'.F26]&gt;0);AND([.E26]-[.F26]&lt;0;[$'Resultados Oficiais'.E26]-[$'Resultados Oficiais'.F26]&lt;0));IF(OR([.E26]=[$'Resultados Oficiais'.E26];[$'Resultados Oficiais'.F26]=[.F26]);18;15);IF(OR([.E26]=[$'Resultados Oficiais'.E26];[$'Resultados Oficiais'.F26]=[.F26]);6;0))))))">
            <text:p/>
          </table:table-cell>
          <table:table-cell table:style-name="ce222" office:value-type="date" office:date-value="2025-06-15" calcext:value-type="date">
            <text:p>15-06</text:p>
          </table:table-cell>
          <table:table-cell table:style-name="ce226"/>
          <table:table-cell table:style-name="ce231" office:value-type="string" calcext:value-type="string">
            <text:p>Irã</text:p>
          </table:table-cell>
          <table:table-cell table:style-name="ce240" table:number-columns-repeated="2"/>
          <table:table-cell table:style-name="ce249" office:value-type="string" calcext:value-type="string">
            <text:p>Nova Zelândia</text:p>
          </table:table-cell>
          <table:table-cell table:style-name="ce255"/>
          <table:table-cell table:style-name="ce253"/>
          <table:table-cell table:style-name="ce222" office:value-type="date" office:date-value="2025-06-15" calcext:value-type="date">
            <text:p>15-06</text:p>
          </table:table-cell>
          <table:table-cell table:style-name="ce226"/>
          <table:table-cell table:style-name="ce231" office:value-type="string" calcext:value-type="string">
            <text:p>Arábia Saudita</text:p>
          </table:table-cell>
          <table:table-cell table:style-name="ce240" table:number-columns-repeated="2"/>
          <table:table-cell table:style-name="ce249" office:value-type="string" calcext:value-type="string">
            <text:p>Uruguai</text:p>
          </table:table-cell>
          <table:table-cell table:style-name="ce255"/>
          <table:table-cell table:style-name="ce253"/>
          <table:table-cell table:style-name="ce278" office:value-type="string" calcext:value-type="string">
            <text:p>O6</text:p>
          </table:table-cell>
          <table:table-cell table:style-name="ce285" office:value-type="date" office:date-value="2025-07-05" calcext:value-type="date">
            <text:p>5-07</text:p>
          </table:table-cell>
          <table:table-cell table:style-name="ce297"/>
          <table:table-cell table:style-name="ce302" office:value-type="string" calcext:value-type="string">
            <text:p>Vencedor do 11</text:p>
          </table:table-cell>
          <table:table-cell table:style-name="ce309"/>
          <table:table-cell table:style-name="ce238"/>
          <table:table-cell table:style-name="ce315" office:value-type="string" calcext:value-type="string">
            <text:p>Vencedor do 12</text:p>
          </table:table-cell>
          <table:table-cell table:style-name="ce323"/>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6-21" calcext:value-type="date">
            <text:p>21-06</text:p>
          </table:table-cell>
          <table:table-cell table:style-name="ce226"/>
          <table:table-cell table:style-name="ce231" office:value-type="string" calcext:value-type="string">
            <text:p>Bélgica</text:p>
          </table:table-cell>
          <table:table-cell table:style-name="ce240" table:number-columns-repeated="2"/>
          <table:table-cell table:style-name="ce249" office:value-type="string" calcext:value-type="string">
            <text:p>Irã</text:p>
          </table:table-cell>
          <table:table-cell table:style-name="ce255"/>
          <table:table-cell table:style-name="ce253"/>
          <table:table-cell table:style-name="ce222" office:value-type="date" office:date-value="2025-06-21" calcext:value-type="date">
            <text:p>21-06</text:p>
          </table:table-cell>
          <table:table-cell table:style-name="ce226"/>
          <table:table-cell table:style-name="ce231" office:value-type="string" calcext:value-type="string">
            <text:p>Espanha</text:p>
          </table:table-cell>
          <table:table-cell table:style-name="ce240" table:number-columns-repeated="2"/>
          <table:table-cell table:style-name="ce273" office:value-type="string" calcext:value-type="string">
            <text:p>Arábia S.</text:p>
            <draw:frame table:end-cell-address="'Resultados Oficiais'.P30" table:end-x="5.33pt" table:end-y="2.95pt" draw:z-index="5" draw:name="image5.png" draw:style-name="gr1" draw:text-style-name="P1" svg:width="27.72pt" svg:height="20.98pt" svg:x="44.25pt" svg:y="4.48pt">
              <draw:image xlink:href="Pictures/100002010000029B000002D058F00F5457A07490.png" xlink:type="simple" xlink:show="embed" xlink:actuate="onLoad">
                <text:p/>
              </draw:image>
            </draw:frame>
          </table:table-cell>
          <table:table-cell table:style-name="ce275" office:value-type="string" calcext:value-type="string">
            <office:annotation draw:style-name="gr7" draw:text-style-name="P3" svg:width="83.45pt" svg:height="61.68pt" svg:x="516.98pt" svg:y="186.66pt" draw:caption-point-x="-11.54pt" draw:caption-point-y="10.86pt">
              <dc:date>2026-05-01T00:00:00</dc:date>
              <text:p text:style-name="P2">Multiplica 3X os pontos em caso de aposta e VITÓRIA da ZEBRA.</text:p>
            </office:annotation>
            <text:p>3X</text:p>
          </table:table-cell>
          <table:table-cell table:style-name="ce253"/>
          <table:table-cell table:style-name="ce278" office:value-type="string" calcext:value-type="string">
            <text:p>O7</text:p>
          </table:table-cell>
          <table:table-cell table:style-name="ce285" office:value-type="date" office:date-value="2025-07-07" calcext:value-type="date">
            <text:p>7-07</text:p>
          </table:table-cell>
          <table:table-cell table:style-name="ce297"/>
          <table:table-cell table:style-name="ce302" office:value-type="string" calcext:value-type="string">
            <text:p>Vencedor do 13</text:p>
          </table:table-cell>
          <table:table-cell table:style-name="ce309"/>
          <table:table-cell table:style-name="ce238"/>
          <table:table-cell table:style-name="ce316" office:value-type="string" calcext:value-type="string">
            <text:p>Vencedor do 14</text:p>
          </table:table-cell>
          <table:table-cell table:style-name="ce324"/>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6-21" calcext:value-type="date">
            <text:p>21-06</text:p>
          </table:table-cell>
          <table:table-cell table:style-name="ce226"/>
          <table:table-cell table:style-name="ce231" office:value-type="string" calcext:value-type="string">
            <text:p>Nova Zelândia</text:p>
          </table:table-cell>
          <table:table-cell table:style-name="ce240" table:number-columns-repeated="2"/>
          <table:table-cell table:style-name="ce249" office:value-type="string" calcext:value-type="string">
            <text:p>Egito</text:p>
          </table:table-cell>
          <table:table-cell table:style-name="ce255"/>
          <table:table-cell table:style-name="ce253"/>
          <table:table-cell table:style-name="ce222" office:value-type="date" office:date-value="2025-06-21" calcext:value-type="date">
            <text:p>21-06</text:p>
          </table:table-cell>
          <table:table-cell table:style-name="ce226"/>
          <table:table-cell table:style-name="ce231" office:value-type="string" calcext:value-type="string">
            <text:p>Uruguai</text:p>
          </table:table-cell>
          <table:table-cell table:style-name="ce240" table:number-columns-repeated="2"/>
          <table:table-cell table:style-name="ce249" office:value-type="string" calcext:value-type="string">
            <text:p>Cabo Verde</text:p>
          </table:table-cell>
          <table:table-cell table:style-name="ce255"/>
          <table:table-cell table:style-name="ce253"/>
          <table:table-cell table:style-name="ce278" office:value-type="string" calcext:value-type="string">
            <text:p>O8</text:p>
          </table:table-cell>
          <table:table-cell table:style-name="ce285" office:value-type="date" office:date-value="2025-07-07" calcext:value-type="date">
            <text:p>7-07</text:p>
          </table:table-cell>
          <table:table-cell table:style-name="ce297"/>
          <table:table-cell table:style-name="ce302" office:value-type="string" calcext:value-type="string">
            <text:p>Vencedor do 15</text:p>
          </table:table-cell>
          <table:table-cell table:style-name="ce309"/>
          <table:table-cell table:style-name="ce238"/>
          <table:table-cell table:style-name="ce316" office:value-type="string" calcext:value-type="string">
            <text:p>Vencedor do 16</text:p>
          </table:table-cell>
          <table:table-cell table:style-name="ce324"/>
          <table:table-cell table:style-name="ce253"/>
          <table:table-cell table:style-name="ce333" table:content-validation-name="val3"/>
          <table:table-cell table:number-columns-repeated="997"/>
        </table:table-row>
        <table:table-row table:style-name="ro12">
          <table:table-cell table:style-name="ce218" table:formula="of:=IF(COUNTBLANK([$'Resultados Oficiais'.M29:.N29])&gt;0;&quot;&quot;;IF(COUNTBLANK([.M29:.N29])&gt;0;&quot;&quot;; IF(AND([.M29]=[$'Resultados Oficiais'.M29];[$'Resultados Oficiais'.N29]=[.N29]);30;IF([.M29]-[.N29]=[$'Resultados Oficiais'.M29]-[$'Resultados Oficiais'.N29];21;IF(OR(AND([.M29]-[.N29]&gt;0;[$'Resultados Oficiais'.M29]-[$'Resultados Oficiais'.N29]&gt;0);AND([.M29]-[.N29]&lt;0;[$'Resultados Oficiais'.M29]-[$'Resultados Oficiais'.N29]&lt;0));IF(OR([.M29]=[$'Resultados Oficiais'.M29];[$'Resultados Oficiais'.N29]=[.N29]);18;15);IF(OR([.M29]=[$'Resultados Oficiais'.M29];[$'Resultados Oficiais'.N29]=[.N29]);6;0))))))">
            <text:p/>
          </table:table-cell>
          <table:table-cell table:style-name="ce222" office:value-type="date" office:date-value="2025-06-27" calcext:value-type="date">
            <text:p>27-06</text:p>
          </table:table-cell>
          <table:table-cell table:style-name="ce229" office:value-type="string" calcext:value-type="string">
            <office:annotation draw:style-name="gr7" draw:text-style-name="P3" svg:width="189.01pt" svg:height="28.09pt" svg:x="58.48pt" svg:y="218.47pt" draw:caption-point-x="-11.54pt" draw:caption-point-y="-5.95pt">
              <dc:date>2026-05-01T00:00:00</dc:date>
              <text:p text:style-name="P2">Multiplica 2X os pontos em caso de aposta e VITÓRIA da ZEBRA.</text:p>
            </office:annotation>
            <text:p>3X</text:p>
            <draw:frame table:end-cell-address="'Resultados Oficiais'.D32" table:end-x="24.69pt" table:end-y="4.48pt" draw:z-index="1" draw:name="image5.png" draw:style-name="gr1" draw:text-style-name="P1" svg:width="27.72pt" svg:height="20.98pt" svg:x="15pt" svg:y="6.01pt">
              <draw:image xlink:href="Pictures/100002010000029B000002D058F00F5457A07490.png" xlink:type="simple" xlink:show="embed" xlink:actuate="onLoad">
                <text:p/>
              </draw:image>
            </draw:frame>
          </table:table-cell>
          <table:table-cell table:style-name="ce232" office:value-type="string" calcext:value-type="string">
            <text:p>N. Zelândia</text:p>
          </table:table-cell>
          <table:table-cell table:style-name="ce240" table:number-columns-repeated="2"/>
          <table:table-cell table:style-name="ce249" office:value-type="string" calcext:value-type="string">
            <text:p>Bélgica</text:p>
          </table:table-cell>
          <table:table-cell table:style-name="ce255"/>
          <table:table-cell table:style-name="ce253"/>
          <table:table-cell table:style-name="ce222" office:value-type="date" office:date-value="2025-06-26" calcext:value-type="date">
            <text:p>26-06</text:p>
          </table:table-cell>
          <table:table-cell table:style-name="ce226"/>
          <table:table-cell table:style-name="ce231" office:value-type="string" calcext:value-type="string">
            <office:annotation draw:style-name="gr7" draw:text-style-name="P3" svg:width="127.79pt" svg:height="39.29pt" svg:x="389.2pt" svg:y="212.85pt" draw:caption-point-x="-11.54pt" draw:caption-point-y="-0.34pt">
              <dc:date>2026-05-01T00:00:00</dc:date>
              <text:p text:style-name="P2">Multiplica 3X os pontos em caso de aposta e VITÓRIA da ZEBRA.</text:p>
            </office:annotation>
            <text:p>Espanha</text:p>
          </table:table-cell>
          <table:table-cell table:style-name="ce240" table:number-columns-repeated="2"/>
          <table:table-cell table:style-name="ce249" office:value-type="string" calcext:value-type="string">
            <text:p>Uruguai</text:p>
          </table:table-cell>
          <table:table-cell table:style-name="ce255"/>
          <table:table-cell table:style-name="ce253"/>
          <table:table-cell table:style-name="ce281" office:value-type="string" calcext:value-type="string">
            <text:p>X</text:p>
          </table:table-cell>
          <table:table-cell table:number-columns-repeated="7"/>
          <table:table-cell table:style-name="ce253"/>
          <table:table-cell table:number-columns-repeated="998"/>
        </table:table-row>
        <table:table-row table:style-name="ro12">
          <table:table-cell table:style-name="ce218"/>
          <table:table-cell table:style-name="ce222" office:value-type="date" office:date-value="2025-06-27" calcext:value-type="date">
            <text:p>27-06</text:p>
          </table:table-cell>
          <table:table-cell table:style-name="ce226"/>
          <table:table-cell table:style-name="ce231" office:value-type="string" calcext:value-type="string">
            <text:p>Egito</text:p>
          </table:table-cell>
          <table:table-cell table:style-name="ce240" table:number-columns-repeated="2"/>
          <table:table-cell table:style-name="ce249" office:value-type="string" calcext:value-type="string">
            <text:p>Irã</text:p>
          </table:table-cell>
          <table:table-cell table:style-name="ce255"/>
          <table:table-cell table:style-name="ce253"/>
          <table:table-cell table:style-name="ce222" office:value-type="date" office:date-value="2025-06-26" calcext:value-type="date">
            <text:p>26-06</text:p>
          </table:table-cell>
          <table:table-cell table:style-name="ce226"/>
          <table:table-cell table:style-name="ce231" office:value-type="string" calcext:value-type="string">
            <text:p>Cabo Verde</text:p>
          </table:table-cell>
          <table:table-cell table:style-name="ce240" table:number-columns-repeated="2"/>
          <table:table-cell table:style-name="ce249" office:value-type="string" calcext:value-type="string">
            <text:p>Arábia Saudita</text:p>
          </table:table-cell>
          <table:table-cell table:style-name="ce255"/>
          <table:table-cell table:style-name="ce253"/>
          <table:table-cell table:style-name="ce281" office:value-type="string" calcext:value-type="string">
            <text:p>X</text:p>
          </table:table-cell>
          <table:table-cell table:style-name="ce287" table:number-columns-repeated="2"/>
          <table:table-cell table:style-name="ce303" office:value-type="string" calcext:value-type="string" table:number-columns-spanned="4" table:number-rows-spanned="1">
            <office:annotation draw:style-name="gr6" draw:text-style-name="P3" svg:width="131.3pt" svg:height="84.08pt" svg:x="667.08pt" svg:y="216.71pt" draw:caption-point-x="98.22pt" draw:caption-point-y="3.32pt">
              <dc:date>2026-05-01T00:00:00</dc:date>
              <text:p text:style-name="P2">QUARTAS</text:p>
              <text:p text:style-name="P2">&gt;&gt; Aposta para 90 minutos + eventual prorrogação!</text:p>
              <text:p text:style-name="P2"/>
              <text:p text:style-name="P2">Bucha: 200 pontos.</text:p>
              <text:p text:style-name="P2">Demais: 140, 120, 100, 40.</text:p>
              <text:p text:style-name="P2">Pênaltis: 100 pontos.</text:p>
            </office:annotation>
            <text:p>Quartas</text:p>
          </table:table-cell>
          <table:covered-table-cell table:number-columns-repeated="3" table:style-name="ce310"/>
          <table:table-cell table:style-name="ce325"/>
          <table:table-cell table:style-name="ce253"/>
          <table:table-cell table:style-name="ce332" office:value-type="string" calcext:value-type="string">
            <office:annotation draw:style-name="gr8" draw:text-style-name="P3" svg:width="222.94pt" svg:height="50.49pt" svg:x="891.5pt" svg:y="214.78pt" draw:caption-point-x="-11.54pt" draw:caption-point-y="5.24pt">
              <dc:date>2026-05-01T00:00:00</dc:date>
              <text:p text:style-name="P2">Os pênaltis terão pontuação EXTRA, independente da aposta feita no tempo de jogo. Ou seja: se o jogo for para os pênaltis, quem vence?</text:p>
            </office:annotation>
            <text:p>Pênaltis</text:p>
          </table:table-cell>
          <table:table-cell table:number-columns-repeated="997"/>
        </table:table-row>
        <table:table-row table:style-name="ro12">
          <table:table-cell table:style-name="ce217"/>
          <table:table-cell table:style-name="ce221" table:number-columns-repeated="2"/>
          <table:table-cell table:style-name="ce230"/>
          <table:table-cell table:style-name="ce236" office:value-type="string" calcext:value-type="string" table:number-columns-spanned="2" table:number-rows-spanned="1">
            <text:p>Grupo I</text:p>
          </table:table-cell>
          <table:covered-table-cell/>
          <table:table-cell table:style-name="ce230"/>
          <table:table-cell table:style-name="ce253" table:number-columns-repeated="2"/>
          <table:table-cell table:style-name="ce221" table:number-columns-repeated="2"/>
          <table:table-cell table:style-name="ce230"/>
          <table:table-cell table:style-name="ce236" office:value-type="string" calcext:value-type="string" table:number-columns-spanned="2" table:number-rows-spanned="1">
            <text:p>Grupo J</text:p>
          </table:table-cell>
          <table:covered-table-cell/>
          <table:table-cell table:style-name="ce230"/>
          <table:table-cell table:style-name="ce253" table:number-columns-repeated="2"/>
          <table:table-cell table:style-name="ce278" office:value-type="string" calcext:value-type="string">
            <text:p>Q1</text:p>
          </table:table-cell>
          <table:table-cell table:style-name="ce288" office:value-type="date" office:date-value="2025-07-09" calcext:value-type="date">
            <text:p>9-07</text:p>
          </table:table-cell>
          <table:table-cell table:style-name="ce298"/>
          <table:table-cell table:style-name="ce304" office:value-type="string" calcext:value-type="string">
            <text:p>Vencedor O1</text:p>
          </table:table-cell>
          <table:table-cell table:style-name="ce240" table:number-columns-repeated="2"/>
          <table:table-cell table:style-name="ce318" office:value-type="string" calcext:value-type="string">
            <text:p>Vencedor O2</text:p>
          </table:table-cell>
          <table:table-cell table:style-name="ce326"/>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6-16" calcext:value-type="date">
            <text:p>16-06</text:p>
          </table:table-cell>
          <table:table-cell table:style-name="ce226"/>
          <table:table-cell table:style-name="ce231" office:value-type="string" calcext:value-type="string">
            <text:p>França</text:p>
          </table:table-cell>
          <table:table-cell table:style-name="ce240" table:number-columns-repeated="2"/>
          <table:table-cell table:style-name="ce249" office:value-type="string" calcext:value-type="string">
            <text:p>Senegal</text:p>
          </table:table-cell>
          <table:table-cell table:style-name="ce257"/>
          <table:table-cell table:style-name="ce253"/>
          <table:table-cell table:style-name="ce222" office:value-type="date" office:date-value="2025-06-16" calcext:value-type="date">
            <text:p>16-06</text:p>
          </table:table-cell>
          <table:table-cell table:style-name="ce226"/>
          <table:table-cell table:style-name="ce231" office:value-type="string" calcext:value-type="string">
            <text:p>Argentina</text:p>
          </table:table-cell>
          <table:table-cell table:style-name="ce240" table:number-columns-repeated="2"/>
          <table:table-cell table:style-name="ce249" office:value-type="string" calcext:value-type="string">
            <text:p>Argélia</text:p>
          </table:table-cell>
          <table:table-cell table:style-name="ce257"/>
          <table:table-cell table:style-name="ce253"/>
          <table:table-cell table:style-name="ce278" office:value-type="string" calcext:value-type="string">
            <text:p>Q2</text:p>
          </table:table-cell>
          <table:table-cell table:style-name="ce288" office:value-type="date" office:date-value="2025-07-10" calcext:value-type="date">
            <text:p>10-07</text:p>
          </table:table-cell>
          <table:table-cell table:style-name="ce298"/>
          <table:table-cell table:style-name="ce304" office:value-type="string" calcext:value-type="string">
            <text:p>Vencedor O3</text:p>
          </table:table-cell>
          <table:table-cell table:style-name="ce240" table:number-columns-repeated="2"/>
          <table:table-cell table:style-name="ce318" office:value-type="string" calcext:value-type="string">
            <text:p>Vencedor O4</text:p>
          </table:table-cell>
          <table:table-cell table:style-name="ce326"/>
          <table:table-cell table:style-name="ce253"/>
          <table:table-cell table:style-name="ce333" table:content-validation-name="val3"/>
          <table:table-cell table:number-columns-repeated="997"/>
        </table:table-row>
        <table:table-row table:style-name="ro12">
          <table:table-cell table:style-name="ce218" table:formula="of:=IF(COUNTBLANK([$'Resultados Oficiais'.E51:.F51])&gt;0;&quot;&quot;;IF(COUNTBLANK([.E33:.F33])&gt;0;&quot;&quot;; IF(AND([.E33]=[$'Resultados Oficiais'.E51];[$'Resultados Oficiais'.F51]=[.F33]);30;IF([.E33]-[.F33]=[$'Resultados Oficiais'.E51]-[$'Resultados Oficiais'.F51];21;IF(OR(AND([.E33]-[.F33]&gt;0;[$'Resultados Oficiais'.E51]-[$'Resultados Oficiais'.F51]&gt;0);AND([.E33]-[.F33]&lt;0;[$'Resultados Oficiais'.E51]-[$'Resultados Oficiais'.F51]&lt;0));IF(OR([.E33]=[$'Resultados Oficiais'.E51];[$'Resultados Oficiais'.F51]=[.F33]);18;15);IF(OR([.E33]=[$'Resultados Oficiais'.E51];[$'Resultados Oficiais'.F51]=[.F33]);6;0))))))">
            <text:p/>
          </table:table-cell>
          <table:table-cell table:style-name="ce222" office:value-type="date" office:date-value="2025-06-16" calcext:value-type="date">
            <text:p>16-06</text:p>
          </table:table-cell>
          <table:table-cell table:style-name="ce226"/>
          <table:table-cell table:style-name="ce231" office:value-type="string" calcext:value-type="string">
            <text:p>Iraque</text:p>
          </table:table-cell>
          <table:table-cell table:style-name="ce240" table:number-columns-repeated="2"/>
          <table:table-cell table:style-name="ce249" office:value-type="string" calcext:value-type="string">
            <text:p>Noruega</text:p>
          </table:table-cell>
          <table:table-cell table:style-name="ce257"/>
          <table:table-cell table:style-name="ce253"/>
          <table:table-cell table:style-name="ce222" office:value-type="date" office:date-value="2025-06-17" calcext:value-type="date">
            <text:p>17-06</text:p>
          </table:table-cell>
          <table:table-cell table:style-name="ce226"/>
          <table:table-cell table:style-name="ce231" office:value-type="string" calcext:value-type="string">
            <text:p>Áustria</text:p>
          </table:table-cell>
          <table:table-cell table:style-name="ce240" table:number-columns-repeated="2"/>
          <table:table-cell table:style-name="ce249" office:value-type="string" calcext:value-type="string">
            <text:p>Jordânia</text:p>
          </table:table-cell>
          <table:table-cell table:style-name="ce257"/>
          <table:table-cell table:style-name="ce253"/>
          <table:table-cell table:style-name="ce278" office:value-type="string" calcext:value-type="string">
            <text:p>Q3</text:p>
          </table:table-cell>
          <table:table-cell table:style-name="ce288" office:value-type="date" office:date-value="2025-07-11" calcext:value-type="date">
            <text:p>11-07</text:p>
          </table:table-cell>
          <table:table-cell table:style-name="ce298"/>
          <table:table-cell table:style-name="ce304" office:value-type="string" calcext:value-type="string">
            <text:p>Vencedor O5</text:p>
          </table:table-cell>
          <table:table-cell table:style-name="ce240" table:number-columns-repeated="2"/>
          <table:table-cell table:style-name="ce318" office:value-type="string" calcext:value-type="string">
            <text:p>Vencedor O6</text:p>
          </table:table-cell>
          <table:table-cell table:style-name="ce326"/>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6-22" calcext:value-type="date">
            <text:p>22-06</text:p>
          </table:table-cell>
          <table:table-cell table:style-name="ce226"/>
          <table:table-cell table:style-name="ce231" office:value-type="string" calcext:value-type="string">
            <text:p>França</text:p>
          </table:table-cell>
          <table:table-cell table:style-name="ce240" table:number-columns-repeated="2"/>
          <table:table-cell table:style-name="ce250" office:value-type="string" calcext:value-type="string">
            <text:p>Iraque</text:p>
            <draw:frame table:end-cell-address="'Resultados Oficiais'.H37" table:end-x="2.01pt" table:end-y="4.48pt" draw:z-index="9" draw:name="image5.png" draw:style-name="gr1" draw:text-style-name="P1" svg:width="27.72pt" svg:height="20.98pt" svg:x="47.25pt" svg:y="6.01pt">
              <draw:image xlink:href="Pictures/100002010000029B000002D058F00F5457A07490.png" xlink:type="simple" xlink:show="embed" xlink:actuate="onLoad">
                <text:p/>
              </draw:image>
            </draw:frame>
          </table:table-cell>
          <table:table-cell table:style-name="ce256" office:value-type="string" calcext:value-type="string">
            <office:annotation draw:style-name="gr7" draw:text-style-name="P3" svg:width="123.65pt" svg:height="39.29pt" svg:x="265.55pt" svg:y="250.36pt" draw:caption-point-x="-11.54pt" draw:caption-point-y="-0.34pt">
              <dc:date>2026-05-01T00:00:00</dc:date>
              <text:p text:style-name="P2">Multiplica 4X os pontos em caso de aposta e VITÓRIA da ZEBRA.</text:p>
            </office:annotation>
            <text:p>4X</text:p>
          </table:table-cell>
          <table:table-cell table:style-name="ce253"/>
          <table:table-cell table:style-name="ce222" office:value-type="date" office:date-value="2025-06-22" calcext:value-type="date">
            <text:p>22-06</text:p>
          </table:table-cell>
          <table:table-cell table:style-name="ce226"/>
          <table:table-cell table:style-name="ce231" office:value-type="string" calcext:value-type="string">
            <text:p>Argentina</text:p>
          </table:table-cell>
          <table:table-cell table:style-name="ce240" table:number-columns-repeated="2"/>
          <table:table-cell table:style-name="ce249" office:value-type="string" calcext:value-type="string">
            <text:p>Áustria</text:p>
          </table:table-cell>
          <table:table-cell table:style-name="ce257"/>
          <table:table-cell table:style-name="ce253"/>
          <table:table-cell table:style-name="ce278" office:value-type="string" calcext:value-type="string">
            <text:p>Q4</text:p>
          </table:table-cell>
          <table:table-cell table:style-name="ce288" office:value-type="date" office:date-value="2025-07-11" calcext:value-type="date">
            <text:p>11-07</text:p>
          </table:table-cell>
          <table:table-cell table:style-name="ce298"/>
          <table:table-cell table:style-name="ce304" office:value-type="string" calcext:value-type="string">
            <text:p>Vencedor O7</text:p>
          </table:table-cell>
          <table:table-cell table:style-name="ce240" table:number-columns-repeated="2"/>
          <table:table-cell table:style-name="ce318" office:value-type="string" calcext:value-type="string">
            <text:p>Vencedor O8</text:p>
          </table:table-cell>
          <table:table-cell table:style-name="ce326"/>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6-22" calcext:value-type="date">
            <text:p>22-06</text:p>
          </table:table-cell>
          <table:table-cell table:style-name="ce226"/>
          <table:table-cell table:style-name="ce231" office:value-type="string" calcext:value-type="string">
            <text:p>Noruega</text:p>
          </table:table-cell>
          <table:table-cell table:style-name="ce240" table:number-columns-repeated="2"/>
          <table:table-cell table:style-name="ce249" office:value-type="string" calcext:value-type="string">
            <text:p>Senegal</text:p>
          </table:table-cell>
          <table:table-cell table:style-name="ce257"/>
          <table:table-cell table:style-name="ce253"/>
          <table:table-cell table:style-name="ce222" office:value-type="date" office:date-value="2025-06-23" calcext:value-type="date">
            <text:p>23-06</text:p>
          </table:table-cell>
          <table:table-cell table:style-name="ce226"/>
          <table:table-cell table:style-name="ce231" office:value-type="string" calcext:value-type="string">
            <text:p>Jordânia</text:p>
          </table:table-cell>
          <table:table-cell table:style-name="ce240" table:number-columns-repeated="2"/>
          <table:table-cell table:style-name="ce249" office:value-type="string" calcext:value-type="string">
            <text:p>Argélia</text:p>
          </table:table-cell>
          <table:table-cell table:style-name="ce257"/>
          <table:table-cell table:style-name="ce253"/>
          <table:table-cell table:style-name="ce281" office:value-type="string" calcext:value-type="string">
            <text:p>X</text:p>
          </table:table-cell>
          <table:table-cell table:number-columns-repeated="7"/>
          <table:table-cell table:style-name="ce253"/>
          <table:table-cell table:number-columns-repeated="998"/>
        </table:table-row>
        <table:table-row table:style-name="ro12">
          <table:table-cell table:style-name="ce218" table:formula="of:=IF(COUNTBLANK([$'Resultados Oficiais'.M54:.N54])&gt;0;&quot;&quot;;IF(COUNTBLANK([.M36:.N36])&gt;0;&quot;&quot;; IF(AND([.M36]=[$'Resultados Oficiais'.M54];[$'Resultados Oficiais'.N54]=[.N36]);30;IF([.M36]-[.N36]=[$'Resultados Oficiais'.M54]-[$'Resultados Oficiais'.N54];21;IF(OR(AND([.M36]-[.N36]&gt;0;[$'Resultados Oficiais'.M54]-[$'Resultados Oficiais'.N54]&gt;0);AND([.M36]-[.N36]&lt;0;[$'Resultados Oficiais'.M54]-[$'Resultados Oficiais'.N54]&lt;0));IF(OR([.M36]=[$'Resultados Oficiais'.M54];[$'Resultados Oficiais'.N54]=[.N36]);18;15);IF(OR([.M36]=[$'Resultados Oficiais'.M54];[$'Resultados Oficiais'.N54]=[.N36]);6;0))))))">
            <text:p/>
          </table:table-cell>
          <table:table-cell table:style-name="ce222" office:value-type="date" office:date-value="2025-06-26" calcext:value-type="date">
            <text:p>26-06</text:p>
          </table:table-cell>
          <table:table-cell table:style-name="ce226"/>
          <table:table-cell table:style-name="ce231" office:value-type="string" calcext:value-type="string">
            <text:p>Noruega</text:p>
          </table:table-cell>
          <table:table-cell table:style-name="ce240" table:number-columns-repeated="2"/>
          <table:table-cell table:style-name="ce249" office:value-type="string" calcext:value-type="string">
            <text:p>França</text:p>
          </table:table-cell>
          <table:table-cell table:style-name="ce257"/>
          <table:table-cell table:style-name="ce253"/>
          <table:table-cell table:style-name="ce222" office:value-type="date" office:date-value="2025-06-27" calcext:value-type="date">
            <text:p>27-06</text:p>
          </table:table-cell>
          <table:table-cell table:style-name="ce262" office:value-type="string" calcext:value-type="string">
            <office:annotation draw:style-name="gr7" draw:text-style-name="P3" svg:width="176.4pt" svg:height="28.09pt" svg:x="322.53pt" svg:y="270.96pt" draw:caption-point-x="-11.54pt" draw:caption-point-y="-5.95pt">
              <dc:date>2026-05-01T00:00:00</dc:date>
              <text:p text:style-name="P2">Multiplica 4X os pontos em caso de aposta e VITÓRIA da ZEBRA.</text:p>
            </office:annotation>
            <text:p>4X</text:p>
            <draw:frame table:end-cell-address="'Resultados Oficiais'.L39" table:end-x="26.96pt" table:end-y="4.48pt" draw:z-index="10" draw:name="image5.png" draw:style-name="gr1" draw:text-style-name="P1" svg:width="27.72pt" svg:height="20.98pt" svg:x="17.26pt" svg:y="6.01pt">
              <draw:image xlink:href="Pictures/100002010000029B000002D058F00F5457A07490.png" xlink:type="simple" xlink:show="embed" xlink:actuate="onLoad">
                <text:p/>
              </draw:image>
            </draw:frame>
          </table:table-cell>
          <table:table-cell table:style-name="ce267" office:value-type="string" calcext:value-type="string">
            <text:p>Jordânia</text:p>
          </table:table-cell>
          <table:table-cell table:style-name="ce240" table:number-columns-repeated="2"/>
          <table:table-cell table:style-name="ce249" office:value-type="string" calcext:value-type="string">
            <text:p>Argentina</text:p>
          </table:table-cell>
          <table:table-cell table:style-name="ce257"/>
          <table:table-cell table:style-name="ce253"/>
          <table:table-cell table:style-name="ce281" office:value-type="string" calcext:value-type="string">
            <text:p>X</text:p>
          </table:table-cell>
          <table:table-cell table:style-name="ce287" table:number-columns-repeated="2"/>
          <table:table-cell table:style-name="ce303" office:value-type="string" calcext:value-type="string" table:number-columns-spanned="4" table:number-rows-spanned="1">
            <office:annotation draw:style-name="gr6" draw:text-style-name="P3" svg:width="131.3pt" svg:height="84.08pt" svg:x="667.08pt" svg:y="261.72pt" draw:caption-point-x="98.22pt" draw:caption-point-y="3.29pt">
              <dc:date>2026-05-01T00:00:00</dc:date>
              <text:p text:style-name="P2">SEMIFINAIS</text:p>
              <text:p text:style-name="P2">&gt;&gt; Aposta para 90 minutos + eventual prorrogação!</text:p>
              <text:p text:style-name="P2"/>
              <text:p text:style-name="P2">Bucha: 300 pontos.</text:p>
              <text:p text:style-name="P2">Demais: 210, 180, 150, 60.</text:p>
              <text:p text:style-name="P2">Pênaltis: 150 pontos.</text:p>
            </office:annotation>
            <text:p>Semifinais</text:p>
          </table:table-cell>
          <table:covered-table-cell table:number-columns-repeated="3" table:style-name="ce310"/>
          <table:table-cell table:style-name="ce325"/>
          <table:table-cell table:style-name="ce253"/>
          <table:table-cell table:style-name="ce332" office:value-type="string" calcext:value-type="string">
            <office:annotation draw:style-name="gr7" draw:text-style-name="P3" svg:width="222.94pt" svg:height="50.49pt" svg:x="891.5pt" svg:y="259.77pt" draw:caption-point-x="-11.54pt" draw:caption-point-y="5.24pt">
              <dc:date>2026-05-01T00:00:00</dc:date>
              <text:p text:style-name="P2">Os pênaltis terão pontuação EXTRA, independente da aposta feita no tempo de jogo. Ou seja: se o jogo for para os pênaltis, quem vence?</text:p>
            </office:annotation>
            <text:p>Pênaltis</text:p>
          </table:table-cell>
          <table:table-cell table:number-columns-repeated="997"/>
        </table:table-row>
        <table:table-row table:style-name="ro12">
          <table:table-cell table:style-name="ce218"/>
          <table:table-cell table:style-name="ce222" office:value-type="date" office:date-value="2025-06-26" calcext:value-type="date">
            <text:p>26-06</text:p>
          </table:table-cell>
          <table:table-cell table:style-name="ce226"/>
          <table:table-cell table:style-name="ce231" office:value-type="string" calcext:value-type="string">
            <text:p>Senegal</text:p>
          </table:table-cell>
          <table:table-cell table:style-name="ce240" table:number-columns-repeated="2"/>
          <table:table-cell table:style-name="ce249" office:value-type="string" calcext:value-type="string">
            <text:p>Iraque</text:p>
          </table:table-cell>
          <table:table-cell table:style-name="ce257"/>
          <table:table-cell table:style-name="ce253"/>
          <table:table-cell table:style-name="ce222" office:value-type="date" office:date-value="2025-06-27" calcext:value-type="date">
            <text:p>27-06</text:p>
          </table:table-cell>
          <table:table-cell table:style-name="ce226"/>
          <table:table-cell table:style-name="ce231" office:value-type="string" calcext:value-type="string">
            <text:p>Áustria</text:p>
          </table:table-cell>
          <table:table-cell table:style-name="ce240" table:number-columns-repeated="2"/>
          <table:table-cell table:style-name="ce249" office:value-type="string" calcext:value-type="string">
            <text:p>Argélia</text:p>
          </table:table-cell>
          <table:table-cell table:style-name="ce257"/>
          <table:table-cell table:style-name="ce253"/>
          <table:table-cell table:style-name="ce278" office:value-type="string" calcext:value-type="string">
            <text:p>S1</text:p>
          </table:table-cell>
          <table:table-cell table:style-name="ce288" office:value-type="date" office:date-value="2025-07-14" calcext:value-type="date">
            <text:p>14-07</text:p>
          </table:table-cell>
          <table:table-cell table:style-name="ce298"/>
          <table:table-cell table:style-name="ce304" office:value-type="string" calcext:value-type="string">
            <text:p>Vencedor Q1</text:p>
          </table:table-cell>
          <table:table-cell table:style-name="ce238" table:number-columns-repeated="2"/>
          <table:table-cell table:style-name="ce318" office:value-type="string" calcext:value-type="string">
            <text:p>Vencedor Q2</text:p>
          </table:table-cell>
          <table:table-cell table:style-name="ce326"/>
          <table:table-cell table:style-name="ce253"/>
          <table:table-cell table:style-name="ce333" table:content-validation-name="val3"/>
          <table:table-cell table:number-columns-repeated="997"/>
        </table:table-row>
        <table:table-row table:style-name="ro12">
          <table:table-cell table:style-name="ce217"/>
          <table:table-cell table:style-name="ce221" table:number-columns-repeated="2"/>
          <table:table-cell table:style-name="ce230"/>
          <table:table-cell table:style-name="ce236" office:value-type="string" calcext:value-type="string" table:number-columns-spanned="2" table:number-rows-spanned="1">
            <text:p>Grupo K</text:p>
          </table:table-cell>
          <table:covered-table-cell/>
          <table:table-cell table:style-name="ce230"/>
          <table:table-cell table:style-name="ce253" table:number-columns-repeated="2"/>
          <table:table-cell table:style-name="ce221" table:number-columns-repeated="2"/>
          <table:table-cell table:style-name="ce230"/>
          <table:table-cell table:style-name="ce236" office:value-type="string" calcext:value-type="string" table:number-columns-spanned="2" table:number-rows-spanned="1">
            <text:p>Grupo L</text:p>
          </table:table-cell>
          <table:covered-table-cell/>
          <table:table-cell table:style-name="ce230"/>
          <table:table-cell table:style-name="ce253" table:number-columns-repeated="2"/>
          <table:table-cell table:style-name="ce278" office:value-type="string" calcext:value-type="string">
            <text:p>S2</text:p>
          </table:table-cell>
          <table:table-cell table:style-name="ce288" office:value-type="date" office:date-value="2025-07-15" calcext:value-type="date">
            <text:p>15-07</text:p>
          </table:table-cell>
          <table:table-cell table:style-name="ce298"/>
          <table:table-cell table:style-name="ce304" office:value-type="string" calcext:value-type="string">
            <text:p>Vencedor Q3</text:p>
          </table:table-cell>
          <table:table-cell table:style-name="ce238" table:number-columns-repeated="2"/>
          <table:table-cell table:style-name="ce318" office:value-type="string" calcext:value-type="string">
            <text:p>Vencedor Q4</text:p>
          </table:table-cell>
          <table:table-cell table:style-name="ce326"/>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6-17" calcext:value-type="date">
            <text:p>17-06</text:p>
          </table:table-cell>
          <table:table-cell table:style-name="ce226"/>
          <table:table-cell table:style-name="ce231" office:value-type="string" calcext:value-type="string">
            <text:p>Portugal</text:p>
          </table:table-cell>
          <table:table-cell table:style-name="ce240" table:number-columns-repeated="2"/>
          <table:table-cell table:style-name="ce249" office:value-type="string" calcext:value-type="string">
            <text:p>Congo</text:p>
          </table:table-cell>
          <table:table-cell table:style-name="ce257"/>
          <table:table-cell table:style-name="ce253"/>
          <table:table-cell table:style-name="ce222" office:value-type="date" office:date-value="2025-06-17" calcext:value-type="date">
            <text:p>17-06</text:p>
          </table:table-cell>
          <table:table-cell table:style-name="ce226"/>
          <table:table-cell table:style-name="ce231" office:value-type="string" calcext:value-type="string">
            <text:p>Inglaterra</text:p>
          </table:table-cell>
          <table:table-cell table:style-name="ce240" table:number-columns-repeated="2"/>
          <table:table-cell table:style-name="ce249" office:value-type="string" calcext:value-type="string">
            <text:p>Croácia</text:p>
          </table:table-cell>
          <table:table-cell table:style-name="ce257"/>
          <table:table-cell table:style-name="ce253"/>
          <table:table-cell table:style-name="ce281" office:value-type="string" calcext:value-type="string">
            <text:p>X</text:p>
          </table:table-cell>
          <table:table-cell table:style-name="ce289" table:number-columns-repeated="2"/>
          <table:table-cell table:style-name="ce305" table:number-columns-repeated="4"/>
          <table:table-cell table:style-name="ce327"/>
          <table:table-cell table:style-name="ce253"/>
          <table:table-cell table:style-name="ce334"/>
          <table:table-cell table:number-columns-repeated="997"/>
        </table:table-row>
        <table:table-row table:style-name="ro12">
          <table:table-cell table:style-name="ce218" table:formula="of:=IF(COUNTBLANK([$'Resultados Oficiais'.E58:.F58])&gt;0;&quot;&quot;;IF(COUNTBLANK([.E40:.F40])&gt;0;&quot;&quot;; IF(AND([.E40]=[$'Resultados Oficiais'.E58];[$'Resultados Oficiais'.F58]=[.F40]);30;IF([.E40]-[.F40]=[$'Resultados Oficiais'.E58]-[$'Resultados Oficiais'.F58];21;IF(OR(AND([.E40]-[.F40]&gt;0;[$'Resultados Oficiais'.E58]-[$'Resultados Oficiais'.F58]&gt;0);AND([.E40]-[.F40]&lt;0;[$'Resultados Oficiais'.E58]-[$'Resultados Oficiais'.F58]&lt;0));IF(OR([.E40]=[$'Resultados Oficiais'.E58];[$'Resultados Oficiais'.F58]=[.F40]);18;15);IF(OR([.E40]=[$'Resultados Oficiais'.E58];[$'Resultados Oficiais'.F58]=[.F40]);6;0))))))">
            <text:p/>
          </table:table-cell>
          <table:table-cell table:style-name="ce222" office:value-type="date" office:date-value="2025-06-17" calcext:value-type="date">
            <text:p>17-06</text:p>
          </table:table-cell>
          <table:table-cell table:style-name="ce226"/>
          <table:table-cell table:style-name="ce231" office:value-type="string" calcext:value-type="string">
            <text:p>Uzbequistão</text:p>
          </table:table-cell>
          <table:table-cell table:style-name="ce240" table:number-columns-repeated="2"/>
          <table:table-cell table:style-name="ce249" office:value-type="string" calcext:value-type="string">
            <text:p>Colômbia</text:p>
          </table:table-cell>
          <table:table-cell table:style-name="ce257"/>
          <table:table-cell table:style-name="ce253"/>
          <table:table-cell table:style-name="ce222" office:value-type="date" office:date-value="2025-06-17" calcext:value-type="date">
            <text:p>17-06</text:p>
          </table:table-cell>
          <table:table-cell table:style-name="ce226"/>
          <table:table-cell table:style-name="ce231" office:value-type="string" calcext:value-type="string">
            <text:p>Gana</text:p>
          </table:table-cell>
          <table:table-cell table:style-name="ce240" table:number-columns-repeated="2"/>
          <table:table-cell table:style-name="ce249" office:value-type="string" calcext:value-type="string">
            <text:p>Panamá</text:p>
          </table:table-cell>
          <table:table-cell table:style-name="ce257"/>
          <table:table-cell table:style-name="ce253"/>
          <table:table-cell table:style-name="ce281" office:value-type="string" calcext:value-type="string">
            <text:p>X</text:p>
          </table:table-cell>
          <table:table-cell table:style-name="ce290" table:number-columns-repeated="2"/>
          <table:table-cell table:style-name="ce303" office:value-type="string" calcext:value-type="string" table:number-columns-spanned="4" table:number-rows-spanned="1">
            <office:annotation draw:style-name="gr6" draw:text-style-name="P3" svg:width="131.3pt" svg:height="84.08pt" svg:x="667.08pt" svg:y="291.71pt" draw:caption-point-x="98.22pt" draw:caption-point-y="3.32pt">
              <dc:date>2026-05-01T00:00:00</dc:date>
              <text:p text:style-name="P2">3° LUGAR</text:p>
              <text:p text:style-name="P2">&gt;&gt; Aposta para 90 minutos + eventual prorrogação!</text:p>
              <text:p text:style-name="P2"/>
              <text:p text:style-name="P2">Bucha: 300 pontos.</text:p>
              <text:p text:style-name="P2">Demais: 210, 180, 150, 60.</text:p>
              <text:p text:style-name="P2">Pênaltis: 150 pontos.</text:p>
            </office:annotation>
            <text:p>Terceiro Lugar</text:p>
          </table:table-cell>
          <table:covered-table-cell table:number-columns-repeated="3" table:style-name="ce310"/>
          <table:table-cell table:style-name="ce328"/>
          <table:table-cell table:style-name="ce253"/>
          <table:table-cell table:style-name="ce332" office:value-type="string" calcext:value-type="string">
            <office:annotation draw:style-name="gr7" draw:text-style-name="P3" svg:width="222.94pt" svg:height="50.49pt" svg:x="891.5pt" svg:y="289.76pt" draw:caption-point-x="-11.54pt" draw:caption-point-y="5.27pt">
              <dc:date>2026-05-01T00:00:00</dc:date>
              <text:p text:style-name="P2">Os pênaltis terão pontuação EXTRA, independente da aposta feita no tempo de jogo. Ou seja: se o jogo for para os pênaltis, quem vence?</text:p>
            </office:annotation>
            <text:p>Pênaltis</text:p>
          </table:table-cell>
          <table:table-cell table:number-columns-repeated="997"/>
        </table:table-row>
        <table:table-row table:style-name="ro12">
          <table:table-cell table:style-name="ce218"/>
          <table:table-cell table:style-name="ce222" office:value-type="date" office:date-value="2025-06-23" calcext:value-type="date">
            <text:p>23-06</text:p>
          </table:table-cell>
          <table:table-cell table:style-name="ce226"/>
          <table:table-cell table:style-name="ce231" office:value-type="string" calcext:value-type="string">
            <text:p>Portugal</text:p>
          </table:table-cell>
          <table:table-cell table:style-name="ce240" table:number-columns-repeated="2"/>
          <table:table-cell table:style-name="ce248" office:value-type="string" calcext:value-type="string">
            <text:p>Uzbequistão</text:p>
            <draw:frame table:end-cell-address="'Resultados Oficiais'.H44" table:end-x="12.5pt" table:end-y="5.24pt" draw:z-index="8" draw:name="image5.png" draw:style-name="gr1" draw:text-style-name="P1" svg:width="27.72pt" svg:height="20.98pt" svg:x="57.74pt" svg:y="6.77pt">
              <draw:image xlink:href="Pictures/100002010000029B000002D058F00F5457A07490.png" xlink:type="simple" xlink:show="embed" xlink:actuate="onLoad">
                <text:p/>
              </draw:image>
            </draw:frame>
          </table:table-cell>
          <table:table-cell table:style-name="ce254" office:value-type="string" calcext:value-type="string">
            <office:annotation draw:style-name="gr7" draw:text-style-name="P3" svg:width="123.65pt" svg:height="39.29pt" svg:x="265.55pt" svg:y="302.85pt" draw:caption-point-x="-11.54pt" draw:caption-point-y="-0.34pt">
              <dc:date>2026-05-01T00:00:00</dc:date>
              <text:p text:style-name="P2">Multiplica 3X os pontos em caso de aposta e VITÓRIA da ZEBRA.</text:p>
            </office:annotation>
            <text:p>2X</text:p>
          </table:table-cell>
          <table:table-cell table:style-name="ce253"/>
          <table:table-cell table:style-name="ce222" office:value-type="date" office:date-value="2025-06-23" calcext:value-type="date">
            <text:p>23-06</text:p>
          </table:table-cell>
          <table:table-cell table:style-name="ce226"/>
          <table:table-cell table:style-name="ce231" office:value-type="string" calcext:value-type="string">
            <text:p>Inglaterra</text:p>
          </table:table-cell>
          <table:table-cell table:style-name="ce240" table:number-columns-repeated="2"/>
          <table:table-cell table:style-name="ce249" office:value-type="string" calcext:value-type="string">
            <text:p>Gana</text:p>
          </table:table-cell>
          <table:table-cell table:style-name="ce257"/>
          <table:table-cell table:style-name="ce253"/>
          <table:table-cell table:style-name="ce281" office:value-type="string" calcext:value-type="string">
            <text:p>X</text:p>
          </table:table-cell>
          <table:table-cell table:style-name="ce288" office:value-type="date" office:date-value="2025-07-18" calcext:value-type="date">
            <text:p>18-07</text:p>
          </table:table-cell>
          <table:table-cell table:style-name="ce298"/>
          <table:table-cell table:style-name="ce304" office:value-type="string" calcext:value-type="string">
            <text:p>Perdedor S1</text:p>
          </table:table-cell>
          <table:table-cell table:style-name="ce238" table:number-columns-repeated="2"/>
          <table:table-cell table:style-name="ce318" office:value-type="string" calcext:value-type="string">
            <text:p>Perdedor S2</text:p>
          </table:table-cell>
          <table:table-cell table:style-name="ce326"/>
          <table:table-cell table:style-name="ce253"/>
          <table:table-cell table:style-name="ce333" table:content-validation-name="val3"/>
          <table:table-cell table:number-columns-repeated="997"/>
        </table:table-row>
        <table:table-row table:style-name="ro12">
          <table:table-cell table:style-name="ce218"/>
          <table:table-cell table:style-name="ce222" office:value-type="date" office:date-value="2025-06-23" calcext:value-type="date">
            <text:p>23-06</text:p>
          </table:table-cell>
          <table:table-cell table:style-name="ce226"/>
          <table:table-cell table:style-name="ce231" office:value-type="string" calcext:value-type="string">
            <text:p>Colômbia</text:p>
          </table:table-cell>
          <table:table-cell table:style-name="ce240" table:number-columns-repeated="2"/>
          <table:table-cell table:style-name="ce249" office:value-type="string" calcext:value-type="string">
            <text:p>Congo</text:p>
          </table:table-cell>
          <table:table-cell table:style-name="ce257"/>
          <table:table-cell table:style-name="ce253"/>
          <table:table-cell table:style-name="ce222" office:value-type="date" office:date-value="2025-06-23" calcext:value-type="date">
            <text:p>23-06</text:p>
          </table:table-cell>
          <table:table-cell table:style-name="ce226"/>
          <table:table-cell table:style-name="ce231" office:value-type="string" calcext:value-type="string">
            <text:p>Panamá</text:p>
          </table:table-cell>
          <table:table-cell table:style-name="ce240" table:number-columns-repeated="2"/>
          <table:table-cell table:style-name="ce249" office:value-type="string" calcext:value-type="string">
            <text:p>Croácia</text:p>
          </table:table-cell>
          <table:table-cell table:style-name="ce257"/>
          <table:table-cell table:style-name="ce253"/>
          <table:table-cell table:style-name="ce281" office:value-type="string" calcext:value-type="string">
            <text:p>X</text:p>
          </table:table-cell>
          <table:table-cell table:style-name="ce291" table:number-columns-repeated="2"/>
          <table:table-cell table:style-name="ce306" table:number-columns-repeated="5"/>
          <table:table-cell table:style-name="ce253"/>
          <table:table-cell table:style-name="ce291"/>
          <table:table-cell table:number-columns-repeated="997"/>
        </table:table-row>
        <table:table-row table:style-name="ro12">
          <table:table-cell table:style-name="ce218" table:formula="of:=IF(COUNTBLANK([$'Resultados Oficiais'.M61:.N61])&gt;0;&quot;&quot;;IF(COUNTBLANK([.M43:.N43])&gt;0;&quot;&quot;; IF(AND([.M43]=[$'Resultados Oficiais'.M61];[$'Resultados Oficiais'.N61]=[.N43]);30;IF([.M43]-[.N43]=[$'Resultados Oficiais'.M61]-[$'Resultados Oficiais'.N61];21;IF(OR(AND([.M43]-[.N43]&gt;0;[$'Resultados Oficiais'.M61]-[$'Resultados Oficiais'.N61]&gt;0);AND([.M43]-[.N43]&lt;0;[$'Resultados Oficiais'.M61]-[$'Resultados Oficiais'.N61]&lt;0));IF(OR([.M43]=[$'Resultados Oficiais'.M61];[$'Resultados Oficiais'.N61]=[.N43]);18;15);IF(OR([.M43]=[$'Resultados Oficiais'.M61];[$'Resultados Oficiais'.N61]=[.N43]);6;0))))))">
            <text:p/>
          </table:table-cell>
          <table:table-cell table:style-name="ce222" office:value-type="date" office:date-value="2025-06-27" calcext:value-type="date">
            <text:p>27-06</text:p>
          </table:table-cell>
          <table:table-cell table:style-name="ce226"/>
          <table:table-cell table:style-name="ce231" office:value-type="string" calcext:value-type="string">
            <text:p>Colômbia</text:p>
          </table:table-cell>
          <table:table-cell table:style-name="ce240" table:number-columns-repeated="2"/>
          <table:table-cell table:style-name="ce249" office:value-type="string" calcext:value-type="string">
            <text:p>Portugal</text:p>
          </table:table-cell>
          <table:table-cell table:style-name="ce257"/>
          <table:table-cell table:style-name="ce253"/>
          <table:table-cell table:style-name="ce222" office:value-type="date" office:date-value="2025-06-27" calcext:value-type="date">
            <text:p>27-06</text:p>
          </table:table-cell>
          <table:table-cell table:style-name="ce229" office:value-type="string" calcext:value-type="string">
            <office:annotation draw:style-name="gr7" draw:text-style-name="P3" svg:width="176.4pt" svg:height="28.09pt" svg:x="322.53pt" svg:y="323.46pt" draw:caption-point-x="-11.54pt" draw:caption-point-y="-5.95pt">
              <dc:date>2026-05-01T00:00:00</dc:date>
              <text:p text:style-name="P2">Multiplica 2X os pontos em caso de aposta e VITÓRIA da ZEBRA.</text:p>
            </office:annotation>
            <text:p>3X</text:p>
            <draw:frame table:end-cell-address="'Resultados Oficiais'.L46" table:end-x="26.96pt" table:end-y="4.48pt" draw:z-index="11" draw:name="image5.png" draw:style-name="gr1" draw:text-style-name="P1" svg:width="27.72pt" svg:height="20.98pt" svg:x="17.26pt" svg:y="6.01pt">
              <draw:image xlink:href="Pictures/100002010000029B000002D058F00F5457A07490.png" xlink:type="simple" xlink:show="embed" xlink:actuate="onLoad">
                <text:p/>
              </draw:image>
            </draw:frame>
          </table:table-cell>
          <table:table-cell table:style-name="ce232" office:value-type="string" calcext:value-type="string">
            <text:p>Panamá</text:p>
          </table:table-cell>
          <table:table-cell table:style-name="ce240" table:number-columns-repeated="2"/>
          <table:table-cell table:style-name="ce249" office:value-type="string" calcext:value-type="string">
            <text:p>Inglaterra</text:p>
          </table:table-cell>
          <table:table-cell table:style-name="ce257"/>
          <table:table-cell table:style-name="ce253"/>
          <table:table-cell table:style-name="ce281" office:value-type="string" calcext:value-type="string">
            <text:p>X</text:p>
          </table:table-cell>
          <table:table-cell table:style-name="ce292" table:number-columns-repeated="2"/>
          <table:table-cell table:style-name="ce307"/>
          <table:table-cell table:style-name="ce311" office:value-type="string" calcext:value-type="string" table:number-columns-spanned="2" table:number-rows-spanned="1">
            <office:annotation draw:style-name="gr9" draw:text-style-name="P3" svg:width="122.94pt" svg:height="106.47pt" svg:x="688.65pt" svg:y="307.13pt" draw:caption-point-x="10.01pt" draw:caption-point-y="10.37pt">
              <dc:date>2026-05-01T00:00:00</dc:date>
              <text:p text:style-name="P2">FINAL</text:p>
              <text:p text:style-name="P2">&gt;&gt; Aposta para 90 minutos + eventual prorrogação!</text:p>
              <text:p text:style-name="P2"/>
              <text:p text:style-name="P2">Bucha: 500 pontos.</text:p>
              <text:p text:style-name="P2">Demais: 350, 300, 250, 100.</text:p>
              <text:p text:style-name="P2">Pênaltis: 250.</text:p>
            </office:annotation>
            <text:p>FINAL</text:p>
          </table:table-cell>
          <table:covered-table-cell table:style-name="ce310"/>
          <table:table-cell table:style-name="ce307"/>
          <table:table-cell table:style-name="ce329"/>
          <table:table-cell table:style-name="ce253"/>
          <table:table-cell table:style-name="ce332" office:value-type="string" calcext:value-type="string">
            <office:annotation draw:style-name="gr7" draw:text-style-name="P3" svg:width="222.94pt" svg:height="50.49pt" svg:x="891.5pt" svg:y="312.26pt" draw:caption-point-x="-11.54pt" draw:caption-point-y="5.24pt">
              <dc:date>2026-05-01T00:00:00</dc:date>
              <text:p text:style-name="P2">Os pênaltis terão pontuação EXTRA, independente da aposta feita no tempo de jogo. Ou seja: se o jogo for para os pênaltis, quem vence?</text:p>
            </office:annotation>
            <text:p>Pênaltis</text:p>
          </table:table-cell>
          <table:table-cell table:number-columns-repeated="997"/>
        </table:table-row>
        <table:table-row table:style-name="ro12">
          <table:table-cell table:style-name="ce218"/>
          <table:table-cell table:style-name="ce222" office:value-type="date" office:date-value="2025-06-27" calcext:value-type="date">
            <text:p>27-06</text:p>
          </table:table-cell>
          <table:table-cell table:style-name="ce226"/>
          <table:table-cell table:style-name="ce231" office:value-type="string" calcext:value-type="string">
            <text:p>Congo</text:p>
          </table:table-cell>
          <table:table-cell table:style-name="ce240" table:number-columns-repeated="2"/>
          <table:table-cell table:style-name="ce249" office:value-type="string" calcext:value-type="string">
            <text:p>Uzbequistão</text:p>
          </table:table-cell>
          <table:table-cell table:style-name="ce257"/>
          <table:table-cell table:style-name="ce253"/>
          <table:table-cell table:style-name="ce222" office:value-type="date" office:date-value="2025-06-27" calcext:value-type="date">
            <text:p>27-06</text:p>
          </table:table-cell>
          <table:table-cell table:style-name="ce226"/>
          <table:table-cell table:style-name="ce231" office:value-type="string" calcext:value-type="string">
            <text:p>Croácia</text:p>
          </table:table-cell>
          <table:table-cell table:style-name="ce240" table:number-columns-repeated="2"/>
          <table:table-cell table:style-name="ce249" office:value-type="string" calcext:value-type="string">
            <text:p>Gana</text:p>
          </table:table-cell>
          <table:table-cell table:style-name="ce257"/>
          <table:table-cell table:style-name="ce253"/>
          <table:table-cell table:style-name="ce281" office:value-type="string" calcext:value-type="string">
            <text:p>X</text:p>
          </table:table-cell>
          <table:table-cell table:style-name="ce293" office:value-type="date" office:date-value="2025-07-19" calcext:value-type="date">
            <text:p>19-07</text:p>
          </table:table-cell>
          <table:table-cell table:style-name="ce299"/>
          <table:table-cell table:style-name="ce308" office:value-type="string" calcext:value-type="string">
            <text:p>Vencedor S1</text:p>
          </table:table-cell>
          <table:table-cell table:style-name="ce312" table:number-columns-repeated="2"/>
          <table:table-cell table:style-name="ce319" office:value-type="string" calcext:value-type="string">
            <text:p>Vencedor S2</text:p>
          </table:table-cell>
          <table:table-cell table:style-name="ce330"/>
          <table:table-cell table:style-name="ce253"/>
          <table:table-cell table:style-name="ce333" table:content-validation-name="val3"/>
          <table:table-cell table:number-columns-repeated="997"/>
        </table:table-row>
        <table:table-row table:style-name="ro12">
          <table:table-cell table:style-name="ce219"/>
          <table:table-cell table:style-name="ce224" table:number-columns-repeated="2"/>
          <table:table-cell table:style-name="ce233"/>
          <table:table-cell table:style-name="ce241" table:number-columns-repeated="2"/>
          <table:table-cell table:style-name="ce233"/>
          <table:table-cell table:style-name="ce258" table:number-columns-repeated="2"/>
          <table:table-cell table:style-name="ce224" table:number-columns-repeated="2"/>
          <table:table-cell table:style-name="ce233"/>
          <table:table-cell table:style-name="ce241" table:number-columns-repeated="2"/>
          <table:table-cell table:style-name="ce233"/>
          <table:table-cell table:style-name="ce258" table:number-columns-repeated="2"/>
          <table:table-cell table:style-name="ce282" office:value-type="string" calcext:value-type="string">
            <text:p>X</text:p>
          </table:table-cell>
          <table:table-cell table:style-name="ce294" table:number-columns-repeated="7"/>
          <table:table-cell table:style-name="ce258"/>
          <table:table-cell table:style-name="ce294"/>
          <table:table-cell table:number-columns-repeated="997"/>
        </table:table-row>
        <table:table-row table:style-name="ro12">
          <table:table-cell table:style-name="ce217"/>
          <table:table-cell table:style-name="ce225" table:number-columns-repeated="2"/>
          <table:table-cell table:style-name="ce234"/>
          <table:table-cell table:style-name="ce216" table:number-columns-repeated="2"/>
          <table:table-cell table:style-name="ce234"/>
          <table:table-cell table:style-name="ce259" table:number-columns-repeated="2"/>
          <table:table-cell table:style-name="ce225" table:number-columns-repeated="2"/>
          <table:table-cell table:style-name="ce234"/>
          <table:table-cell table:style-name="ce216" table:number-columns-repeated="2"/>
          <table:table-cell table:style-name="ce234"/>
          <table:table-cell table:style-name="ce259" table:number-columns-repeated="2"/>
          <table:table-cell table:style-name="ce283"/>
          <table:table-cell table:number-columns-repeated="7"/>
          <table:table-cell table:style-name="ce259"/>
          <table:table-cell table:number-columns-repeated="998"/>
        </table:table-row>
        <table:table-row table:style-name="ro12">
          <table:table-cell table:style-name="ce217"/>
          <table:table-cell table:style-name="ce225" table:number-columns-repeated="2"/>
          <table:table-cell table:style-name="ce235" office:value-type="string" calcext:value-type="string" table:number-columns-spanned="1" table:number-rows-spanned="2">
            <text:p>QUIZ: </text:p>
            <text:p>(150 pts)</text:p>
          </table:table-cell>
          <table:table-cell table:style-name="ce242" office:value-type="string" calcext:value-type="string" table:number-columns-spanned="9" table:number-rows-spanned="1">
            <text:p>Quem será o artilheiro?</text:p>
          </table:table-cell>
          <table:covered-table-cell table:number-columns-repeated="7" table:style-name="ce245"/>
          <table:covered-table-cell table:style-name="ce269"/>
          <table:table-cell table:style-name="ce271"/>
          <table:table-cell table:number-columns-repeated="2"/>
          <table:table-cell table:style-name="ce235" office:value-type="string" calcext:value-type="string" table:number-columns-spanned="3" table:number-rows-spanned="2">
            <text:p>QUIZ: </text:p>
            <text:p>(300 pts)</text:p>
          </table:table-cell>
          <table:covered-table-cell table:number-columns-repeated="2"/>
          <table:table-cell table:style-name="ce242" office:value-type="string" calcext:value-type="string" table:number-columns-spanned="7" table:number-rows-spanned="1">
            <office:annotation draw:style-name="gr10" draw:text-style-name="P3" svg:width="176.4pt" svg:height="28.09pt" svg:x="600.43pt" svg:y="361.33pt" draw:caption-point-x="199.62pt" draw:caption-point-y="-13.8pt">
              <dc:date>2026-05-01T00:00:00</dc:date>
              <text:p text:style-name="P2"/>
              <text:p text:style-name="P2"/>
            </office:annotation>
            <text:p>Qual seleção será a campeã?</text:p>
          </table:table-cell>
          <table:covered-table-cell table:number-columns-repeated="5" table:style-name="ce245"/>
          <table:covered-table-cell table:style-name="ce269"/>
          <table:table-cell/>
          <table:table-cell table:style-name="ce271"/>
          <table:table-cell table:number-columns-repeated="996"/>
        </table:table-row>
        <table:table-row table:style-name="ro12">
          <table:table-cell table:style-name="ce217"/>
          <table:table-cell table:style-name="ce225" table:number-columns-repeated="2"/>
          <table:covered-table-cell/>
          <table:table-cell table:style-name="ce243" table:content-validation-name="val1" table:number-columns-spanned="9" table:number-rows-spanned="1"/>
          <table:covered-table-cell table:number-columns-repeated="7" table:style-name="ce245"/>
          <table:covered-table-cell table:style-name="ce269"/>
          <table:table-cell table:style-name="ce271"/>
          <table:table-cell table:number-columns-repeated="2"/>
          <table:covered-table-cell table:number-columns-repeated="3"/>
          <table:table-cell table:style-name="ce243" table:content-validation-name="val2" table:number-columns-spanned="7" table:number-rows-spanned="1"/>
          <table:covered-table-cell table:number-columns-repeated="5" table:style-name="ce245"/>
          <table:covered-table-cell table:style-name="ce269"/>
          <table:table-cell/>
          <table:table-cell table:style-name="ce271"/>
          <table:table-cell table:number-columns-repeated="996"/>
        </table:table-row>
        <table:table-row table:style-name="ro12">
          <table:table-cell table:style-name="ce217"/>
          <table:table-cell table:style-name="ce225" table:number-columns-repeated="2"/>
          <table:table-cell table:style-name="ce234"/>
          <table:table-cell table:style-name="ce216" table:number-columns-repeated="2"/>
          <table:table-cell table:style-name="ce234"/>
          <table:table-cell table:style-name="ce259" table:number-columns-repeated="2"/>
          <table:table-cell table:style-name="ce225" table:number-columns-repeated="2"/>
          <table:table-cell table:style-name="ce234"/>
          <table:table-cell table:style-name="ce216" table:number-columns-repeated="2"/>
          <table:table-cell table:style-name="ce234"/>
          <table:table-cell table:style-name="ce259" table:number-columns-repeated="2"/>
          <table:table-cell table:number-columns-repeated="8"/>
          <table:table-cell table:style-name="ce259"/>
          <table:table-cell table:number-columns-repeated="998"/>
        </table:table-row>
        <table:table-row table:style-name="ro3" table:number-rows-repeated="1048526">
          <table:table-cell table:number-columns-repeated="1024"/>
        </table:table-row>
        <table:table-row table:style-name="ro3">
          <table:table-cell table:number-columns-repeated="1024"/>
        </table:table-row>
        <calcext:conditional-formats>
          <calcext:conditional-format calcext:target-range-address="'Resultados Oficiais'.Y3:'Resultados Oficiais'.Y18">
            <calcext:condition calcext:apply-style-name="ConditionalStyle_2" calcext:value="contains-text(&quot;2X&quot;)" calcext:base-cell-address="'Resultados Oficiais'.Y3"/>
          </calcext:conditional-format>
          <calcext:conditional-format calcext:target-range-address="'Resultados Oficiais'.Y3:'Resultados Oficiais'.Y18">
            <calcext:condition calcext:apply-style-name="ConditionalStyle_3" calcext:value="formula-is(LEN(TRIM([.Y3]))=0)" calcext:base-cell-address="'Resultados Oficiais'.Y3"/>
          </calcext:conditional-format>
          <calcext:conditional-format calcext:target-range-address="'Resultados Oficiais'.Y3:'Resultados Oficiais'.Y18">
            <calcext:condition calcext:apply-style-name="ConditionalStyle_4" calcext:value="contains-text(&quot;3X&quot;)" calcext:base-cell-address="'Resultados Oficiais'.Y3"/>
          </calcext:conditional-format>
          <calcext:conditional-format calcext:target-range-address="'Resultados Oficiais'.Y3:'Resultados Oficiais'.Y18">
            <calcext:condition calcext:apply-style-name="ConditionalStyle_5" calcext:value="contains-text(&quot;4X&quot;)" calcext:base-cell-address="'Resultados Oficiais'.Y3"/>
          </calcext:conditional-format>
        </calcext:conditional-formats>
      </table:table>
      <table:table table:name="Cartão de Apostas" table:style-name="ta6">
        <table:table-column table:style-name="co41" table:default-cell-style-name="Default"/>
        <table:table-column table:style-name="co20" table:default-cell-style-name="Default"/>
        <table:table-column table:style-name="co39" table:default-cell-style-name="Default"/>
        <table:table-column table:style-name="co36" table:number-columns-repeated="2" table:default-cell-style-name="Default"/>
        <table:table-column table:style-name="co39" table:default-cell-style-name="Default"/>
        <table:table-column table:style-name="co20" table:default-cell-style-name="Default"/>
        <table:table-column table:style-name="co4" table:default-cell-style-name="Default"/>
        <table:table-column table:style-name="co44" table:default-cell-style-name="Default"/>
        <table:table-column table:style-name="co20" table:default-cell-style-name="Default"/>
        <table:table-column table:style-name="co39" table:default-cell-style-name="Default"/>
        <table:table-column table:style-name="co36" table:number-columns-repeated="2" table:default-cell-style-name="Default"/>
        <table:table-column table:style-name="co39" table:default-cell-style-name="Default"/>
        <table:table-column table:style-name="co20" table:default-cell-style-name="Default"/>
        <table:table-column table:style-name="co4" table:default-cell-style-name="Default"/>
        <table:table-column table:style-name="co45" table:default-cell-style-name="Default"/>
        <table:table-column table:style-name="co38" table:default-cell-style-name="Default"/>
        <table:table-column table:style-name="co20" table:default-cell-style-name="Default"/>
        <table:table-column table:style-name="co39" table:default-cell-style-name="Default"/>
        <table:table-column table:style-name="co36" table:number-columns-repeated="2" table:default-cell-style-name="Default"/>
        <table:table-column table:style-name="co39" table:default-cell-style-name="Default"/>
        <table:table-column table:style-name="co20" table:default-cell-style-name="Default"/>
        <table:table-column table:style-name="co36" table:default-cell-style-name="Default"/>
        <table:table-column table:style-name="co42" table:default-cell-style-name="Default"/>
        <table:table-column table:style-name="co36" table:default-cell-style-name="Default"/>
        <table:table-column table:style-name="co46" table:default-cell-style-name="Default"/>
        <table:table-column table:style-name="co13" table:number-columns-repeated="996" table:default-cell-style-name="Default"/>
        <table:table-row table:style-name="ro7">
          <table:table-cell table:style-name="ce335" office:value-type="string" calcext:value-type="string" table:number-columns-spanned="3" table:number-rows-spanned="1">
            <text:p>Nome</text:p>
          </table:table-cell>
          <table:covered-table-cell table:style-name="ce42"/>
          <table:covered-table-cell table:style-name="ce44"/>
          <table:table-cell table:style-name="ce345" office:value-type="string" calcext:value-type="string" table:number-columns-spanned="6" table:number-rows-spanned="1">
            <text:p>NOME</text:p>
          </table:table-cell>
          <table:covered-table-cell table:number-columns-repeated="4" table:style-name="ce23"/>
          <table:covered-table-cell table:style-name="ce28"/>
          <table:table-cell table:style-name="ce367"/>
          <table:table-cell table:style-name="ce375" office:value-type="string" calcext:value-type="string">
            <text:p>Pontos</text:p>
          </table:table-cell>
          <table:table-cell table:style-name="ce379" office:value-type="float" office:value="0" calcext:value-type="float" table:number-columns-spanned="2" table:number-rows-spanned="1">
            <text:p>0</text:p>
          </table:table-cell>
          <table:covered-table-cell table:style-name="ce28"/>
          <table:table-cell table:style-name="ce375" office:value-type="string" calcext:value-type="string">
            <text:p>Ranking</text:p>
          </table:table-cell>
          <table:table-cell table:style-name="ce380" office:value-type="float" office:value="0" calcext:value-type="float" table:number-columns-spanned="2" table:number-rows-spanned="1">
            <text:p>0</text:p>
          </table:table-cell>
          <table:covered-table-cell table:style-name="ce23"/>
          <table:table-cell table:style-name="ce381"/>
          <table:table-cell table:style-name="ce375" office:value-type="string" calcext:value-type="string" table:number-columns-spanned="3" table:number-rows-spanned="1">
            <text:p>Buchas</text:p>
          </table:table-cell>
          <table:covered-table-cell table:number-columns-repeated="2" table:style-name="ce23"/>
          <table:table-cell table:style-name="ce380" table:formula="of:=COUNTIF([.I$1:.I$1048576];&quot;BUCHA!&quot;)+COUNTIF([.Q$1:.Q$1048576];&quot;BUCHA!&quot;)+COUNTIF([.AB$1:.AB$1048576];&quot;BUCHA!&quot;)" office:value-type="float" office:value="0" calcext:value-type="float">
            <text:p>0</text:p>
          </table:table-cell>
          <table:table-cell table:style-name="ce375" office:value-type="string" calcext:value-type="string" table:number-columns-spanned="2" table:number-rows-spanned="1">
            <text:p>Super Buchas</text:p>
          </table:table-cell>
          <table:covered-table-cell table:style-name="ce23"/>
          <table:table-cell table:style-name="ce380" table:formula="of:=COUNTIF([.I$1:.I$1048576];&quot;SUPER!!&quot;)+COUNTIF([.Q$1:.Q$1048576];&quot;SUPER!!&quot;)+COUNTIF([.AB$1:.AB$1048576];&quot;SUPER!!&quot;)" office:value-type="float" office:value="0" calcext:value-type="float" table:number-columns-spanned="2" table:number-rows-spanned="1">
            <text:p>0</text:p>
          </table:table-cell>
          <table:covered-table-cell table:style-name="ce23"/>
          <table:table-cell table:style-name="ce375" office:value-type="string" calcext:value-type="string">
            <text:p>Ranking</text:p>
          </table:table-cell>
          <table:table-cell table:style-name="ce380" office:value-type="float" office:value="0" calcext:value-type="float">
            <text:p>0</text:p>
          </table:table-cell>
          <table:table-cell table:style-name="ce416"/>
          <table:table-cell table:number-columns-repeated="996"/>
        </table:table-row>
        <table:table-row table:style-name="ro11">
          <table:table-cell table:style-name="ce336" office:value-type="string" calcext:value-type="string" table:number-columns-spanned="3" table:number-rows-spanned="1">
            <text:p><text:a xlink:href="#'BOLÃO 2026'.A1" xlink:type="simple">&lt;&lt;  Página Inicial</text:a></text:p>
          </table:table-cell>
          <table:covered-table-cell table:style-name="ce23"/>
          <table:covered-table-cell table:style-name="ce28"/>
          <table:table-cell table:style-name="ce346"/>
          <table:table-cell table:style-name="ce244" table:formula="of:=SUM([.H4:.H9];[.H11:.H16];[.H18:.H23];[.H25:.H30];[.P4:.P9];[.P11:.P16];[.P18:.P23];[.P25:.P30])" office:value-type="float" office:value="0" calcext:value-type="float">
            <text:p>0</text:p>
          </table:table-cell>
          <table:table-cell table:style-name="ce247" office:value-type="string" calcext:value-type="string" table:number-columns-spanned="6" table:number-rows-spanned="1">
            <office:annotation draw:style-name="gr5" draw:text-style-name="P3" svg:width="79.2pt" svg:height="84.08pt" svg:x="215.43pt" svg:y="-4.54pt" draw:caption-point-x="134.31pt" draw:caption-point-y="16.04pt">
              <dc:date>2026-05-01T00:00:00</dc:date>
              <text:p text:style-name="P2">PONTOS da PRIMEIRA FASE:</text:p>
              <text:p text:style-name="P2">Bucha: 25 pontos</text:p>
              <text:p text:style-name="P2">Demais: 18,15, 12 e 5</text:p>
            </office:annotation>
            <text:p>Primeira Fase</text:p>
          </table:table-cell>
          <table:covered-table-cell table:number-columns-repeated="5"/>
          <table:table-cell table:style-name="ce346" table:number-columns-repeated="2"/>
          <table:table-cell table:style-name="ce340"/>
          <table:table-cell table:style-name="ce361" table:number-columns-repeated="2"/>
          <table:table-cell table:style-name="ce382"/>
          <table:table-cell table:style-name="ce386"/>
          <table:table-cell table:style-name="ce284" office:value-type="string" calcext:value-type="string" table:number-columns-spanned="5" table:number-rows-spanned="1">
            <office:annotation draw:style-name="gr6" draw:text-style-name="P3" svg:width="176.4pt" svg:height="95.27pt" svg:x="566.93pt" svg:y="1.11pt" draw:caption-point-x="164.86pt" draw:caption-point-y="10.4pt">
              <dc:date>2026-05-01T00:00:00</dc:date>
              <text:p text:style-name="P2">PONTOS da FASE 16 AVOS DE FINAL</text:p>
              <text:p text:style-name="P2">&gt;&gt; Aposta para 90 minutos + eventual prorrogação!</text:p>
              <text:p text:style-name="P2"/>
              <text:p text:style-name="P2">Bucha: 50 pontos.</text:p>
              <text:p text:style-name="P2">Demais: 35, 30, 25, 10</text:p>
              <text:p text:style-name="P2">Pênaltis: 25 pontos.</text:p>
            </office:annotation>
            <text:p>Dezesseis Avos</text:p>
          </table:table-cell>
          <table:covered-table-cell table:number-columns-repeated="4"/>
          <table:table-cell table:style-name="ce271"/>
          <table:table-cell table:style-name="ce271" office:value-type="string" calcext:value-type="string">
            <text:p>PTS</text:p>
          </table:table-cell>
          <table:table-cell table:style-name="ce332" office:value-type="string" calcext:value-type="string">
            <office:annotation draw:style-name="gr7" draw:text-style-name="P3" svg:width="191.76pt" svg:height="50.49pt" svg:x="859.38pt" svg:y="4.76pt" draw:caption-point-x="-11.54pt" draw:caption-point-y="6.75pt">
              <dc:date>2026-05-01T00:00:00</dc:date>
              <text:p text:style-name="P2">Os pênaltis terão pontuação EXTRA, independente da aposta feita no tempo de jogo. Ou seja: se o jogo for para os pênaltis, quem vence?</text:p>
            </office:annotation>
            <text:p>Pênaltis</text:p>
          </table:table-cell>
          <table:table-cell table:style-name="ce414" office:value-type="string" calcext:value-type="string">
            <text:p>EXTRA</text:p>
          </table:table-cell>
          <table:table-cell table:style-name="ce417"/>
          <table:table-cell table:number-columns-repeated="996"/>
        </table:table-row>
        <table:table-row table:style-name="ro12">
          <table:table-cell table:style-name="ce217"/>
          <table:table-cell table:style-name="ce307" table:number-columns-repeated="2"/>
          <table:table-cell table:style-name="ce236" office:value-type="string" calcext:value-type="string" table:number-columns-spanned="2" table:number-rows-spanned="1">
            <text:p>Grupo A</text:p>
          </table:table-cell>
          <table:covered-table-cell/>
          <table:table-cell table:style-name="ce230" table:number-columns-repeated="2"/>
          <table:table-cell table:style-name="ce253" office:value-type="string" calcext:value-type="string">
            <text:p>PONTOS</text:p>
          </table:table-cell>
          <table:table-cell table:style-name="ce253"/>
          <table:table-cell table:style-name="ce368"/>
          <table:table-cell table:style-name="ce230"/>
          <table:table-cell table:style-name="ce236" office:value-type="string" calcext:value-type="string" table:number-columns-spanned="2" table:number-rows-spanned="1">
            <text:p>Grupo B</text:p>
          </table:table-cell>
          <table:covered-table-cell/>
          <table:table-cell table:style-name="ce307"/>
          <table:table-cell table:style-name="ce271"/>
          <table:table-cell table:style-name="ce271" office:value-type="string" calcext:value-type="string">
            <text:p>PONTOS</text:p>
          </table:table-cell>
          <table:table-cell table:style-name="ce383"/>
          <table:table-cell table:style-name="ce387" office:value-type="float" office:value="1" calcext:value-type="float">
            <text:p>1</text:p>
          </table:table-cell>
          <table:table-cell table:style-name="ce392" table:formula="of:=[$'Resultados Oficiais'.T3]" office:value-type="date" office:date-value="1899-12-30" calcext:value-type="date">
            <text:p>30-12</text:p>
          </table:table-cell>
          <table:table-cell table:style-name="ce397" table:formula="of:=[$'Resultados Oficiais'.U3]" office:value-type="string" office:string-value="1º do Grupo E" calcext:value-type="string">
            <text:p>1º do Grupo E</text:p>
          </table:table-cell>
          <table:table-cell table:style-name="ce243" table:number-columns-repeated="2"/>
          <table:table-cell table:style-name="ce405" table:formula="of:=[$'Resultados Oficiais'.X3]" office:value-type="string" office:string-value="3º ABCDF" calcext:value-type="string">
            <text:p>3º ABCDF</text:p>
          </table:table-cell>
          <table:table-cell table:style-name="ce408" table:formula="of:=[$'Resultados Oficiais'.Y3]" office:value-type="date" office:date-value="1899-12-30" calcext:value-type="date">
            <text:p>30-12</text:p>
          </table:table-cell>
          <table:table-cell table:style-name="ce357"/>
          <table:table-cell table:style-name="ce333" table:content-validation-name="val6"/>
          <table:table-cell table:style-name="ce357"/>
          <table:table-cell table:style-name="ce305"/>
          <table:table-cell table:number-columns-repeated="996"/>
        </table:table-row>
        <table:table-row table:style-name="ro12">
          <table:table-cell table:style-name="ce218" table:formula="of:=IF(COUNTBLANK([$'Resultados Oficiais'.M4:.N4])&gt;0;&quot;&quot;;IF(COUNTBLANK([.L4:.M4])&gt;0;&quot;&quot;; IF(AND([.L4]=[$'Resultados Oficiais'.M4];[$'Resultados Oficiais'.N4]=[.M4]);30;IF([.L4]-[.M4]=[$'Resultados Oficiais'.M4]-[$'Resultados Oficiais'.N4];21;IF(OR(AND([.L4]-[.M4]&gt;0;[$'Resultados Oficiais'.M4]-[$'Resultados Oficiais'.N4]&gt;0);AND([.L4]-[.M4]&lt;0;[$'Resultados Oficiais'.M4]-[$'Resultados Oficiais'.N4]&lt;0));IF(OR([.L4]=[$'Resultados Oficiais'.M4];[$'Resultados Oficiais'.N4]=[.M4]);18;15);IF(OR([.L4]=[$'Resultados Oficiais'.M4];[$'Resultados Oficiais'.N4]=[.M4]);6;0))))))">
            <text:p/>
          </table:table-cell>
          <table:table-cell table:style-name="ce337"/>
          <table:table-cell table:style-name="ce342" table:formula="of:=[$'Resultados Oficiais'.D4]" office:value-type="string" office:string-value="México" calcext:value-type="string">
            <text:p>México</text:p>
          </table:table-cell>
          <table:table-cell table:style-name="ce243" table:number-columns-repeated="2"/>
          <table:table-cell table:style-name="ce348" table:formula="of:=[$'Resultados Oficiais'.G4]" office:value-type="string" office:string-value="África S." calcext:value-type="string">
            <text:p>África S.</text:p>
            <draw:frame table:end-cell-address="'Cartão de Apostas'.G7" table:end-x="12.08pt" table:end-y="4.48pt" draw:z-index="5" draw:name="image6.png" draw:style-name="gr1" draw:text-style-name="P1" svg:width="27.72pt" svg:height="20.98pt" svg:x="51pt" svg:y="5.98pt">
              <draw:image xlink:href="Pictures/100002010000029B000002D058F00F5457A07490.png" xlink:type="simple" xlink:show="embed" xlink:actuate="onLoad">
                <text:p/>
              </draw:image>
            </draw:frame>
          </table:table-cell>
          <table:table-cell table:style-name="ce352" office:value-type="string" calcext:value-type="string">
            <office:annotation draw:style-name="gr7" draw:text-style-name="P3" svg:width="131.24pt" svg:height="39.29pt" svg:x="230.03pt" svg:y="25.34pt" draw:caption-point-x="-11.54pt" draw:caption-point-y="-0.31pt">
              <dc:date>2026-05-01T00:00:00</dc:date>
              <text:p text:style-name="P2">Multiplica 3X os pontos em caso de aposta e VITÓRIA da ZEBRA.</text:p>
            </office:annotation>
            <text:p>2X</text:p>
          </table:table-cell>
          <table:table-cell table:style-name="ce357" table:formula="of:=IF(COUNTBLANK([$'Resultados Oficiais'.E4:.F4])&gt;0;&quot;&quot;;IF(COUNTBLANK([.D4:.E4])&gt;0;&quot;&quot;; IF(AND([.D4]=[$'Resultados Oficiais'.E4];[$'Resultados Oficiais'.F4]=[.E4]);30;IF([.D4]-[.E4]=[$'Resultados Oficiais'.E4]-[$'Resultados Oficiais'.F4];21;IF(OR(AND([.D4]-[.E4]&gt;0;[$'Resultados Oficiais'.E4]-[$'Resultados Oficiais'.F4]&gt;0);AND([.D4]-[.E4]&lt;0;[$'Resultados Oficiais'.E4]-[$'Resultados Oficiais'.F4]&lt;0));IF(OR([.D4]=[$'Resultados Oficiais'.E4];[$'Resultados Oficiais'.F4]=[.E4]);18;15);IF(OR([.D4]=[$'Resultados Oficiais'.E4];[$'Resultados Oficiais'.F4]=[.E4]);6;0))))))">
            <text:p/>
          </table:table-cell>
          <table:table-cell table:style-name="ce362" table:formula="of:=IF([.H4]=30;&quot;BUCHA!&quot;;IF([.H4]=90;&quot;SUPER!!&quot;;IF(AND([.H4]&gt;30;[.H4]&lt;90);&quot;ZEBRA!&quot;;&quot;&quot;)))">
            <text:p/>
          </table:table-cell>
          <table:table-cell table:style-name="ce369"/>
          <table:table-cell table:style-name="ce342" table:formula="of:=[$'Resultados Oficiais'.L4]" office:value-type="string" office:string-value="Canadá" calcext:value-type="string">
            <text:p>Canadá</text:p>
          </table:table-cell>
          <table:table-cell table:style-name="ce239" table:number-columns-repeated="2"/>
          <table:table-cell table:style-name="ce349" table:formula="of:=[$'Resultados Oficiais'.O4]" office:value-type="string" office:string-value="Bósnia" calcext:value-type="string">
            <text:p>Bósnia</text:p>
          </table:table-cell>
          <table:table-cell table:style-name="ce356"/>
          <table:table-cell table:style-name="ce357" table:formula="of:=IF([.A4]=&quot;&quot;;&quot;&quot;;IF(AND([.M4]&gt;[.L4];[$'Resultados Oficiais'.N4]&gt;[$'Resultados Oficiais'.M4]);[.A4]*3;[.A4]))">
            <text:p/>
          </table:table-cell>
          <table:table-cell table:style-name="ce362" table:formula="of:=IF([.P4]=30;&quot;BUCHA!&quot;;IF([.P4]=90;&quot;SUPER!!&quot;;IF(AND([.P4]&gt;30;[.P4]&lt;90);&quot;ZEBRA!&quot;;&quot;&quot;)))">
            <text:p/>
          </table:table-cell>
          <table:table-cell table:style-name="ce387" office:value-type="float" office:value="2" calcext:value-type="float">
            <text:p>2</text:p>
          </table:table-cell>
          <table:table-cell table:style-name="ce392" table:formula="of:=[$'Resultados Oficiais'.T4]" office:value-type="date" office:date-value="1899-12-30" calcext:value-type="date">
            <text:p>30-12</text:p>
          </table:table-cell>
          <table:table-cell table:style-name="ce398" table:formula="of:=[$'Resultados Oficiais'.U4]" office:value-type="string" office:string-value="1º do Grupo I" calcext:value-type="string">
            <text:p>1º do Grupo I</text:p>
          </table:table-cell>
          <table:table-cell table:style-name="ce243" table:number-columns-repeated="2"/>
          <table:table-cell table:style-name="ce405" table:formula="of:=[$'Resultados Oficiais'.X4]" office:value-type="string" office:string-value="3º CDFGH" calcext:value-type="string">
            <text:p>3º CDFGH</text:p>
          </table:table-cell>
          <table:table-cell table:style-name="ce408" table:formula="of:=[$'Resultados Oficiais'.Y4]" office:value-type="date" office:date-value="1899-12-30" calcext:value-type="date">
            <text:p>30-12</text:p>
          </table:table-cell>
          <table:table-cell table:style-name="ce357"/>
          <table:table-cell table:style-name="ce333" table:content-validation-name="val6"/>
          <table:table-cell table:style-name="ce357"/>
          <table:table-cell table:style-name="ce305"/>
          <table:table-cell table:number-columns-repeated="996"/>
        </table:table-row>
        <table:table-row table:style-name="ro12">
          <table:table-cell table:style-name="ce218" table:formula="of:=IF(COUNTBLANK([$'Resultados Oficiais'.V5:.W5])&gt;0;&quot;&quot;;IF(COUNTBLANK([.U22:.V22])&gt;0;&quot;&quot;;IF(AND([.U22]=[$'Resultados Oficiais'.V5];[$'Resultados Oficiais'.W5]=[.V22]);100;IF([.U22]-[.V22]=[$'Resultados Oficiais'.V5]-[$'Resultados Oficiais'.W5];70;IF(OR(AND([.U22]-[.V22]&gt;0;[$'Resultados Oficiais'.V5]-[$'Resultados Oficiais'.W5]&gt;0);AND([.U22]-[.V22]&lt;0;[$'Resultados Oficiais'.V5]-[$'Resultados Oficiais'.W5]&lt;0));IF(OR([.U22]=[$'Resultados Oficiais'.V5];[$'Resultados Oficiais'.W5]=[.V22]);60;50);IF(OR([.U22]=[$'Resultados Oficiais'.V5];[$'Resultados Oficiais'.W5]=[.V22]);20;0))))))">
            <text:p/>
          </table:table-cell>
          <table:table-cell table:style-name="ce337"/>
          <table:table-cell table:style-name="ce342" table:formula="of:=[$'Resultados Oficiais'.D5]" office:value-type="string" office:string-value="Coréia do Sul" calcext:value-type="string">
            <text:p>Coréia do Sul</text:p>
          </table:table-cell>
          <table:table-cell table:style-name="ce243" table:number-columns-repeated="2"/>
          <table:table-cell table:style-name="ce349" table:formula="of:=[$'Resultados Oficiais'.G5]" office:value-type="string" office:string-value="República Tcheca" calcext:value-type="string">
            <text:p>República Tcheca</text:p>
          </table:table-cell>
          <table:table-cell table:style-name="ce353"/>
          <table:table-cell table:style-name="ce357" table:formula="of:=IF(COUNTBLANK([$'Resultados Oficiais'.E5:.F5])&gt;0;&quot;&quot;;IF(COUNTBLANK([.D5:.E5])&gt;0;&quot;&quot;; IF(AND([.D5]=[$'Resultados Oficiais'.E5];[$'Resultados Oficiais'.F5]=[.E5]);30;IF([.D5]-[.E5]=[$'Resultados Oficiais'.E5]-[$'Resultados Oficiais'.F5];21;IF(OR(AND([.D5]-[.E5]&gt;0;[$'Resultados Oficiais'.E5]-[$'Resultados Oficiais'.F5]&gt;0);AND([.D5]-[.E5]&lt;0;[$'Resultados Oficiais'.E5]-[$'Resultados Oficiais'.F5]&lt;0));IF(OR([.D5]=[$'Resultados Oficiais'.E5];[$'Resultados Oficiais'.F5]=[.E5]);18;15);IF(OR([.D5]=[$'Resultados Oficiais'.E5];[$'Resultados Oficiais'.F5]=[.E5]);6;0))))))">
            <text:p/>
          </table:table-cell>
          <table:table-cell table:style-name="ce362" table:formula="of:=IF([.H5]=30;&quot;BUCHA!&quot;;IF([.H5]=90;&quot;SUPER!!&quot;;IF(AND([.H5]&gt;30;[.H5]&lt;90);&quot;ZEBRA!&quot;;&quot;&quot;)))">
            <text:p/>
          </table:table-cell>
          <table:table-cell table:style-name="ce370" office:value-type="string" calcext:value-type="string">
            <office:annotation draw:style-name="gr7" draw:text-style-name="P3" svg:width="176.4pt" svg:height="28.09pt" svg:x="294.63pt" svg:y="38.47pt" draw:caption-point-x="-11.54pt" draw:caption-point-y="-5.95pt">
              <dc:date>2026-05-01T00:00:00</dc:date>
              <text:p text:style-name="P2">Multiplica 2X os pontos em caso de aposta e VITÓRIA da ZEBRA.</text:p>
            </office:annotation>
            <text:p>3X</text:p>
          </table:table-cell>
          <table:table-cell table:style-name="ce376" table:formula="of:=[$'Resultados Oficiais'.L5]" office:value-type="string" office:string-value="Qatar" calcext:value-type="string">
            <text:p>Qatar</text:p>
            <draw:frame table:end-cell-address="'Cartão de Apostas'.K8" table:end-x="31.46pt" table:end-y="3.74pt" draw:z-index="4" draw:name="image6.png" draw:style-name="gr1" draw:text-style-name="P1" svg:width="27.72pt" svg:height="20.98pt" svg:x="3.74pt" svg:y="5.27pt">
              <draw:image xlink:href="Pictures/100002010000029B000002D058F00F5457A07490.png" xlink:type="simple" xlink:show="embed" xlink:actuate="onLoad">
                <text:p/>
              </draw:image>
            </draw:frame>
          </table:table-cell>
          <table:table-cell table:style-name="ce239" table:number-columns-repeated="2"/>
          <table:table-cell table:style-name="ce349" table:formula="of:=[$'Resultados Oficiais'.O5]" office:value-type="string" office:string-value="Suiça" calcext:value-type="string">
            <text:p>Suiça</text:p>
          </table:table-cell>
          <table:table-cell table:style-name="ce356"/>
          <table:table-cell table:style-name="ce357" table:formula="of:=IF(COUNTBLANK([$'Resultados Oficiais'.M5:.N5])&gt;0;&quot;&quot;;IF(COUNTBLANK([.L5:.M5])&gt;0;&quot;&quot;; IF(AND([.L5]=[$'Resultados Oficiais'.M5];[$'Resultados Oficiais'.N5]=[.M5]);30;IF([.L5]-[.M5]=[$'Resultados Oficiais'.M5]-[$'Resultados Oficiais'.N5];21;IF(OR(AND([.L5]-[.M5]&gt;0;[$'Resultados Oficiais'.M5]-[$'Resultados Oficiais'.N5]&gt;0);AND([.L5]-[.M5]&lt;0;[$'Resultados Oficiais'.M5]-[$'Resultados Oficiais'.N5]&lt;0));IF(OR([.L5]=[$'Resultados Oficiais'.M5];[$'Resultados Oficiais'.N5]=[.M5]);18;15);IF(OR([.L5]=[$'Resultados Oficiais'.M5];[$'Resultados Oficiais'.N5]=[.M5]);6;0))))))">
            <text:p/>
          </table:table-cell>
          <table:table-cell table:style-name="ce362" table:formula="of:=IF([.P5]=30;&quot;BUCHA!&quot;;IF([.P5]=90;&quot;SUPER!!&quot;;IF(AND([.P5]&gt;30;[.P5]&lt;90);&quot;ZEBRA!&quot;;&quot;&quot;)))">
            <text:p/>
          </table:table-cell>
          <table:table-cell table:style-name="ce387" office:value-type="float" office:value="3" calcext:value-type="float">
            <text:p>3</text:p>
          </table:table-cell>
          <table:table-cell table:style-name="ce392" table:formula="of:=[$'Resultados Oficiais'.T5]" office:value-type="date" office:date-value="1899-12-30" calcext:value-type="date">
            <text:p>30-12</text:p>
          </table:table-cell>
          <table:table-cell table:style-name="ce398" table:formula="of:=[$'Resultados Oficiais'.U5]" office:value-type="string" office:string-value="2º do Grupo A" calcext:value-type="string">
            <text:p>2º do Grupo A</text:p>
          </table:table-cell>
          <table:table-cell table:style-name="ce243" table:number-columns-repeated="2"/>
          <table:table-cell table:style-name="ce405" table:formula="of:=[$'Resultados Oficiais'.X5]" office:value-type="string" office:string-value="2º do Grupo B" calcext:value-type="string">
            <text:p>2º do Grupo B</text:p>
          </table:table-cell>
          <table:table-cell table:style-name="ce408" table:formula="of:=[$'Resultados Oficiais'.Y5]" office:value-type="date" office:date-value="1899-12-30" calcext:value-type="date">
            <text:p>30-12</text:p>
          </table:table-cell>
          <table:table-cell table:style-name="ce357"/>
          <table:table-cell table:style-name="ce333" table:content-validation-name="val6"/>
          <table:table-cell table:style-name="ce357"/>
          <table:table-cell table:style-name="ce305"/>
          <table:table-cell table:number-columns-repeated="996"/>
        </table:table-row>
        <table:table-row table:style-name="ro12">
          <table:table-cell table:style-name="ce218"/>
          <table:table-cell table:style-name="ce337"/>
          <table:table-cell table:style-name="ce342" table:formula="of:=[$'Resultados Oficiais'.D6]" office:value-type="string" office:string-value="República Tcheca" calcext:value-type="string">
            <text:p>República Tcheca</text:p>
          </table:table-cell>
          <table:table-cell table:style-name="ce243" table:number-columns-repeated="2"/>
          <table:table-cell table:style-name="ce349" table:formula="of:=[$'Resultados Oficiais'.G6]" office:value-type="string" office:string-value="África do Sul" calcext:value-type="string">
            <text:p>África do Sul</text:p>
          </table:table-cell>
          <table:table-cell table:style-name="ce353"/>
          <table:table-cell table:style-name="ce357" table:formula="of:=IF(COUNTBLANK([$'Resultados Oficiais'.E6:.F6])&gt;0;&quot;&quot;;IF(COUNTBLANK([.D6:.E6])&gt;0;&quot;&quot;; IF(AND([.D6]=[$'Resultados Oficiais'.E6];[$'Resultados Oficiais'.F6]=[.E6]);30;IF([.D6]-[.E6]=[$'Resultados Oficiais'.E6]-[$'Resultados Oficiais'.F6];21;IF(OR(AND([.D6]-[.E6]&gt;0;[$'Resultados Oficiais'.E6]-[$'Resultados Oficiais'.F6]&gt;0);AND([.D6]-[.E6]&lt;0;[$'Resultados Oficiais'.E6]-[$'Resultados Oficiais'.F6]&lt;0));IF(OR([.D6]=[$'Resultados Oficiais'.E6];[$'Resultados Oficiais'.F6]=[.E6]);18;15);IF(OR([.D6]=[$'Resultados Oficiais'.E6];[$'Resultados Oficiais'.F6]=[.E6]);6;0))))))">
            <text:p/>
          </table:table-cell>
          <table:table-cell table:style-name="ce362" table:formula="of:=IF([.H6]=30;&quot;BUCHA!&quot;;IF([.H6]=90;&quot;SUPER!!&quot;;IF(AND([.H6]&gt;30;[.H6]&lt;90);&quot;ZEBRA!&quot;;&quot;&quot;)))">
            <text:p/>
          </table:table-cell>
          <table:table-cell table:style-name="ce369"/>
          <table:table-cell table:style-name="ce342" table:formula="of:=[$'Resultados Oficiais'.L6]" office:value-type="string" office:string-value="Suíça" calcext:value-type="string">
            <text:p>Suíça</text:p>
          </table:table-cell>
          <table:table-cell table:style-name="ce239" table:number-columns-repeated="2"/>
          <table:table-cell table:style-name="ce349" table:formula="of:=[$'Resultados Oficiais'.O6]" office:value-type="string" office:string-value="Bósnia" calcext:value-type="string">
            <text:p>Bósnia</text:p>
          </table:table-cell>
          <table:table-cell table:style-name="ce356"/>
          <table:table-cell table:style-name="ce357" table:formula="of:=IF(COUNTBLANK([$'Resultados Oficiais'.M6:.N6])&gt;0;&quot;&quot;;IF(COUNTBLANK([.L6:.M6])&gt;0;&quot;&quot;; IF(AND([.L6]=[$'Resultados Oficiais'.M6];[$'Resultados Oficiais'.N6]=[.M6]);30;IF([.L6]-[.M6]=[$'Resultados Oficiais'.M6]-[$'Resultados Oficiais'.N6];21;IF(OR(AND([.L6]-[.M6]&gt;0;[$'Resultados Oficiais'.M6]-[$'Resultados Oficiais'.N6]&gt;0);AND([.L6]-[.M6]&lt;0;[$'Resultados Oficiais'.M6]-[$'Resultados Oficiais'.N6]&lt;0));IF(OR([.L6]=[$'Resultados Oficiais'.M6];[$'Resultados Oficiais'.N6]=[.M6]);18;15);IF(OR([.L6]=[$'Resultados Oficiais'.M6];[$'Resultados Oficiais'.N6]=[.M6]);6;0))))))">
            <text:p/>
          </table:table-cell>
          <table:table-cell table:style-name="ce362" table:formula="of:=IF([.P6]=30;&quot;BUCHA!&quot;;IF([.P6]=90;&quot;SUPER!!&quot;;IF(AND([.P6]&gt;30;[.P6]&lt;90);&quot;ZEBRA!&quot;;&quot;&quot;)))">
            <text:p/>
          </table:table-cell>
          <table:table-cell table:style-name="ce387" office:value-type="float" office:value="4" calcext:value-type="float">
            <text:p>4</text:p>
          </table:table-cell>
          <table:table-cell table:style-name="ce392" table:formula="of:=[$'Resultados Oficiais'.T6]" office:value-type="date" office:date-value="1899-12-30" calcext:value-type="date">
            <text:p>30-12</text:p>
          </table:table-cell>
          <table:table-cell table:style-name="ce398" table:formula="of:=[$'Resultados Oficiais'.U6]" office:value-type="string" office:string-value="1º do Grupo F" calcext:value-type="string">
            <text:p>1º do Grupo F</text:p>
          </table:table-cell>
          <table:table-cell table:style-name="ce243" table:number-columns-repeated="2"/>
          <table:table-cell table:style-name="ce405" table:formula="of:=[$'Resultados Oficiais'.X6]" office:value-type="string" office:string-value="2º do Grupo C" calcext:value-type="string">
            <text:p>2º do Grupo C</text:p>
          </table:table-cell>
          <table:table-cell table:style-name="ce408" table:formula="of:=[$'Resultados Oficiais'.Y6]" office:value-type="date" office:date-value="1899-12-30" calcext:value-type="date">
            <text:p>30-12</text:p>
          </table:table-cell>
          <table:table-cell table:style-name="ce357"/>
          <table:table-cell table:style-name="ce333" table:content-validation-name="val6"/>
          <table:table-cell table:style-name="ce357"/>
          <table:table-cell table:style-name="ce305"/>
          <table:table-cell table:number-columns-repeated="996"/>
        </table:table-row>
        <table:table-row table:style-name="ro12">
          <table:table-cell table:style-name="ce218" table:formula="of:=IF(COUNTBLANK([$'Resultados Oficiais'.V7:.W7])&gt;0;&quot;&quot;;IF(COUNTBLANK([.U24:.V24])&gt;0;&quot;&quot;;IF(AND([.U24]=[$'Resultados Oficiais'.V7];[$'Resultados Oficiais'.W7]=[.V24]);100;IF([.U24]-[.V24]=[$'Resultados Oficiais'.V7]-[$'Resultados Oficiais'.W7];70;IF(OR(AND([.U24]-[.V24]&gt;0;[$'Resultados Oficiais'.V7]-[$'Resultados Oficiais'.W7]&gt;0);AND([.U24]-[.V24]&lt;0;[$'Resultados Oficiais'.V7]-[$'Resultados Oficiais'.W7]&lt;0));IF(OR([.U24]=[$'Resultados Oficiais'.V7];[$'Resultados Oficiais'.W7]=[.V24]);60;50);IF(OR([.U24]=[$'Resultados Oficiais'.V7];[$'Resultados Oficiais'.W7]=[.V24]);20;0))))))">
            <text:p/>
          </table:table-cell>
          <table:table-cell table:style-name="ce337"/>
          <table:table-cell table:style-name="ce342" table:formula="of:=[$'Resultados Oficiais'.D7]" office:value-type="string" office:string-value="México" calcext:value-type="string">
            <text:p>México</text:p>
          </table:table-cell>
          <table:table-cell table:style-name="ce243" table:number-columns-repeated="2"/>
          <table:table-cell table:style-name="ce349" table:formula="of:=[$'Resultados Oficiais'.G7]" office:value-type="string" office:string-value="Coréia do Sul" calcext:value-type="string">
            <text:p>Coréia do Sul</text:p>
          </table:table-cell>
          <table:table-cell table:style-name="ce353"/>
          <table:table-cell table:style-name="ce357" table:formula="of:=IF(COUNTBLANK([$'Resultados Oficiais'.E7:.F7])&gt;0;&quot;&quot;;IF(COUNTBLANK([.D7:.E7])&gt;0;&quot;&quot;; IF(AND([.D7]=[$'Resultados Oficiais'.E7];[$'Resultados Oficiais'.F7]=[.E7]);30;IF([.D7]-[.E7]=[$'Resultados Oficiais'.E7]-[$'Resultados Oficiais'.F7];21;IF(OR(AND([.D7]-[.E7]&gt;0;[$'Resultados Oficiais'.E7]-[$'Resultados Oficiais'.F7]&gt;0);AND([.D7]-[.E7]&lt;0;[$'Resultados Oficiais'.E7]-[$'Resultados Oficiais'.F7]&lt;0));IF(OR([.D7]=[$'Resultados Oficiais'.E7];[$'Resultados Oficiais'.F7]=[.E7]);18;15);IF(OR([.D7]=[$'Resultados Oficiais'.E7];[$'Resultados Oficiais'.F7]=[.E7]);6;0))))))">
            <text:p/>
          </table:table-cell>
          <table:table-cell table:style-name="ce362" table:formula="of:=IF([.H7]=30;&quot;BUCHA!&quot;;IF([.H7]=90;&quot;SUPER!!&quot;;IF(AND([.H7]&gt;30;[.H7]&lt;90);&quot;ZEBRA!&quot;;&quot;&quot;)))">
            <text:p/>
          </table:table-cell>
          <table:table-cell table:style-name="ce369"/>
          <table:table-cell table:style-name="ce342" table:formula="of:=[$'Resultados Oficiais'.L7]" office:value-type="string" office:string-value="Canadá" calcext:value-type="string">
            <text:p>Canadá</text:p>
          </table:table-cell>
          <table:table-cell table:style-name="ce239" table:number-columns-repeated="2"/>
          <table:table-cell table:style-name="ce349" table:formula="of:=[$'Resultados Oficiais'.O7]" office:value-type="string" office:string-value="Qatar" calcext:value-type="string">
            <text:p>Qatar</text:p>
          </table:table-cell>
          <table:table-cell table:style-name="ce356"/>
          <table:table-cell table:style-name="ce357" table:formula="of:=IF(COUNTBLANK([$'Resultados Oficiais'.M7:.N7])&gt;0;&quot;&quot;;IF(COUNTBLANK([.L7:.M7])&gt;0;&quot;&quot;; IF(AND([.L7]=[$'Resultados Oficiais'.M7];[$'Resultados Oficiais'.N7]=[.M7]);30;IF([.L7]-[.M7]=[$'Resultados Oficiais'.M7]-[$'Resultados Oficiais'.N7];21;IF(OR(AND([.L7]-[.M7]&gt;0;[$'Resultados Oficiais'.M7]-[$'Resultados Oficiais'.N7]&gt;0);AND([.L7]-[.M7]&lt;0;[$'Resultados Oficiais'.M7]-[$'Resultados Oficiais'.N7]&lt;0));IF(OR([.L7]=[$'Resultados Oficiais'.M7];[$'Resultados Oficiais'.N7]=[.M7]);18;15);IF(OR([.L7]=[$'Resultados Oficiais'.M7];[$'Resultados Oficiais'.N7]=[.M7]);6;0))))))">
            <text:p/>
          </table:table-cell>
          <table:table-cell table:style-name="ce362" table:formula="of:=IF([.P7]=30;&quot;BUCHA!&quot;;IF([.P7]=90;&quot;SUPER!!&quot;;IF(AND([.P7]&gt;30;[.P7]&lt;90);&quot;ZEBRA!&quot;;&quot;&quot;)))">
            <text:p/>
          </table:table-cell>
          <table:table-cell table:style-name="ce387" office:value-type="float" office:value="5" calcext:value-type="float">
            <text:p>5</text:p>
          </table:table-cell>
          <table:table-cell table:style-name="ce392" table:formula="of:=[$'Resultados Oficiais'.T7]" office:value-type="date" office:date-value="1899-12-30" calcext:value-type="date">
            <text:p>30-12</text:p>
          </table:table-cell>
          <table:table-cell table:style-name="ce398" table:formula="of:=[$'Resultados Oficiais'.U7]" office:value-type="string" office:string-value="2º do Grupo K" calcext:value-type="string">
            <text:p>2º do Grupo K</text:p>
          </table:table-cell>
          <table:table-cell table:style-name="ce243" table:number-columns-repeated="2"/>
          <table:table-cell table:style-name="ce405" table:formula="of:=[$'Resultados Oficiais'.X7]" office:value-type="string" office:string-value="2º do Grupo L" calcext:value-type="string">
            <text:p>2º do Grupo L</text:p>
          </table:table-cell>
          <table:table-cell table:style-name="ce408" table:formula="of:=[$'Resultados Oficiais'.Y7]" office:value-type="date" office:date-value="1899-12-30" calcext:value-type="date">
            <text:p>30-12</text:p>
          </table:table-cell>
          <table:table-cell table:style-name="ce357"/>
          <table:table-cell table:style-name="ce333" table:content-validation-name="val6"/>
          <table:table-cell table:style-name="ce357"/>
          <table:table-cell table:style-name="ce305"/>
          <table:table-cell table:number-columns-repeated="996"/>
        </table:table-row>
        <table:table-row table:style-name="ro12">
          <table:table-cell table:style-name="ce218" table:formula="of:=IF(COUNTBLANK([$'Resultados Oficiais'.E8:.F8])&gt;0;&quot;&quot;;IF(COUNTBLANK([.D8:.E8])&gt;0;&quot;&quot;; IF(AND([.D8]=[$'Resultados Oficiais'.E8];[$'Resultados Oficiais'.F8]=[.E8]);30;IF([.D8]-[.E8]=[$'Resultados Oficiais'.E8]-[$'Resultados Oficiais'.F8];21;IF(OR(AND([.D8]-[.E8]&gt;0;[$'Resultados Oficiais'.E8]-[$'Resultados Oficiais'.F8]&gt;0);AND([.D8]-[.E8]&lt;0;[$'Resultados Oficiais'.E8]-[$'Resultados Oficiais'.F8]&lt;0));IF(OR([.D8]=[$'Resultados Oficiais'.E8];[$'Resultados Oficiais'.F8]=[.E8]);18;15);IF(OR([.D8]=[$'Resultados Oficiais'.E8];[$'Resultados Oficiais'.F8]=[.E8]);6;0))))))">
            <text:p/>
          </table:table-cell>
          <table:table-cell table:style-name="ce337"/>
          <table:table-cell table:style-name="ce342" table:formula="of:=[$'Resultados Oficiais'.D8]" office:value-type="string" office:string-value="República Tcheca" calcext:value-type="string">
            <text:p>República Tcheca</text:p>
          </table:table-cell>
          <table:table-cell table:style-name="ce243" table:number-columns-repeated="2"/>
          <table:table-cell table:style-name="ce349" table:formula="of:=[$'Resultados Oficiais'.G8]" office:value-type="string" office:string-value="México" calcext:value-type="string">
            <text:p>México</text:p>
          </table:table-cell>
          <table:table-cell table:style-name="ce353"/>
          <table:table-cell table:style-name="ce357" table:formula="of:=IF([.A8]=&quot;&quot;;&quot;&quot;;IF(AND([.D8]&gt;[.E8];[$'Resultados Oficiais'.E8]&gt;[$'Resultados Oficiais'.F8]);[.A8]*3;[.A8]))">
            <text:p/>
          </table:table-cell>
          <table:table-cell table:style-name="ce362" table:formula="of:=IF([.H8]=30;&quot;BUCHA!&quot;;IF([.H8]=90;&quot;SUPER!!&quot;;IF(AND([.H8]&gt;30;[.H8]&lt;90);&quot;ZEBRA!&quot;;&quot;&quot;)))">
            <text:p/>
          </table:table-cell>
          <table:table-cell table:style-name="ce369"/>
          <table:table-cell table:style-name="ce342" table:formula="of:=[$'Resultados Oficiais'.L8]" office:value-type="string" office:string-value="Qatar" calcext:value-type="string">
            <text:p>Qatar</text:p>
          </table:table-cell>
          <table:table-cell table:style-name="ce239" table:number-columns-repeated="2"/>
          <table:table-cell table:style-name="ce349" table:formula="of:=[$'Resultados Oficiais'.O8]" office:value-type="string" office:string-value="Bósnia" calcext:value-type="string">
            <text:p>Bósnia</text:p>
          </table:table-cell>
          <table:table-cell table:style-name="ce356"/>
          <table:table-cell table:style-name="ce357" table:formula="of:=IF(COUNTBLANK([$'Resultados Oficiais'.M8:.N8])&gt;0;&quot;&quot;;IF(COUNTBLANK([.L8:.M8])&gt;0;&quot;&quot;; IF(AND([.L8]=[$'Resultados Oficiais'.M8];[$'Resultados Oficiais'.N8]=[.M8]);30;IF([.L8]-[.M8]=[$'Resultados Oficiais'.M8]-[$'Resultados Oficiais'.N8];21;IF(OR(AND([.L8]-[.M8]&gt;0;[$'Resultados Oficiais'.M8]-[$'Resultados Oficiais'.N8]&gt;0);AND([.L8]-[.M8]&lt;0;[$'Resultados Oficiais'.M8]-[$'Resultados Oficiais'.N8]&lt;0));IF(OR([.L8]=[$'Resultados Oficiais'.M8];[$'Resultados Oficiais'.N8]=[.M8]);18;15);IF(OR([.L8]=[$'Resultados Oficiais'.M8];[$'Resultados Oficiais'.N8]=[.M8]);6;0))))))">
            <text:p/>
          </table:table-cell>
          <table:table-cell table:style-name="ce362" table:formula="of:=IF([.P8]=30;&quot;BUCHA!&quot;;IF([.P8]=90;&quot;SUPER!!&quot;;IF(AND([.P8]&gt;30;[.P8]&lt;90);&quot;ZEBRA!&quot;;&quot;&quot;)))">
            <text:p/>
          </table:table-cell>
          <table:table-cell table:style-name="ce387" office:value-type="float" office:value="6" calcext:value-type="float">
            <text:p>6</text:p>
          </table:table-cell>
          <table:table-cell table:style-name="ce392" table:formula="of:=[$'Resultados Oficiais'.T8]" office:value-type="date" office:date-value="1899-12-30" calcext:value-type="date">
            <text:p>30-12</text:p>
          </table:table-cell>
          <table:table-cell table:style-name="ce398" table:formula="of:=[$'Resultados Oficiais'.U8]" office:value-type="string" office:string-value="1º do Grupo H" calcext:value-type="string">
            <text:p>1º do Grupo H</text:p>
          </table:table-cell>
          <table:table-cell table:style-name="ce243" table:number-columns-repeated="2"/>
          <table:table-cell table:style-name="ce405" table:formula="of:=[$'Resultados Oficiais'.X8]" office:value-type="string" office:string-value="2º do Grupo J" calcext:value-type="string">
            <text:p>2º do Grupo J</text:p>
          </table:table-cell>
          <table:table-cell table:style-name="ce408" table:formula="of:=[$'Resultados Oficiais'.Y8]" office:value-type="date" office:date-value="1899-12-30" calcext:value-type="date">
            <text:p>30-12</text:p>
          </table:table-cell>
          <table:table-cell table:style-name="ce357"/>
          <table:table-cell table:style-name="ce333" table:content-validation-name="val6"/>
          <table:table-cell table:style-name="ce357"/>
          <table:table-cell table:style-name="ce305"/>
          <table:table-cell table:number-columns-repeated="996"/>
        </table:table-row>
        <table:table-row table:style-name="ro12">
          <table:table-cell table:style-name="ce218" table:formula="of:=IF(COUNTBLANK([$'Resultados Oficiais'.V9:.W9])&gt;0;&quot;&quot;;IF(COUNTBLANK([.U26:.V26])&gt;0;&quot;&quot;;IF(AND([.U26]=[$'Resultados Oficiais'.V9];[$'Resultados Oficiais'.W9]=[.V26]);100;IF([.U26]-[.V26]=[$'Resultados Oficiais'.V9]-[$'Resultados Oficiais'.W9];70;IF(OR(AND([.U26]-[.V26]&gt;0;[$'Resultados Oficiais'.V9]-[$'Resultados Oficiais'.W9]&gt;0);AND([.U26]-[.V26]&lt;0;[$'Resultados Oficiais'.V9]-[$'Resultados Oficiais'.W9]&lt;0));IF(OR([.U26]=[$'Resultados Oficiais'.V9];[$'Resultados Oficiais'.W9]=[.V26]);60;50);IF(OR([.U26]=[$'Resultados Oficiais'.V9];[$'Resultados Oficiais'.W9]=[.V26]);20;0))))))">
            <text:p/>
          </table:table-cell>
          <table:table-cell table:style-name="ce337"/>
          <table:table-cell table:style-name="ce342" table:formula="of:=[$'Resultados Oficiais'.D9]" office:value-type="string" office:string-value="África do Sul" calcext:value-type="string">
            <text:p>África do Sul</text:p>
          </table:table-cell>
          <table:table-cell table:style-name="ce243" table:number-columns-repeated="2"/>
          <table:table-cell table:style-name="ce349" table:formula="of:=[$'Resultados Oficiais'.G9]" office:value-type="string" office:string-value="Coréia do Sul" calcext:value-type="string">
            <text:p>Coréia do Sul</text:p>
          </table:table-cell>
          <table:table-cell table:style-name="ce353"/>
          <table:table-cell table:style-name="ce357" table:formula="of:=IF(COUNTBLANK([$'Resultados Oficiais'.E9:.F9])&gt;0;&quot;&quot;;IF(COUNTBLANK([.D9:.E9])&gt;0;&quot;&quot;; IF(AND([.D9]=[$'Resultados Oficiais'.E9];[$'Resultados Oficiais'.F9]=[.E9]);30;IF([.D9]-[.E9]=[$'Resultados Oficiais'.E9]-[$'Resultados Oficiais'.F9];21;IF(OR(AND([.D9]-[.E9]&gt;0;[$'Resultados Oficiais'.E9]-[$'Resultados Oficiais'.F9]&gt;0);AND([.D9]-[.E9]&lt;0;[$'Resultados Oficiais'.E9]-[$'Resultados Oficiais'.F9]&lt;0));IF(OR([.D9]=[$'Resultados Oficiais'.E9];[$'Resultados Oficiais'.F9]=[.E9]);18;15);IF(OR([.D9]=[$'Resultados Oficiais'.E9];[$'Resultados Oficiais'.F9]=[.E9]);6;0))))))">
            <text:p/>
          </table:table-cell>
          <table:table-cell table:style-name="ce362" table:formula="of:=IF([.H9]=30;&quot;BUCHA!&quot;;IF([.H9]=90;&quot;SUPER!!&quot;;IF(AND([.H9]&gt;30;[.H9]&lt;90);&quot;ZEBRA!&quot;;&quot;&quot;)))">
            <text:p/>
          </table:table-cell>
          <table:table-cell table:style-name="ce369"/>
          <table:table-cell table:style-name="ce342" table:formula="of:=[$'Resultados Oficiais'.L9]" office:value-type="string" office:string-value="Canadá" calcext:value-type="string">
            <text:p>Canadá</text:p>
          </table:table-cell>
          <table:table-cell table:style-name="ce239" table:number-columns-repeated="2"/>
          <table:table-cell table:style-name="ce349" table:formula="of:=[$'Resultados Oficiais'.O9]" office:value-type="string" office:string-value="Suiça" calcext:value-type="string">
            <text:p>Suiça</text:p>
          </table:table-cell>
          <table:table-cell table:style-name="ce356"/>
          <table:table-cell table:style-name="ce357" table:formula="of:=IF(COUNTBLANK([$'Resultados Oficiais'.M9:.N9])&gt;0;&quot;&quot;;IF(COUNTBLANK([.L9:.M9])&gt;0;&quot;&quot;; IF(AND([.L9]=[$'Resultados Oficiais'.M9];[$'Resultados Oficiais'.N9]=[.M9]);30;IF([.L9]-[.M9]=[$'Resultados Oficiais'.M9]-[$'Resultados Oficiais'.N9];21;IF(OR(AND([.L9]-[.M9]&gt;0;[$'Resultados Oficiais'.M9]-[$'Resultados Oficiais'.N9]&gt;0);AND([.L9]-[.M9]&lt;0;[$'Resultados Oficiais'.M9]-[$'Resultados Oficiais'.N9]&lt;0));IF(OR([.L9]=[$'Resultados Oficiais'.M9];[$'Resultados Oficiais'.N9]=[.M9]);18;15);IF(OR([.L9]=[$'Resultados Oficiais'.M9];[$'Resultados Oficiais'.N9]=[.M9]);6;0))))))">
            <text:p/>
          </table:table-cell>
          <table:table-cell table:style-name="ce362" table:formula="of:=IF([.P9]=30;&quot;BUCHA!&quot;;IF([.P9]=90;&quot;SUPER!!&quot;;IF(AND([.P9]&gt;30;[.P9]&lt;90);&quot;ZEBRA!&quot;;&quot;&quot;)))">
            <text:p/>
          </table:table-cell>
          <table:table-cell table:style-name="ce387" office:value-type="float" office:value="7" calcext:value-type="float">
            <text:p>7</text:p>
          </table:table-cell>
          <table:table-cell table:style-name="ce392" table:formula="of:=[$'Resultados Oficiais'.T9]" office:value-type="date" office:date-value="1899-12-30" calcext:value-type="date">
            <text:p>30-12</text:p>
          </table:table-cell>
          <table:table-cell table:style-name="ce398" table:formula="of:=[$'Resultados Oficiais'.U9]" office:value-type="string" office:string-value="1º do Grupo D" calcext:value-type="string">
            <text:p>1º do Grupo D</text:p>
          </table:table-cell>
          <table:table-cell table:style-name="ce243" table:number-columns-repeated="2"/>
          <table:table-cell table:style-name="ce405" table:formula="of:=[$'Resultados Oficiais'.X9]" office:value-type="string" office:string-value="3º BEFIJ" calcext:value-type="string">
            <text:p>3º BEFIJ</text:p>
          </table:table-cell>
          <table:table-cell table:style-name="ce408" table:formula="of:=[$'Resultados Oficiais'.Y9]" office:value-type="date" office:date-value="1899-12-30" calcext:value-type="date">
            <text:p>30-12</text:p>
          </table:table-cell>
          <table:table-cell table:style-name="ce357"/>
          <table:table-cell table:style-name="ce333" table:content-validation-name="val6"/>
          <table:table-cell table:style-name="ce357"/>
          <table:table-cell table:style-name="ce305"/>
          <table:table-cell table:number-columns-repeated="996"/>
        </table:table-row>
        <table:table-row table:style-name="ro12">
          <table:table-cell table:style-name="ce217"/>
          <table:table-cell table:style-name="ce307" table:number-columns-repeated="2"/>
          <table:table-cell table:style-name="ce236" office:value-type="string" calcext:value-type="string" table:number-columns-spanned="2" table:number-rows-spanned="1">
            <text:p>Grupo C</text:p>
          </table:table-cell>
          <table:covered-table-cell/>
          <table:table-cell table:style-name="ce350" table:number-columns-repeated="2"/>
          <table:table-cell table:style-name="ce358"/>
          <table:table-cell table:style-name="ce363"/>
          <table:table-cell table:style-name="ce371"/>
          <table:table-cell table:style-name="ce350"/>
          <table:table-cell table:style-name="ce236" office:value-type="string" calcext:value-type="string" table:number-columns-spanned="2" table:number-rows-spanned="1">
            <text:p>Grupo D</text:p>
          </table:table-cell>
          <table:covered-table-cell/>
          <table:table-cell table:style-name="ce307"/>
          <table:table-cell table:style-name="ce271" table:number-columns-repeated="2"/>
          <table:table-cell table:style-name="ce362"/>
          <table:table-cell table:style-name="ce387" office:value-type="float" office:value="8" calcext:value-type="float">
            <text:p>8</text:p>
          </table:table-cell>
          <table:table-cell table:style-name="ce392" table:formula="of:=[$'Resultados Oficiais'.T10]" office:value-type="date" office:date-value="1899-12-30" calcext:value-type="date">
            <text:p>30-12</text:p>
          </table:table-cell>
          <table:table-cell table:style-name="ce398" table:formula="of:=[$'Resultados Oficiais'.U10]" office:value-type="string" office:string-value="1º do Grupo G" calcext:value-type="string">
            <text:p>1º do Grupo G</text:p>
          </table:table-cell>
          <table:table-cell table:style-name="ce243" table:number-columns-repeated="2"/>
          <table:table-cell table:style-name="ce405" table:formula="of:=[$'Resultados Oficiais'.X10]" office:value-type="string" office:string-value="3º AEHIJ" calcext:value-type="string">
            <text:p>3º AEHIJ</text:p>
          </table:table-cell>
          <table:table-cell table:style-name="ce408" table:formula="of:=[$'Resultados Oficiais'.Y10]" office:value-type="date" office:date-value="1899-12-30" calcext:value-type="date">
            <text:p>30-12</text:p>
          </table:table-cell>
          <table:table-cell table:style-name="ce357"/>
          <table:table-cell table:style-name="ce333" table:content-validation-name="val6"/>
          <table:table-cell table:style-name="ce357"/>
          <table:table-cell table:style-name="ce305"/>
          <table:table-cell table:number-columns-repeated="996"/>
        </table:table-row>
        <table:table-row table:style-name="ro12">
          <table:table-cell table:style-name="ce218" table:formula="of:=IF(COUNTBLANK([$'Resultados Oficiais'.E11:.F11])&gt;0;&quot;&quot;;IF(COUNTBLANK([.D11:.E11])&gt;0;&quot;&quot;; IF(AND([.D11]=[$'Resultados Oficiais'.E11];[$'Resultados Oficiais'.F11]=[.E11]);30;IF([.D11]-[.E11]=[$'Resultados Oficiais'.E11]-[$'Resultados Oficiais'.F11];21;IF(OR(AND([.D11]-[.E11]&gt;0;[$'Resultados Oficiais'.E11]-[$'Resultados Oficiais'.F11]&gt;0);AND([.D11]-[.E11]&lt;0;[$'Resultados Oficiais'.E11]-[$'Resultados Oficiais'.F11]&lt;0));IF(OR([.D11]=[$'Resultados Oficiais'.E11];[$'Resultados Oficiais'.F11]=[.E11]);18;15);IF(OR([.D11]=[$'Resultados Oficiais'.E11];[$'Resultados Oficiais'.F11]=[.E11]);6;0))))))">
            <text:p/>
          </table:table-cell>
          <table:table-cell table:style-name="ce337"/>
          <table:table-cell table:style-name="ce342" table:formula="of:=[$'Resultados Oficiais'.D11]" office:value-type="string" office:string-value="Brasil" calcext:value-type="string">
            <text:p>Brasil</text:p>
          </table:table-cell>
          <table:table-cell table:style-name="ce239" table:number-columns-repeated="2"/>
          <table:table-cell table:style-name="ce349" table:formula="of:=[$'Resultados Oficiais'.G11]" office:value-type="string" office:string-value="Marrocos" calcext:value-type="string">
            <text:p>Marrocos</text:p>
          </table:table-cell>
          <table:table-cell table:style-name="ce353"/>
          <table:table-cell table:style-name="ce357" table:formula="of:=IF([.A11]=&quot;&quot;;&quot;&quot;;IF(AND([.E11]&gt;[.D11];[$'Resultados Oficiais'.F11]&gt;[$'Resultados Oficiais'.E11]);[.A11]*3;[.A11]))">
            <text:p/>
          </table:table-cell>
          <table:table-cell table:style-name="ce362" table:formula="of:=IF([.H11]=30;&quot;BUCHA!&quot;;IF([.H11]=90;&quot;SUPER!!&quot;;IF(AND([.H11]&gt;30;[.H11]&lt;90);&quot;ZEBRA!&quot;;&quot;&quot;)))">
            <text:p/>
          </table:table-cell>
          <table:table-cell table:style-name="ce369"/>
          <table:table-cell table:style-name="ce342" table:formula="of:=[$'Resultados Oficiais'.L11]" office:value-type="string" office:string-value="Estados Unidos" calcext:value-type="string">
            <text:p>Estados Unidos</text:p>
          </table:table-cell>
          <table:table-cell table:style-name="ce239" table:number-columns-repeated="2"/>
          <table:table-cell table:style-name="ce349" table:formula="of:=[$'Resultados Oficiais'.O11]" office:value-type="string" office:string-value="Paraguai" calcext:value-type="string">
            <text:p>Paraguai</text:p>
          </table:table-cell>
          <table:table-cell table:style-name="ce356"/>
          <table:table-cell table:style-name="ce357" table:formula="of:=IF(COUNTBLANK([$'Resultados Oficiais'.M11:.N11])&gt;0;&quot;&quot;;IF(COUNTBLANK([.L11:.M11])&gt;0;&quot;&quot;; IF(AND([.L11]=[$'Resultados Oficiais'.M11];[$'Resultados Oficiais'.N11]=[.M11]);30;IF([.L11]-[.M11]=[$'Resultados Oficiais'.M11]-[$'Resultados Oficiais'.N11];21;IF(OR(AND([.L11]-[.M11]&gt;0;[$'Resultados Oficiais'.M11]-[$'Resultados Oficiais'.N11]&gt;0);AND([.L11]-[.M11]&lt;0;[$'Resultados Oficiais'.M11]-[$'Resultados Oficiais'.N11]&lt;0));IF(OR([.L11]=[$'Resultados Oficiais'.M11];[$'Resultados Oficiais'.N11]=[.M11]);18;15);IF(OR([.L11]=[$'Resultados Oficiais'.M11];[$'Resultados Oficiais'.N11]=[.M11]);6;0))))))">
            <text:p/>
          </table:table-cell>
          <table:table-cell table:style-name="ce362" table:formula="of:=IF([.P11]=30;&quot;BUCHA!&quot;;IF([.P11]=90;&quot;SUPER!!&quot;;IF(AND([.P11]&gt;30;[.P11]&lt;90);&quot;ZEBRA!&quot;;&quot;&quot;)))">
            <text:p/>
          </table:table-cell>
          <table:table-cell table:style-name="ce387" office:value-type="float" office:value="9" calcext:value-type="float">
            <text:p>9</text:p>
          </table:table-cell>
          <table:table-cell table:style-name="ce392" table:formula="of:=[$'Resultados Oficiais'.T11]" office:value-type="date" office:date-value="1899-12-30" calcext:value-type="date">
            <text:p>30-12</text:p>
          </table:table-cell>
          <table:table-cell table:style-name="ce398" table:formula="of:=[$'Resultados Oficiais'.U11]" office:value-type="string" office:string-value="1º do Grupo C" calcext:value-type="string">
            <text:p>1º do Grupo C</text:p>
          </table:table-cell>
          <table:table-cell table:style-name="ce243" table:number-columns-repeated="2"/>
          <table:table-cell table:style-name="ce405" table:formula="of:=[$'Resultados Oficiais'.X11]" office:value-type="string" office:string-value="2º do Grupo F" calcext:value-type="string">
            <text:p>2º do Grupo F</text:p>
          </table:table-cell>
          <table:table-cell table:style-name="ce408" table:formula="of:=[$'Resultados Oficiais'.Y11]" office:value-type="date" office:date-value="1899-12-30" calcext:value-type="date">
            <text:p>30-12</text:p>
          </table:table-cell>
          <table:table-cell table:style-name="ce357"/>
          <table:table-cell table:style-name="ce333" table:content-validation-name="val6"/>
          <table:table-cell table:style-name="ce357"/>
          <table:table-cell table:style-name="ce305"/>
          <table:table-cell table:number-columns-repeated="996"/>
        </table:table-row>
        <table:table-row table:style-name="ro12">
          <table:table-cell table:style-name="ce218" table:formula="of:=IF(COUNTBLANK([$'Resultados Oficiais'.M12:.N12])&gt;0;&quot;&quot;;IF(COUNTBLANK([.L12:.M12])&gt;0;&quot;&quot;; IF(AND([.L12]=[$'Resultados Oficiais'.M12];[$'Resultados Oficiais'.N12]=[.M12]);30;IF([.L12]-[.M12]=[$'Resultados Oficiais'.M12]-[$'Resultados Oficiais'.N12];21;IF(OR(AND([.L12]-[.M12]&gt;0;[$'Resultados Oficiais'.M12]-[$'Resultados Oficiais'.N12]&gt;0);AND([.L12]-[.M12]&lt;0;[$'Resultados Oficiais'.M12]-[$'Resultados Oficiais'.N12]&lt;0));IF(OR([.L12]=[$'Resultados Oficiais'.M12];[$'Resultados Oficiais'.N12]=[.M12]);18;15);IF(OR([.L12]=[$'Resultados Oficiais'.M12];[$'Resultados Oficiais'.N12]=[.M12]);6;0))))))">
            <text:p/>
          </table:table-cell>
          <table:table-cell table:style-name="ce337"/>
          <table:table-cell table:style-name="ce342" table:formula="of:=[$'Resultados Oficiais'.D12]" office:value-type="string" office:string-value="Haiti" calcext:value-type="string">
            <text:p>Haiti</text:p>
          </table:table-cell>
          <table:table-cell table:style-name="ce239" table:number-columns-repeated="2"/>
          <table:table-cell table:style-name="ce349" table:formula="of:=[$'Resultados Oficiais'.G12]" office:value-type="string" office:string-value="Escócia" calcext:value-type="string">
            <text:p>Escócia</text:p>
          </table:table-cell>
          <table:table-cell table:style-name="ce353"/>
          <table:table-cell table:style-name="ce357" table:formula="of:=IF(COUNTBLANK([$'Resultados Oficiais'.E12:.F12])&gt;0;&quot;&quot;;IF(COUNTBLANK([.D12:.E12])&gt;0;&quot;&quot;; IF(AND([.D12]=[$'Resultados Oficiais'.E12];[$'Resultados Oficiais'.F12]=[.E12]);30;IF([.D12]-[.E12]=[$'Resultados Oficiais'.E12]-[$'Resultados Oficiais'.F12];21;IF(OR(AND([.D12]-[.E12]&gt;0;[$'Resultados Oficiais'.E12]-[$'Resultados Oficiais'.F12]&gt;0);AND([.D12]-[.E12]&lt;0;[$'Resultados Oficiais'.E12]-[$'Resultados Oficiais'.F12]&lt;0));IF(OR([.D12]=[$'Resultados Oficiais'.E12];[$'Resultados Oficiais'.F12]=[.E12]);18;15);IF(OR([.D12]=[$'Resultados Oficiais'.E12];[$'Resultados Oficiais'.F12]=[.E12]);6;0))))))">
            <text:p/>
          </table:table-cell>
          <table:table-cell table:style-name="ce364" table:formula="of:=IF([.H12]=30;&quot;BUCHA!&quot;;IF([.H12]=90;&quot;SUPER!!&quot;;IF(AND([.H12]&gt;30;[.H12]&lt;90);&quot;ZEBRA!&quot;;&quot;&quot;)))">
            <text:p/>
          </table:table-cell>
          <table:table-cell table:style-name="ce261" office:value-type="string" calcext:value-type="string">
            <office:annotation draw:style-name="gr7" draw:text-style-name="P3" svg:width="176.4pt" svg:height="28.09pt" svg:x="294.63pt" svg:y="90.96pt" draw:caption-point-x="-11.54pt" draw:caption-point-y="-5.95pt">
              <dc:date>2026-05-01T00:00:00</dc:date>
              <text:p text:style-name="P2">Multiplica 2X os pontos em caso de aposta e VITÓRIA da ZEBRA.</text:p>
            </office:annotation>
            <text:p>2X</text:p>
            <draw:frame table:end-cell-address="'Cartão de Apostas'.K15" table:end-x="26.62pt" table:end-y="3.74pt" draw:z-index="8" draw:name="image6.png" draw:style-name="gr1" draw:text-style-name="P1" svg:width="27.72pt" svg:height="20.98pt" svg:x="13.49pt" svg:y="5.27pt">
              <draw:image xlink:href="Pictures/100002010000029B000002D058F00F5457A07490.png" xlink:type="simple" xlink:show="embed" xlink:actuate="onLoad">
                <text:p/>
              </draw:image>
            </draw:frame>
          </table:table-cell>
          <table:table-cell table:style-name="ce263" office:value-type="string" calcext:value-type="string">
            <text:p>Austrália</text:p>
          </table:table-cell>
          <table:table-cell table:style-name="ce239" table:number-columns-repeated="2"/>
          <table:table-cell table:style-name="ce349" table:formula="of:=[$'Resultados Oficiais'.O12]" office:value-type="string" office:string-value="Turquia" calcext:value-type="string">
            <text:p>Turquia</text:p>
          </table:table-cell>
          <table:table-cell table:style-name="ce356"/>
          <table:table-cell table:style-name="ce357" table:formula="of:=IF([.A12]=&quot;&quot;;&quot;&quot;;IF(AND([.L12]&gt;[.M12];[$'Resultados Oficiais'.M12]&gt;[$'Resultados Oficiais'.N12]);[.A12]*3;[.A12]))">
            <text:p/>
          </table:table-cell>
          <table:table-cell table:style-name="ce362" table:formula="of:=IF([.P12]=30;&quot;BUCHA!&quot;;IF([.P12]=90;&quot;SUPER!!&quot;;IF(AND([.P12]&gt;30;[.P12]&lt;90);&quot;ZEBRA!&quot;;&quot;&quot;)))">
            <text:p/>
          </table:table-cell>
          <table:table-cell table:style-name="ce387" office:value-type="float" office:value="10" calcext:value-type="float">
            <text:p>10</text:p>
          </table:table-cell>
          <table:table-cell table:style-name="ce392" table:formula="of:=[$'Resultados Oficiais'.T12]" office:value-type="date" office:date-value="1899-12-30" calcext:value-type="date">
            <text:p>30-12</text:p>
          </table:table-cell>
          <table:table-cell table:style-name="ce398" table:formula="of:=[$'Resultados Oficiais'.U12]" office:value-type="string" office:string-value="2º do Grupo E" calcext:value-type="string">
            <text:p>2º do Grupo E</text:p>
          </table:table-cell>
          <table:table-cell table:style-name="ce243" table:number-columns-repeated="2"/>
          <table:table-cell table:style-name="ce405" table:formula="of:=[$'Resultados Oficiais'.X12]" office:value-type="string" office:string-value="2º do Grupo I" calcext:value-type="string">
            <text:p>2º do Grupo I</text:p>
          </table:table-cell>
          <table:table-cell table:style-name="ce408" table:formula="of:=[$'Resultados Oficiais'.Y12]" office:value-type="date" office:date-value="1899-12-30" calcext:value-type="date">
            <text:p>30-12</text:p>
          </table:table-cell>
          <table:table-cell table:style-name="ce357"/>
          <table:table-cell table:style-name="ce333" table:content-validation-name="val6"/>
          <table:table-cell table:style-name="ce357"/>
          <table:table-cell table:style-name="ce305"/>
          <table:table-cell table:number-columns-repeated="996"/>
        </table:table-row>
        <table:table-row table:style-name="ro12">
          <table:table-cell table:style-name="ce218"/>
          <table:table-cell table:style-name="ce337"/>
          <table:table-cell table:style-name="ce342" table:formula="of:=[$'Resultados Oficiais'.D13]" office:value-type="string" office:string-value="Escócia" calcext:value-type="string">
            <text:p>Escócia</text:p>
          </table:table-cell>
          <table:table-cell table:style-name="ce239" table:number-columns-repeated="2"/>
          <table:table-cell table:style-name="ce349" table:formula="of:=[$'Resultados Oficiais'.G13]" office:value-type="string" office:string-value="Marrocos" calcext:value-type="string">
            <text:p>Marrocos</text:p>
          </table:table-cell>
          <table:table-cell table:style-name="ce353"/>
          <table:table-cell table:style-name="ce357" table:formula="of:=IF(COUNTBLANK([$'Resultados Oficiais'.E13:.F13])&gt;0;&quot;&quot;;IF(COUNTBLANK([.D13:.E13])&gt;0;&quot;&quot;; IF(AND([.D13]=[$'Resultados Oficiais'.E13];[$'Resultados Oficiais'.F13]=[.E13]);30;IF([.D13]-[.E13]=[$'Resultados Oficiais'.E13]-[$'Resultados Oficiais'.F13];21;IF(OR(AND([.D13]-[.E13]&gt;0;[$'Resultados Oficiais'.E13]-[$'Resultados Oficiais'.F13]&gt;0);AND([.D13]-[.E13]&lt;0;[$'Resultados Oficiais'.E13]-[$'Resultados Oficiais'.F13]&lt;0));IF(OR([.D13]=[$'Resultados Oficiais'.E13];[$'Resultados Oficiais'.F13]=[.E13]);18;15);IF(OR([.D13]=[$'Resultados Oficiais'.E13];[$'Resultados Oficiais'.F13]=[.E13]);6;0))))))">
            <text:p/>
          </table:table-cell>
          <table:table-cell table:style-name="ce364" table:formula="of:=IF([.H13]=30;&quot;BUCHA!&quot;;IF([.H13]=90;&quot;SUPER!!&quot;;IF(AND([.H13]&gt;30;[.H13]&lt;90);&quot;ZEBRA!&quot;;&quot;&quot;)))">
            <text:p/>
          </table:table-cell>
          <table:table-cell table:style-name="ce369"/>
          <table:table-cell table:style-name="ce342" table:formula="of:=[$'Resultados Oficiais'.L13]" office:value-type="string" office:string-value="Turquia" calcext:value-type="string">
            <text:p>Turquia</text:p>
          </table:table-cell>
          <table:table-cell table:style-name="ce239" table:number-columns-repeated="2"/>
          <table:table-cell table:style-name="ce349" table:formula="of:=[$'Resultados Oficiais'.O13]" office:value-type="string" office:string-value="Paraguai" calcext:value-type="string">
            <text:p>Paraguai</text:p>
          </table:table-cell>
          <table:table-cell table:style-name="ce356"/>
          <table:table-cell table:style-name="ce357" table:formula="of:=IF(COUNTBLANK([$'Resultados Oficiais'.M13:.N13])&gt;0;&quot;&quot;;IF(COUNTBLANK([.L13:.M13])&gt;0;&quot;&quot;; IF(AND([.L13]=[$'Resultados Oficiais'.M13];[$'Resultados Oficiais'.N13]=[.M13]);30;IF([.L13]-[.M13]=[$'Resultados Oficiais'.M13]-[$'Resultados Oficiais'.N13];21;IF(OR(AND([.L13]-[.M13]&gt;0;[$'Resultados Oficiais'.M13]-[$'Resultados Oficiais'.N13]&gt;0);AND([.L13]-[.M13]&lt;0;[$'Resultados Oficiais'.M13]-[$'Resultados Oficiais'.N13]&lt;0));IF(OR([.L13]=[$'Resultados Oficiais'.M13];[$'Resultados Oficiais'.N13]=[.M13]);18;15);IF(OR([.L13]=[$'Resultados Oficiais'.M13];[$'Resultados Oficiais'.N13]=[.M13]);6;0))))))">
            <text:p/>
          </table:table-cell>
          <table:table-cell table:style-name="ce362" table:formula="of:=IF([.P13]=30;&quot;BUCHA!&quot;;IF([.P13]=90;&quot;SUPER!!&quot;;IF(AND([.P13]&gt;30;[.P13]&lt;90);&quot;ZEBRA!&quot;;&quot;&quot;)))">
            <text:p/>
          </table:table-cell>
          <table:table-cell table:style-name="ce387" office:value-type="float" office:value="11" calcext:value-type="float">
            <text:p>11</text:p>
          </table:table-cell>
          <table:table-cell table:style-name="ce392" table:formula="of:=[$'Resultados Oficiais'.T13]" office:value-type="date" office:date-value="1899-12-30" calcext:value-type="date">
            <text:p>30-12</text:p>
          </table:table-cell>
          <table:table-cell table:style-name="ce398" table:formula="of:=[$'Resultados Oficiais'.U13]" office:value-type="string" office:string-value="1º do Grupo A" calcext:value-type="string">
            <text:p>1º do Grupo A</text:p>
          </table:table-cell>
          <table:table-cell table:style-name="ce243" table:number-columns-repeated="2"/>
          <table:table-cell table:style-name="ce405" table:formula="of:=[$'Resultados Oficiais'.X13]" office:value-type="string" office:string-value="3º CEFHI" calcext:value-type="string">
            <text:p>3º CEFHI</text:p>
          </table:table-cell>
          <table:table-cell table:style-name="ce408" table:formula="of:=[$'Resultados Oficiais'.Y13]" office:value-type="date" office:date-value="1899-12-30" calcext:value-type="date">
            <text:p>30-12</text:p>
          </table:table-cell>
          <table:table-cell table:style-name="ce357"/>
          <table:table-cell table:style-name="ce333" table:content-validation-name="val6"/>
          <table:table-cell table:style-name="ce357"/>
          <table:table-cell table:style-name="ce305"/>
          <table:table-cell table:number-columns-repeated="996"/>
        </table:table-row>
        <table:table-row table:style-name="ro12">
          <table:table-cell table:style-name="ce218"/>
          <table:table-cell table:style-name="ce337"/>
          <table:table-cell table:style-name="ce342" table:formula="of:=[$'Resultados Oficiais'.D14]" office:value-type="string" office:string-value="Brasil" calcext:value-type="string">
            <text:p>Brasil</text:p>
          </table:table-cell>
          <table:table-cell table:style-name="ce239" table:number-columns-repeated="2"/>
          <table:table-cell table:style-name="ce251" table:formula="of:=[$'Resultados Oficiais'.G14]" office:value-type="string" office:string-value="Haiti" calcext:value-type="string">
            <text:p>Haiti</text:p>
            <draw:frame table:end-cell-address="'Cartão de Apostas'.G17" table:end-x="5.33pt" table:end-y="4.48pt" draw:z-index="0" draw:name="image6.png" draw:style-name="gr1" draw:text-style-name="P1" svg:width="27.72pt" svg:height="20.98pt" svg:x="44.25pt" svg:y="6.01pt">
              <draw:image xlink:href="Pictures/100002010000029B000002D058F00F5457A07490.png" xlink:type="simple" xlink:show="embed" xlink:actuate="onLoad">
                <text:p/>
              </draw:image>
            </draw:frame>
          </table:table-cell>
          <table:table-cell table:style-name="ce354" office:value-type="string" calcext:value-type="string">
            <text:p>4X</text:p>
          </table:table-cell>
          <table:table-cell table:style-name="ce357" table:formula="of:=IF(COUNTBLANK([$'Resultados Oficiais'.E14:.F14])&gt;0;&quot;&quot;;IF(COUNTBLANK([.D14:.E14])&gt;0;&quot;&quot;; IF(AND([.D14]=[$'Resultados Oficiais'.E14];[$'Resultados Oficiais'.F14]=[.E14]);30;IF([.D14]-[.E14]=[$'Resultados Oficiais'.E14]-[$'Resultados Oficiais'.F14];21;IF(OR(AND([.D14]-[.E14]&gt;0;[$'Resultados Oficiais'.E14]-[$'Resultados Oficiais'.F14]&gt;0);AND([.D14]-[.E14]&lt;0;[$'Resultados Oficiais'.E14]-[$'Resultados Oficiais'.F14]&lt;0));IF(OR([.D14]=[$'Resultados Oficiais'.E14];[$'Resultados Oficiais'.F14]=[.E14]);18;15);IF(OR([.D14]=[$'Resultados Oficiais'.E14];[$'Resultados Oficiais'.F14]=[.E14]);6;0))))))">
            <text:p/>
          </table:table-cell>
          <table:table-cell table:style-name="ce364" table:formula="of:=IF([.H14]=30;&quot;BUCHA!&quot;;IF([.H14]=90;&quot;SUPER!!&quot;;IF(AND([.H14]&gt;30;[.H14]&lt;90);&quot;ZEBRA!&quot;;&quot;&quot;)))">
            <text:p/>
          </table:table-cell>
          <table:table-cell table:style-name="ce369"/>
          <table:table-cell table:style-name="ce342" table:formula="of:=[$'Resultados Oficiais'.L14]" office:value-type="string" office:string-value="Estados Unidos" calcext:value-type="string">
            <text:p>Estados Unidos</text:p>
          </table:table-cell>
          <table:table-cell table:style-name="ce239" table:number-columns-repeated="2"/>
          <table:table-cell table:style-name="ce349" table:formula="of:=[$'Resultados Oficiais'.O14]" office:value-type="string" office:string-value="Austrália" calcext:value-type="string">
            <text:p>Austrália</text:p>
          </table:table-cell>
          <table:table-cell table:style-name="ce356"/>
          <table:table-cell table:style-name="ce357" table:formula="of:=IF(COUNTBLANK([$'Resultados Oficiais'.M14:.N14])&gt;0;&quot;&quot;;IF(COUNTBLANK([.L14:.M14])&gt;0;&quot;&quot;; IF(AND([.L14]=[$'Resultados Oficiais'.M14];[$'Resultados Oficiais'.N14]=[.M14]);30;IF([.L14]-[.M14]=[$'Resultados Oficiais'.M14]-[$'Resultados Oficiais'.N14];21;IF(OR(AND([.L14]-[.M14]&gt;0;[$'Resultados Oficiais'.M14]-[$'Resultados Oficiais'.N14]&gt;0);AND([.L14]-[.M14]&lt;0;[$'Resultados Oficiais'.M14]-[$'Resultados Oficiais'.N14]&lt;0));IF(OR([.L14]=[$'Resultados Oficiais'.M14];[$'Resultados Oficiais'.N14]=[.M14]);18;15);IF(OR([.L14]=[$'Resultados Oficiais'.M14];[$'Resultados Oficiais'.N14]=[.M14]);6;0))))))">
            <text:p/>
          </table:table-cell>
          <table:table-cell table:style-name="ce362" table:formula="of:=IF([.P14]=30;&quot;BUCHA!&quot;;IF([.P14]=90;&quot;SUPER!!&quot;;IF(AND([.P14]&gt;30;[.P14]&lt;90);&quot;ZEBRA!&quot;;&quot;&quot;)))">
            <text:p/>
          </table:table-cell>
          <table:table-cell table:style-name="ce387" office:value-type="float" office:value="12" calcext:value-type="float">
            <text:p>12</text:p>
          </table:table-cell>
          <table:table-cell table:style-name="ce392" table:formula="of:=[$'Resultados Oficiais'.T14]" office:value-type="date" office:date-value="1899-12-30" calcext:value-type="date">
            <text:p>30-12</text:p>
          </table:table-cell>
          <table:table-cell table:style-name="ce398" table:formula="of:=[$'Resultados Oficiais'.U14]" office:value-type="string" office:string-value="1º do Grupo L" calcext:value-type="string">
            <text:p>1º do Grupo L</text:p>
          </table:table-cell>
          <table:table-cell table:style-name="ce243" table:number-columns-repeated="2"/>
          <table:table-cell table:style-name="ce405" table:formula="of:=[$'Resultados Oficiais'.X14]" office:value-type="string" office:string-value="3º EHIJK" calcext:value-type="string">
            <text:p>3º EHIJK</text:p>
          </table:table-cell>
          <table:table-cell table:style-name="ce408" table:formula="of:=[$'Resultados Oficiais'.Y14]" office:value-type="date" office:date-value="1899-12-30" calcext:value-type="date">
            <text:p>30-12</text:p>
          </table:table-cell>
          <table:table-cell table:style-name="ce357"/>
          <table:table-cell table:style-name="ce333" table:content-validation-name="val6"/>
          <table:table-cell table:style-name="ce357"/>
          <table:table-cell table:style-name="ce305"/>
          <table:table-cell table:number-columns-repeated="996"/>
        </table:table-row>
        <table:table-row table:style-name="ro12">
          <table:table-cell table:style-name="ce218" table:formula="of:=IF(COUNTBLANK([$'Resultados Oficiais'.V15:.W15])&gt;0;&quot;&quot;;IF(COUNTBLANK([.U32:.V32])&gt;0;&quot;&quot;;IF(AND([.U32]=[$'Resultados Oficiais'.V15];[$'Resultados Oficiais'.W15]=[.V32]);200;IF([.U32]-[.V32]=[$'Resultados Oficiais'.V15]-[$'Resultados Oficiais'.W15];140;IF(OR(AND([.U32]-[.V32]&gt;0;[$'Resultados Oficiais'.V15]-[$'Resultados Oficiais'.W15]&gt;0);AND([.U32]-[.V32]&lt;0;[$'Resultados Oficiais'.V15]-[$'Resultados Oficiais'.W15]&lt;0));IF(OR([.U32]=[$'Resultados Oficiais'.V15];[$'Resultados Oficiais'.W15]=[.V32]);120;100);IF(OR([.U32]=[$'Resultados Oficiais'.V15];[$'Resultados Oficiais'.W15]=[.V32]);40;0))))))">
            <text:p/>
          </table:table-cell>
          <table:table-cell table:style-name="ce337"/>
          <table:table-cell table:style-name="ce342" table:formula="of:=[$'Resultados Oficiais'.D15]" office:value-type="string" office:string-value="Escócia" calcext:value-type="string">
            <text:p>Escócia</text:p>
          </table:table-cell>
          <table:table-cell table:style-name="ce239" table:number-columns-repeated="2"/>
          <table:table-cell table:style-name="ce349" table:formula="of:=[$'Resultados Oficiais'.G15]" office:value-type="string" office:string-value="Brasil" calcext:value-type="string">
            <text:p>Brasil</text:p>
          </table:table-cell>
          <table:table-cell table:style-name="ce353"/>
          <table:table-cell table:style-name="ce357" table:formula="of:=IF(COUNTBLANK([$'Resultados Oficiais'.E15:.F15])&gt;0;&quot;&quot;;IF(COUNTBLANK([.D15:.E15])&gt;0;&quot;&quot;; IF(AND([.D15]=[$'Resultados Oficiais'.E15];[$'Resultados Oficiais'.F15]=[.E15]);30;IF([.D15]-[.E15]=[$'Resultados Oficiais'.E15]-[$'Resultados Oficiais'.F15];21;IF(OR(AND([.D15]-[.E15]&gt;0;[$'Resultados Oficiais'.E15]-[$'Resultados Oficiais'.F15]&gt;0);AND([.D15]-[.E15]&lt;0;[$'Resultados Oficiais'.E15]-[$'Resultados Oficiais'.F15]&lt;0));IF(OR([.D15]=[$'Resultados Oficiais'.E15];[$'Resultados Oficiais'.F15]=[.E15]);18;15);IF(OR([.D15]=[$'Resultados Oficiais'.E15];[$'Resultados Oficiais'.F15]=[.E15]);6;0))))))">
            <text:p/>
          </table:table-cell>
          <table:table-cell table:style-name="ce364" table:formula="of:=IF([.H15]=30;&quot;BUCHA!&quot;;IF([.H15]=90;&quot;SUPER!!&quot;;IF(AND([.H15]&gt;30;[.H15]&lt;90);&quot;ZEBRA!&quot;;&quot;&quot;)))">
            <text:p/>
          </table:table-cell>
          <table:table-cell table:style-name="ce369"/>
          <table:table-cell table:style-name="ce342" table:formula="of:=[$'Resultados Oficiais'.L15]" office:value-type="string" office:string-value="Turquia" calcext:value-type="string">
            <text:p>Turquia</text:p>
          </table:table-cell>
          <table:table-cell table:style-name="ce239" table:number-columns-repeated="2"/>
          <table:table-cell table:style-name="ce349" table:formula="of:=[$'Resultados Oficiais'.O15]" office:value-type="string" office:string-value="Estados Unidos" calcext:value-type="string">
            <text:p>Estados Unidos</text:p>
          </table:table-cell>
          <table:table-cell table:style-name="ce356"/>
          <table:table-cell table:style-name="ce357" table:formula="of:=IF(COUNTBLANK([$'Resultados Oficiais'.M15:.N15])&gt;0;&quot;&quot;;IF(COUNTBLANK([.L15:.M15])&gt;0;&quot;&quot;; IF(AND([.L15]=[$'Resultados Oficiais'.M15];[$'Resultados Oficiais'.N15]=[.M15]);30;IF([.L15]-[.M15]=[$'Resultados Oficiais'.M15]-[$'Resultados Oficiais'.N15];21;IF(OR(AND([.L15]-[.M15]&gt;0;[$'Resultados Oficiais'.M15]-[$'Resultados Oficiais'.N15]&gt;0);AND([.L15]-[.M15]&lt;0;[$'Resultados Oficiais'.M15]-[$'Resultados Oficiais'.N15]&lt;0));IF(OR([.L15]=[$'Resultados Oficiais'.M15];[$'Resultados Oficiais'.N15]=[.M15]);18;15);IF(OR([.L15]=[$'Resultados Oficiais'.M15];[$'Resultados Oficiais'.N15]=[.M15]);6;0))))))">
            <text:p/>
          </table:table-cell>
          <table:table-cell table:style-name="ce362" table:formula="of:=IF([.P15]=30;&quot;BUCHA!&quot;;IF([.P15]=90;&quot;SUPER!!&quot;;IF(AND([.P15]&gt;30;[.P15]&lt;90);&quot;ZEBRA!&quot;;&quot;&quot;)))">
            <text:p/>
          </table:table-cell>
          <table:table-cell table:style-name="ce387" office:value-type="float" office:value="13" calcext:value-type="float">
            <text:p>13</text:p>
          </table:table-cell>
          <table:table-cell table:style-name="ce392" table:formula="of:=[$'Resultados Oficiais'.T15]" office:value-type="date" office:date-value="1899-12-30" calcext:value-type="date">
            <text:p>30-12</text:p>
          </table:table-cell>
          <table:table-cell table:style-name="ce398" table:formula="of:=[$'Resultados Oficiais'.U15]" office:value-type="string" office:string-value="1º do Grupo J" calcext:value-type="string">
            <text:p>1º do Grupo J</text:p>
          </table:table-cell>
          <table:table-cell table:style-name="ce243" table:number-columns-repeated="2"/>
          <table:table-cell table:style-name="ce405" table:formula="of:=[$'Resultados Oficiais'.X15]" office:value-type="string" office:string-value="2º do Grupo H" calcext:value-type="string">
            <text:p>2º do Grupo H</text:p>
          </table:table-cell>
          <table:table-cell table:style-name="ce408" table:formula="of:=[$'Resultados Oficiais'.Y15]" office:value-type="date" office:date-value="1899-12-30" calcext:value-type="date">
            <text:p>30-12</text:p>
          </table:table-cell>
          <table:table-cell table:style-name="ce357"/>
          <table:table-cell table:style-name="ce333" table:content-validation-name="val6"/>
          <table:table-cell table:style-name="ce357"/>
          <table:table-cell table:style-name="ce305"/>
          <table:table-cell table:number-columns-repeated="996"/>
        </table:table-row>
        <table:table-row table:style-name="ro12">
          <table:table-cell table:style-name="ce218"/>
          <table:table-cell table:style-name="ce337"/>
          <table:table-cell table:style-name="ce342" table:formula="of:=[$'Resultados Oficiais'.D16]" office:value-type="string" office:string-value="Marrocos" calcext:value-type="string">
            <text:p>Marrocos</text:p>
          </table:table-cell>
          <table:table-cell table:style-name="ce239" table:number-columns-repeated="2"/>
          <table:table-cell table:style-name="ce349" table:formula="of:=[$'Resultados Oficiais'.G16]" office:value-type="string" office:string-value="Haiti" calcext:value-type="string">
            <text:p>Haiti</text:p>
          </table:table-cell>
          <table:table-cell table:style-name="ce353"/>
          <table:table-cell table:style-name="ce357" table:formula="of:=IF(COUNTBLANK([$'Resultados Oficiais'.E16:.F16])&gt;0;&quot;&quot;;IF(COUNTBLANK([.D16:.E16])&gt;0;&quot;&quot;; IF(AND([.D16]=[$'Resultados Oficiais'.E16];[$'Resultados Oficiais'.F16]=[.E16]);30;IF([.D16]-[.E16]=[$'Resultados Oficiais'.E16]-[$'Resultados Oficiais'.F16];21;IF(OR(AND([.D16]-[.E16]&gt;0;[$'Resultados Oficiais'.E16]-[$'Resultados Oficiais'.F16]&gt;0);AND([.D16]-[.E16]&lt;0;[$'Resultados Oficiais'.E16]-[$'Resultados Oficiais'.F16]&lt;0));IF(OR([.D16]=[$'Resultados Oficiais'.E16];[$'Resultados Oficiais'.F16]=[.E16]);18;15);IF(OR([.D16]=[$'Resultados Oficiais'.E16];[$'Resultados Oficiais'.F16]=[.E16]);6;0))))))">
            <text:p/>
          </table:table-cell>
          <table:table-cell table:style-name="ce364" table:formula="of:=IF([.H16]=30;&quot;BUCHA!&quot;;IF([.H16]=90;&quot;SUPER!!&quot;;IF(AND([.H16]&gt;30;[.H16]&lt;90);&quot;ZEBRA!&quot;;&quot;&quot;)))">
            <text:p/>
          </table:table-cell>
          <table:table-cell table:style-name="ce369"/>
          <table:table-cell table:style-name="ce342" table:formula="of:=[$'Resultados Oficiais'.L16]" office:value-type="string" office:string-value="Paraguai" calcext:value-type="string">
            <text:p>Paraguai</text:p>
          </table:table-cell>
          <table:table-cell table:style-name="ce239" table:number-columns-repeated="2"/>
          <table:table-cell table:style-name="ce349" table:formula="of:=[$'Resultados Oficiais'.O16]" office:value-type="string" office:string-value="Austrália" calcext:value-type="string">
            <text:p>Austrália</text:p>
          </table:table-cell>
          <table:table-cell table:style-name="ce356"/>
          <table:table-cell table:style-name="ce357" table:formula="of:=IF(COUNTBLANK([$'Resultados Oficiais'.M16:.N16])&gt;0;&quot;&quot;;IF(COUNTBLANK([.L16:.M16])&gt;0;&quot;&quot;; IF(AND([.L16]=[$'Resultados Oficiais'.M16];[$'Resultados Oficiais'.N16]=[.M16]);30;IF([.L16]-[.M16]=[$'Resultados Oficiais'.M16]-[$'Resultados Oficiais'.N16];21;IF(OR(AND([.L16]-[.M16]&gt;0;[$'Resultados Oficiais'.M16]-[$'Resultados Oficiais'.N16]&gt;0);AND([.L16]-[.M16]&lt;0;[$'Resultados Oficiais'.M16]-[$'Resultados Oficiais'.N16]&lt;0));IF(OR([.L16]=[$'Resultados Oficiais'.M16];[$'Resultados Oficiais'.N16]=[.M16]);18;15);IF(OR([.L16]=[$'Resultados Oficiais'.M16];[$'Resultados Oficiais'.N16]=[.M16]);6;0))))))">
            <text:p/>
          </table:table-cell>
          <table:table-cell table:style-name="ce362" table:formula="of:=IF([.P16]=30;&quot;BUCHA!&quot;;IF([.P16]=90;&quot;SUPER!!&quot;;IF(AND([.P16]&gt;30;[.P16]&lt;90);&quot;ZEBRA!&quot;;&quot;&quot;)))">
            <text:p/>
          </table:table-cell>
          <table:table-cell table:style-name="ce387" office:value-type="float" office:value="14" calcext:value-type="float">
            <text:p>14</text:p>
          </table:table-cell>
          <table:table-cell table:style-name="ce392" table:formula="of:=[$'Resultados Oficiais'.T16]" office:value-type="date" office:date-value="1899-12-30" calcext:value-type="date">
            <text:p>30-12</text:p>
          </table:table-cell>
          <table:table-cell table:style-name="ce398" table:formula="of:=[$'Resultados Oficiais'.U16]" office:value-type="string" office:string-value="2º do Grupo D" calcext:value-type="string">
            <text:p>2º do Grupo D</text:p>
          </table:table-cell>
          <table:table-cell table:style-name="ce243" table:number-columns-repeated="2"/>
          <table:table-cell table:style-name="ce405" table:formula="of:=[$'Resultados Oficiais'.X16]" office:value-type="string" office:string-value="2º do Grupo G" calcext:value-type="string">
            <text:p>2º do Grupo G</text:p>
          </table:table-cell>
          <table:table-cell table:style-name="ce408" table:formula="of:=[$'Resultados Oficiais'.Y16]" office:value-type="date" office:date-value="1899-12-30" calcext:value-type="date">
            <text:p>30-12</text:p>
          </table:table-cell>
          <table:table-cell table:style-name="ce357"/>
          <table:table-cell table:style-name="ce333" table:content-validation-name="val6"/>
          <table:table-cell table:style-name="ce357"/>
          <table:table-cell table:style-name="ce305"/>
          <table:table-cell table:number-columns-repeated="996"/>
        </table:table-row>
        <table:table-row table:style-name="ro12">
          <table:table-cell table:style-name="ce217" table:formula="of:=IF(COUNTBLANK([$'Resultados Oficiais'.V17:.W17])&gt;0;&quot;&quot;;IF(COUNTBLANK([.U34:.V34])&gt;0;&quot;&quot;;IF(AND([.U34]=[$'Resultados Oficiais'.V17];[$'Resultados Oficiais'.W17]=[.V34]);200;IF([.U34]-[.V34]=[$'Resultados Oficiais'.V17]-[$'Resultados Oficiais'.W17];140;IF(OR(AND([.U34]-[.V34]&gt;0;[$'Resultados Oficiais'.V17]-[$'Resultados Oficiais'.W17]&gt;0);AND([.U34]-[.V34]&lt;0;[$'Resultados Oficiais'.V17]-[$'Resultados Oficiais'.W17]&lt;0));IF(OR([.U34]=[$'Resultados Oficiais'.V17];[$'Resultados Oficiais'.W17]=[.V34]);120;100);IF(OR([.U34]=[$'Resultados Oficiais'.V17];[$'Resultados Oficiais'.W17]=[.V34]);40;0))))))">
            <text:p/>
          </table:table-cell>
          <table:table-cell table:style-name="ce307" table:number-columns-repeated="2"/>
          <table:table-cell table:style-name="ce236" office:value-type="string" calcext:value-type="string" table:number-columns-spanned="2" table:number-rows-spanned="1">
            <text:p>Grupo E</text:p>
          </table:table-cell>
          <table:covered-table-cell/>
          <table:table-cell table:style-name="ce350" table:number-columns-repeated="2"/>
          <table:table-cell table:style-name="ce359"/>
          <table:table-cell table:style-name="ce363"/>
          <table:table-cell table:style-name="ce371"/>
          <table:table-cell table:style-name="ce350"/>
          <table:table-cell table:style-name="ce236" office:value-type="string" calcext:value-type="string" table:number-columns-spanned="2" table:number-rows-spanned="1">
            <text:p>Grupo F</text:p>
          </table:table-cell>
          <table:covered-table-cell/>
          <table:table-cell table:style-name="ce307"/>
          <table:table-cell table:style-name="ce271" table:number-columns-repeated="2"/>
          <table:table-cell table:style-name="ce384"/>
          <table:table-cell table:style-name="ce387" office:value-type="float" office:value="15" calcext:value-type="float">
            <text:p>15</text:p>
          </table:table-cell>
          <table:table-cell table:style-name="ce392" table:formula="of:=[$'Resultados Oficiais'.T17]" office:value-type="date" office:date-value="1899-12-30" calcext:value-type="date">
            <text:p>30-12</text:p>
          </table:table-cell>
          <table:table-cell table:style-name="ce398" table:formula="of:=[$'Resultados Oficiais'.U17]" office:value-type="string" office:string-value="1º do Grupo B" calcext:value-type="string">
            <text:p>1º do Grupo B</text:p>
          </table:table-cell>
          <table:table-cell table:style-name="ce243" table:number-columns-repeated="2"/>
          <table:table-cell table:style-name="ce405" table:formula="of:=[$'Resultados Oficiais'.X17]" office:value-type="string" office:string-value="3º EFGIJ" calcext:value-type="string">
            <text:p>3º EFGIJ</text:p>
          </table:table-cell>
          <table:table-cell table:style-name="ce408" table:formula="of:=[$'Resultados Oficiais'.Y17]" office:value-type="date" office:date-value="1899-12-30" calcext:value-type="date">
            <text:p>30-12</text:p>
          </table:table-cell>
          <table:table-cell table:style-name="ce357"/>
          <table:table-cell table:style-name="ce333" table:content-validation-name="val6"/>
          <table:table-cell table:style-name="ce357"/>
          <table:table-cell table:style-name="ce418"/>
          <table:table-cell table:number-columns-repeated="996"/>
        </table:table-row>
        <table:table-row table:style-name="ro12">
          <table:table-cell table:style-name="ce218"/>
          <table:table-cell table:style-name="ce337"/>
          <table:table-cell table:style-name="ce342" table:formula="of:=[$'Resultados Oficiais'.D18]" office:value-type="string" office:string-value="Alemanha" calcext:value-type="string">
            <text:p>Alemanha</text:p>
          </table:table-cell>
          <table:table-cell table:style-name="ce243" table:number-columns-repeated="2"/>
          <table:table-cell table:style-name="ce251" table:formula="of:=[$'Resultados Oficiais'.G18]" office:value-type="string" office:string-value="Curaçao" calcext:value-type="string">
            <text:p>Curaçao</text:p>
            <draw:frame table:end-cell-address="'Cartão de Apostas'.G21" table:end-x="5.33pt" table:end-y="5.22pt" draw:z-index="7" draw:name="image6.png" draw:style-name="gr1" draw:text-style-name="P1" svg:width="27.72pt" svg:height="20.98pt" svg:x="44.25pt" svg:y="6.75pt">
              <draw:image xlink:href="Pictures/100002010000029B000002D058F00F5457A07490.png" xlink:type="simple" xlink:show="embed" xlink:actuate="onLoad">
                <text:p/>
              </draw:image>
            </draw:frame>
          </table:table-cell>
          <table:table-cell table:style-name="ce354" office:value-type="string" calcext:value-type="string">
            <text:p>4X</text:p>
          </table:table-cell>
          <table:table-cell table:style-name="ce357" table:formula="of:=IF(COUNTBLANK([$'Resultados Oficiais'.E18:.F18])&gt;0;&quot;&quot;;IF(COUNTBLANK([.D18:.E18])&gt;0;&quot;&quot;; IF(AND([.D18]=[$'Resultados Oficiais'.E18];[$'Resultados Oficiais'.F18]=[.E18]);30;IF([.D18]-[.E18]=[$'Resultados Oficiais'.E18]-[$'Resultados Oficiais'.F18];21;IF(OR(AND([.D18]-[.E18]&gt;0;[$'Resultados Oficiais'.E18]-[$'Resultados Oficiais'.F18]&gt;0);AND([.D18]-[.E18]&lt;0;[$'Resultados Oficiais'.E18]-[$'Resultados Oficiais'.F18]&lt;0));IF(OR([.D18]=[$'Resultados Oficiais'.E18];[$'Resultados Oficiais'.F18]=[.E18]);18;15);IF(OR([.D18]=[$'Resultados Oficiais'.E18];[$'Resultados Oficiais'.F18]=[.E18]);6;0))))))">
            <text:p/>
          </table:table-cell>
          <table:table-cell table:style-name="ce362" table:formula="of:=IF([.H18]=30;&quot;BUCHA!&quot;;IF([.H18]=90;&quot;SUPER!!&quot;;IF(AND([.H18]&gt;30;[.H18]&lt;90);&quot;ZEBRA!&quot;;&quot;&quot;)))">
            <text:p/>
          </table:table-cell>
          <table:table-cell table:style-name="ce369"/>
          <table:table-cell table:style-name="ce342" table:formula="of:=[$'Resultados Oficiais'.L18]" office:value-type="string" office:string-value="Holanda" calcext:value-type="string">
            <text:p>Holanda</text:p>
          </table:table-cell>
          <table:table-cell table:style-name="ce243" table:number-columns-repeated="2"/>
          <table:table-cell table:style-name="ce349" table:formula="of:=[$'Resultados Oficiais'.O18]" office:value-type="string" office:string-value="Japão" calcext:value-type="string">
            <text:p>Japão</text:p>
          </table:table-cell>
          <table:table-cell table:style-name="ce356"/>
          <table:table-cell table:style-name="ce357" table:formula="of:=IF(COUNTBLANK([$'Resultados Oficiais'.M18:.N18])&gt;0;&quot;&quot;;IF(COUNTBLANK([.L18:.M18])&gt;0;&quot;&quot;; IF(AND([.L18]=[$'Resultados Oficiais'.M18];[$'Resultados Oficiais'.N18]=[.M18]);30;IF([.L18]-[.M18]=[$'Resultados Oficiais'.M18]-[$'Resultados Oficiais'.N18];21;IF(OR(AND([.L18]-[.M18]&gt;0;[$'Resultados Oficiais'.M18]-[$'Resultados Oficiais'.N18]&gt;0);AND([.L18]-[.M18]&lt;0;[$'Resultados Oficiais'.M18]-[$'Resultados Oficiais'.N18]&lt;0));IF(OR([.L18]=[$'Resultados Oficiais'.M18];[$'Resultados Oficiais'.N18]=[.M18]);18;15);IF(OR([.L18]=[$'Resultados Oficiais'.M18];[$'Resultados Oficiais'.N18]=[.M18]);6;0))))))">
            <text:p/>
          </table:table-cell>
          <table:table-cell table:style-name="ce362" table:formula="of:=IF([.P18]=30;&quot;BUCHA!&quot;;IF([.P18]=90;&quot;SUPER!!&quot;;IF(AND([.P18]&gt;30;[.P18]&lt;90);&quot;ZEBRA!&quot;;&quot;&quot;)))">
            <text:p/>
          </table:table-cell>
          <table:table-cell table:style-name="ce387" office:value-type="float" office:value="16" calcext:value-type="float">
            <text:p>16</text:p>
          </table:table-cell>
          <table:table-cell table:style-name="ce392" table:formula="of:=[$'Resultados Oficiais'.T18]" office:value-type="date" office:date-value="1899-12-30" calcext:value-type="date">
            <text:p>30-12</text:p>
          </table:table-cell>
          <table:table-cell table:style-name="ce398" table:formula="of:=[$'Resultados Oficiais'.U18]" office:value-type="string" office:string-value="1º do Grupo K" calcext:value-type="string">
            <text:p>1º do Grupo K</text:p>
          </table:table-cell>
          <table:table-cell table:style-name="ce243" table:number-columns-repeated="2"/>
          <table:table-cell table:style-name="ce405" table:formula="of:=[$'Resultados Oficiais'.X18]" office:value-type="string" office:string-value="3º DEIJL" calcext:value-type="string">
            <text:p>3º DEIJL</text:p>
          </table:table-cell>
          <table:table-cell table:style-name="ce408" table:formula="of:=[$'Resultados Oficiais'.Y18]" office:value-type="date" office:date-value="1899-12-30" calcext:value-type="date">
            <text:p>30-12</text:p>
          </table:table-cell>
          <table:table-cell table:style-name="ce357"/>
          <table:table-cell table:style-name="ce333" table:content-validation-name="val6"/>
          <table:table-cell table:style-name="ce357"/>
          <table:table-cell table:style-name="ce419" table:formula="of:=IF([.Y21]=&quot;&quot;;&quot;&quot;;IF([.Y21]+[.AA21]=150;&quot;SUPER!!&quot;;IF([.Y21]=100;&quot;BUCHA!&quot;;&quot;&quot;)))">
            <text:p/>
          </table:table-cell>
          <table:table-cell table:number-columns-repeated="996"/>
        </table:table-row>
        <table:table-row table:style-name="ro12">
          <table:table-cell table:style-name="ce218"/>
          <table:table-cell table:style-name="ce337"/>
          <table:table-cell table:style-name="ce342" table:formula="of:=[$'Resultados Oficiais'.D19]" office:value-type="string" office:string-value="Costa do Marfim" calcext:value-type="string">
            <text:p>Costa do Marfim</text:p>
          </table:table-cell>
          <table:table-cell table:style-name="ce243" table:number-columns-repeated="2"/>
          <table:table-cell table:style-name="ce351" table:formula="of:=[$'Resultados Oficiais'.G19]" office:value-type="string" office:string-value="Equador" calcext:value-type="string">
            <text:p>Equador</text:p>
          </table:table-cell>
          <table:table-cell table:style-name="ce355"/>
          <table:table-cell table:style-name="ce357" table:formula="of:=IF(COUNTBLANK([$'Resultados Oficiais'.E19:.F19])&gt;0;&quot;&quot;;IF(COUNTBLANK([.D19:.E19])&gt;0;&quot;&quot;; IF(AND([.D19]=[$'Resultados Oficiais'.E19];[$'Resultados Oficiais'.F19]=[.E19]);30;IF([.D19]-[.E19]=[$'Resultados Oficiais'.E19]-[$'Resultados Oficiais'.F19];21;IF(OR(AND([.D19]-[.E19]&gt;0;[$'Resultados Oficiais'.E19]-[$'Resultados Oficiais'.F19]&gt;0);AND([.D19]-[.E19]&lt;0;[$'Resultados Oficiais'.E19]-[$'Resultados Oficiais'.F19]&lt;0));IF(OR([.D19]=[$'Resultados Oficiais'.E19];[$'Resultados Oficiais'.F19]=[.E19]);18;15);IF(OR([.D19]=[$'Resultados Oficiais'.E19];[$'Resultados Oficiais'.F19]=[.E19]);6;0))))))">
            <text:p/>
          </table:table-cell>
          <table:table-cell table:style-name="ce362" table:formula="of:=IF([.H19]=30;&quot;BUCHA!&quot;;IF([.H19]=90;&quot;SUPER!!&quot;;IF(AND([.H19]&gt;30;[.H19]&lt;90);&quot;ZEBRA!&quot;;&quot;&quot;)))">
            <text:p/>
          </table:table-cell>
          <table:table-cell table:style-name="ce369"/>
          <table:table-cell table:style-name="ce342" table:formula="of:=[$'Resultados Oficiais'.L19]" office:value-type="string" office:string-value="Suécia" calcext:value-type="string">
            <text:p>Suécia</text:p>
          </table:table-cell>
          <table:table-cell table:style-name="ce243" table:number-columns-repeated="2"/>
          <table:table-cell table:style-name="ce349" table:formula="of:=[$'Resultados Oficiais'.O19]" office:value-type="string" office:string-value="Tunísia" calcext:value-type="string">
            <text:p>Tunísia</text:p>
          </table:table-cell>
          <table:table-cell table:style-name="ce356"/>
          <table:table-cell table:style-name="ce357" table:formula="of:=IF(COUNTBLANK([$'Resultados Oficiais'.M19:.N19])&gt;0;&quot;&quot;;IF(COUNTBLANK([.L19:.M19])&gt;0;&quot;&quot;; IF(AND([.L19]=[$'Resultados Oficiais'.M19];[$'Resultados Oficiais'.N19]=[.M19]);30;IF([.L19]-[.M19]=[$'Resultados Oficiais'.M19]-[$'Resultados Oficiais'.N19];21;IF(OR(AND([.L19]-[.M19]&gt;0;[$'Resultados Oficiais'.M19]-[$'Resultados Oficiais'.N19]&gt;0);AND([.L19]-[.M19]&lt;0;[$'Resultados Oficiais'.M19]-[$'Resultados Oficiais'.N19]&lt;0));IF(OR([.L19]=[$'Resultados Oficiais'.M19];[$'Resultados Oficiais'.N19]=[.M19]);18;15);IF(OR([.L19]=[$'Resultados Oficiais'.M19];[$'Resultados Oficiais'.N19]=[.M19]);6;0))))))">
            <text:p/>
          </table:table-cell>
          <table:table-cell table:style-name="ce362" table:formula="of:=IF([.P19]=30;&quot;BUCHA!&quot;;IF([.P19]=90;&quot;SUPER!!&quot;;IF(AND([.P19]&gt;30;[.P19]&lt;90);&quot;ZEBRA!&quot;;&quot;&quot;)))">
            <text:p/>
          </table:table-cell>
          <table:table-cell table:style-name="ce388"/>
          <table:table-cell table:style-name="ce305" table:number-columns-repeated="9"/>
          <table:table-cell table:style-name="ce419" table:formula="of:=IF([.Y22]=&quot;&quot;;&quot;&quot;;IF([.Y22]+[.AA22]=150;&quot;SUPER!!&quot;;IF([.Y22]=100;&quot;BUCHA!&quot;;IF([.Y22]=300;&quot;SUPER!!&quot;;IF(AND([.Y22]&gt;100;[.Y22]&lt;300);&quot;ZEBRA!&quot;;&quot;&quot;)))))">
            <text:p/>
          </table:table-cell>
          <table:table-cell table:number-columns-repeated="996"/>
        </table:table-row>
        <table:table-row table:style-name="ro12">
          <table:table-cell table:style-name="ce218"/>
          <table:table-cell table:style-name="ce337"/>
          <table:table-cell table:style-name="ce342" table:formula="of:=[$'Resultados Oficiais'.D20]" office:value-type="string" office:string-value="Alemanha" calcext:value-type="string">
            <text:p>Alemanha</text:p>
          </table:table-cell>
          <table:table-cell table:style-name="ce243" table:number-columns-repeated="2"/>
          <table:table-cell table:style-name="ce351" table:formula="of:=[$'Resultados Oficiais'.G20]" office:value-type="string" office:string-value="Costa do Marfim" calcext:value-type="string">
            <text:p>Costa do Marfim</text:p>
          </table:table-cell>
          <table:table-cell table:style-name="ce355"/>
          <table:table-cell table:style-name="ce357" table:formula="of:=IF(COUNTBLANK([$'Resultados Oficiais'.E20:.F20])&gt;0;&quot;&quot;;IF(COUNTBLANK([.D20:.E20])&gt;0;&quot;&quot;; IF(AND([.D20]=[$'Resultados Oficiais'.E20];[$'Resultados Oficiais'.F20]=[.E20]);30;IF([.D20]-[.E20]=[$'Resultados Oficiais'.E20]-[$'Resultados Oficiais'.F20];21;IF(OR(AND([.D20]-[.E20]&gt;0;[$'Resultados Oficiais'.E20]-[$'Resultados Oficiais'.F20]&gt;0);AND([.D20]-[.E20]&lt;0;[$'Resultados Oficiais'.E20]-[$'Resultados Oficiais'.F20]&lt;0));IF(OR([.D20]=[$'Resultados Oficiais'.E20];[$'Resultados Oficiais'.F20]=[.E20]);18;15);IF(OR([.D20]=[$'Resultados Oficiais'.E20];[$'Resultados Oficiais'.F20]=[.E20]);6;0))))))">
            <text:p/>
          </table:table-cell>
          <table:table-cell table:style-name="ce362" table:formula="of:=IF([.H20]=30;&quot;BUCHA!&quot;;IF([.H20]=90;&quot;SUPER!!&quot;;IF(AND([.H20]&gt;30;[.H20]&lt;90);&quot;ZEBRA!&quot;;&quot;&quot;)))">
            <text:p/>
          </table:table-cell>
          <table:table-cell table:style-name="ce369"/>
          <table:table-cell table:style-name="ce342" table:formula="of:=[$'Resultados Oficiais'.L20]" office:value-type="string" office:string-value="Holanda" calcext:value-type="string">
            <text:p>Holanda</text:p>
          </table:table-cell>
          <table:table-cell table:style-name="ce243" table:number-columns-repeated="2"/>
          <table:table-cell table:style-name="ce349" table:formula="of:=[$'Resultados Oficiais'.O20]" office:value-type="string" office:string-value="Suécia" calcext:value-type="string">
            <text:p>Suécia</text:p>
          </table:table-cell>
          <table:table-cell table:style-name="ce356"/>
          <table:table-cell table:style-name="ce357" table:formula="of:=IF(COUNTBLANK([$'Resultados Oficiais'.M20:.N20])&gt;0;&quot;&quot;;IF(COUNTBLANK([.L20:.M20])&gt;0;&quot;&quot;; IF(AND([.L20]=[$'Resultados Oficiais'.M20];[$'Resultados Oficiais'.N20]=[.M20]);30;IF([.L20]-[.M20]=[$'Resultados Oficiais'.M20]-[$'Resultados Oficiais'.N20];21;IF(OR(AND([.L20]-[.M20]&gt;0;[$'Resultados Oficiais'.M20]-[$'Resultados Oficiais'.N20]&gt;0);AND([.L20]-[.M20]&lt;0;[$'Resultados Oficiais'.M20]-[$'Resultados Oficiais'.N20]&lt;0));IF(OR([.L20]=[$'Resultados Oficiais'.M20];[$'Resultados Oficiais'.N20]=[.M20]);18;15);IF(OR([.L20]=[$'Resultados Oficiais'.M20];[$'Resultados Oficiais'.N20]=[.M20]);6;0))))))">
            <text:p/>
          </table:table-cell>
          <table:table-cell table:style-name="ce362" table:formula="of:=IF([.P20]=30;&quot;BUCHA!&quot;;IF([.P20]=90;&quot;SUPER!!&quot;;IF(AND([.P20]&gt;30;[.P20]&lt;90);&quot;ZEBRA!&quot;;&quot;&quot;)))">
            <text:p/>
          </table:table-cell>
          <table:table-cell table:style-name="ce389" table:formula="of:=IF(COUNTBLANK([$'Resultados Oficiais'.V21:.W21])&gt;0;&quot;&quot;;IF(COUNTBLANK([.U38:.V38])&gt;0;&quot;&quot;;IF(AND([.U38]=[$'Resultados Oficiais'.V21];[$'Resultados Oficiais'.W21]=[.V38]);300;IF([.U38]-[.V38]=[$'Resultados Oficiais'.V21]-[$'Resultados Oficiais'.W21];210;IF(OR(AND([.U38]-[.V38]&gt;0;[$'Resultados Oficiais'.V21]-[$'Resultados Oficiais'.W21]&gt;0);AND([.U38]-[.V38]&lt;0;[$'Resultados Oficiais'.V21]-[$'Resultados Oficiais'.W21]&lt;0));IF(OR([.U38]=[$'Resultados Oficiais'.V21];[$'Resultados Oficiais'.W21]=[.V38]);180;150);IF(OR([.U38]=[$'Resultados Oficiais'.V21];[$'Resultados Oficiais'.W21]=[.V38]);60;0))))))">
            <text:p/>
          </table:table-cell>
          <table:table-cell table:style-name="ce286"/>
          <table:table-cell table:style-name="ce284" office:value-type="string" calcext:value-type="string" table:number-columns-spanned="4" table:number-rows-spanned="1">
            <office:annotation draw:style-name="gr6" draw:text-style-name="P3" svg:width="124.33pt" svg:height="95.27pt" svg:x="633.6pt" svg:y="136.12pt" draw:caption-point-x="98.19pt" draw:caption-point-y="8.9pt">
              <dc:date>2026-05-01T00:00:00</dc:date>
              <text:p text:style-name="P2">OITAVAS </text:p>
              <text:p text:style-name="P2">&gt;&gt; Aposta para 90 minutos + eventual prorrogação!</text:p>
              <text:p text:style-name="P2"/>
              <text:p text:style-name="P2">Bucha: 100 pontos.</text:p>
              <text:p text:style-name="P2">Demais: 70, 60, 50, 20.</text:p>
              <text:p text:style-name="P2">Pênaltis: 50 pontos.</text:p>
            </office:annotation>
            <text:p>Oitavas</text:p>
          </table:table-cell>
          <table:covered-table-cell table:number-columns-repeated="3"/>
          <table:table-cell table:style-name="ce271"/>
          <table:table-cell table:style-name="ce271" office:value-type="string" calcext:value-type="string">
            <text:p>PTS</text:p>
          </table:table-cell>
          <table:table-cell table:style-name="ce332" office:value-type="string" calcext:value-type="string">
            <office:annotation draw:style-name="gr7" draw:text-style-name="P3" svg:width="191.76pt" svg:height="50.49pt" svg:x="859.38pt" svg:y="139.78pt" draw:caption-point-x="-11.54pt" draw:caption-point-y="5.24pt">
              <dc:date>2026-05-01T00:00:00</dc:date>
              <text:p text:style-name="P2">Os pênaltis terão pontuação EXTRA, independente da aposta feita no tempo de jogo. Ou seja: se o jogo for para os pênaltis, quem vence?</text:p>
            </office:annotation>
            <text:p>Pênaltis</text:p>
          </table:table-cell>
          <table:table-cell table:style-name="ce414" office:value-type="string" calcext:value-type="string">
            <text:p>EXTRA</text:p>
          </table:table-cell>
          <table:table-cell table:style-name="ce419"/>
          <table:table-cell table:number-columns-repeated="996"/>
        </table:table-row>
        <table:table-row table:style-name="ro12">
          <table:table-cell table:style-name="ce218" table:formula="of:=IF(COUNTBLANK([$'Resultados Oficiais'.M21:.N21])&gt;0;&quot;&quot;;IF(COUNTBLANK([.L21:.M21])&gt;0;&quot;&quot;; IF(AND([.L21]=[$'Resultados Oficiais'.M21];[$'Resultados Oficiais'.N21]=[.M21]);30;IF([.L21]-[.M21]=[$'Resultados Oficiais'.M21]-[$'Resultados Oficiais'.N21];21;IF(OR(AND([.L21]-[.M21]&gt;0;[$'Resultados Oficiais'.M21]-[$'Resultados Oficiais'.N21]&gt;0);AND([.L21]-[.M21]&lt;0;[$'Resultados Oficiais'.M21]-[$'Resultados Oficiais'.N21]&lt;0));IF(OR([.L21]=[$'Resultados Oficiais'.M21];[$'Resultados Oficiais'.N21]=[.M21]);18;15);IF(OR([.L21]=[$'Resultados Oficiais'.M21];[$'Resultados Oficiais'.N21]=[.M21]);6;0))))))">
            <text:p/>
          </table:table-cell>
          <table:table-cell table:style-name="ce337"/>
          <table:table-cell table:style-name="ce342" table:formula="of:=[$'Resultados Oficiais'.D21]" office:value-type="string" office:string-value="Equador" calcext:value-type="string">
            <text:p>Equador</text:p>
          </table:table-cell>
          <table:table-cell table:style-name="ce243" table:number-columns-repeated="2"/>
          <table:table-cell table:style-name="ce351" table:formula="of:=[$'Resultados Oficiais'.G21]" office:value-type="string" office:string-value="Curaçao" calcext:value-type="string">
            <text:p>Curaçao</text:p>
          </table:table-cell>
          <table:table-cell table:style-name="ce355"/>
          <table:table-cell table:style-name="ce357" table:formula="of:=IF(COUNTBLANK([$'Resultados Oficiais'.E21:.F21])&gt;0;&quot;&quot;;IF(COUNTBLANK([.D21:.E21])&gt;0;&quot;&quot;; IF(AND([.D21]=[$'Resultados Oficiais'.E21];[$'Resultados Oficiais'.F21]=[.E21]);30;IF([.D21]-[.E21]=[$'Resultados Oficiais'.E21]-[$'Resultados Oficiais'.F21];21;IF(OR(AND([.D21]-[.E21]&gt;0;[$'Resultados Oficiais'.E21]-[$'Resultados Oficiais'.F21]&gt;0);AND([.D21]-[.E21]&lt;0;[$'Resultados Oficiais'.E21]-[$'Resultados Oficiais'.F21]&lt;0));IF(OR([.D21]=[$'Resultados Oficiais'.E21];[$'Resultados Oficiais'.F21]=[.E21]);18;15);IF(OR([.D21]=[$'Resultados Oficiais'.E21];[$'Resultados Oficiais'.F21]=[.E21]);6;0))))))">
            <text:p/>
          </table:table-cell>
          <table:table-cell table:style-name="ce362" table:formula="of:=IF([.H21]=30;&quot;BUCHA!&quot;;IF([.H21]=90;&quot;SUPER!!&quot;;IF(AND([.H21]&gt;30;[.H21]&lt;90);&quot;ZEBRA!&quot;;&quot;&quot;)))">
            <text:p/>
          </table:table-cell>
          <table:table-cell table:style-name="ce369"/>
          <table:table-cell table:style-name="ce342" table:formula="of:=[$'Resultados Oficiais'.L21]" office:value-type="string" office:string-value="Tunísia" calcext:value-type="string">
            <text:p>Tunísia</text:p>
          </table:table-cell>
          <table:table-cell table:style-name="ce243" table:number-columns-repeated="2"/>
          <table:table-cell table:style-name="ce349" table:formula="of:=[$'Resultados Oficiais'.O21]" office:value-type="string" office:string-value="Japão" calcext:value-type="string">
            <text:p>Japão</text:p>
          </table:table-cell>
          <table:table-cell table:style-name="ce356"/>
          <table:table-cell table:style-name="ce357" table:formula="of:=IF([.A21]=&quot;&quot;;&quot;&quot;;IF(AND([.M21]&gt;[.L21];[$'Resultados Oficiais'.N21]&gt;[$'Resultados Oficiais'.M21]);[.A21]*3;[.A21]))">
            <text:p/>
          </table:table-cell>
          <table:table-cell table:style-name="ce362" table:formula="of:=IF([.P21]=30;&quot;BUCHA!&quot;;IF([.P21]=90;&quot;SUPER!!&quot;;IF(AND([.P21]&gt;30;[.P21]&lt;90);&quot;ZEBRA!&quot;;&quot;&quot;)))">
            <text:p/>
          </table:table-cell>
          <table:table-cell table:style-name="ce278" office:value-type="string" calcext:value-type="string">
            <text:p>O1</text:p>
          </table:table-cell>
          <table:table-cell table:style-name="ce393" table:formula="of:=[$'Resultados Oficiais'.T21]" office:value-type="float" office:value="0" calcext:value-type="float">
            <text:p>0</text:p>
          </table:table-cell>
          <table:table-cell table:style-name="ce397" table:formula="of:=[$'Resultados Oficiais'.U21]" office:value-type="string" office:string-value="Vencedor do 1" calcext:value-type="string">
            <text:p>Vencedor do 1</text:p>
          </table:table-cell>
          <table:table-cell table:style-name="ce402"/>
          <table:table-cell table:style-name="ce243"/>
          <table:table-cell table:style-name="ce405" table:formula="of:=[$'Resultados Oficiais'.X21]" office:value-type="string" office:string-value="Vencedor do 2" calcext:value-type="string">
            <text:p>Vencedor do 2</text:p>
          </table:table-cell>
          <table:table-cell table:style-name="ce409" table:formula="of:=[$'Resultados Oficiais'.Y21]" office:value-type="float" office:value="0" calcext:value-type="float">
            <text:p>0</text:p>
          </table:table-cell>
          <table:table-cell table:style-name="ce357" table:formula="of:=IF(COUNTBLANK([$'Resultados Oficiais'.V4:.W4])&gt;0;&quot;&quot;;IF(COUNTBLANK([.U21:.V21])&gt;0;&quot;&quot;;IF(AND([.U21]=[$'Resultados Oficiais'.V4];[$'Resultados Oficiais'.W4]=[.V21]);100;IF([.U21]-[.V21]=[$'Resultados Oficiais'.V4]-[$'Resultados Oficiais'.W4];70;IF(OR(AND([.U21]-[.V21]&gt;0;[$'Resultados Oficiais'.V4]-[$'Resultados Oficiais'.W4]&gt;0);AND([.U21]-[.V21]&lt;0;[$'Resultados Oficiais'.V4]-[$'Resultados Oficiais'.W4]&lt;0));IF(OR([.U21]=[$'Resultados Oficiais'.V4];[$'Resultados Oficiais'.W4]=[.V21]);60;50);IF(OR([.U21]=[$'Resultados Oficiais'.V4];[$'Resultados Oficiais'.W4]=[.V21]);20;0))))))">
            <text:p/>
          </table:table-cell>
          <table:table-cell table:style-name="ce333" table:content-validation-name="val6"/>
          <table:table-cell table:style-name="ce357" table:formula="of:=IF(COUNTBLANK([$'Resultados Oficiais'.V4:.W4])&gt;0;&quot;&quot;;IF(COUNTBLANK([.U21:.V21])&gt;0;&quot;&quot;;IF([.Z21]=&quot;&quot;;&quot;&quot;;IF(#REF!=&quot;&quot;;0;IF(#REF!=[.Z21];50;0)))))">
            <text:p/>
          </table:table-cell>
          <table:table-cell table:style-name="ce419" table:formula="of:=IF([.Y24]=&quot;&quot;;&quot;&quot;;IF([.Y24]+[.AA24]=150;&quot;SUPER!!&quot;;IF([.Y24]=100;&quot;BUCHA!&quot;;IF([.Y24]=300;&quot;SUPER!!&quot;;IF(AND([.Y24]&gt;100;[.Y24]&lt;300);&quot;ZEBRA!&quot;;&quot;&quot;)))))">
            <text:p/>
          </table:table-cell>
          <table:table-cell table:number-columns-repeated="996"/>
        </table:table-row>
        <table:table-row table:style-name="ro12">
          <table:table-cell table:style-name="ce218"/>
          <table:table-cell table:style-name="ce337"/>
          <table:table-cell table:style-name="ce342" table:formula="of:=[$'Resultados Oficiais'.D22]" office:value-type="string" office:string-value="Equador" calcext:value-type="string">
            <text:p>Equador</text:p>
          </table:table-cell>
          <table:table-cell table:style-name="ce243" table:number-columns-repeated="2"/>
          <table:table-cell table:style-name="ce351" table:formula="of:=[$'Resultados Oficiais'.G22]" office:value-type="string" office:string-value="Alemanha" calcext:value-type="string">
            <text:p>Alemanha</text:p>
          </table:table-cell>
          <table:table-cell table:style-name="ce355"/>
          <table:table-cell table:style-name="ce357" table:formula="of:=IF(COUNTBLANK([$'Resultados Oficiais'.E22:.F22])&gt;0;&quot;&quot;;IF(COUNTBLANK([.D22:.E22])&gt;0;&quot;&quot;; IF(AND([.D22]=[$'Resultados Oficiais'.E22];[$'Resultados Oficiais'.F22]=[.E22]);30;IF([.D22]-[.E22]=[$'Resultados Oficiais'.E22]-[$'Resultados Oficiais'.F22];21;IF(OR(AND([.D22]-[.E22]&gt;0;[$'Resultados Oficiais'.E22]-[$'Resultados Oficiais'.F22]&gt;0);AND([.D22]-[.E22]&lt;0;[$'Resultados Oficiais'.E22]-[$'Resultados Oficiais'.F22]&lt;0));IF(OR([.D22]=[$'Resultados Oficiais'.E22];[$'Resultados Oficiais'.F22]=[.E22]);18;15);IF(OR([.D22]=[$'Resultados Oficiais'.E22];[$'Resultados Oficiais'.F22]=[.E22]);6;0))))))">
            <text:p/>
          </table:table-cell>
          <table:table-cell table:style-name="ce364" table:formula="of:=IF([.H22]=30;&quot;BUCHA!&quot;;IF([.H22]=90;&quot;SUPER!!&quot;;IF(AND([.H22]&gt;30;[.H22]&lt;90);&quot;ZEBRA!&quot;;&quot;&quot;)))">
            <text:p/>
          </table:table-cell>
          <table:table-cell table:style-name="ce261" office:value-type="string" calcext:value-type="string">
            <office:annotation draw:style-name="gr7" draw:text-style-name="P3" svg:width="176.4pt" svg:height="28.09pt" svg:x="294.63pt" svg:y="165.97pt" draw:caption-point-x="-11.54pt" draw:caption-point-y="-5.95pt">
              <dc:date>2026-05-01T00:00:00</dc:date>
              <text:p text:style-name="P2">Multiplica 2X os pontos em caso de aposta e VITÓRIA da ZEBRA.</text:p>
            </office:annotation>
            <text:p>2X</text:p>
            <draw:frame table:end-cell-address="'Cartão de Apostas'.K25" table:end-x="26.62pt" table:end-y="2.98pt" draw:z-index="1" draw:name="image6.png" draw:style-name="gr1" draw:text-style-name="P1" svg:width="27.72pt" svg:height="20.98pt" svg:x="13.49pt" svg:y="4.51pt">
              <draw:image xlink:href="Pictures/100002010000029B000002D058F00F5457A07490.png" xlink:type="simple" xlink:show="embed" xlink:actuate="onLoad">
                <text:p/>
              </draw:image>
            </draw:frame>
            <draw:frame table:end-cell-address="'Cartão de Apostas'.K25" table:end-x="26.62pt" table:end-y="4.48pt" draw:z-index="9" draw:name="image6.png" draw:style-name="gr1" draw:text-style-name="P1" svg:width="27.72pt" svg:height="20.98pt" svg:x="13.49pt" svg:y="6.01pt">
              <draw:image xlink:href="Pictures/100002010000029B000002D058F00F5457A07490.png" xlink:type="simple" xlink:show="embed" xlink:actuate="onLoad">
                <text:p/>
              </draw:image>
            </draw:frame>
          </table:table-cell>
          <table:table-cell table:style-name="ce265" office:value-type="string" calcext:value-type="string">
            <text:p>Tunísia</text:p>
          </table:table-cell>
          <table:table-cell table:style-name="ce243" table:number-columns-repeated="2"/>
          <table:table-cell table:style-name="ce349" table:formula="of:=[$'Resultados Oficiais'.O22]" office:value-type="string" office:string-value="Holanda" calcext:value-type="string">
            <text:p>Holanda</text:p>
          </table:table-cell>
          <table:table-cell table:style-name="ce356"/>
          <table:table-cell table:style-name="ce357" table:formula="of:=IF(COUNTBLANK([$'Resultados Oficiais'.M22:.N22])&gt;0;&quot;&quot;;IF(COUNTBLANK([.L22:.M22])&gt;0;&quot;&quot;; IF(AND([.L22]=[$'Resultados Oficiais'.M22];[$'Resultados Oficiais'.N22]=[.M22]);30;IF([.L22]-[.M22]=[$'Resultados Oficiais'.M22]-[$'Resultados Oficiais'.N22];21;IF(OR(AND([.L22]-[.M22]&gt;0;[$'Resultados Oficiais'.M22]-[$'Resultados Oficiais'.N22]&gt;0);AND([.L22]-[.M22]&lt;0;[$'Resultados Oficiais'.M22]-[$'Resultados Oficiais'.N22]&lt;0));IF(OR([.L22]=[$'Resultados Oficiais'.M22];[$'Resultados Oficiais'.N22]=[.M22]);18;15);IF(OR([.L22]=[$'Resultados Oficiais'.M22];[$'Resultados Oficiais'.N22]=[.M22]);6;0))))))">
            <text:p/>
          </table:table-cell>
          <table:table-cell table:style-name="ce362" table:formula="of:=IF([.P22]=30;&quot;BUCHA!&quot;;IF([.P22]=90;&quot;SUPER!!&quot;;IF(AND([.P22]&gt;30;[.P22]&lt;90);&quot;ZEBRA!&quot;;&quot;&quot;)))">
            <text:p/>
          </table:table-cell>
          <table:table-cell table:style-name="ce278" office:value-type="string" calcext:value-type="string">
            <text:p>O2</text:p>
          </table:table-cell>
          <table:table-cell table:style-name="ce393" table:formula="of:=[$'Resultados Oficiais'.T22]" office:value-type="float" office:value="0" calcext:value-type="float">
            <text:p>0</text:p>
          </table:table-cell>
          <table:table-cell table:style-name="ce397" table:formula="of:=[$'Resultados Oficiais'.U22]" office:value-type="string" office:string-value="Vencedor do 3" calcext:value-type="string">
            <text:p>Vencedor do 3</text:p>
          </table:table-cell>
          <table:table-cell table:style-name="ce402"/>
          <table:table-cell table:style-name="ce243"/>
          <table:table-cell table:style-name="ce405" table:formula="of:=[$'Resultados Oficiais'.X22]" office:value-type="string" office:string-value="Vencedor do 4" calcext:value-type="string">
            <text:p>Vencedor do 4</text:p>
          </table:table-cell>
          <table:table-cell table:style-name="ce409" table:formula="of:=[$'Resultados Oficiais'.Y22]" office:value-type="float" office:value="0" calcext:value-type="float">
            <text:p>0</text:p>
          </table:table-cell>
          <table:table-cell table:style-name="ce357" table:formula="of:=IF([.A5]=&quot;&quot;;&quot;&quot;;IF(AND([.V22]&gt;[.U22];[$'Resultados Oficiais'.W5]&gt;[$'Resultados Oficiais'.V5]);[.A5]*3;[.A5]))">
            <text:p/>
          </table:table-cell>
          <table:table-cell table:style-name="ce333" table:content-validation-name="val6"/>
          <table:table-cell table:style-name="ce357" table:formula="of:=IF(COUNTBLANK([$'Resultados Oficiais'.V5:.W5])&gt;0;&quot;&quot;;IF(COUNTBLANK([.U22:.V22])&gt;0;&quot;&quot;;IF([.Z22]=&quot;&quot;;&quot;&quot;;IF(#REF!=&quot;&quot;;0;IF(#REF!=[.Z22];50;0)))))">
            <text:p/>
          </table:table-cell>
          <table:table-cell table:style-name="ce419" table:formula="of:=IF([.Y25]=&quot;&quot;;&quot;&quot;;IF([.Y25]+[.AA25]=150;&quot;SUPER!!&quot;;IF([.Y25]=100;&quot;BUCHA!&quot;;&quot;&quot;)))">
            <text:p/>
          </table:table-cell>
          <table:table-cell table:number-columns-repeated="996"/>
        </table:table-row>
        <table:table-row table:style-name="ro12">
          <table:table-cell table:style-name="ce218" table:formula="of:=IF(COUNTBLANK([$'Resultados Oficiais'.E23:.F23])&gt;0;&quot;&quot;;IF(COUNTBLANK([.D23:.E23])&gt;0;&quot;&quot;; IF(AND([.D23]=[$'Resultados Oficiais'.E23];[$'Resultados Oficiais'.F23]=[.E23]);30;IF([.D23]-[.E23]=[$'Resultados Oficiais'.E23]-[$'Resultados Oficiais'.F23];21;IF(OR(AND([.D23]-[.E23]&gt;0;[$'Resultados Oficiais'.E23]-[$'Resultados Oficiais'.F23]&gt;0);AND([.D23]-[.E23]&lt;0;[$'Resultados Oficiais'.E23]-[$'Resultados Oficiais'.F23]&lt;0));IF(OR([.D23]=[$'Resultados Oficiais'.E23];[$'Resultados Oficiais'.F23]=[.E23]);18;15);IF(OR([.D23]=[$'Resultados Oficiais'.E23];[$'Resultados Oficiais'.F23]=[.E23]);6;0))))))">
            <text:p/>
          </table:table-cell>
          <table:table-cell table:style-name="ce338"/>
          <table:table-cell table:style-name="ce342" table:formula="of:=[$'Resultados Oficiais'.D23]" office:value-type="string" office:string-value="Curaçao" calcext:value-type="string">
            <text:p>Curaçao</text:p>
          </table:table-cell>
          <table:table-cell table:style-name="ce243" table:number-columns-repeated="2"/>
          <table:table-cell table:style-name="ce351" table:formula="of:=[$'Resultados Oficiais'.G23]" office:value-type="string" office:string-value="Costa do Marfim" calcext:value-type="string">
            <text:p>Costa do Marfim</text:p>
          </table:table-cell>
          <table:table-cell table:style-name="ce355"/>
          <table:table-cell table:style-name="ce357" table:formula="of:=IF([.A23]=&quot;&quot;;&quot;&quot;;IF(AND([.D23]&gt;[.E23];[$'Resultados Oficiais'.E23]&gt;[$'Resultados Oficiais'.F23]);[.A23]*3;[.A23]))">
            <text:p/>
          </table:table-cell>
          <table:table-cell table:style-name="ce362" table:formula="of:=IF([.H23]=30;&quot;BUCHA!&quot;;IF([.H23]=90;&quot;SUPER!!&quot;;IF(AND([.H23]&gt;30;[.H23]&lt;90);&quot;ZEBRA!&quot;;&quot;&quot;)))">
            <text:p/>
          </table:table-cell>
          <table:table-cell table:style-name="ce369"/>
          <table:table-cell table:style-name="ce342" table:formula="of:=[$'Resultados Oficiais'.L23]" office:value-type="string" office:string-value="Japão" calcext:value-type="string">
            <text:p>Japão</text:p>
          </table:table-cell>
          <table:table-cell table:style-name="ce243" table:number-columns-repeated="2"/>
          <table:table-cell table:style-name="ce349" table:formula="of:=[$'Resultados Oficiais'.O23]" office:value-type="string" office:string-value="Suécia" calcext:value-type="string">
            <text:p>Suécia</text:p>
          </table:table-cell>
          <table:table-cell table:style-name="ce356"/>
          <table:table-cell table:style-name="ce357" table:formula="of:=IF(COUNTBLANK([$'Resultados Oficiais'.M23:.N23])&gt;0;&quot;&quot;;IF(COUNTBLANK([.L23:.M23])&gt;0;&quot;&quot;; IF(AND([.L23]=[$'Resultados Oficiais'.M23];[$'Resultados Oficiais'.N23]=[.M23]);30;IF([.L23]-[.M23]=[$'Resultados Oficiais'.M23]-[$'Resultados Oficiais'.N23];21;IF(OR(AND([.L23]-[.M23]&gt;0;[$'Resultados Oficiais'.M23]-[$'Resultados Oficiais'.N23]&gt;0);AND([.L23]-[.M23]&lt;0;[$'Resultados Oficiais'.M23]-[$'Resultados Oficiais'.N23]&lt;0));IF(OR([.L23]=[$'Resultados Oficiais'.M23];[$'Resultados Oficiais'.N23]=[.M23]);18;15);IF(OR([.L23]=[$'Resultados Oficiais'.M23];[$'Resultados Oficiais'.N23]=[.M23]);6;0))))))">
            <text:p/>
          </table:table-cell>
          <table:table-cell table:style-name="ce362" table:formula="of:=IF([.P23]=30;&quot;BUCHA!&quot;;IF([.P23]=90;&quot;SUPER!!&quot;;IF(AND([.P23]&gt;30;[.P23]&lt;90);&quot;ZEBRA!&quot;;&quot;&quot;)))">
            <text:p/>
          </table:table-cell>
          <table:table-cell table:style-name="ce278" office:value-type="string" calcext:value-type="string">
            <text:p>O3</text:p>
          </table:table-cell>
          <table:table-cell table:style-name="ce393" table:formula="of:=[$'Resultados Oficiais'.T23]" office:value-type="float" office:value="0" calcext:value-type="float">
            <text:p>0</text:p>
          </table:table-cell>
          <table:table-cell table:style-name="ce397" table:formula="of:=[$'Resultados Oficiais'.U23]" office:value-type="string" office:string-value="Vencedor do 5" calcext:value-type="string">
            <text:p>Vencedor do 5</text:p>
          </table:table-cell>
          <table:table-cell table:style-name="ce402"/>
          <table:table-cell table:style-name="ce243"/>
          <table:table-cell table:style-name="ce405" table:formula="of:=[$'Resultados Oficiais'.X23]" office:value-type="string" office:string-value="Vencedor do 6" calcext:value-type="string">
            <text:p>Vencedor do 6</text:p>
          </table:table-cell>
          <table:table-cell table:style-name="ce409" table:formula="of:=[$'Resultados Oficiais'.Y23]" office:value-type="float" office:value="0" calcext:value-type="float">
            <text:p>0</text:p>
          </table:table-cell>
          <table:table-cell table:style-name="ce357" table:formula="of:=IF(COUNTBLANK([$'Resultados Oficiais'.V6:.W6])&gt;0;&quot;&quot;;IF(COUNTBLANK([.U23:.V23])&gt;0;&quot;&quot;;IF(AND([.U23]=[$'Resultados Oficiais'.V6];[$'Resultados Oficiais'.W6]=[.V23]);100;IF([.U23]-[.V23]=[$'Resultados Oficiais'.V6]-[$'Resultados Oficiais'.W6];70;IF(OR(AND([.U23]-[.V23]&gt;0;[$'Resultados Oficiais'.V6]-[$'Resultados Oficiais'.W6]&gt;0);AND([.U23]-[.V23]&lt;0;[$'Resultados Oficiais'.V6]-[$'Resultados Oficiais'.W6]&lt;0));IF(OR([.U23]=[$'Resultados Oficiais'.V6];[$'Resultados Oficiais'.W6]=[.V23]);60;50);IF(OR([.U23]=[$'Resultados Oficiais'.V6];[$'Resultados Oficiais'.W6]=[.V23]);20;0))))))">
            <text:p/>
          </table:table-cell>
          <table:table-cell table:style-name="ce333" table:content-validation-name="val6"/>
          <table:table-cell table:style-name="ce357" table:formula="of:=IF(COUNTBLANK([$'Resultados Oficiais'.V6:.W6])&gt;0;&quot;&quot;;IF(COUNTBLANK([.U23:.V23])&gt;0;&quot;&quot;;IF([.Z23]=&quot;&quot;;&quot;&quot;;IF(#REF!=&quot;&quot;;0;IF(#REF!=[.Z23];50;0)))))">
            <text:p/>
          </table:table-cell>
          <table:table-cell table:style-name="ce419" table:formula="of:=IF([.Y26]=&quot;&quot;;&quot;&quot;;IF([.Y26]+[.AA26]=150;&quot;SUPER!!&quot;;IF([.Y26]=100;&quot;BUCHA!&quot;;IF([.Y26]=300;&quot;SUPER!!&quot;;IF(AND([.Y26]&gt;100;[.Y26]&lt;300);&quot;ZEBRA!&quot;;&quot;&quot;)))))">
            <text:p/>
          </table:table-cell>
          <table:table-cell table:number-columns-repeated="996"/>
        </table:table-row>
        <table:table-row table:style-name="ro12">
          <table:table-cell table:style-name="ce217"/>
          <table:table-cell table:style-name="ce307" table:number-columns-repeated="2"/>
          <table:table-cell table:style-name="ce236" office:value-type="string" calcext:value-type="string" table:number-columns-spanned="2" table:number-rows-spanned="1">
            <text:p>Grupo G</text:p>
          </table:table-cell>
          <table:covered-table-cell/>
          <table:table-cell table:style-name="ce350" table:number-columns-repeated="2"/>
          <table:table-cell table:style-name="ce359"/>
          <table:table-cell table:style-name="ce363"/>
          <table:table-cell table:style-name="ce371"/>
          <table:table-cell table:style-name="ce350"/>
          <table:table-cell table:style-name="ce236" office:value-type="string" calcext:value-type="string" table:number-columns-spanned="2" table:number-rows-spanned="1">
            <text:p>Grupo H</text:p>
          </table:table-cell>
          <table:covered-table-cell/>
          <table:table-cell table:style-name="ce307"/>
          <table:table-cell table:style-name="ce271" table:number-columns-repeated="2"/>
          <table:table-cell table:style-name="ce384"/>
          <table:table-cell table:style-name="ce278" office:value-type="string" calcext:value-type="string">
            <text:p>O4</text:p>
          </table:table-cell>
          <table:table-cell table:style-name="ce393" table:formula="of:=[$'Resultados Oficiais'.T24]" office:value-type="float" office:value="0" calcext:value-type="float">
            <text:p>0</text:p>
          </table:table-cell>
          <table:table-cell table:style-name="ce397" table:formula="of:=[$'Resultados Oficiais'.U24]" office:value-type="string" office:string-value="Vencedor do 7" calcext:value-type="string">
            <text:p>Vencedor do 7</text:p>
          </table:table-cell>
          <table:table-cell table:style-name="ce402"/>
          <table:table-cell table:style-name="ce243"/>
          <table:table-cell table:style-name="ce405" table:formula="of:=[$'Resultados Oficiais'.X24]" office:value-type="string" office:string-value="Vencedor do 8" calcext:value-type="string">
            <text:p>Vencedor do 8</text:p>
          </table:table-cell>
          <table:table-cell table:style-name="ce409" table:formula="of:=[$'Resultados Oficiais'.Y24]" office:value-type="float" office:value="0" calcext:value-type="float">
            <text:p>0</text:p>
          </table:table-cell>
          <table:table-cell table:style-name="ce357" table:formula="of:=IF([.A7]=&quot;&quot;;&quot;&quot;;IF(AND([.V24]&gt;[.U24];[$'Resultados Oficiais'.W7]&gt;[$'Resultados Oficiais'.V7]);[.A7]*3;[.A7]))">
            <text:p/>
          </table:table-cell>
          <table:table-cell table:style-name="ce333" table:content-validation-name="val6"/>
          <table:table-cell table:style-name="ce357" table:formula="of:=IF(COUNTBLANK([$'Resultados Oficiais'.V7:.W7])&gt;0;&quot;&quot;;IF(COUNTBLANK([.U24:.V24])&gt;0;&quot;&quot;;IF([.Z24]=&quot;&quot;;&quot;&quot;;IF(#REF!=&quot;&quot;;0;IF(#REF!=[.Z24];50;0)))))">
            <text:p/>
          </table:table-cell>
          <table:table-cell table:style-name="ce419" table:formula="of:=IF([.Y27]=&quot;&quot;;&quot;&quot;;IF([.Y27]+[.AA27]=150;&quot;SUPER!!&quot;;IF([.Y27]=100;&quot;BUCHA!&quot;;&quot;&quot;)))">
            <text:p/>
          </table:table-cell>
          <table:table-cell table:number-columns-repeated="996"/>
        </table:table-row>
        <table:table-row table:style-name="ro12">
          <table:table-cell table:style-name="ce218"/>
          <table:table-cell table:style-name="ce337"/>
          <table:table-cell table:style-name="ce342" table:formula="of:=[$'Resultados Oficiais'.D25]" office:value-type="string" office:string-value="Bélgica" calcext:value-type="string">
            <text:p>Bélgica</text:p>
          </table:table-cell>
          <table:table-cell table:style-name="ce243" table:number-columns-repeated="2"/>
          <table:table-cell table:style-name="ce351" table:formula="of:=[$'Resultados Oficiais'.G25]" office:value-type="string" office:string-value="Egito" calcext:value-type="string">
            <text:p>Egito</text:p>
          </table:table-cell>
          <table:table-cell table:style-name="ce355"/>
          <table:table-cell table:style-name="ce357" table:formula="of:=IF(COUNTBLANK([$'Resultados Oficiais'.E25:.F25])&gt;0;&quot;&quot;;IF(COUNTBLANK([.D25:.E25])&gt;0;&quot;&quot;; IF(AND([.D25]=[$'Resultados Oficiais'.E25];[$'Resultados Oficiais'.F25]=[.E25]);30;IF([.D25]-[.E25]=[$'Resultados Oficiais'.E25]-[$'Resultados Oficiais'.F25];21;IF(OR(AND([.D25]-[.E25]&gt;0;[$'Resultados Oficiais'.E25]-[$'Resultados Oficiais'.F25]&gt;0);AND([.D25]-[.E25]&lt;0;[$'Resultados Oficiais'.E25]-[$'Resultados Oficiais'.F25]&lt;0));IF(OR([.D25]=[$'Resultados Oficiais'.E25];[$'Resultados Oficiais'.F25]=[.E25]);18;15);IF(OR([.D25]=[$'Resultados Oficiais'.E25];[$'Resultados Oficiais'.F25]=[.E25]);6;0))))))">
            <text:p/>
          </table:table-cell>
          <table:table-cell table:style-name="ce362" table:formula="of:=IF([.H25]=30;&quot;BUCHA!&quot;;IF([.H25]=90;&quot;SUPER!!&quot;;IF(AND([.H25]&gt;30;[.H25]&lt;90);&quot;ZEBRA!&quot;;&quot;&quot;)))">
            <text:p/>
          </table:table-cell>
          <table:table-cell table:style-name="ce369"/>
          <table:table-cell table:style-name="ce342" table:formula="of:=[$'Resultados Oficiais'.L25]" office:value-type="string" office:string-value="Espanha" calcext:value-type="string">
            <text:p>Espanha</text:p>
          </table:table-cell>
          <table:table-cell table:style-name="ce243" table:number-columns-repeated="2"/>
          <table:table-cell table:style-name="ce349" table:formula="of:=[$'Resultados Oficiais'.O25]" office:value-type="string" office:string-value="Cabo Verde" calcext:value-type="string">
            <text:p>Cabo Verde</text:p>
          </table:table-cell>
          <table:table-cell table:style-name="ce356"/>
          <table:table-cell table:style-name="ce357" table:formula="of:=IF(COUNTBLANK([$'Resultados Oficiais'.M25:.N25])&gt;0;&quot;&quot;;IF(COUNTBLANK([.L25:.M25])&gt;0;&quot;&quot;; IF(AND([.L25]=[$'Resultados Oficiais'.M25];[$'Resultados Oficiais'.N25]=[.M25]);30;IF([.L25]-[.M25]=[$'Resultados Oficiais'.M25]-[$'Resultados Oficiais'.N25];21;IF(OR(AND([.L25]-[.M25]&gt;0;[$'Resultados Oficiais'.M25]-[$'Resultados Oficiais'.N25]&gt;0);AND([.L25]-[.M25]&lt;0;[$'Resultados Oficiais'.M25]-[$'Resultados Oficiais'.N25]&lt;0));IF(OR([.L25]=[$'Resultados Oficiais'.M25];[$'Resultados Oficiais'.N25]=[.M25]);18;15);IF(OR([.L25]=[$'Resultados Oficiais'.M25];[$'Resultados Oficiais'.N25]=[.M25]);6;0))))))">
            <text:p/>
          </table:table-cell>
          <table:table-cell table:style-name="ce362" table:formula="of:=IF([.P25]=30;&quot;BUCHA!&quot;;IF([.P25]=90;&quot;SUPER!!&quot;;IF(AND([.P25]&gt;30;[.P25]&lt;90);&quot;ZEBRA!&quot;;&quot;&quot;)))">
            <text:p/>
          </table:table-cell>
          <table:table-cell table:style-name="ce278" office:value-type="string" calcext:value-type="string">
            <text:p>O5</text:p>
          </table:table-cell>
          <table:table-cell table:style-name="ce393" table:formula="of:=[$'Resultados Oficiais'.T25]" office:value-type="float" office:value="0" calcext:value-type="float">
            <text:p>0</text:p>
          </table:table-cell>
          <table:table-cell table:style-name="ce397" table:formula="of:=[$'Resultados Oficiais'.U25]" office:value-type="string" office:string-value="Vencedor do 9" calcext:value-type="string">
            <text:p>Vencedor do 9</text:p>
          </table:table-cell>
          <table:table-cell table:style-name="ce402"/>
          <table:table-cell table:style-name="ce243"/>
          <table:table-cell table:style-name="ce405" table:formula="of:=[$'Resultados Oficiais'.X25]" office:value-type="string" office:string-value="Vencedor do 10" calcext:value-type="string">
            <text:p>Vencedor do 10</text:p>
          </table:table-cell>
          <table:table-cell table:style-name="ce409" table:formula="of:=[$'Resultados Oficiais'.Y25]" office:value-type="float" office:value="0" calcext:value-type="float">
            <text:p>0</text:p>
          </table:table-cell>
          <table:table-cell table:style-name="ce357" table:formula="of:=IF(COUNTBLANK([$'Resultados Oficiais'.V8:.W8])&gt;0;&quot;&quot;;IF(COUNTBLANK([.U25:.V25])&gt;0;&quot;&quot;;IF(AND([.U25]=[$'Resultados Oficiais'.V8];[$'Resultados Oficiais'.W8]=[.V25]);100;IF([.U25]-[.V25]=[$'Resultados Oficiais'.V8]-[$'Resultados Oficiais'.W8];70;IF(OR(AND([.U25]-[.V25]&gt;0;[$'Resultados Oficiais'.V8]-[$'Resultados Oficiais'.W8]&gt;0);AND([.U25]-[.V25]&lt;0;[$'Resultados Oficiais'.V8]-[$'Resultados Oficiais'.W8]&lt;0));IF(OR([.U25]=[$'Resultados Oficiais'.V8];[$'Resultados Oficiais'.W8]=[.V25]);60;50);IF(OR([.U25]=[$'Resultados Oficiais'.V8];[$'Resultados Oficiais'.W8]=[.V25]);20;0))))))">
            <text:p/>
          </table:table-cell>
          <table:table-cell table:style-name="ce333" table:content-validation-name="val6"/>
          <table:table-cell table:style-name="ce357" table:formula="of:=IF(COUNTBLANK([$'Resultados Oficiais'.V8:.W8])&gt;0;&quot;&quot;;IF(COUNTBLANK([.U25:.V25])&gt;0;&quot;&quot;;IF([.Z25]=&quot;&quot;;&quot;&quot;;IF(#REF!=&quot;&quot;;0;IF(#REF!=[.Z25];50;0)))))">
            <text:p/>
          </table:table-cell>
          <table:table-cell table:style-name="ce419" table:formula="of:=IF([.Y28]=&quot;&quot;;&quot;&quot;;IF([.Y28]+[.AA28]=150;&quot;SUPER!!&quot;;IF([.Y28]=100;&quot;BUCHA!&quot;;&quot;&quot;)))">
            <text:p/>
          </table:table-cell>
          <table:table-cell table:number-columns-repeated="996"/>
        </table:table-row>
        <table:table-row table:style-name="ro12">
          <table:table-cell table:style-name="ce218" table:formula="of:=IF(COUNTBLANK([$'Resultados Oficiais'.E26:.F26])&gt;0;&quot;&quot;;IF(COUNTBLANK([.D26:.E26])&gt;0;&quot;&quot;; IF(AND([.D26]=[$'Resultados Oficiais'.E26];[$'Resultados Oficiais'.F26]=[.E26]);30;IF([.D26]-[.E26]=[$'Resultados Oficiais'.E26]-[$'Resultados Oficiais'.F26];21;IF(OR(AND([.D26]-[.E26]&gt;0;[$'Resultados Oficiais'.E26]-[$'Resultados Oficiais'.F26]&gt;0);AND([.D26]-[.E26]&lt;0;[$'Resultados Oficiais'.E26]-[$'Resultados Oficiais'.F26]&lt;0));IF(OR([.D26]=[$'Resultados Oficiais'.E26];[$'Resultados Oficiais'.F26]=[.E26]);18;15);IF(OR([.D26]=[$'Resultados Oficiais'.E26];[$'Resultados Oficiais'.F26]=[.E26]);6;0))))))">
            <text:p/>
          </table:table-cell>
          <table:table-cell table:style-name="ce337"/>
          <table:table-cell table:style-name="ce342" table:formula="of:=[$'Resultados Oficiais'.D26]" office:value-type="string" office:string-value="Irã" calcext:value-type="string">
            <text:p>Irã</text:p>
          </table:table-cell>
          <table:table-cell table:style-name="ce243" table:number-columns-repeated="2"/>
          <table:table-cell table:style-name="ce351" table:formula="of:=[$'Resultados Oficiais'.G26]" office:value-type="string" office:string-value="Nova Zelândia" calcext:value-type="string">
            <text:p>Nova Zelândia</text:p>
          </table:table-cell>
          <table:table-cell table:style-name="ce355"/>
          <table:table-cell table:style-name="ce357" table:formula="of:=IF([.A26]=&quot;&quot;;&quot;&quot;;IF(AND([.E26]&gt;[.D26];[$'Resultados Oficiais'.F26]&gt;[$'Resultados Oficiais'.E26]);[.A26]*3;[.A26]))">
            <text:p/>
          </table:table-cell>
          <table:table-cell table:style-name="ce362" table:formula="of:=IF([.H26]=30;&quot;BUCHA!&quot;;IF([.H26]=90;&quot;SUPER!!&quot;;IF(AND([.H26]&gt;30;[.H26]&lt;90);&quot;ZEBRA!&quot;;&quot;&quot;)))">
            <text:p/>
          </table:table-cell>
          <table:table-cell table:style-name="ce369"/>
          <table:table-cell table:style-name="ce342" table:formula="of:=[$'Resultados Oficiais'.L26]" office:value-type="string" office:string-value="Arábia Saudita" calcext:value-type="string">
            <text:p>Arábia Saudita</text:p>
          </table:table-cell>
          <table:table-cell table:style-name="ce243" table:number-columns-repeated="2"/>
          <table:table-cell table:style-name="ce349" table:formula="of:=[$'Resultados Oficiais'.O26]" office:value-type="string" office:string-value="Uruguai" calcext:value-type="string">
            <text:p>Uruguai</text:p>
          </table:table-cell>
          <table:table-cell table:style-name="ce356"/>
          <table:table-cell table:style-name="ce357" table:formula="of:=IF(COUNTBLANK([$'Resultados Oficiais'.M26:.N26])&gt;0;&quot;&quot;;IF(COUNTBLANK([.L26:.M26])&gt;0;&quot;&quot;; IF(AND([.L26]=[$'Resultados Oficiais'.M26];[$'Resultados Oficiais'.N26]=[.M26]);30;IF([.L26]-[.M26]=[$'Resultados Oficiais'.M26]-[$'Resultados Oficiais'.N26];21;IF(OR(AND([.L26]-[.M26]&gt;0;[$'Resultados Oficiais'.M26]-[$'Resultados Oficiais'.N26]&gt;0);AND([.L26]-[.M26]&lt;0;[$'Resultados Oficiais'.M26]-[$'Resultados Oficiais'.N26]&lt;0));IF(OR([.L26]=[$'Resultados Oficiais'.M26];[$'Resultados Oficiais'.N26]=[.M26]);18;15);IF(OR([.L26]=[$'Resultados Oficiais'.M26];[$'Resultados Oficiais'.N26]=[.M26]);6;0))))))">
            <text:p/>
          </table:table-cell>
          <table:table-cell table:style-name="ce362" table:formula="of:=IF([.P26]=30;&quot;BUCHA!&quot;;IF([.P26]=90;&quot;SUPER!!&quot;;IF(AND([.P26]&gt;30;[.P26]&lt;90);&quot;ZEBRA!&quot;;&quot;&quot;)))">
            <text:p/>
          </table:table-cell>
          <table:table-cell table:style-name="ce278" office:value-type="string" calcext:value-type="string">
            <text:p>O6</text:p>
          </table:table-cell>
          <table:table-cell table:style-name="ce393" table:formula="of:=[$'Resultados Oficiais'.T26]" office:value-type="float" office:value="0" calcext:value-type="float">
            <text:p>0</text:p>
          </table:table-cell>
          <table:table-cell table:style-name="ce397" table:formula="of:=[$'Resultados Oficiais'.U26]" office:value-type="string" office:string-value="Vencedor do 11" calcext:value-type="string">
            <text:p>Vencedor do 11</text:p>
          </table:table-cell>
          <table:table-cell table:style-name="ce402"/>
          <table:table-cell table:style-name="ce243"/>
          <table:table-cell table:style-name="ce405" table:formula="of:=[$'Resultados Oficiais'.X26]" office:value-type="string" office:string-value="Vencedor do 12" calcext:value-type="string">
            <text:p>Vencedor do 12</text:p>
          </table:table-cell>
          <table:table-cell table:style-name="ce409" table:formula="of:=[$'Resultados Oficiais'.Y26]" office:value-type="float" office:value="0" calcext:value-type="float">
            <text:p>0</text:p>
          </table:table-cell>
          <table:table-cell table:style-name="ce357" table:formula="of:=IF([.A9]=&quot;&quot;;&quot;&quot;;IF(AND([.V26]&gt;[.U26];[$'Resultados Oficiais'.W9]&gt;[$'Resultados Oficiais'.V9]);[.A9]*3;[.A9]))">
            <text:p/>
          </table:table-cell>
          <table:table-cell table:style-name="ce333" table:content-validation-name="val6"/>
          <table:table-cell table:style-name="ce357" table:formula="of:=IF(COUNTBLANK([$'Resultados Oficiais'.V9:.W9])&gt;0;&quot;&quot;;IF(COUNTBLANK([.U26:.V26])&gt;0;&quot;&quot;;IF([.Z26]=&quot;&quot;;&quot;&quot;;IF(#REF!=&quot;&quot;;0;IF(#REF!=[.Z26];50;0)))))">
            <text:p/>
          </table:table-cell>
          <table:table-cell table:style-name="ce420"/>
          <table:table-cell table:number-columns-repeated="996"/>
        </table:table-row>
        <table:table-row table:style-name="ro12">
          <table:table-cell table:style-name="ce218"/>
          <table:table-cell table:style-name="ce337"/>
          <table:table-cell table:style-name="ce342" table:formula="of:=[$'Resultados Oficiais'.D27]" office:value-type="string" office:string-value="Bélgica" calcext:value-type="string">
            <text:p>Bélgica</text:p>
          </table:table-cell>
          <table:table-cell table:style-name="ce243" table:number-columns-repeated="2"/>
          <table:table-cell table:style-name="ce351" table:formula="of:=[$'Resultados Oficiais'.G27]" office:value-type="string" office:string-value="Irã" calcext:value-type="string">
            <text:p>Irã</text:p>
          </table:table-cell>
          <table:table-cell table:style-name="ce355"/>
          <table:table-cell table:style-name="ce357" table:formula="of:=IF(COUNTBLANK([$'Resultados Oficiais'.E27:.F27])&gt;0;&quot;&quot;;IF(COUNTBLANK([.D27:.E27])&gt;0;&quot;&quot;; IF(AND([.D27]=[$'Resultados Oficiais'.E27];[$'Resultados Oficiais'.F27]=[.E27]);30;IF([.D27]-[.E27]=[$'Resultados Oficiais'.E27]-[$'Resultados Oficiais'.F27];21;IF(OR(AND([.D27]-[.E27]&gt;0;[$'Resultados Oficiais'.E27]-[$'Resultados Oficiais'.F27]&gt;0);AND([.D27]-[.E27]&lt;0;[$'Resultados Oficiais'.E27]-[$'Resultados Oficiais'.F27]&lt;0));IF(OR([.D27]=[$'Resultados Oficiais'.E27];[$'Resultados Oficiais'.F27]=[.E27]);18;15);IF(OR([.D27]=[$'Resultados Oficiais'.E27];[$'Resultados Oficiais'.F27]=[.E27]);6;0))))))">
            <text:p/>
          </table:table-cell>
          <table:table-cell table:style-name="ce362" table:formula="of:=IF([.H27]=30;&quot;BUCHA!&quot;;IF([.H27]=90;&quot;SUPER!!&quot;;IF(AND([.H27]&gt;30;[.H27]&lt;90);&quot;ZEBRA!&quot;;&quot;&quot;)))">
            <text:p/>
          </table:table-cell>
          <table:table-cell table:style-name="ce369"/>
          <table:table-cell table:style-name="ce342" table:formula="of:=[$'Resultados Oficiais'.L27]" office:value-type="string" office:string-value="Espanha" calcext:value-type="string">
            <text:p>Espanha</text:p>
          </table:table-cell>
          <table:table-cell table:style-name="ce243" table:number-columns-repeated="2"/>
          <table:table-cell table:style-name="ce273" office:value-type="string" calcext:value-type="string">
            <text:p>Arábia S.</text:p>
            <draw:frame table:end-cell-address="'Cartão de Apostas'.O30" table:end-x="9.84pt" table:end-y="3.71pt" draw:z-index="2" draw:name="image6.png" draw:style-name="gr1" draw:text-style-name="P1" svg:width="27.72pt" svg:height="20.98pt" svg:x="48.76pt" svg:y="5.24pt">
              <draw:image xlink:href="Pictures/100002010000029B000002D058F00F5457A07490.png" xlink:type="simple" xlink:show="embed" xlink:actuate="onLoad">
                <text:p/>
              </draw:image>
            </draw:frame>
          </table:table-cell>
          <table:table-cell table:style-name="ce275" office:value-type="string" calcext:value-type="string">
            <office:annotation draw:style-name="gr7" draw:text-style-name="P3" svg:width="81.3pt" svg:height="61.68pt" svg:x="485.63pt" svg:y="186.66pt" draw:caption-point-x="-11.54pt" draw:caption-point-y="10.86pt">
              <dc:date>2026-05-01T00:00:00</dc:date>
              <text:p text:style-name="P2">Multiplica 3X os pontos em caso de aposta e VITÓRIA da ZEBRA.</text:p>
            </office:annotation>
            <text:p>3X</text:p>
          </table:table-cell>
          <table:table-cell table:style-name="ce357" table:formula="of:=IF(COUNTBLANK([$'Resultados Oficiais'.M27:.N27])&gt;0;&quot;&quot;;IF(COUNTBLANK([.L27:.M27])&gt;0;&quot;&quot;; IF(AND([.L27]=[$'Resultados Oficiais'.M27];[$'Resultados Oficiais'.N27]=[.M27]);30;IF([.L27]-[.M27]=[$'Resultados Oficiais'.M27]-[$'Resultados Oficiais'.N27];21;IF(OR(AND([.L27]-[.M27]&gt;0;[$'Resultados Oficiais'.M27]-[$'Resultados Oficiais'.N27]&gt;0);AND([.L27]-[.M27]&lt;0;[$'Resultados Oficiais'.M27]-[$'Resultados Oficiais'.N27]&lt;0));IF(OR([.L27]=[$'Resultados Oficiais'.M27];[$'Resultados Oficiais'.N27]=[.M27]);18;15);IF(OR([.L27]=[$'Resultados Oficiais'.M27];[$'Resultados Oficiais'.N27]=[.M27]);6;0))))))">
            <text:p/>
          </table:table-cell>
          <table:table-cell table:style-name="ce362" table:formula="of:=IF([.P27]=30;&quot;BUCHA!&quot;;IF([.P27]=90;&quot;SUPER!!&quot;;IF(AND([.P27]&gt;30;[.P27]&lt;90);&quot;ZEBRA!&quot;;&quot;&quot;)))">
            <text:p/>
          </table:table-cell>
          <table:table-cell table:style-name="ce278" office:value-type="string" calcext:value-type="string">
            <text:p>O7</text:p>
          </table:table-cell>
          <table:table-cell table:style-name="ce393" table:formula="of:=[$'Resultados Oficiais'.T27]" office:value-type="float" office:value="0" calcext:value-type="float">
            <text:p>0</text:p>
          </table:table-cell>
          <table:table-cell table:style-name="ce397" table:formula="of:=[$'Resultados Oficiais'.U27]" office:value-type="string" office:string-value="Vencedor do 13" calcext:value-type="string">
            <text:p>Vencedor do 13</text:p>
          </table:table-cell>
          <table:table-cell table:style-name="ce402"/>
          <table:table-cell table:style-name="ce243"/>
          <table:table-cell table:style-name="ce405" table:formula="of:=[$'Resultados Oficiais'.X27]" office:value-type="string" office:string-value="Vencedor do 14" calcext:value-type="string">
            <text:p>Vencedor do 14</text:p>
          </table:table-cell>
          <table:table-cell table:style-name="ce409" table:formula="of:=[$'Resultados Oficiais'.Y27]" office:value-type="float" office:value="0" calcext:value-type="float">
            <text:p>0</text:p>
          </table:table-cell>
          <table:table-cell table:style-name="ce357" table:formula="of:=IF(COUNTBLANK([$'Resultados Oficiais'.V10:.W10])&gt;0;&quot;&quot;;IF(COUNTBLANK([.U27:.V27])&gt;0;&quot;&quot;;IF(AND([.U27]=[$'Resultados Oficiais'.V10];[$'Resultados Oficiais'.W10]=[.V27]);100;IF([.U27]-[.V27]=[$'Resultados Oficiais'.V10]-[$'Resultados Oficiais'.W10];70;IF(OR(AND([.U27]-[.V27]&gt;0;[$'Resultados Oficiais'.V10]-[$'Resultados Oficiais'.W10]&gt;0);AND([.U27]-[.V27]&lt;0;[$'Resultados Oficiais'.V10]-[$'Resultados Oficiais'.W10]&lt;0));IF(OR([.U27]=[$'Resultados Oficiais'.V10];[$'Resultados Oficiais'.W10]=[.V27]);60;50);IF(OR([.U27]=[$'Resultados Oficiais'.V10];[$'Resultados Oficiais'.W10]=[.V27]);20;0))))))">
            <text:p/>
          </table:table-cell>
          <table:table-cell table:style-name="ce333" table:content-validation-name="val6"/>
          <table:table-cell table:style-name="ce357" table:formula="of:=IF(COUNTBLANK([$'Resultados Oficiais'.V10:.W10])&gt;0;&quot;&quot;;IF(COUNTBLANK([.U27:.V27])&gt;0;&quot;&quot;;IF([.Z27]=&quot;&quot;;&quot;&quot;;IF(#REF!=&quot;&quot;;0;IF(#REF!=[.Z27];50;0)))))">
            <text:p/>
          </table:table-cell>
          <table:table-cell table:style-name="ce420"/>
          <table:table-cell table:number-columns-repeated="996"/>
        </table:table-row>
        <table:table-row table:style-name="ro12">
          <table:table-cell table:style-name="ce218"/>
          <table:table-cell table:style-name="ce337"/>
          <table:table-cell table:style-name="ce342" table:formula="of:=[$'Resultados Oficiais'.D28]" office:value-type="string" office:string-value="Nova Zelândia" calcext:value-type="string">
            <text:p>Nova Zelândia</text:p>
          </table:table-cell>
          <table:table-cell table:style-name="ce243" table:number-columns-repeated="2"/>
          <table:table-cell table:style-name="ce351" table:formula="of:=[$'Resultados Oficiais'.G28]" office:value-type="string" office:string-value="Egito" calcext:value-type="string">
            <text:p>Egito</text:p>
          </table:table-cell>
          <table:table-cell table:style-name="ce355"/>
          <table:table-cell table:style-name="ce357" table:formula="of:=IF(COUNTBLANK([$'Resultados Oficiais'.E28:.F28])&gt;0;&quot;&quot;;IF(COUNTBLANK([.D28:.E28])&gt;0;&quot;&quot;; IF(AND([.D28]=[$'Resultados Oficiais'.E28];[$'Resultados Oficiais'.F28]=[.E28]);30;IF([.D28]-[.E28]=[$'Resultados Oficiais'.E28]-[$'Resultados Oficiais'.F28];21;IF(OR(AND([.D28]-[.E28]&gt;0;[$'Resultados Oficiais'.E28]-[$'Resultados Oficiais'.F28]&gt;0);AND([.D28]-[.E28]&lt;0;[$'Resultados Oficiais'.E28]-[$'Resultados Oficiais'.F28]&lt;0));IF(OR([.D28]=[$'Resultados Oficiais'.E28];[$'Resultados Oficiais'.F28]=[.E28]);18;15);IF(OR([.D28]=[$'Resultados Oficiais'.E28];[$'Resultados Oficiais'.F28]=[.E28]);6;0))))))">
            <text:p/>
          </table:table-cell>
          <table:table-cell table:style-name="ce362" table:formula="of:=IF([.H28]=30;&quot;BUCHA!&quot;;IF([.H28]=90;&quot;SUPER!!&quot;;IF(AND([.H28]&gt;30;[.H28]&lt;90);&quot;ZEBRA!&quot;;&quot;&quot;)))">
            <text:p/>
          </table:table-cell>
          <table:table-cell table:style-name="ce369"/>
          <table:table-cell table:style-name="ce342" table:formula="of:=[$'Resultados Oficiais'.L28]" office:value-type="string" office:string-value="Uruguai" calcext:value-type="string">
            <text:p>Uruguai</text:p>
          </table:table-cell>
          <table:table-cell table:style-name="ce243" table:number-columns-repeated="2"/>
          <table:table-cell table:style-name="ce349" table:formula="of:=[$'Resultados Oficiais'.O28]" office:value-type="string" office:string-value="Cabo Verde" calcext:value-type="string">
            <text:p>Cabo Verde</text:p>
          </table:table-cell>
          <table:table-cell table:style-name="ce356"/>
          <table:table-cell table:style-name="ce357" table:formula="of:=IF(COUNTBLANK([$'Resultados Oficiais'.M28:.N28])&gt;0;&quot;&quot;;IF(COUNTBLANK([.L28:.M28])&gt;0;&quot;&quot;; IF(AND([.L28]=[$'Resultados Oficiais'.M28];[$'Resultados Oficiais'.N28]=[.M28]);30;IF([.L28]-[.M28]=[$'Resultados Oficiais'.M28]-[$'Resultados Oficiais'.N28];21;IF(OR(AND([.L28]-[.M28]&gt;0;[$'Resultados Oficiais'.M28]-[$'Resultados Oficiais'.N28]&gt;0);AND([.L28]-[.M28]&lt;0;[$'Resultados Oficiais'.M28]-[$'Resultados Oficiais'.N28]&lt;0));IF(OR([.L28]=[$'Resultados Oficiais'.M28];[$'Resultados Oficiais'.N28]=[.M28]);18;15);IF(OR([.L28]=[$'Resultados Oficiais'.M28];[$'Resultados Oficiais'.N28]=[.M28]);6;0))))))">
            <text:p/>
          </table:table-cell>
          <table:table-cell table:style-name="ce362" table:formula="of:=IF([.P28]=30;&quot;BUCHA!&quot;;IF([.P28]=90;&quot;SUPER!!&quot;;IF(AND([.P28]&gt;30;[.P28]&lt;90);&quot;ZEBRA!&quot;;&quot;&quot;)))">
            <text:p/>
          </table:table-cell>
          <table:table-cell table:style-name="ce278" office:value-type="string" calcext:value-type="string">
            <text:p>O8</text:p>
          </table:table-cell>
          <table:table-cell table:style-name="ce393" table:formula="of:=[$'Resultados Oficiais'.T28]" office:value-type="float" office:value="0" calcext:value-type="float">
            <text:p>0</text:p>
          </table:table-cell>
          <table:table-cell table:style-name="ce397" table:formula="of:=[$'Resultados Oficiais'.U28]" office:value-type="string" office:string-value="Vencedor do 15" calcext:value-type="string">
            <text:p>Vencedor do 15</text:p>
          </table:table-cell>
          <table:table-cell table:style-name="ce402"/>
          <table:table-cell table:style-name="ce243"/>
          <table:table-cell table:style-name="ce405" table:formula="of:=[$'Resultados Oficiais'.X28]" office:value-type="string" office:string-value="Vencedor do 16" calcext:value-type="string">
            <text:p>Vencedor do 16</text:p>
          </table:table-cell>
          <table:table-cell table:style-name="ce409" table:formula="of:=[$'Resultados Oficiais'.Y28]" office:value-type="float" office:value="0" calcext:value-type="float">
            <text:p>0</text:p>
          </table:table-cell>
          <table:table-cell table:style-name="ce357" table:formula="of:=IF(COUNTBLANK([$'Resultados Oficiais'.V11:.W11])&gt;0;&quot;&quot;;IF(COUNTBLANK([.U28:.V28])&gt;0;&quot;&quot;;IF(AND([.U28]=[$'Resultados Oficiais'.V11];[$'Resultados Oficiais'.W11]=[.V28]);100;IF([.U28]-[.V28]=[$'Resultados Oficiais'.V11]-[$'Resultados Oficiais'.W11];70;IF(OR(AND([.U28]-[.V28]&gt;0;[$'Resultados Oficiais'.V11]-[$'Resultados Oficiais'.W11]&gt;0);AND([.U28]-[.V28]&lt;0;[$'Resultados Oficiais'.V11]-[$'Resultados Oficiais'.W11]&lt;0));IF(OR([.U28]=[$'Resultados Oficiais'.V11];[$'Resultados Oficiais'.W11]=[.V28]);60;50);IF(OR([.U28]=[$'Resultados Oficiais'.V11];[$'Resultados Oficiais'.W11]=[.V28]);20;0))))))">
            <text:p/>
          </table:table-cell>
          <table:table-cell table:style-name="ce333" table:content-validation-name="val6"/>
          <table:table-cell table:style-name="ce357" table:formula="of:=IF(COUNTBLANK([$'Resultados Oficiais'.V11:.W11])&gt;0;&quot;&quot;;IF(COUNTBLANK([.U28:.V28])&gt;0;&quot;&quot;;IF([.Z28]=&quot;&quot;;&quot;&quot;;IF(#REF!=&quot;&quot;;0;IF(#REF!=[.Z28];50;0)))))">
            <text:p/>
          </table:table-cell>
          <table:table-cell table:style-name="ce421" table:formula="of:=IF([.Y31]=&quot;&quot;;&quot;&quot;;IF([.Y31]+[.AA31]=300;&quot;SUPER!!&quot;;IF([.Y31]=200;&quot;BUCHA!&quot;;&quot;&quot;)))">
            <text:p/>
          </table:table-cell>
          <table:table-cell table:number-columns-repeated="996"/>
        </table:table-row>
        <table:table-row table:style-name="ro12">
          <table:table-cell table:style-name="ce218" table:formula="of:=IF(COUNTBLANK([$'Resultados Oficiais'.M29:.N29])&gt;0;&quot;&quot;;IF(COUNTBLANK([.L29:.M29])&gt;0;&quot;&quot;; IF(AND([.L29]=[$'Resultados Oficiais'.M29];[$'Resultados Oficiais'.N29]=[.M29]);30;IF([.L29]-[.M29]=[$'Resultados Oficiais'.M29]-[$'Resultados Oficiais'.N29];21;IF(OR(AND([.L29]-[.M29]&gt;0;[$'Resultados Oficiais'.M29]-[$'Resultados Oficiais'.N29]&gt;0);AND([.L29]-[.M29]&lt;0;[$'Resultados Oficiais'.M29]-[$'Resultados Oficiais'.N29]&lt;0));IF(OR([.L29]=[$'Resultados Oficiais'.M29];[$'Resultados Oficiais'.N29]=[.M29]);18;15);IF(OR([.L29]=[$'Resultados Oficiais'.M29];[$'Resultados Oficiais'.N29]=[.M29]);6;0))))))">
            <text:p/>
          </table:table-cell>
          <table:table-cell table:style-name="ce229" office:value-type="string" calcext:value-type="string">
            <office:annotation draw:style-name="gr7" draw:text-style-name="P3" svg:width="176.4pt" svg:height="28.09pt" svg:x="39.03pt" svg:y="218.47pt" draw:caption-point-x="-11.54pt" draw:caption-point-y="-5.95pt">
              <dc:date>2026-05-01T00:00:00</dc:date>
              <text:p text:style-name="P2">Multiplica 2X os pontos em caso de aposta e VITÓRIA da ZEBRA.</text:p>
            </office:annotation>
            <text:p>3X</text:p>
            <draw:frame table:end-cell-address="'Cartão de Apostas'.C32" table:end-x="23.61pt" table:end-y="2.98pt" draw:z-index="3" draw:name="image6.png" draw:style-name="gr1" draw:text-style-name="P1" svg:width="27.72pt" svg:height="20.98pt" svg:x="10.49pt" svg:y="4.51pt">
              <draw:image xlink:href="Pictures/100002010000029B000002D058F00F5457A07490.png" xlink:type="simple" xlink:show="embed" xlink:actuate="onLoad">
                <text:p/>
              </draw:image>
            </draw:frame>
          </table:table-cell>
          <table:table-cell table:style-name="ce343" table:formula="of:=[$'Resultados Oficiais'.D29]" office:value-type="string" office:string-value="N. Zelândia" calcext:value-type="string">
            <text:p>N. Zelândia</text:p>
          </table:table-cell>
          <table:table-cell table:style-name="ce243" table:number-columns-repeated="2"/>
          <table:table-cell table:style-name="ce351" table:formula="of:=[$'Resultados Oficiais'.G29]" office:value-type="string" office:string-value="Bélgica" calcext:value-type="string">
            <text:p>Bélgica</text:p>
          </table:table-cell>
          <table:table-cell table:style-name="ce355"/>
          <table:table-cell table:style-name="ce357" table:formula="of:=IF(COUNTBLANK([$'Resultados Oficiais'.E29:.F29])&gt;0;&quot;&quot;;IF(COUNTBLANK([.D29:.E29])&gt;0;&quot;&quot;; IF(AND([.D29]=[$'Resultados Oficiais'.E29];[$'Resultados Oficiais'.F29]=[.E29]);30;IF([.D29]-[.E29]=[$'Resultados Oficiais'.E29]-[$'Resultados Oficiais'.F29];21;IF(OR(AND([.D29]-[.E29]&gt;0;[$'Resultados Oficiais'.E29]-[$'Resultados Oficiais'.F29]&gt;0);AND([.D29]-[.E29]&lt;0;[$'Resultados Oficiais'.E29]-[$'Resultados Oficiais'.F29]&lt;0));IF(OR([.D29]=[$'Resultados Oficiais'.E29];[$'Resultados Oficiais'.F29]=[.E29]);18;15);IF(OR([.D29]=[$'Resultados Oficiais'.E29];[$'Resultados Oficiais'.F29]=[.E29]);6;0))))))">
            <text:p/>
          </table:table-cell>
          <table:table-cell table:style-name="ce362" table:formula="of:=IF([.H29]=30;&quot;BUCHA!&quot;;IF([.H29]=90;&quot;SUPER!!&quot;;IF(AND([.H29]&gt;30;[.H29]&lt;90);&quot;ZEBRA!&quot;;&quot;&quot;)))">
            <text:p/>
          </table:table-cell>
          <table:table-cell table:style-name="ce369"/>
          <table:table-cell table:style-name="ce342" table:formula="of:=[$'Resultados Oficiais'.L29]" office:value-type="string" office:string-value="Espanha" calcext:value-type="string">
            <text:p>Espanha</text:p>
          </table:table-cell>
          <table:table-cell table:style-name="ce243" table:number-columns-repeated="2"/>
          <table:table-cell table:style-name="ce349" table:formula="of:=[$'Resultados Oficiais'.O29]" office:value-type="string" office:string-value="Uruguai" calcext:value-type="string">
            <text:p>Uruguai</text:p>
          </table:table-cell>
          <table:table-cell table:style-name="ce356"/>
          <table:table-cell table:style-name="ce357" table:formula="of:=IF([.A29]=&quot;&quot;;&quot;&quot;;IF(AND([.L29]&gt;[.M29];[$'Resultados Oficiais'.M29]&gt;[$'Resultados Oficiais'.N29]);[.A29]*3;[.A29]))">
            <text:p/>
          </table:table-cell>
          <table:table-cell table:style-name="ce362" table:formula="of:=IF([.P29]=30;&quot;BUCHA!&quot;;IF([.P29]=90;&quot;SUPER!!&quot;;IF(AND([.P29]&gt;30;[.P29]&lt;90);&quot;ZEBRA!&quot;;&quot;&quot;)))">
            <text:p/>
          </table:table-cell>
          <table:table-cell table:style-name="ce281" office:value-type="string" calcext:value-type="string">
            <text:p>X</text:p>
          </table:table-cell>
          <table:table-cell table:style-name="ce305" table:number-columns-repeated="10"/>
          <table:table-cell table:number-columns-repeated="996"/>
        </table:table-row>
        <table:table-row table:style-name="ro12">
          <table:table-cell table:style-name="ce218"/>
          <table:table-cell table:style-name="ce337"/>
          <table:table-cell table:style-name="ce342" table:formula="of:=[$'Resultados Oficiais'.D30]" office:value-type="string" office:string-value="Egito" calcext:value-type="string">
            <text:p>Egito</text:p>
          </table:table-cell>
          <table:table-cell table:style-name="ce243" table:number-columns-repeated="2"/>
          <table:table-cell table:style-name="ce351" table:formula="of:=[$'Resultados Oficiais'.G30]" office:value-type="string" office:string-value="Irã" calcext:value-type="string">
            <text:p>Irã</text:p>
          </table:table-cell>
          <table:table-cell table:style-name="ce355"/>
          <table:table-cell table:style-name="ce357" table:formula="of:=IF(COUNTBLANK([$'Resultados Oficiais'.E30:.F30])&gt;0;&quot;&quot;;IF(COUNTBLANK([.D30:.E30])&gt;0;&quot;&quot;; IF(AND([.D30]=[$'Resultados Oficiais'.E30];[$'Resultados Oficiais'.F30]=[.E30]);30;IF([.D30]-[.E30]=[$'Resultados Oficiais'.E30]-[$'Resultados Oficiais'.F30];21;IF(OR(AND([.D30]-[.E30]&gt;0;[$'Resultados Oficiais'.E30]-[$'Resultados Oficiais'.F30]&gt;0);AND([.D30]-[.E30]&lt;0;[$'Resultados Oficiais'.E30]-[$'Resultados Oficiais'.F30]&lt;0));IF(OR([.D30]=[$'Resultados Oficiais'.E30];[$'Resultados Oficiais'.F30]=[.E30]);18;15);IF(OR([.D30]=[$'Resultados Oficiais'.E30];[$'Resultados Oficiais'.F30]=[.E30]);6;0))))))">
            <text:p/>
          </table:table-cell>
          <table:table-cell table:style-name="ce362" table:formula="of:=IF([.H30]=30;&quot;BUCHA!&quot;;IF([.H30]=90;&quot;SUPER!!&quot;;IF(AND([.H30]&gt;30;[.H30]&lt;90);&quot;ZEBRA!&quot;;&quot;&quot;)))">
            <text:p/>
          </table:table-cell>
          <table:table-cell table:style-name="ce369"/>
          <table:table-cell table:style-name="ce342" table:formula="of:=[$'Resultados Oficiais'.L30]" office:value-type="string" office:string-value="Cabo Verde" calcext:value-type="string">
            <text:p>Cabo Verde</text:p>
          </table:table-cell>
          <table:table-cell table:style-name="ce243" table:number-columns-repeated="2"/>
          <table:table-cell table:style-name="ce349" table:formula="of:=[$'Resultados Oficiais'.O30]" office:value-type="string" office:string-value="Arábia Saudita" calcext:value-type="string">
            <text:p>Arábia Saudita</text:p>
          </table:table-cell>
          <table:table-cell table:style-name="ce356"/>
          <table:table-cell table:style-name="ce357" table:formula="of:=IF(COUNTBLANK([$'Resultados Oficiais'.M30:.N30])&gt;0;&quot;&quot;;IF(COUNTBLANK([.L30:.M30])&gt;0;&quot;&quot;; IF(AND([.L30]=[$'Resultados Oficiais'.M30];[$'Resultados Oficiais'.N30]=[.M30]);30;IF([.L30]-[.M30]=[$'Resultados Oficiais'.M30]-[$'Resultados Oficiais'.N30];21;IF(OR(AND([.L30]-[.M30]&gt;0;[$'Resultados Oficiais'.M30]-[$'Resultados Oficiais'.N30]&gt;0);AND([.L30]-[.M30]&lt;0;[$'Resultados Oficiais'.M30]-[$'Resultados Oficiais'.N30]&lt;0));IF(OR([.L30]=[$'Resultados Oficiais'.M30];[$'Resultados Oficiais'.N30]=[.M30]);18;15);IF(OR([.L30]=[$'Resultados Oficiais'.M30];[$'Resultados Oficiais'.N30]=[.M30]);6;0))))))">
            <text:p/>
          </table:table-cell>
          <table:table-cell table:style-name="ce362" table:formula="of:=IF([.P30]=30;&quot;BUCHA!&quot;;IF([.P30]=90;&quot;SUPER!!&quot;;IF(AND([.P30]&gt;30;[.P30]&lt;90);&quot;ZEBRA!&quot;;&quot;&quot;)))">
            <text:p/>
          </table:table-cell>
          <table:table-cell table:style-name="ce281" office:value-type="string" calcext:value-type="string">
            <text:p>X</text:p>
          </table:table-cell>
          <table:table-cell table:style-name="ce287"/>
          <table:table-cell table:style-name="ce303" office:value-type="string" calcext:value-type="string" table:number-columns-spanned="4" table:number-rows-spanned="1">
            <office:annotation draw:style-name="gr6" draw:text-style-name="P3" svg:width="124.33pt" svg:height="106.47pt" svg:x="633.6pt" svg:y="205.51pt" draw:caption-point-x="98.19pt" draw:caption-point-y="14.51pt">
              <dc:date>2026-05-01T00:00:00</dc:date>
              <text:p text:style-name="P2">QUARTAS</text:p>
              <text:p text:style-name="P2">&gt;&gt; Aposta para 90 minutos + eventual prorrogação!</text:p>
              <text:p text:style-name="P2"/>
              <text:p text:style-name="P2">Bucha: 200 pontos.</text:p>
              <text:p text:style-name="P2">Demais: 140, 120, 100, 40.</text:p>
              <text:p text:style-name="P2">Pênaltis: 100 pontos.</text:p>
            </office:annotation>
            <text:p>Quartas</text:p>
          </table:table-cell>
          <table:covered-table-cell table:number-columns-repeated="3" table:style-name="ce310"/>
          <table:table-cell table:style-name="ce325"/>
          <table:table-cell table:style-name="ce271" office:value-type="string" calcext:value-type="string">
            <text:p>PTS</text:p>
          </table:table-cell>
          <table:table-cell table:style-name="ce332" office:value-type="string" calcext:value-type="string">
            <office:annotation draw:style-name="gr8" draw:text-style-name="P3" svg:width="191.76pt" svg:height="50.49pt" svg:x="859.38pt" svg:y="214.78pt" draw:caption-point-x="-11.54pt" draw:caption-point-y="5.24pt">
              <dc:date>2026-05-01T00:00:00</dc:date>
              <text:p text:style-name="P2">Os pênaltis terão pontuação EXTRA, independente da aposta feita no tempo de jogo. Ou seja: se o jogo for para os pênaltis, quem vence?</text:p>
            </office:annotation>
            <text:p>Pênaltis</text:p>
          </table:table-cell>
          <table:table-cell table:style-name="ce414" office:value-type="string" calcext:value-type="string">
            <text:p>EXTRA</text:p>
          </table:table-cell>
          <table:table-cell table:style-name="ce421"/>
          <table:table-cell table:number-columns-repeated="996"/>
        </table:table-row>
        <table:table-row table:style-name="ro12">
          <table:table-cell table:style-name="ce217"/>
          <table:table-cell table:style-name="ce307" table:number-columns-repeated="2"/>
          <table:table-cell table:style-name="ce236" office:value-type="string" calcext:value-type="string" table:number-columns-spanned="2" table:number-rows-spanned="1">
            <text:p>Grupo I</text:p>
          </table:table-cell>
          <table:covered-table-cell/>
          <table:table-cell table:style-name="ce350" table:number-columns-repeated="2"/>
          <table:table-cell table:style-name="ce359"/>
          <table:table-cell table:style-name="ce363"/>
          <table:table-cell table:style-name="ce371"/>
          <table:table-cell table:style-name="ce350"/>
          <table:table-cell table:style-name="ce236" office:value-type="string" calcext:value-type="string" table:number-columns-spanned="2" table:number-rows-spanned="1">
            <text:p>Grupo J</text:p>
          </table:table-cell>
          <table:covered-table-cell/>
          <table:table-cell table:style-name="ce307"/>
          <table:table-cell table:style-name="ce271" table:number-columns-repeated="2"/>
          <table:table-cell table:style-name="ce384"/>
          <table:table-cell table:style-name="ce278" office:value-type="string" calcext:value-type="string">
            <text:p>Q1</text:p>
          </table:table-cell>
          <table:table-cell table:style-name="ce394"/>
          <table:table-cell table:style-name="ce399" table:formula="of:=[$'Resultados Oficiais'.U31]" office:value-type="string" office:string-value="Vencedor O1" calcext:value-type="string">
            <text:p>Vencedor O1</text:p>
          </table:table-cell>
          <table:table-cell table:style-name="ce243" table:number-columns-repeated="2"/>
          <table:table-cell table:style-name="ce406" table:formula="of:=[$'Resultados Oficiais'.X31]" office:value-type="string" office:string-value="Vencedor O2" calcext:value-type="string">
            <text:p>Vencedor O2</text:p>
          </table:table-cell>
          <table:table-cell table:style-name="ce410"/>
          <table:table-cell table:style-name="ce357" table:formula="of:=IF(COUNTBLANK([$'Resultados Oficiais'.V14:.W14])&gt;0;&quot;&quot;;IF(COUNTBLANK([.U31:.V31])&gt;0;&quot;&quot;;IF(AND([.U31]=[$'Resultados Oficiais'.V14];[$'Resultados Oficiais'.W14]=[.V31]);200;IF([.U31]-[.V31]=[$'Resultados Oficiais'.V14]-[$'Resultados Oficiais'.W14];140;IF(OR(AND([.U31]-[.V31]&gt;0;[$'Resultados Oficiais'.V14]-[$'Resultados Oficiais'.W14]&gt;0);AND([.U31]-[.V31]&lt;0;[$'Resultados Oficiais'.V14]-[$'Resultados Oficiais'.W14]&lt;0));IF(OR([.U31]=[$'Resultados Oficiais'.V14];[$'Resultados Oficiais'.W14]=[.V31]);120;100);IF(OR([.U31]=[$'Resultados Oficiais'.V14];[$'Resultados Oficiais'.W14]=[.V31]);40;0))))))">
            <text:p/>
          </table:table-cell>
          <table:table-cell table:style-name="ce333" table:content-validation-name="val6"/>
          <table:table-cell table:style-name="ce357" table:formula="of:=IF(COUNTBLANK([$'Resultados Oficiais'.V14:.W14])&gt;0;&quot;&quot;;IF(COUNTBLANK([.U31:.V31])&gt;0;&quot;&quot;;IF([.Z31]=&quot;&quot;;&quot;&quot;;IF(#REF!=&quot;&quot;;0;IF(#REF!=[.Z31];100;0)))))">
            <text:p/>
          </table:table-cell>
          <table:table-cell table:style-name="ce419" table:formula="of:=IF([.Y34]=&quot;&quot;;&quot;&quot;;IF([.Y34]+[.AA34]=400;&quot;SUPER!!&quot;;IF([.Y34]=200;&quot;BUCHA!&quot;;IF([.Y34]=600;&quot;SUPER!!&quot;;IF(AND([.Y34]&gt;200;[.Y34]&lt;600);&quot;ZEBRA!&quot;;&quot;&quot;)))))">
            <text:p/>
          </table:table-cell>
          <table:table-cell table:number-columns-repeated="996"/>
        </table:table-row>
        <table:table-row table:style-name="ro12">
          <table:table-cell table:style-name="ce218"/>
          <table:table-cell table:style-name="ce337"/>
          <table:table-cell table:style-name="ce342" table:formula="of:=[$'Resultados Oficiais'.D32]" office:value-type="string" office:string-value="França" calcext:value-type="string">
            <text:p>França</text:p>
          </table:table-cell>
          <table:table-cell table:style-name="ce243" table:number-columns-repeated="2"/>
          <table:table-cell table:style-name="ce349" table:formula="of:=[$'Resultados Oficiais'.G32]" office:value-type="string" office:string-value="Senegal" calcext:value-type="string">
            <text:p>Senegal</text:p>
          </table:table-cell>
          <table:table-cell table:style-name="ce356"/>
          <table:table-cell table:style-name="ce357" table:formula="of:=IF(COUNTBLANK([$'Resultados Oficiais'.E32:.F32])&gt;0;&quot;&quot;;IF(COUNTBLANK([.D32:.E32])&gt;0;&quot;&quot;; IF(AND([.D32]=[$'Resultados Oficiais'.E32];[$'Resultados Oficiais'.F32]=[.E32]);30;IF([.D32]-[.E32]=[$'Resultados Oficiais'.E32]-[$'Resultados Oficiais'.F32];21;IF(OR(AND([.D32]-[.E32]&gt;0;[$'Resultados Oficiais'.E32]-[$'Resultados Oficiais'.F32]&gt;0);AND([.D32]-[.E32]&lt;0;[$'Resultados Oficiais'.E32]-[$'Resultados Oficiais'.F32]&lt;0));IF(OR([.D32]=[$'Resultados Oficiais'.E32];[$'Resultados Oficiais'.F32]=[.E32]);18;15);IF(OR([.D32]=[$'Resultados Oficiais'.E32];[$'Resultados Oficiais'.F32]=[.E32]);6;0))))))">
            <text:p/>
          </table:table-cell>
          <table:table-cell table:style-name="ce362" table:formula="of:=IF([.H32]=30;&quot;BUCHA!&quot;;IF([.H32]=90;&quot;SUPER!!&quot;;IF(AND([.H32]&gt;30;[.H32]&lt;90);&quot;ZEBRA!&quot;;&quot;&quot;)))">
            <text:p/>
          </table:table-cell>
          <table:table-cell table:style-name="ce337"/>
          <table:table-cell table:style-name="ce342" table:formula="of:=[$'Resultados Oficiais'.L32]" office:value-type="string" office:string-value="Argentina" calcext:value-type="string">
            <text:p>Argentina</text:p>
          </table:table-cell>
          <table:table-cell table:style-name="ce243" table:number-columns-repeated="2"/>
          <table:table-cell table:style-name="ce349" table:formula="of:=[$'Resultados Oficiais'.O32]" office:value-type="string" office:string-value="Argélia" calcext:value-type="string">
            <text:p>Argélia</text:p>
          </table:table-cell>
          <table:table-cell table:style-name="ce356"/>
          <table:table-cell table:style-name="ce357" table:formula="of:=IF(COUNTBLANK([$'Resultados Oficiais'.O32:.Q32])&gt;0;&quot;&quot;;IF(COUNTBLANK([.L32:.M32])&gt;0;&quot;&quot;; IF(AND([.L32]=[$'Resultados Oficiais'.O32];[$'Resultados Oficiais'.Q32]=[.M32]);30;IF([.L32]-[.M32]=[$'Resultados Oficiais'.O32]-[$'Resultados Oficiais'.Q32];21;IF(OR(AND([.L32]-[.M32]&gt;0;[$'Resultados Oficiais'.O32]-[$'Resultados Oficiais'.Q32]&gt;0);AND([.L32]-[.M32]&lt;0;[$'Resultados Oficiais'.O32]-[$'Resultados Oficiais'.Q32]&lt;0));IF(OR([.L32]=[$'Resultados Oficiais'.O32];[$'Resultados Oficiais'.Q32]=[.M32]);18;15);IF(OR([.L32]=[$'Resultados Oficiais'.O32];[$'Resultados Oficiais'.Q32]=[.M32]);6;0))))))">
            <text:p/>
          </table:table-cell>
          <table:table-cell table:style-name="ce362" table:formula="of:=IF([.P32]=30;&quot;BUCHA!&quot;;IF([.P32]=90;&quot;SUPER!!&quot;;IF(AND([.P32]&gt;30;[.P32]&lt;90);&quot;ZEBRA!&quot;;&quot;&quot;)))">
            <text:p/>
          </table:table-cell>
          <table:table-cell table:style-name="ce278" office:value-type="string" calcext:value-type="string">
            <text:p>Q2</text:p>
          </table:table-cell>
          <table:table-cell table:style-name="ce394"/>
          <table:table-cell table:style-name="ce399" table:formula="of:=[$'Resultados Oficiais'.U32]" office:value-type="string" office:string-value="Vencedor O3" calcext:value-type="string">
            <text:p>Vencedor O3</text:p>
          </table:table-cell>
          <table:table-cell table:style-name="ce243" table:number-columns-repeated="2"/>
          <table:table-cell table:style-name="ce406" table:formula="of:=[$'Resultados Oficiais'.X32]" office:value-type="string" office:string-value="Vencedor O4" calcext:value-type="string">
            <text:p>Vencedor O4</text:p>
          </table:table-cell>
          <table:table-cell table:style-name="ce410"/>
          <table:table-cell table:style-name="ce357" table:formula="of:=IF([.A15]=&quot;&quot;;&quot;&quot;;IF(AND([.V32]&lt;[.U32];[$'Resultados Oficiais'.W15]&lt;[$'Resultados Oficiais'.V15]);[.A15]*3;[.A15]))">
            <text:p/>
          </table:table-cell>
          <table:table-cell table:style-name="ce333" table:content-validation-name="val6"/>
          <table:table-cell table:style-name="ce357" table:formula="of:=IF(COUNTBLANK([$'Resultados Oficiais'.V15:.W15])&gt;0;&quot;&quot;;IF(COUNTBLANK([.U32:.V32])&gt;0;&quot;&quot;;IF([.Z32]=&quot;&quot;;&quot;&quot;;IF(#REF!=&quot;&quot;;0;IF(#REF!=[.Z32];100;0)))))">
            <text:p/>
          </table:table-cell>
          <table:table-cell table:style-name="ce420"/>
          <table:table-cell table:number-columns-repeated="996"/>
        </table:table-row>
        <table:table-row table:style-name="ro12">
          <table:table-cell table:style-name="ce218" table:formula="of:=IF(COUNTBLANK([$'Resultados Oficiais'.E51:.F51])&gt;0;&quot;&quot;;IF(COUNTBLANK([.D33:.E33])&gt;0;&quot;&quot;; IF(AND([.D33]=[$'Resultados Oficiais'.E51];[$'Resultados Oficiais'.F51]=[.E33]);30;IF([.D33]-[.E33]=[$'Resultados Oficiais'.E51]-[$'Resultados Oficiais'.F51];21;IF(OR(AND([.D33]-[.E33]&gt;0;[$'Resultados Oficiais'.E51]-[$'Resultados Oficiais'.F51]&gt;0);AND([.D33]-[.E33]&lt;0;[$'Resultados Oficiais'.E51]-[$'Resultados Oficiais'.F51]&lt;0));IF(OR([.D33]=[$'Resultados Oficiais'.E51];[$'Resultados Oficiais'.F51]=[.E33]);18;15);IF(OR([.D33]=[$'Resultados Oficiais'.E51];[$'Resultados Oficiais'.F51]=[.E33]);6;0))))))">
            <text:p/>
          </table:table-cell>
          <table:table-cell table:style-name="ce337"/>
          <table:table-cell table:style-name="ce342" table:formula="of:=[$'Resultados Oficiais'.D33]" office:value-type="string" office:string-value="Iraque" calcext:value-type="string">
            <text:p>Iraque</text:p>
          </table:table-cell>
          <table:table-cell table:style-name="ce243" table:number-columns-repeated="2"/>
          <table:table-cell table:style-name="ce349" table:formula="of:=[$'Resultados Oficiais'.G33]" office:value-type="string" office:string-value="Noruega" calcext:value-type="string">
            <text:p>Noruega</text:p>
          </table:table-cell>
          <table:table-cell table:style-name="ce356"/>
          <table:table-cell table:style-name="ce357" table:formula="of:=IF([.A33]=&quot;&quot;;&quot;&quot;;IF(AND([.E33]&gt;[.D33];[$'Resultados Oficiais'.F33]&gt;[$'Resultados Oficiais'.E33]);[.A33]*3;[.A33]))">
            <text:p/>
          </table:table-cell>
          <table:table-cell table:style-name="ce362" table:formula="of:=IF([.H33]=30;&quot;BUCHA!&quot;;IF([.H33]=90;&quot;SUPER!!&quot;;IF(AND([.H33]&gt;30;[.H33]&lt;90);&quot;ZEBRA!&quot;;&quot;&quot;)))">
            <text:p/>
          </table:table-cell>
          <table:table-cell table:style-name="ce337"/>
          <table:table-cell table:style-name="ce342" table:formula="of:=[$'Resultados Oficiais'.L33]" office:value-type="string" office:string-value="Áustria" calcext:value-type="string">
            <text:p>Áustria</text:p>
          </table:table-cell>
          <table:table-cell table:style-name="ce243" table:number-columns-repeated="2"/>
          <table:table-cell table:style-name="ce349" table:formula="of:=[$'Resultados Oficiais'.O33]" office:value-type="string" office:string-value="Jordânia" calcext:value-type="string">
            <text:p>Jordânia</text:p>
          </table:table-cell>
          <table:table-cell table:style-name="ce356"/>
          <table:table-cell table:style-name="ce357" table:formula="of:=IF([.I33]=&quot;&quot;;&quot;&quot;;IF(AND([.M33]&gt;[.L33];[$'Resultados Oficiais'.Q33]&gt;[$'Resultados Oficiais'.O33]);[.I33]*3;[.I33]))">
            <text:p/>
          </table:table-cell>
          <table:table-cell table:style-name="ce362" table:formula="of:=IF([.P33]=30;&quot;BUCHA!&quot;;IF([.P33]=90;&quot;SUPER!!&quot;;IF(AND([.P33]&gt;30;[.P33]&lt;90);&quot;ZEBRA!&quot;;&quot;&quot;)))">
            <text:p/>
          </table:table-cell>
          <table:table-cell table:style-name="ce278" office:value-type="string" calcext:value-type="string">
            <text:p>Q3</text:p>
          </table:table-cell>
          <table:table-cell table:style-name="ce394"/>
          <table:table-cell table:style-name="ce399" table:formula="of:=[$'Resultados Oficiais'.U33]" office:value-type="string" office:string-value="Vencedor O5" calcext:value-type="string">
            <text:p>Vencedor O5</text:p>
          </table:table-cell>
          <table:table-cell table:style-name="ce243" table:number-columns-repeated="2"/>
          <table:table-cell table:style-name="ce406" table:formula="of:=[$'Resultados Oficiais'.X33]" office:value-type="string" office:string-value="Vencedor O6" calcext:value-type="string">
            <text:p>Vencedor O6</text:p>
          </table:table-cell>
          <table:table-cell table:style-name="ce410"/>
          <table:table-cell table:style-name="ce357" table:formula="of:=IF(COUNTBLANK([$'Resultados Oficiais'.V16:.W16])&gt;0;&quot;&quot;;IF(COUNTBLANK([.U33:.V33])&gt;0;&quot;&quot;;IF(AND([.U33]=[$'Resultados Oficiais'.V16];[$'Resultados Oficiais'.W16]=[.V33]);200;IF([.U33]-[.V33]=[$'Resultados Oficiais'.V16]-[$'Resultados Oficiais'.W16];140;IF(OR(AND([.U33]-[.V33]&gt;0;[$'Resultados Oficiais'.V16]-[$'Resultados Oficiais'.W16]&gt;0);AND([.U33]-[.V33]&lt;0;[$'Resultados Oficiais'.V16]-[$'Resultados Oficiais'.W16]&lt;0));IF(OR([.U33]=[$'Resultados Oficiais'.V16];[$'Resultados Oficiais'.W16]=[.V33]);120;100);IF(OR([.U33]=[$'Resultados Oficiais'.V16];[$'Resultados Oficiais'.W16]=[.V33]);40;0))))))">
            <text:p/>
          </table:table-cell>
          <table:table-cell table:style-name="ce333" table:content-validation-name="val6"/>
          <table:table-cell table:style-name="ce357" table:formula="of:=IF(COUNTBLANK([$'Resultados Oficiais'.V16:.W16])&gt;0;&quot;&quot;;IF(COUNTBLANK([.U33:.V33])&gt;0;&quot;&quot;;IF([.Z33]=&quot;&quot;;&quot;&quot;;IF(#REF!=&quot;&quot;;0;IF(#REF!=[.Z33];100;0)))))">
            <text:p/>
          </table:table-cell>
          <table:table-cell table:style-name="ce420"/>
          <table:table-cell table:number-columns-repeated="996"/>
        </table:table-row>
        <table:table-row table:style-name="ro12">
          <table:table-cell table:style-name="ce218"/>
          <table:table-cell table:style-name="ce337"/>
          <table:table-cell table:style-name="ce342" table:formula="of:=[$'Resultados Oficiais'.D34]" office:value-type="string" office:string-value="França" calcext:value-type="string">
            <text:p>França</text:p>
          </table:table-cell>
          <table:table-cell table:style-name="ce243" table:number-columns-repeated="2"/>
          <table:table-cell table:style-name="ce250" office:value-type="string" calcext:value-type="string">
            <text:p>Iraque</text:p>
            <draw:frame table:end-cell-address="'Cartão de Apostas'.G37" table:end-x="5.33pt" table:end-y="1.47pt" draw:z-index="10" draw:name="image6.png" draw:style-name="gr1" draw:text-style-name="P1" svg:width="27.72pt" svg:height="20.98pt" svg:x="44.25pt" svg:y="3pt">
              <draw:image xlink:href="Pictures/100002010000029B000002D058F00F5457A07490.png" xlink:type="simple" xlink:show="embed" xlink:actuate="onLoad">
                <text:p/>
              </draw:image>
            </draw:frame>
          </table:table-cell>
          <table:table-cell table:style-name="ce256" office:value-type="string" calcext:value-type="string">
            <office:annotation draw:style-name="gr7" draw:text-style-name="P3" svg:width="131.24pt" svg:height="39.29pt" svg:x="230.03pt" svg:y="250.36pt" draw:caption-point-x="-11.54pt" draw:caption-point-y="-0.34pt">
              <dc:date>2026-05-01T00:00:00</dc:date>
              <text:p text:style-name="P2">Multiplica 4X os pontos em caso de aposta e VITÓRIA da ZEBRA.</text:p>
            </office:annotation>
            <text:p>4X</text:p>
          </table:table-cell>
          <table:table-cell table:style-name="ce357" table:formula="of:=IF(COUNTBLANK([$'Resultados Oficiais'.E34:.F34])&gt;0;&quot;&quot;;IF(COUNTBLANK([.D34:.E34])&gt;0;&quot;&quot;; IF(AND([.D34]=[$'Resultados Oficiais'.E34];[$'Resultados Oficiais'.F34]=[.E34]);30;IF([.D34]-[.E34]=[$'Resultados Oficiais'.E34]-[$'Resultados Oficiais'.F34];21;IF(OR(AND([.D34]-[.E34]&gt;0;[$'Resultados Oficiais'.E34]-[$'Resultados Oficiais'.F34]&gt;0);AND([.D34]-[.E34]&lt;0;[$'Resultados Oficiais'.E34]-[$'Resultados Oficiais'.F34]&lt;0));IF(OR([.D34]=[$'Resultados Oficiais'.E34];[$'Resultados Oficiais'.F34]=[.E34]);18;15);IF(OR([.D34]=[$'Resultados Oficiais'.E34];[$'Resultados Oficiais'.F34]=[.E34]);6;0))))))">
            <text:p/>
          </table:table-cell>
          <table:table-cell table:style-name="ce362" table:formula="of:=IF([.H34]=30;&quot;BUCHA!&quot;;IF([.H34]=90;&quot;SUPER!!&quot;;IF(AND([.H34]&gt;30;[.H34]&lt;90);&quot;ZEBRA!&quot;;&quot;&quot;)))">
            <text:p/>
          </table:table-cell>
          <table:table-cell table:style-name="ce337"/>
          <table:table-cell table:style-name="ce342" table:formula="of:=[$'Resultados Oficiais'.L34]" office:value-type="string" office:string-value="Argentina" calcext:value-type="string">
            <text:p>Argentina</text:p>
          </table:table-cell>
          <table:table-cell table:style-name="ce243" table:number-columns-repeated="2"/>
          <table:table-cell table:style-name="ce349" table:formula="of:=[$'Resultados Oficiais'.O34]" office:value-type="string" office:string-value="Áustria" calcext:value-type="string">
            <text:p>Áustria</text:p>
          </table:table-cell>
          <table:table-cell table:style-name="ce356"/>
          <table:table-cell table:style-name="ce357" table:formula="of:=IF(COUNTBLANK([$'Resultados Oficiais'.O34:.Q34])&gt;0;&quot;&quot;;IF(COUNTBLANK([.L34:.M34])&gt;0;&quot;&quot;; IF(AND([.L34]=[$'Resultados Oficiais'.O34];[$'Resultados Oficiais'.Q34]=[.M34]);30;IF([.L34]-[.M34]=[$'Resultados Oficiais'.O34]-[$'Resultados Oficiais'.Q34];21;IF(OR(AND([.L34]-[.M34]&gt;0;[$'Resultados Oficiais'.O34]-[$'Resultados Oficiais'.Q34]&gt;0);AND([.L34]-[.M34]&lt;0;[$'Resultados Oficiais'.O34]-[$'Resultados Oficiais'.Q34]&lt;0));IF(OR([.L34]=[$'Resultados Oficiais'.O34];[$'Resultados Oficiais'.Q34]=[.M34]);18;15);IF(OR([.L34]=[$'Resultados Oficiais'.O34];[$'Resultados Oficiais'.Q34]=[.M34]);6;0))))))">
            <text:p/>
          </table:table-cell>
          <table:table-cell table:style-name="ce362" table:formula="of:=IF([.P34]=30;&quot;BUCHA!&quot;;IF([.P34]=90;&quot;SUPER!!&quot;;IF(AND([.P34]&gt;30;[.P34]&lt;90);&quot;ZEBRA!&quot;;&quot;&quot;)))">
            <text:p/>
          </table:table-cell>
          <table:table-cell table:style-name="ce278" office:value-type="string" calcext:value-type="string">
            <text:p>Q4</text:p>
          </table:table-cell>
          <table:table-cell table:style-name="ce394"/>
          <table:table-cell table:style-name="ce399" table:formula="of:=[$'Resultados Oficiais'.U34]" office:value-type="string" office:string-value="Vencedor O7" calcext:value-type="string">
            <text:p>Vencedor O7</text:p>
          </table:table-cell>
          <table:table-cell table:style-name="ce243" table:number-columns-repeated="2"/>
          <table:table-cell table:style-name="ce406" table:formula="of:=[$'Resultados Oficiais'.X34]" office:value-type="string" office:string-value="Vencedor O8" calcext:value-type="string">
            <text:p>Vencedor O8</text:p>
          </table:table-cell>
          <table:table-cell table:style-name="ce410"/>
          <table:table-cell table:style-name="ce357" table:formula="of:=IF([.A17]=&quot;&quot;;&quot;&quot;;IF(AND([.V34]&lt;[.U34];[$'Resultados Oficiais'.W17]&lt;[$'Resultados Oficiais'.V17]);[.A17]*3;[.A17]))">
            <text:p/>
          </table:table-cell>
          <table:table-cell table:style-name="ce333" table:content-validation-name="val6"/>
          <table:table-cell table:style-name="ce357" table:formula="of:=IF(COUNTBLANK([$'Resultados Oficiais'.V17:.W17])&gt;0;&quot;&quot;;IF(COUNTBLANK([.U34:.V34])&gt;0;&quot;&quot;;IF([.Z34]=&quot;&quot;;&quot;&quot;;IF(#REF!=&quot;&quot;;0;IF(#REF!=[.Z34];100;0)))))">
            <text:p/>
          </table:table-cell>
          <table:table-cell table:style-name="ce421" table:formula="of:=IF([.Y37]=&quot;&quot;;&quot;&quot;;IF([.Y37]+[.AA37]=450;&quot;SUPER!!&quot;;IF([.Y37]=300;&quot;BUCHA!&quot;;&quot;&quot;)))">
            <text:p/>
          </table:table-cell>
          <table:table-cell table:number-columns-repeated="996"/>
        </table:table-row>
        <table:table-row table:style-name="ro12">
          <table:table-cell table:style-name="ce218"/>
          <table:table-cell table:style-name="ce337"/>
          <table:table-cell table:style-name="ce342" table:formula="of:=[$'Resultados Oficiais'.D35]" office:value-type="string" office:string-value="Noruega" calcext:value-type="string">
            <text:p>Noruega</text:p>
          </table:table-cell>
          <table:table-cell table:style-name="ce243" table:number-columns-repeated="2"/>
          <table:table-cell table:style-name="ce349" table:formula="of:=[$'Resultados Oficiais'.G35]" office:value-type="string" office:string-value="Senegal" calcext:value-type="string">
            <text:p>Senegal</text:p>
          </table:table-cell>
          <table:table-cell table:style-name="ce356"/>
          <table:table-cell table:style-name="ce357" table:formula="of:=IF(COUNTBLANK([$'Resultados Oficiais'.E35:.F35])&gt;0;&quot;&quot;;IF(COUNTBLANK([.D35:.E35])&gt;0;&quot;&quot;; IF(AND([.D35]=[$'Resultados Oficiais'.E35];[$'Resultados Oficiais'.F35]=[.E35]);30;IF([.D35]-[.E35]=[$'Resultados Oficiais'.E35]-[$'Resultados Oficiais'.F35];21;IF(OR(AND([.D35]-[.E35]&gt;0;[$'Resultados Oficiais'.E35]-[$'Resultados Oficiais'.F35]&gt;0);AND([.D35]-[.E35]&lt;0;[$'Resultados Oficiais'.E35]-[$'Resultados Oficiais'.F35]&lt;0));IF(OR([.D35]=[$'Resultados Oficiais'.E35];[$'Resultados Oficiais'.F35]=[.E35]);18;15);IF(OR([.D35]=[$'Resultados Oficiais'.E35];[$'Resultados Oficiais'.F35]=[.E35]);6;0))))))">
            <text:p/>
          </table:table-cell>
          <table:table-cell table:style-name="ce362" table:formula="of:=IF([.H35]=30;&quot;BUCHA!&quot;;IF([.H35]=90;&quot;SUPER!!&quot;;IF(AND([.H35]&gt;30;[.H35]&lt;90);&quot;ZEBRA!&quot;;&quot;&quot;)))">
            <text:p/>
          </table:table-cell>
          <table:table-cell table:style-name="ce337"/>
          <table:table-cell table:style-name="ce342" table:formula="of:=[$'Resultados Oficiais'.L35]" office:value-type="string" office:string-value="Jordânia" calcext:value-type="string">
            <text:p>Jordânia</text:p>
          </table:table-cell>
          <table:table-cell table:style-name="ce243" table:number-columns-repeated="2"/>
          <table:table-cell table:style-name="ce349" table:formula="of:=[$'Resultados Oficiais'.O35]" office:value-type="string" office:string-value="Argélia" calcext:value-type="string">
            <text:p>Argélia</text:p>
          </table:table-cell>
          <table:table-cell table:style-name="ce356"/>
          <table:table-cell table:style-name="ce357" table:formula="of:=IF(COUNTBLANK([$'Resultados Oficiais'.O35:.Q35])&gt;0;&quot;&quot;;IF(COUNTBLANK([.L35:.M35])&gt;0;&quot;&quot;; IF(AND([.L35]=[$'Resultados Oficiais'.O35];[$'Resultados Oficiais'.Q35]=[.M35]);30;IF([.L35]-[.M35]=[$'Resultados Oficiais'.O35]-[$'Resultados Oficiais'.Q35];21;IF(OR(AND([.L35]-[.M35]&gt;0;[$'Resultados Oficiais'.O35]-[$'Resultados Oficiais'.Q35]&gt;0);AND([.L35]-[.M35]&lt;0;[$'Resultados Oficiais'.O35]-[$'Resultados Oficiais'.Q35]&lt;0));IF(OR([.L35]=[$'Resultados Oficiais'.O35];[$'Resultados Oficiais'.Q35]=[.M35]);18;15);IF(OR([.L35]=[$'Resultados Oficiais'.O35];[$'Resultados Oficiais'.Q35]=[.M35]);6;0))))))">
            <text:p/>
          </table:table-cell>
          <table:table-cell table:style-name="ce362" table:formula="of:=IF([.P35]=30;&quot;BUCHA!&quot;;IF([.P35]=90;&quot;SUPER!!&quot;;IF(AND([.P35]&gt;30;[.P35]&lt;90);&quot;ZEBRA!&quot;;&quot;&quot;)))">
            <text:p/>
          </table:table-cell>
          <table:table-cell table:style-name="ce281" office:value-type="string" calcext:value-type="string">
            <text:p>X</text:p>
          </table:table-cell>
          <table:table-cell table:style-name="ce305" table:number-columns-repeated="9"/>
          <table:table-cell table:style-name="ce420"/>
          <table:table-cell table:number-columns-repeated="996"/>
        </table:table-row>
        <table:table-row table:style-name="ro12">
          <table:table-cell table:style-name="ce218" table:formula="of:=IF(COUNTBLANK([$'Resultados Oficiais'.M54:.N54])&gt;0;&quot;&quot;;IF(COUNTBLANK([.L36:.M36])&gt;0;&quot;&quot;; IF(AND([.L36]=[$'Resultados Oficiais'.M54];[$'Resultados Oficiais'.N54]=[.M36]);30;IF([.L36]-[.M36]=[$'Resultados Oficiais'.M54]-[$'Resultados Oficiais'.N54];21;IF(OR(AND([.L36]-[.M36]&gt;0;[$'Resultados Oficiais'.M54]-[$'Resultados Oficiais'.N54]&gt;0);AND([.L36]-[.M36]&lt;0;[$'Resultados Oficiais'.M54]-[$'Resultados Oficiais'.N54]&lt;0));IF(OR([.L36]=[$'Resultados Oficiais'.M54];[$'Resultados Oficiais'.N54]=[.M36]);18;15);IF(OR([.L36]=[$'Resultados Oficiais'.M54];[$'Resultados Oficiais'.N54]=[.M36]);6;0))))))">
            <text:p/>
          </table:table-cell>
          <table:table-cell table:style-name="ce338"/>
          <table:table-cell table:style-name="ce342" table:formula="of:=[$'Resultados Oficiais'.D36]" office:value-type="string" office:string-value="Noruega" calcext:value-type="string">
            <text:p>Noruega</text:p>
          </table:table-cell>
          <table:table-cell table:style-name="ce243" table:number-columns-repeated="2"/>
          <table:table-cell table:style-name="ce349" table:formula="of:=[$'Resultados Oficiais'.G36]" office:value-type="string" office:string-value="França" calcext:value-type="string">
            <text:p>França</text:p>
          </table:table-cell>
          <table:table-cell table:style-name="ce356"/>
          <table:table-cell table:style-name="ce357" table:formula="of:=IF(COUNTBLANK([$'Resultados Oficiais'.E36:.F36])&gt;0;&quot;&quot;;IF(COUNTBLANK([.D36:.E36])&gt;0;&quot;&quot;; IF(AND([.D36]=[$'Resultados Oficiais'.E36];[$'Resultados Oficiais'.F36]=[.E36]);30;IF([.D36]-[.E36]=[$'Resultados Oficiais'.E36]-[$'Resultados Oficiais'.F36];21;IF(OR(AND([.D36]-[.E36]&gt;0;[$'Resultados Oficiais'.E36]-[$'Resultados Oficiais'.F36]&gt;0);AND([.D36]-[.E36]&lt;0;[$'Resultados Oficiais'.E36]-[$'Resultados Oficiais'.F36]&lt;0));IF(OR([.D36]=[$'Resultados Oficiais'.E36];[$'Resultados Oficiais'.F36]=[.E36]);18;15);IF(OR([.D36]=[$'Resultados Oficiais'.E36];[$'Resultados Oficiais'.F36]=[.E36]);6;0))))))">
            <text:p/>
          </table:table-cell>
          <table:table-cell table:style-name="ce362" table:formula="of:=IF([.H36]=30;&quot;BUCHA!&quot;;IF([.H36]=90;&quot;SUPER!!&quot;;IF(AND([.H36]&gt;30;[.H36]&lt;90);&quot;ZEBRA!&quot;;&quot;&quot;)))">
            <text:p/>
          </table:table-cell>
          <table:table-cell table:style-name="ce372" office:value-type="string" calcext:value-type="string">
            <text:p>4X</text:p>
            <draw:frame table:end-cell-address="'Cartão de Apostas'.K39" table:end-x="26.62pt" table:end-y="4.48pt" draw:z-index="6" draw:name="image6.png" draw:style-name="gr1" draw:text-style-name="P1" svg:width="27.72pt" svg:height="20.98pt" svg:x="13.49pt" svg:y="6.01pt">
              <draw:image xlink:href="Pictures/100002010000029B000002D058F00F5457A07490.png" xlink:type="simple" xlink:show="embed" xlink:actuate="onLoad">
                <text:p/>
              </draw:image>
            </draw:frame>
          </table:table-cell>
          <table:table-cell table:style-name="ce377" table:formula="of:=[$'Resultados Oficiais'.L36]" office:value-type="string" office:string-value="Jordânia" calcext:value-type="string">
            <text:p>Jordânia</text:p>
          </table:table-cell>
          <table:table-cell table:style-name="ce243" table:number-columns-repeated="2"/>
          <table:table-cell table:style-name="ce349" table:formula="of:=[$'Resultados Oficiais'.O36]" office:value-type="string" office:string-value="Argentina" calcext:value-type="string">
            <text:p>Argentina</text:p>
          </table:table-cell>
          <table:table-cell table:style-name="ce356"/>
          <table:table-cell table:style-name="ce357" table:formula="of:=IF(COUNTBLANK([$'Resultados Oficiais'.O36:.Q36])&gt;0;&quot;&quot;;IF(COUNTBLANK([.L36:.M36])&gt;0;&quot;&quot;; IF(AND([.L36]=[$'Resultados Oficiais'.O36];[$'Resultados Oficiais'.Q36]=[.M36]);30;IF([.L36]-[.M36]=[$'Resultados Oficiais'.O36]-[$'Resultados Oficiais'.Q36];21;IF(OR(AND([.L36]-[.M36]&gt;0;[$'Resultados Oficiais'.O36]-[$'Resultados Oficiais'.Q36]&gt;0);AND([.L36]-[.M36]&lt;0;[$'Resultados Oficiais'.O36]-[$'Resultados Oficiais'.Q36]&lt;0));IF(OR([.L36]=[$'Resultados Oficiais'.O36];[$'Resultados Oficiais'.Q36]=[.M36]);18;15);IF(OR([.L36]=[$'Resultados Oficiais'.O36];[$'Resultados Oficiais'.Q36]=[.M36]);6;0))))))">
            <text:p/>
          </table:table-cell>
          <table:table-cell table:style-name="ce362" table:formula="of:=IF([.P36]=30;&quot;BUCHA!&quot;;IF([.P36]=90;&quot;SUPER!!&quot;;IF(AND([.P36]&gt;30;[.P36]&lt;90);&quot;ZEBRA!&quot;;&quot;&quot;)))">
            <text:p/>
          </table:table-cell>
          <table:table-cell table:style-name="ce281" office:value-type="string" calcext:value-type="string">
            <text:p>X</text:p>
          </table:table-cell>
          <table:table-cell table:style-name="ce287"/>
          <table:table-cell table:style-name="ce303" office:value-type="string" calcext:value-type="string" table:number-columns-spanned="4" table:number-rows-spanned="1">
            <office:annotation draw:style-name="gr6" draw:text-style-name="P3" svg:width="124.33pt" svg:height="106.47pt" svg:x="633.6pt" svg:y="250.53pt" draw:caption-point-x="98.19pt" draw:caption-point-y="14.49pt">
              <dc:date>2026-05-01T00:00:00</dc:date>
              <text:p text:style-name="P2">SEMIFINAIS</text:p>
              <text:p text:style-name="P2">&gt;&gt; Aposta para 90 minutos + eventual prorrogação!</text:p>
              <text:p text:style-name="P2"/>
              <text:p text:style-name="P2">Bucha: 300 pontos.</text:p>
              <text:p text:style-name="P2">Demais: 210, 180, 150, 60.</text:p>
              <text:p text:style-name="P2">Pênaltis: 150 pontos.</text:p>
            </office:annotation>
            <text:p>Semifinais</text:p>
          </table:table-cell>
          <table:covered-table-cell table:number-columns-repeated="3" table:style-name="ce310"/>
          <table:table-cell table:style-name="ce325"/>
          <table:table-cell table:style-name="ce271" office:value-type="string" calcext:value-type="string">
            <text:p>PTS</text:p>
          </table:table-cell>
          <table:table-cell table:style-name="ce332" office:value-type="string" calcext:value-type="string">
            <office:annotation draw:style-name="gr7" draw:text-style-name="P3" svg:width="191.76pt" svg:height="50.49pt" svg:x="859.38pt" svg:y="259.77pt" draw:caption-point-x="-11.54pt" draw:caption-point-y="5.24pt">
              <dc:date>2026-05-01T00:00:00</dc:date>
              <text:p text:style-name="P2">Os pênaltis terão pontuação EXTRA, independente da aposta feita no tempo de jogo. Ou seja: se o jogo for para os pênaltis, quem vence?</text:p>
            </office:annotation>
            <text:p>Pênaltis</text:p>
          </table:table-cell>
          <table:table-cell table:style-name="ce414" office:value-type="string" calcext:value-type="string">
            <text:p>EXTRA</text:p>
          </table:table-cell>
          <table:table-cell table:style-name="ce421"/>
          <table:table-cell table:number-columns-repeated="996"/>
        </table:table-row>
        <table:table-row table:style-name="ro12">
          <table:table-cell table:style-name="ce218"/>
          <table:table-cell table:style-name="ce337"/>
          <table:table-cell table:style-name="ce342" table:formula="of:=[$'Resultados Oficiais'.D37]" office:value-type="string" office:string-value="Senegal" calcext:value-type="string">
            <text:p>Senegal</text:p>
          </table:table-cell>
          <table:table-cell table:style-name="ce243" table:number-columns-repeated="2"/>
          <table:table-cell table:style-name="ce349" table:formula="of:=[$'Resultados Oficiais'.G37]" office:value-type="string" office:string-value="Iraque" calcext:value-type="string">
            <text:p>Iraque</text:p>
          </table:table-cell>
          <table:table-cell table:style-name="ce356"/>
          <table:table-cell table:style-name="ce357" table:formula="of:=IF(COUNTBLANK([$'Resultados Oficiais'.E37:.F37])&gt;0;&quot;&quot;;IF(COUNTBLANK([.D37:.E37])&gt;0;&quot;&quot;; IF(AND([.D37]=[$'Resultados Oficiais'.E37];[$'Resultados Oficiais'.F37]=[.E37]);30;IF([.D37]-[.E37]=[$'Resultados Oficiais'.E37]-[$'Resultados Oficiais'.F37];21;IF(OR(AND([.D37]-[.E37]&gt;0;[$'Resultados Oficiais'.E37]-[$'Resultados Oficiais'.F37]&gt;0);AND([.D37]-[.E37]&lt;0;[$'Resultados Oficiais'.E37]-[$'Resultados Oficiais'.F37]&lt;0));IF(OR([.D37]=[$'Resultados Oficiais'.E37];[$'Resultados Oficiais'.F37]=[.E37]);18;15);IF(OR([.D37]=[$'Resultados Oficiais'.E37];[$'Resultados Oficiais'.F37]=[.E37]);6;0))))))">
            <text:p/>
          </table:table-cell>
          <table:table-cell table:style-name="ce362" table:formula="of:=IF([.H37]=30;&quot;BUCHA!&quot;;IF([.H37]=90;&quot;SUPER!!&quot;;IF(AND([.H37]&gt;30;[.H37]&lt;90);&quot;ZEBRA!&quot;;&quot;&quot;)))">
            <text:p/>
          </table:table-cell>
          <table:table-cell table:style-name="ce337"/>
          <table:table-cell table:style-name="ce342" table:formula="of:=[$'Resultados Oficiais'.L37]" office:value-type="string" office:string-value="Áustria" calcext:value-type="string">
            <text:p>Áustria</text:p>
          </table:table-cell>
          <table:table-cell table:style-name="ce243" table:number-columns-repeated="2"/>
          <table:table-cell table:style-name="ce349" table:formula="of:=[$'Resultados Oficiais'.O37]" office:value-type="string" office:string-value="Argélia" calcext:value-type="string">
            <text:p>Argélia</text:p>
          </table:table-cell>
          <table:table-cell table:style-name="ce356"/>
          <table:table-cell table:style-name="ce357" table:formula="of:=IF(COUNTBLANK([$'Resultados Oficiais'.O37:.Q37])&gt;0;&quot;&quot;;IF(COUNTBLANK([.L37:.M37])&gt;0;&quot;&quot;; IF(AND([.L37]=[$'Resultados Oficiais'.O37];[$'Resultados Oficiais'.Q37]=[.M37]);30;IF([.L37]-[.M37]=[$'Resultados Oficiais'.O37]-[$'Resultados Oficiais'.Q37];21;IF(OR(AND([.L37]-[.M37]&gt;0;[$'Resultados Oficiais'.O37]-[$'Resultados Oficiais'.Q37]&gt;0);AND([.L37]-[.M37]&lt;0;[$'Resultados Oficiais'.O37]-[$'Resultados Oficiais'.Q37]&lt;0));IF(OR([.L37]=[$'Resultados Oficiais'.O37];[$'Resultados Oficiais'.Q37]=[.M37]);18;15);IF(OR([.L37]=[$'Resultados Oficiais'.O37];[$'Resultados Oficiais'.Q37]=[.M37]);6;0))))))">
            <text:p/>
          </table:table-cell>
          <table:table-cell table:style-name="ce362" table:formula="of:=IF([.P37]=30;&quot;BUCHA!&quot;;IF([.P37]=90;&quot;SUPER!!&quot;;IF(AND([.P37]&gt;30;[.P37]&lt;90);&quot;ZEBRA!&quot;;&quot;&quot;)))">
            <text:p/>
          </table:table-cell>
          <table:table-cell table:style-name="ce278" office:value-type="string" calcext:value-type="string">
            <text:p>S1</text:p>
          </table:table-cell>
          <table:table-cell table:style-name="ce394"/>
          <table:table-cell table:style-name="ce399" table:formula="of:=[$'Resultados Oficiais'.U37]" office:value-type="string" office:string-value="Vencedor Q1" calcext:value-type="string">
            <text:p>Vencedor Q1</text:p>
          </table:table-cell>
          <table:table-cell table:style-name="ce243" table:number-columns-repeated="2"/>
          <table:table-cell table:style-name="ce406" table:formula="of:=[$'Resultados Oficiais'.X37]" office:value-type="string" office:string-value="Vencedor Q2" calcext:value-type="string">
            <text:p>Vencedor Q2</text:p>
          </table:table-cell>
          <table:table-cell table:style-name="ce410"/>
          <table:table-cell table:style-name="ce357" table:formula="of:=IF(COUNTBLANK([$'Resultados Oficiais'.V20:.W20])&gt;0;&quot;&quot;;IF(COUNTBLANK([.U37:.V37])&gt;0;&quot;&quot;;IF(AND([.U37]=[$'Resultados Oficiais'.V20];[$'Resultados Oficiais'.W20]=[.V37]);300;IF([.U37]-[.V37]=[$'Resultados Oficiais'.V20]-[$'Resultados Oficiais'.W20];210;IF(OR(AND([.U37]-[.V37]&gt;0;[$'Resultados Oficiais'.V20]-[$'Resultados Oficiais'.W20]&gt;0);AND([.U37]-[.V37]&lt;0;[$'Resultados Oficiais'.V20]-[$'Resultados Oficiais'.W20]&lt;0));IF(OR([.U37]=[$'Resultados Oficiais'.V20];[$'Resultados Oficiais'.W20]=[.V37]);180;150);IF(OR([.U37]=[$'Resultados Oficiais'.V20];[$'Resultados Oficiais'.W20]=[.V37]);60;0))))))">
            <text:p/>
          </table:table-cell>
          <table:table-cell table:style-name="ce333" table:content-validation-name="val6"/>
          <table:table-cell table:style-name="ce357" table:formula="of:=IF(COUNTBLANK([$'Resultados Oficiais'.V20:.W20])&gt;0;&quot;&quot;;IF(COUNTBLANK([.U37:.V37])&gt;0;&quot;&quot;;IF([.Z37]=&quot;&quot;;&quot;&quot;;IF(#REF!=&quot;&quot;;0;IF(#REF!=[.Z37];150;0)))))">
            <text:p/>
          </table:table-cell>
          <table:table-cell table:style-name="ce422"/>
          <table:table-cell table:number-columns-repeated="996"/>
        </table:table-row>
        <table:table-row table:style-name="ro12">
          <table:table-cell table:style-name="ce217"/>
          <table:table-cell table:style-name="ce307" table:number-columns-repeated="2"/>
          <table:table-cell table:style-name="ce236" office:value-type="string" calcext:value-type="string" table:number-columns-spanned="2" table:number-rows-spanned="1">
            <text:p>Grupo K</text:p>
          </table:table-cell>
          <table:covered-table-cell/>
          <table:table-cell table:style-name="ce350" table:number-columns-repeated="2"/>
          <table:table-cell table:style-name="ce359"/>
          <table:table-cell table:style-name="ce363"/>
          <table:table-cell table:style-name="ce371"/>
          <table:table-cell table:style-name="ce350"/>
          <table:table-cell table:style-name="ce236" office:value-type="string" calcext:value-type="string" table:number-columns-spanned="2" table:number-rows-spanned="1">
            <text:p>Grupo L</text:p>
          </table:table-cell>
          <table:covered-table-cell/>
          <table:table-cell table:style-name="ce307"/>
          <table:table-cell table:style-name="ce271" table:number-columns-repeated="2"/>
          <table:table-cell table:style-name="ce384"/>
          <table:table-cell table:style-name="ce278" office:value-type="string" calcext:value-type="string">
            <text:p>S2</text:p>
          </table:table-cell>
          <table:table-cell table:style-name="ce394"/>
          <table:table-cell table:style-name="ce399" table:formula="of:=[$'Resultados Oficiais'.U38]" office:value-type="string" office:string-value="Vencedor Q3" calcext:value-type="string">
            <text:p>Vencedor Q3</text:p>
          </table:table-cell>
          <table:table-cell table:style-name="ce243" table:number-columns-repeated="2"/>
          <table:table-cell table:style-name="ce406" table:formula="of:=[$'Resultados Oficiais'.X38]" office:value-type="string" office:string-value="Vencedor Q4" calcext:value-type="string">
            <text:p>Vencedor Q4</text:p>
          </table:table-cell>
          <table:table-cell table:style-name="ce410"/>
          <table:table-cell table:style-name="ce357" table:formula="of:=IF([.R20]=&quot;&quot;;&quot;&quot;;IF(AND([.V38]&gt;[.U38];[$'Resultados Oficiais'.W21]&gt;[$'Resultados Oficiais'.V21]);[.R20]*3;[.R20]))">
            <text:p/>
          </table:table-cell>
          <table:table-cell table:style-name="ce333" table:content-validation-name="val6"/>
          <table:table-cell table:style-name="ce357" table:formula="of:=IF(COUNTBLANK([$'Resultados Oficiais'.V21:.W21])&gt;0;&quot;&quot;;IF(COUNTBLANK([.U38:.V38])&gt;0;&quot;&quot;;IF([.Z38]=&quot;&quot;;&quot;&quot;;IF(#REF!=&quot;&quot;;0;IF(#REF!=[.Z38];150;0)))))">
            <text:p/>
          </table:table-cell>
          <table:table-cell table:style-name="ce362" table:formula="of:=IF([.Y44]=&quot;&quot;;&quot;&quot;;IF([.Y44]+[.AA44]=750;&quot;SUPER!!&quot;;IF([.Y44]=500;&quot;BUCHA!&quot;;&quot;&quot;)))">
            <text:p/>
          </table:table-cell>
          <table:table-cell table:number-columns-repeated="996"/>
        </table:table-row>
        <table:table-row table:style-name="ro12">
          <table:table-cell table:style-name="ce218"/>
          <table:table-cell table:style-name="ce337"/>
          <table:table-cell table:style-name="ce342" table:formula="of:=[$'Resultados Oficiais'.D39]" office:value-type="string" office:string-value="Portugal" calcext:value-type="string">
            <text:p>Portugal</text:p>
          </table:table-cell>
          <table:table-cell table:style-name="ce243" table:number-columns-repeated="2"/>
          <table:table-cell table:style-name="ce351" table:formula="of:=[$'Resultados Oficiais'.G39]" office:value-type="string" office:string-value="Congo" calcext:value-type="string">
            <text:p>Congo</text:p>
          </table:table-cell>
          <table:table-cell table:style-name="ce355"/>
          <table:table-cell table:style-name="ce357" table:formula="of:=IF(COUNTBLANK([$'Resultados Oficiais'.E39:.F39])&gt;0;&quot;&quot;;IF(COUNTBLANK([.D39:.E39])&gt;0;&quot;&quot;; IF(AND([.D39]=[$'Resultados Oficiais'.E39];[$'Resultados Oficiais'.F39]=[.E39]);30;IF([.D39]-[.E39]=[$'Resultados Oficiais'.E39]-[$'Resultados Oficiais'.F39];21;IF(OR(AND([.D39]-[.E39]&gt;0;[$'Resultados Oficiais'.E39]-[$'Resultados Oficiais'.F39]&gt;0);AND([.D39]-[.E39]&lt;0;[$'Resultados Oficiais'.E39]-[$'Resultados Oficiais'.F39]&lt;0));IF(OR([.D39]=[$'Resultados Oficiais'.E39];[$'Resultados Oficiais'.F39]=[.E39]);18;15);IF(OR([.D39]=[$'Resultados Oficiais'.E39];[$'Resultados Oficiais'.F39]=[.E39]);6;0))))))">
            <text:p/>
          </table:table-cell>
          <table:table-cell table:style-name="ce362" table:formula="of:=IF([.H39]=30;&quot;BUCHA!&quot;;IF([.H39]=90;&quot;SUPER!!&quot;;IF(AND([.H39]&gt;30;[.H39]&lt;90);&quot;ZEBRA!&quot;;&quot;&quot;)))">
            <text:p/>
          </table:table-cell>
          <table:table-cell table:style-name="ce337"/>
          <table:table-cell table:style-name="ce342" table:formula="of:=[$'Resultados Oficiais'.L39]" office:value-type="string" office:string-value="Inglaterra" calcext:value-type="string">
            <text:p>Inglaterra</text:p>
          </table:table-cell>
          <table:table-cell table:style-name="ce243" table:number-columns-repeated="2"/>
          <table:table-cell table:style-name="ce349" table:formula="of:=[$'Resultados Oficiais'.O39]" office:value-type="string" office:string-value="Croácia" calcext:value-type="string">
            <text:p>Croácia</text:p>
          </table:table-cell>
          <table:table-cell table:style-name="ce356"/>
          <table:table-cell table:style-name="ce357" table:formula="of:=IF(COUNTBLANK([$'Resultados Oficiais'.O39:.Q39])&gt;0;&quot;&quot;;IF(COUNTBLANK([.L39:.M39])&gt;0;&quot;&quot;; IF(AND([.L39]=[$'Resultados Oficiais'.O39];[$'Resultados Oficiais'.Q39]=[.M39]);30;IF([.L39]-[.M39]=[$'Resultados Oficiais'.O39]-[$'Resultados Oficiais'.Q39];21;IF(OR(AND([.L39]-[.M39]&gt;0;[$'Resultados Oficiais'.O39]-[$'Resultados Oficiais'.Q39]&gt;0);AND([.L39]-[.M39]&lt;0;[$'Resultados Oficiais'.O39]-[$'Resultados Oficiais'.Q39]&lt;0));IF(OR([.L39]=[$'Resultados Oficiais'.O39];[$'Resultados Oficiais'.Q39]=[.M39]);18;15);IF(OR([.L39]=[$'Resultados Oficiais'.O39];[$'Resultados Oficiais'.Q39]=[.M39]);6;0))))))">
            <text:p/>
          </table:table-cell>
          <table:table-cell table:style-name="ce362" table:formula="of:=IF([.P39]=30;&quot;BUCHA!&quot;;IF([.P39]=90;&quot;SUPER!!&quot;;IF(AND([.P39]&gt;30;[.P39]&lt;90);&quot;ZEBRA!&quot;;&quot;&quot;)))">
            <text:p/>
          </table:table-cell>
          <table:table-cell table:style-name="ce390" office:value-type="string" calcext:value-type="string">
            <text:p>X</text:p>
          </table:table-cell>
          <table:table-cell table:style-name="ce289"/>
          <table:table-cell table:style-name="ce305" table:number-columns-repeated="4"/>
          <table:table-cell table:style-name="ce411" table:number-columns-repeated="2"/>
          <table:table-cell table:style-name="ce334"/>
          <table:table-cell table:style-name="ce415"/>
          <table:table-cell table:style-name="ce420"/>
          <table:table-cell table:number-columns-repeated="996"/>
        </table:table-row>
        <table:table-row table:style-name="ro12">
          <table:table-cell table:style-name="ce218" table:formula="of:=IF(COUNTBLANK([$'Resultados Oficiais'.E58:.F58])&gt;0;&quot;&quot;;IF(COUNTBLANK([.D40:.E40])&gt;0;&quot;&quot;; IF(AND([.D40]=[$'Resultados Oficiais'.E58];[$'Resultados Oficiais'.F58]=[.E40]);30;IF([.D40]-[.E40]=[$'Resultados Oficiais'.E58]-[$'Resultados Oficiais'.F58];21;IF(OR(AND([.D40]-[.E40]&gt;0;[$'Resultados Oficiais'.E58]-[$'Resultados Oficiais'.F58]&gt;0);AND([.D40]-[.E40]&lt;0;[$'Resultados Oficiais'.E58]-[$'Resultados Oficiais'.F58]&lt;0));IF(OR([.D40]=[$'Resultados Oficiais'.E58];[$'Resultados Oficiais'.F58]=[.E40]);18;15);IF(OR([.D40]=[$'Resultados Oficiais'.E58];[$'Resultados Oficiais'.F58]=[.E40]);6;0))))))">
            <text:p/>
          </table:table-cell>
          <table:table-cell table:style-name="ce337"/>
          <table:table-cell table:style-name="ce342" table:formula="of:=[$'Resultados Oficiais'.D40]" office:value-type="string" office:string-value="Uzbequistão" calcext:value-type="string">
            <text:p>Uzbequistão</text:p>
          </table:table-cell>
          <table:table-cell table:style-name="ce243" table:number-columns-repeated="2"/>
          <table:table-cell table:style-name="ce351" table:formula="of:=[$'Resultados Oficiais'.G40]" office:value-type="string" office:string-value="Colômbia" calcext:value-type="string">
            <text:p>Colômbia</text:p>
          </table:table-cell>
          <table:table-cell table:style-name="ce355"/>
          <table:table-cell table:style-name="ce357" table:formula="of:=IF([.A40]=&quot;&quot;;&quot;&quot;;IF(AND([.E40]&gt;[.D40];[$'Resultados Oficiais'.F40]&gt;[$'Resultados Oficiais'.E40]);[.A40]*3;[.A40]))">
            <text:p/>
          </table:table-cell>
          <table:table-cell table:style-name="ce362" table:formula="of:=IF([.H40]=30;&quot;BUCHA!&quot;;IF([.H40]=90;&quot;SUPER!!&quot;;IF(AND([.H40]&gt;30;[.H40]&lt;90);&quot;ZEBRA!&quot;;&quot;&quot;)))">
            <text:p/>
          </table:table-cell>
          <table:table-cell table:style-name="ce337"/>
          <table:table-cell table:style-name="ce342" table:formula="of:=[$'Resultados Oficiais'.L40]" office:value-type="string" office:string-value="Gana" calcext:value-type="string">
            <text:p>Gana</text:p>
          </table:table-cell>
          <table:table-cell table:style-name="ce243" table:number-columns-repeated="2"/>
          <table:table-cell table:style-name="ce349" table:formula="of:=[$'Resultados Oficiais'.O40]" office:value-type="string" office:string-value="Panamá" calcext:value-type="string">
            <text:p>Panamá</text:p>
          </table:table-cell>
          <table:table-cell table:style-name="ce356"/>
          <table:table-cell table:style-name="ce357" table:formula="of:=IF([.I40]=&quot;&quot;;&quot;&quot;;IF(AND([.M40]&gt;[.L40];[$'Resultados Oficiais'.Q40]&gt;[$'Resultados Oficiais'.O40]);[.I40]*3;[.I40]))">
            <text:p/>
          </table:table-cell>
          <table:table-cell table:style-name="ce362" table:formula="of:=IF([.P40]=30;&quot;BUCHA!&quot;;IF([.P40]=90;&quot;SUPER!!&quot;;IF(AND([.P40]&gt;30;[.P40]&lt;90);&quot;ZEBRA!&quot;;&quot;&quot;)))">
            <text:p/>
          </table:table-cell>
          <table:table-cell table:style-name="ce390" office:value-type="string" calcext:value-type="string">
            <text:p>X</text:p>
          </table:table-cell>
          <table:table-cell table:style-name="ce290"/>
          <table:table-cell table:style-name="ce303" office:value-type="string" calcext:value-type="string" table:number-columns-spanned="4" table:number-rows-spanned="1">
            <office:annotation draw:style-name="gr6" draw:text-style-name="P3" svg:width="124.33pt" svg:height="106.47pt" svg:x="633.6pt" svg:y="280.52pt" draw:caption-point-x="98.19pt" draw:caption-point-y="14.51pt">
              <dc:date>2026-05-01T00:00:00</dc:date>
              <text:p text:style-name="P2">3° LUGAR</text:p>
              <text:p text:style-name="P2">&gt;&gt; Aposta para 90 minutos + eventual prorrogação!</text:p>
              <text:p text:style-name="P2"/>
              <text:p text:style-name="P2">Bucha: 300 pontos.</text:p>
              <text:p text:style-name="P2">Demais: 210, 180, 150, 60.</text:p>
              <text:p text:style-name="P2">Pênaltis: 150 pontos.</text:p>
            </office:annotation>
            <text:p>Terceiro Lugar</text:p>
          </table:table-cell>
          <table:covered-table-cell table:number-columns-repeated="3" table:style-name="ce310"/>
          <table:table-cell table:style-name="ce328"/>
          <table:table-cell table:style-name="ce271" office:value-type="string" calcext:value-type="string">
            <text:p>PTS</text:p>
          </table:table-cell>
          <table:table-cell table:style-name="ce332" office:value-type="string" calcext:value-type="string">
            <office:annotation draw:style-name="gr7" draw:text-style-name="P3" svg:width="191.76pt" svg:height="50.49pt" svg:x="859.38pt" svg:y="289.76pt" draw:caption-point-x="-11.54pt" draw:caption-point-y="5.27pt">
              <dc:date>2026-05-01T00:00:00</dc:date>
              <text:p text:style-name="P2">Os pênaltis terão pontuação EXTRA, independente da aposta feita no tempo de jogo. Ou seja: se o jogo for para os pênaltis, quem vence?</text:p>
            </office:annotation>
            <text:p>Pênaltis</text:p>
          </table:table-cell>
          <table:table-cell table:style-name="ce414" office:value-type="string" calcext:value-type="string">
            <text:p>EXTRA</text:p>
          </table:table-cell>
          <table:table-cell table:style-name="ce421"/>
          <table:table-cell table:number-columns-repeated="996"/>
        </table:table-row>
        <table:table-row table:style-name="ro12">
          <table:table-cell table:style-name="ce218"/>
          <table:table-cell table:style-name="ce337"/>
          <table:table-cell table:style-name="ce342" table:formula="of:=[$'Resultados Oficiais'.D41]" office:value-type="string" office:string-value="Portugal" calcext:value-type="string">
            <text:p>Portugal</text:p>
          </table:table-cell>
          <table:table-cell table:style-name="ce243" table:number-columns-repeated="2"/>
          <table:table-cell table:style-name="ce348" table:formula="of:=[$'Resultados Oficiais'.G41]" office:value-type="string" office:string-value="Uzbequistão" calcext:value-type="string">
            <text:p>Uzbequistão</text:p>
            <draw:frame table:end-cell-address="'Cartão de Apostas'.G44" table:end-x="12.08pt" table:end-y="4.48pt" draw:z-index="11" draw:name="image6.png" draw:style-name="gr1" draw:text-style-name="P1" svg:width="27.72pt" svg:height="20.98pt" svg:x="51pt" svg:y="6.01pt">
              <draw:image xlink:href="Pictures/100002010000029B000002D058F00F5457A07490.png" xlink:type="simple" xlink:show="embed" xlink:actuate="onLoad">
                <text:p/>
              </draw:image>
            </draw:frame>
          </table:table-cell>
          <table:table-cell table:style-name="ce352" office:value-type="string" calcext:value-type="string">
            <office:annotation draw:style-name="gr7" draw:text-style-name="P3" svg:width="131.24pt" svg:height="39.29pt" svg:x="230.03pt" svg:y="302.85pt" draw:caption-point-x="-11.54pt" draw:caption-point-y="-0.34pt">
              <dc:date>2026-05-01T00:00:00</dc:date>
              <text:p text:style-name="P2">Multiplica 3X os pontos em caso de aposta e VITÓRIA da ZEBRA.</text:p>
            </office:annotation>
            <text:p>2X</text:p>
          </table:table-cell>
          <table:table-cell table:style-name="ce357" table:formula="of:=IF(COUNTBLANK([$'Resultados Oficiais'.E41:.F41])&gt;0;&quot;&quot;;IF(COUNTBLANK([.D41:.E41])&gt;0;&quot;&quot;; IF(AND([.D41]=[$'Resultados Oficiais'.E41];[$'Resultados Oficiais'.F41]=[.E41]);30;IF([.D41]-[.E41]=[$'Resultados Oficiais'.E41]-[$'Resultados Oficiais'.F41];21;IF(OR(AND([.D41]-[.E41]&gt;0;[$'Resultados Oficiais'.E41]-[$'Resultados Oficiais'.F41]&gt;0);AND([.D41]-[.E41]&lt;0;[$'Resultados Oficiais'.E41]-[$'Resultados Oficiais'.F41]&lt;0));IF(OR([.D41]=[$'Resultados Oficiais'.E41];[$'Resultados Oficiais'.F41]=[.E41]);18;15);IF(OR([.D41]=[$'Resultados Oficiais'.E41];[$'Resultados Oficiais'.F41]=[.E41]);6;0))))))">
            <text:p/>
          </table:table-cell>
          <table:table-cell table:style-name="ce362" table:formula="of:=IF([.H41]=30;&quot;BUCHA!&quot;;IF([.H41]=90;&quot;SUPER!!&quot;;IF(AND([.H41]&gt;30;[.H41]&lt;90);&quot;ZEBRA!&quot;;&quot;&quot;)))">
            <text:p/>
          </table:table-cell>
          <table:table-cell table:style-name="ce337"/>
          <table:table-cell table:style-name="ce342" table:formula="of:=[$'Resultados Oficiais'.L41]" office:value-type="string" office:string-value="Inglaterra" calcext:value-type="string">
            <text:p>Inglaterra</text:p>
          </table:table-cell>
          <table:table-cell table:style-name="ce243" table:number-columns-repeated="2"/>
          <table:table-cell table:style-name="ce349" table:formula="of:=[$'Resultados Oficiais'.O41]" office:value-type="string" office:string-value="Gana" calcext:value-type="string">
            <text:p>Gana</text:p>
          </table:table-cell>
          <table:table-cell table:style-name="ce356"/>
          <table:table-cell table:style-name="ce357" table:formula="of:=IF(COUNTBLANK([$'Resultados Oficiais'.O41:.Q41])&gt;0;&quot;&quot;;IF(COUNTBLANK([.L41:.M41])&gt;0;&quot;&quot;; IF(AND([.L41]=[$'Resultados Oficiais'.O41];[$'Resultados Oficiais'.Q41]=[.M41]);30;IF([.L41]-[.M41]=[$'Resultados Oficiais'.O41]-[$'Resultados Oficiais'.Q41];21;IF(OR(AND([.L41]-[.M41]&gt;0;[$'Resultados Oficiais'.O41]-[$'Resultados Oficiais'.Q41]&gt;0);AND([.L41]-[.M41]&lt;0;[$'Resultados Oficiais'.O41]-[$'Resultados Oficiais'.Q41]&lt;0));IF(OR([.L41]=[$'Resultados Oficiais'.O41];[$'Resultados Oficiais'.Q41]=[.M41]);18;15);IF(OR([.L41]=[$'Resultados Oficiais'.O41];[$'Resultados Oficiais'.Q41]=[.M41]);6;0))))))">
            <text:p/>
          </table:table-cell>
          <table:table-cell table:style-name="ce362" table:formula="of:=IF([.P41]=30;&quot;BUCHA!&quot;;IF([.P41]=90;&quot;SUPER!!&quot;;IF(AND([.P41]&gt;30;[.P41]&lt;90);&quot;ZEBRA!&quot;;&quot;&quot;)))">
            <text:p/>
          </table:table-cell>
          <table:table-cell table:style-name="ce390" office:value-type="string" calcext:value-type="string">
            <text:p>X</text:p>
          </table:table-cell>
          <table:table-cell table:style-name="ce394"/>
          <table:table-cell table:style-name="ce399" table:formula="of:=[$'Resultados Oficiais'.U41]" office:value-type="string" office:string-value="Perdedor S1" calcext:value-type="string">
            <text:p>Perdedor S1</text:p>
          </table:table-cell>
          <table:table-cell table:style-name="ce403" table:number-columns-repeated="2"/>
          <table:table-cell table:style-name="ce406" table:formula="of:=[$'Resultados Oficiais'.X41]" office:value-type="string" office:string-value="Perdedor S2" calcext:value-type="string">
            <text:p>Perdedor S2</text:p>
          </table:table-cell>
          <table:table-cell table:style-name="ce410"/>
          <table:table-cell table:style-name="ce357" table:formula="of:=IF(COUNTBLANK([$'Resultados Oficiais'.V24:.W24])&gt;0;&quot;&quot;;IF(COUNTBLANK([.U41:.V41])&gt;0;&quot;&quot;;IF(AND([.U41]=[$'Resultados Oficiais'.V24];[$'Resultados Oficiais'.W24]=[.V41]);300;IF([.U41]-[.V41]=[$'Resultados Oficiais'.V24]-[$'Resultados Oficiais'.W24];210;IF(OR(AND([.U41]-[.V41]&gt;0;[$'Resultados Oficiais'.V24]-[$'Resultados Oficiais'.W24]&gt;0);AND([.U41]-[.V41]&lt;0;[$'Resultados Oficiais'.V24]-[$'Resultados Oficiais'.W24]&lt;0));IF(OR([.U41]=[$'Resultados Oficiais'.V24];[$'Resultados Oficiais'.W24]=[.V41]);180;150);IF(OR([.U41]=[$'Resultados Oficiais'.V24];[$'Resultados Oficiais'.W24]=[.V41]);60;0))))))">
            <text:p/>
          </table:table-cell>
          <table:table-cell table:style-name="ce333" table:content-validation-name="val6"/>
          <table:table-cell table:style-name="ce357" table:formula="of:=IF(COUNTBLANK([$'Resultados Oficiais'.V24:.W24])&gt;0;&quot;&quot;;IF(COUNTBLANK([.U41:.V41])&gt;0;&quot;&quot;;IF([.Z41]=&quot;&quot;;&quot;&quot;;IF(#REF!=&quot;&quot;;0;IF(#REF!=[.Z41];150;0)))))">
            <text:p/>
          </table:table-cell>
          <table:table-cell table:style-name="ce305"/>
          <table:table-cell table:number-columns-repeated="996"/>
        </table:table-row>
        <table:table-row table:style-name="ro12">
          <table:table-cell table:style-name="ce218"/>
          <table:table-cell table:style-name="ce337"/>
          <table:table-cell table:style-name="ce342" table:formula="of:=[$'Resultados Oficiais'.D42]" office:value-type="string" office:string-value="Colômbia" calcext:value-type="string">
            <text:p>Colômbia</text:p>
          </table:table-cell>
          <table:table-cell table:style-name="ce243" table:number-columns-repeated="2"/>
          <table:table-cell table:style-name="ce351" table:formula="of:=[$'Resultados Oficiais'.G42]" office:value-type="string" office:string-value="Congo" calcext:value-type="string">
            <text:p>Congo</text:p>
          </table:table-cell>
          <table:table-cell table:style-name="ce355"/>
          <table:table-cell table:style-name="ce357" table:formula="of:=IF(COUNTBLANK([$'Resultados Oficiais'.E42:.F42])&gt;0;&quot;&quot;;IF(COUNTBLANK([.D42:.E42])&gt;0;&quot;&quot;; IF(AND([.D42]=[$'Resultados Oficiais'.E42];[$'Resultados Oficiais'.F42]=[.E42]);30;IF([.D42]-[.E42]=[$'Resultados Oficiais'.E42]-[$'Resultados Oficiais'.F42];21;IF(OR(AND([.D42]-[.E42]&gt;0;[$'Resultados Oficiais'.E42]-[$'Resultados Oficiais'.F42]&gt;0);AND([.D42]-[.E42]&lt;0;[$'Resultados Oficiais'.E42]-[$'Resultados Oficiais'.F42]&lt;0));IF(OR([.D42]=[$'Resultados Oficiais'.E42];[$'Resultados Oficiais'.F42]=[.E42]);18;15);IF(OR([.D42]=[$'Resultados Oficiais'.E42];[$'Resultados Oficiais'.F42]=[.E42]);6;0))))))">
            <text:p/>
          </table:table-cell>
          <table:table-cell table:style-name="ce362" table:formula="of:=IF([.H42]=30;&quot;BUCHA!&quot;;IF([.H42]=90;&quot;SUPER!!&quot;;IF(AND([.H42]&gt;30;[.H42]&lt;90);&quot;ZEBRA!&quot;;&quot;&quot;)))">
            <text:p/>
          </table:table-cell>
          <table:table-cell table:style-name="ce337"/>
          <table:table-cell table:style-name="ce342" table:formula="of:=[$'Resultados Oficiais'.L42]" office:value-type="string" office:string-value="Panamá" calcext:value-type="string">
            <text:p>Panamá</text:p>
          </table:table-cell>
          <table:table-cell table:style-name="ce243" table:number-columns-repeated="2"/>
          <table:table-cell table:style-name="ce349" table:formula="of:=[$'Resultados Oficiais'.O42]" office:value-type="string" office:string-value="Croácia" calcext:value-type="string">
            <text:p>Croácia</text:p>
          </table:table-cell>
          <table:table-cell table:style-name="ce356"/>
          <table:table-cell table:style-name="ce357" table:formula="of:=IF(COUNTBLANK([$'Resultados Oficiais'.O42:.Q42])&gt;0;&quot;&quot;;IF(COUNTBLANK([.L42:.M42])&gt;0;&quot;&quot;; IF(AND([.L42]=[$'Resultados Oficiais'.O42];[$'Resultados Oficiais'.Q42]=[.M42]);30;IF([.L42]-[.M42]=[$'Resultados Oficiais'.O42]-[$'Resultados Oficiais'.Q42];21;IF(OR(AND([.L42]-[.M42]&gt;0;[$'Resultados Oficiais'.O42]-[$'Resultados Oficiais'.Q42]&gt;0);AND([.L42]-[.M42]&lt;0;[$'Resultados Oficiais'.O42]-[$'Resultados Oficiais'.Q42]&lt;0));IF(OR([.L42]=[$'Resultados Oficiais'.O42];[$'Resultados Oficiais'.Q42]=[.M42]);18;15);IF(OR([.L42]=[$'Resultados Oficiais'.O42];[$'Resultados Oficiais'.Q42]=[.M42]);6;0))))))">
            <text:p/>
          </table:table-cell>
          <table:table-cell table:style-name="ce362" table:formula="of:=IF([.P42]=30;&quot;BUCHA!&quot;;IF([.P42]=90;&quot;SUPER!!&quot;;IF(AND([.P42]&gt;30;[.P42]&lt;90);&quot;ZEBRA!&quot;;&quot;&quot;)))">
            <text:p/>
          </table:table-cell>
          <table:table-cell table:style-name="ce390" office:value-type="string" calcext:value-type="string">
            <text:p>X</text:p>
          </table:table-cell>
          <table:table-cell table:style-name="ce291"/>
          <table:table-cell table:style-name="ce306" table:number-columns-repeated="6"/>
          <table:table-cell table:style-name="ce291"/>
          <table:table-cell table:style-name="ce306"/>
          <table:table-cell table:style-name="ce423"/>
          <table:table-cell table:number-columns-repeated="996"/>
        </table:table-row>
        <table:table-row table:style-name="ro12">
          <table:table-cell table:style-name="ce218" table:formula="of:=IF(COUNTBLANK([$'Resultados Oficiais'.M61:.N61])&gt;0;&quot;&quot;;IF(COUNTBLANK([.L43:.M43])&gt;0;&quot;&quot;; IF(AND([.L43]=[$'Resultados Oficiais'.M61];[$'Resultados Oficiais'.N61]=[.M43]);30;IF([.L43]-[.M43]=[$'Resultados Oficiais'.M61]-[$'Resultados Oficiais'.N61];21;IF(OR(AND([.L43]-[.M43]&gt;0;[$'Resultados Oficiais'.M61]-[$'Resultados Oficiais'.N61]&gt;0);AND([.L43]-[.M43]&lt;0;[$'Resultados Oficiais'.M61]-[$'Resultados Oficiais'.N61]&lt;0));IF(OR([.L43]=[$'Resultados Oficiais'.M61];[$'Resultados Oficiais'.N61]=[.M43]);18;15);IF(OR([.L43]=[$'Resultados Oficiais'.M61];[$'Resultados Oficiais'.N61]=[.M43]);6;0))))))">
            <text:p/>
          </table:table-cell>
          <table:table-cell table:style-name="ce338"/>
          <table:table-cell table:style-name="ce344" office:value-type="string" calcext:value-type="string">
            <text:p>Camarões</text:p>
          </table:table-cell>
          <table:table-cell table:style-name="ce243" table:number-columns-repeated="2"/>
          <table:table-cell table:style-name="ce351" table:formula="of:=[$'Resultados Oficiais'.G43]" office:value-type="string" office:string-value="Portugal" calcext:value-type="string">
            <text:p>Portugal</text:p>
          </table:table-cell>
          <table:table-cell table:style-name="ce355"/>
          <table:table-cell table:style-name="ce357" table:formula="of:=IF(COUNTBLANK([$'Resultados Oficiais'.E43:.F43])&gt;0;&quot;&quot;;IF(COUNTBLANK([.D43:.E43])&gt;0;&quot;&quot;; IF(AND([.D43]=[$'Resultados Oficiais'.E43];[$'Resultados Oficiais'.F43]=[.E43]);30;IF([.D43]-[.E43]=[$'Resultados Oficiais'.E43]-[$'Resultados Oficiais'.F43];21;IF(OR(AND([.D43]-[.E43]&gt;0;[$'Resultados Oficiais'.E43]-[$'Resultados Oficiais'.F43]&gt;0);AND([.D43]-[.E43]&lt;0;[$'Resultados Oficiais'.E43]-[$'Resultados Oficiais'.F43]&lt;0));IF(OR([.D43]=[$'Resultados Oficiais'.E43];[$'Resultados Oficiais'.F43]=[.E43]);18;15);IF(OR([.D43]=[$'Resultados Oficiais'.E43];[$'Resultados Oficiais'.F43]=[.E43]);6;0))))))">
            <text:p/>
          </table:table-cell>
          <table:table-cell table:style-name="ce362" table:formula="of:=IF([.H43]=30;&quot;BUCHA!&quot;;IF([.H43]=90;&quot;SUPER!!&quot;;IF(AND([.H43]&gt;30;[.H43]&lt;90);&quot;ZEBRA!&quot;;&quot;&quot;)))">
            <text:p/>
          </table:table-cell>
          <table:table-cell table:style-name="ce229" office:value-type="string" calcext:value-type="string">
            <office:annotation draw:style-name="gr7" draw:text-style-name="P3" svg:width="176.4pt" svg:height="28.09pt" svg:x="294.63pt" svg:y="323.46pt" draw:caption-point-x="-11.54pt" draw:caption-point-y="-5.95pt">
              <dc:date>2026-05-01T00:00:00</dc:date>
              <text:p text:style-name="P2">Multiplica 2X os pontos em caso de aposta e VITÓRIA da ZEBRA.</text:p>
            </office:annotation>
            <text:p>3X</text:p>
          </table:table-cell>
          <table:table-cell table:style-name="ce378" table:formula="of:=[$'Resultados Oficiais'.L43]" office:value-type="string" office:string-value="Panamá" calcext:value-type="string">
            <text:p>Panamá</text:p>
            <draw:frame table:end-cell-address="'Cartão de Apostas'.K46" table:end-x="31.46pt" table:end-y="4.48pt" draw:z-index="12" draw:name="image5.png" draw:style-name="gr1" draw:text-style-name="P1" svg:width="27.72pt" svg:height="20.98pt" svg:x="3.74pt" svg:y="6.01pt">
              <draw:image xlink:href="Pictures/100002010000029B000002D058F00F5457A07490.png" xlink:type="simple" xlink:show="embed" xlink:actuate="onLoad">
                <text:p/>
              </draw:image>
            </draw:frame>
          </table:table-cell>
          <table:table-cell table:style-name="ce243" table:number-columns-repeated="2"/>
          <table:table-cell table:style-name="ce349" table:formula="of:=[$'Resultados Oficiais'.O43]" office:value-type="string" office:string-value="Inglaterra" calcext:value-type="string">
            <text:p>Inglaterra</text:p>
          </table:table-cell>
          <table:table-cell table:style-name="ce356"/>
          <table:table-cell table:style-name="ce357" table:formula="of:=IF(COUNTBLANK([$'Resultados Oficiais'.O43:.Q43])&gt;0;&quot;&quot;;IF(COUNTBLANK([.L43:.M43])&gt;0;&quot;&quot;; IF(AND([.L43]=[$'Resultados Oficiais'.O43];[$'Resultados Oficiais'.Q43]=[.M43]);30;IF([.L43]-[.M43]=[$'Resultados Oficiais'.O43]-[$'Resultados Oficiais'.Q43];21;IF(OR(AND([.L43]-[.M43]&gt;0;[$'Resultados Oficiais'.O43]-[$'Resultados Oficiais'.Q43]&gt;0);AND([.L43]-[.M43]&lt;0;[$'Resultados Oficiais'.O43]-[$'Resultados Oficiais'.Q43]&lt;0));IF(OR([.L43]=[$'Resultados Oficiais'.O43];[$'Resultados Oficiais'.Q43]=[.M43]);18;15);IF(OR([.L43]=[$'Resultados Oficiais'.O43];[$'Resultados Oficiais'.Q43]=[.M43]);6;0))))))">
            <text:p/>
          </table:table-cell>
          <table:table-cell table:style-name="ce362" table:formula="of:=IF([.P43]=30;&quot;BUCHA!&quot;;IF([.P43]=90;&quot;SUPER!!&quot;;IF(AND([.P43]&gt;30;[.P43]&lt;90);&quot;ZEBRA!&quot;;&quot;&quot;)))">
            <text:p/>
          </table:table-cell>
          <table:table-cell table:style-name="ce390" office:value-type="string" calcext:value-type="string">
            <text:p>X</text:p>
          </table:table-cell>
          <table:table-cell table:style-name="ce292"/>
          <table:table-cell table:style-name="ce307"/>
          <table:table-cell table:style-name="ce404" office:value-type="string" calcext:value-type="string" table:number-columns-spanned="2" table:number-rows-spanned="1">
            <office:annotation draw:style-name="gr9" draw:text-style-name="P3" svg:width="124.36pt" svg:height="106.47pt" svg:x="655.14pt" svg:y="307.13pt" draw:caption-point-x="10.01pt" draw:caption-point-y="10.37pt">
              <dc:date>2026-05-01T00:00:00</dc:date>
              <text:p text:style-name="P2">FINAL</text:p>
              <text:p text:style-name="P2">&gt;&gt; Aposta para 90 minutos + eventual prorrogação!</text:p>
              <text:p text:style-name="P2"/>
              <text:p text:style-name="P2">Bucha: 500 pontos.</text:p>
              <text:p text:style-name="P2">Demais: 350, 300, 250, 100.</text:p>
              <text:p text:style-name="P2">Pênaltis: 250.</text:p>
            </office:annotation>
            <text:p>FINAL</text:p>
          </table:table-cell>
          <table:covered-table-cell table:style-name="ce310"/>
          <table:table-cell table:style-name="ce307"/>
          <table:table-cell table:style-name="ce412"/>
          <table:table-cell table:style-name="ce271" office:value-type="string" calcext:value-type="string">
            <text:p>PTS</text:p>
          </table:table-cell>
          <table:table-cell table:style-name="ce332" office:value-type="string" calcext:value-type="string">
            <office:annotation draw:style-name="gr7" draw:text-style-name="P3" svg:width="191.76pt" svg:height="50.49pt" svg:x="859.38pt" svg:y="312.26pt" draw:caption-point-x="-11.54pt" draw:caption-point-y="5.24pt">
              <dc:date>2026-05-01T00:00:00</dc:date>
              <text:p text:style-name="P2">Os pênaltis terão pontuação EXTRA, independente da aposta feita no tempo de jogo. Ou seja: se o jogo for para os pênaltis, quem vence?</text:p>
            </office:annotation>
            <text:p>Pênaltis</text:p>
          </table:table-cell>
          <table:table-cell table:style-name="ce414" office:value-type="string" calcext:value-type="string">
            <text:p>EXTRA</text:p>
          </table:table-cell>
          <table:table-cell table:style-name="ce421"/>
          <table:table-cell table:number-columns-repeated="996"/>
        </table:table-row>
        <table:table-row table:style-name="ro12">
          <table:table-cell table:style-name="ce218"/>
          <table:table-cell table:style-name="ce337"/>
          <table:table-cell table:style-name="ce342" table:formula="of:=[$'Resultados Oficiais'.D44]" office:value-type="string" office:string-value="Congo" calcext:value-type="string">
            <text:p>Congo</text:p>
          </table:table-cell>
          <table:table-cell table:style-name="ce243" table:number-columns-repeated="2"/>
          <table:table-cell table:style-name="ce351" table:formula="of:=[$'Resultados Oficiais'.G44]" office:value-type="string" office:string-value="Uzbequistão" calcext:value-type="string">
            <text:p>Uzbequistão</text:p>
          </table:table-cell>
          <table:table-cell table:style-name="ce355"/>
          <table:table-cell table:style-name="ce357" table:formula="of:=IF(COUNTBLANK([$'Resultados Oficiais'.E44:.F44])&gt;0;&quot;&quot;;IF(COUNTBLANK([.D44:.E44])&gt;0;&quot;&quot;; IF(AND([.D44]=[$'Resultados Oficiais'.E44];[$'Resultados Oficiais'.F44]=[.E44]);30;IF([.D44]-[.E44]=[$'Resultados Oficiais'.E44]-[$'Resultados Oficiais'.F44];21;IF(OR(AND([.D44]-[.E44]&gt;0;[$'Resultados Oficiais'.E44]-[$'Resultados Oficiais'.F44]&gt;0);AND([.D44]-[.E44]&lt;0;[$'Resultados Oficiais'.E44]-[$'Resultados Oficiais'.F44]&lt;0));IF(OR([.D44]=[$'Resultados Oficiais'.E44];[$'Resultados Oficiais'.F44]=[.E44]);18;15);IF(OR([.D44]=[$'Resultados Oficiais'.E44];[$'Resultados Oficiais'.F44]=[.E44]);6;0))))))">
            <text:p/>
          </table:table-cell>
          <table:table-cell table:style-name="ce362" table:formula="of:=IF([.H44]=30;&quot;BUCHA!&quot;;IF([.H44]=90;&quot;SUPER!!&quot;;IF(AND([.H44]&gt;30;[.H44]&lt;90);&quot;ZEBRA!&quot;;&quot;&quot;)))">
            <text:p/>
          </table:table-cell>
          <table:table-cell table:style-name="ce337"/>
          <table:table-cell table:style-name="ce342" table:formula="of:=[$'Resultados Oficiais'.L44]" office:value-type="string" office:string-value="Croácia" calcext:value-type="string">
            <text:p>Croácia</text:p>
          </table:table-cell>
          <table:table-cell table:style-name="ce243" table:number-columns-repeated="2"/>
          <table:table-cell table:style-name="ce349" table:formula="of:=[$'Resultados Oficiais'.O44]" office:value-type="string" office:string-value="Gana" calcext:value-type="string">
            <text:p>Gana</text:p>
          </table:table-cell>
          <table:table-cell table:style-name="ce356"/>
          <table:table-cell table:style-name="ce357" table:formula="of:=IF(COUNTBLANK([$'Resultados Oficiais'.O44:.Q44])&gt;0;&quot;&quot;;IF(COUNTBLANK([.L44:.M44])&gt;0;&quot;&quot;; IF(AND([.L44]=[$'Resultados Oficiais'.O44];[$'Resultados Oficiais'.Q44]=[.M44]);30;IF([.L44]-[.M44]=[$'Resultados Oficiais'.O44]-[$'Resultados Oficiais'.Q44];21;IF(OR(AND([.L44]-[.M44]&gt;0;[$'Resultados Oficiais'.O44]-[$'Resultados Oficiais'.Q44]&gt;0);AND([.L44]-[.M44]&lt;0;[$'Resultados Oficiais'.O44]-[$'Resultados Oficiais'.Q44]&lt;0));IF(OR([.L44]=[$'Resultados Oficiais'.O44];[$'Resultados Oficiais'.Q44]=[.M44]);18;15);IF(OR([.L44]=[$'Resultados Oficiais'.O44];[$'Resultados Oficiais'.Q44]=[.M44]);6;0))))))">
            <text:p/>
          </table:table-cell>
          <table:table-cell table:style-name="ce362" table:formula="of:=IF([.P44]=30;&quot;BUCHA!&quot;;IF([.P44]=90;&quot;SUPER!!&quot;;IF(AND([.P44]&gt;30;[.P44]&lt;90);&quot;ZEBRA!&quot;;&quot;&quot;)))">
            <text:p/>
          </table:table-cell>
          <table:table-cell table:style-name="ce390" office:value-type="string" calcext:value-type="string">
            <text:p>X</text:p>
          </table:table-cell>
          <table:table-cell table:style-name="ce395"/>
          <table:table-cell table:style-name="ce400" table:formula="of:=[$'Resultados Oficiais'.U44]" office:value-type="string" office:string-value="Vencedor S1" calcext:value-type="string">
            <text:p>Vencedor S1</text:p>
          </table:table-cell>
          <table:table-cell table:style-name="ce243" table:number-columns-repeated="2"/>
          <table:table-cell table:style-name="ce407" table:formula="of:=[$'Resultados Oficiais'.X44]" office:value-type="string" office:string-value="Vencedor S2" calcext:value-type="string">
            <text:p>Vencedor S2</text:p>
          </table:table-cell>
          <table:table-cell table:style-name="ce413"/>
          <table:table-cell table:style-name="ce357" table:formula="of:=IF(COUNTBLANK([$'Resultados Oficiais'.V27:.W27])&gt;0;&quot;&quot;;IF(COUNTBLANK([.U44:.V44])&gt;0;&quot;&quot;;IF(AND([.U44]=[$'Resultados Oficiais'.V27];[$'Resultados Oficiais'.W27]=[.V44]);300;IF([.U44]-[.V44]=[$'Resultados Oficiais'.V27]-[$'Resultados Oficiais'.W27];210;IF(OR(AND([.U44]-[.V44]&gt;0;[$'Resultados Oficiais'.V27]-[$'Resultados Oficiais'.W27]&gt;0);AND([.U44]-[.V44]&lt;0;[$'Resultados Oficiais'.V27]-[$'Resultados Oficiais'.W27]&lt;0));IF(OR([.U44]=[$'Resultados Oficiais'.V27];[$'Resultados Oficiais'.W27]=[.V44]);180;150);IF(OR([.U44]=[$'Resultados Oficiais'.V27];[$'Resultados Oficiais'.W27]=[.V44]);60;0))))))">
            <text:p/>
          </table:table-cell>
          <table:table-cell table:style-name="ce333" table:content-validation-name="val6"/>
          <table:table-cell table:style-name="ce357" table:formula="of:=IF(COUNTBLANK([$'Resultados Oficiais'.V27:.W27])&gt;0;&quot;&quot;;IF(COUNTBLANK([.U44:.V44])&gt;0;&quot;&quot;;IF([.Z44]=&quot;&quot;;&quot;&quot;;IF(#REF!=&quot;&quot;;0;IF(#REF!=[.Z44];250;0)))))">
            <text:p/>
          </table:table-cell>
          <table:table-cell table:style-name="ce305"/>
          <table:table-cell table:number-columns-repeated="996"/>
        </table:table-row>
        <table:table-row table:style-name="ro12">
          <table:table-cell table:style-name="ce219"/>
          <table:table-cell table:style-name="ce339" table:number-columns-repeated="2"/>
          <table:table-cell table:style-name="ce347" table:number-columns-repeated="2"/>
          <table:table-cell table:style-name="ce339" table:number-columns-repeated="2"/>
          <table:table-cell table:style-name="ce360"/>
          <table:table-cell table:style-name="ce365"/>
          <table:table-cell table:style-name="ce373"/>
          <table:table-cell table:style-name="ce339"/>
          <table:table-cell table:style-name="ce347" table:number-columns-repeated="2"/>
          <table:table-cell table:style-name="ce339"/>
          <table:table-cell table:style-name="ce360" table:number-columns-repeated="2"/>
          <table:table-cell table:style-name="ce385"/>
          <table:table-cell table:style-name="ce391" office:value-type="string" calcext:value-type="string">
            <text:p>X</text:p>
          </table:table-cell>
          <table:table-cell table:style-name="ce396" table:number-columns-repeated="10"/>
          <table:table-cell table:number-columns-repeated="996"/>
        </table:table-row>
        <table:table-row table:style-name="ro12">
          <table:table-cell table:style-name="ce217"/>
          <table:table-cell table:style-name="ce340" table:number-columns-repeated="2"/>
          <table:table-cell table:style-name="ce346" table:number-columns-repeated="2"/>
          <table:table-cell table:style-name="ce340" table:number-columns-repeated="2"/>
          <table:table-cell table:style-name="ce361"/>
          <table:table-cell table:style-name="ce366"/>
          <table:table-cell table:style-name="ce374"/>
          <table:table-cell table:style-name="ce340"/>
          <table:table-cell table:style-name="ce346" table:number-columns-repeated="2"/>
          <table:table-cell table:style-name="ce340"/>
          <table:table-cell table:style-name="ce361" table:number-columns-repeated="2"/>
          <table:table-cell table:style-name="ce382"/>
          <table:table-cell table:style-name="ce291"/>
          <table:table-cell table:style-name="ce305" table:number-columns-repeated="10"/>
          <table:table-cell table:number-columns-repeated="996"/>
        </table:table-row>
        <table:table-row table:style-name="ro12">
          <table:table-cell table:style-name="ce217"/>
          <table:table-cell table:style-name="ce341"/>
          <table:table-cell table:style-name="ce235" office:value-type="string" calcext:value-type="string" table:number-columns-spanned="1" table:number-rows-spanned="2">
            <text:p>QUIZ: </text:p>
            <text:p>(150 pts)</text:p>
          </table:table-cell>
          <table:table-cell table:style-name="ce242" office:value-type="string" calcext:value-type="string" table:number-columns-spanned="9" table:number-rows-spanned="1">
            <office:annotation draw:style-name="gr10" draw:text-style-name="P3" svg:width="120.84pt" svg:height="28.09pt" svg:x="127.25pt" svg:y="361.33pt" draw:caption-point-x="244.06pt" draw:caption-point-y="-13.8pt">
              <dc:date>2026-05-01T00:00:00</dc:date>
              <text:p text:style-name="P2"/>
              <text:p text:style-name="P2"/>
            </office:annotation>
            <text:p>Quem será o artilheiro da Copa?</text:p>
          </table:table-cell>
          <table:covered-table-cell table:number-columns-repeated="7" table:style-name="ce245"/>
          <table:covered-table-cell table:style-name="ce269"/>
          <table:table-cell table:style-name="ce271" office:value-type="string" calcext:value-type="string">
            <text:p>PTS</text:p>
          </table:table-cell>
          <table:table-cell table:number-columns-repeated="3"/>
          <table:table-cell table:style-name="ce235" office:value-type="string" calcext:value-type="string" table:number-columns-spanned="3" table:number-rows-spanned="2">
            <text:p>QUIZ: </text:p>
            <text:p>(300 pts)</text:p>
          </table:table-cell>
          <table:covered-table-cell table:number-columns-repeated="2"/>
          <table:table-cell table:style-name="ce401" office:value-type="string" calcext:value-type="string" table:number-columns-spanned="7" table:number-rows-spanned="1">
            <office:annotation draw:style-name="gr10" draw:text-style-name="P3" svg:width="124.33pt" svg:height="28.09pt" svg:x="633.6pt" svg:y="361.33pt" draw:caption-point-x="214.24pt" draw:caption-point-y="-13.8pt">
              <dc:date>2026-05-01T00:00:00</dc:date>
              <text:p text:style-name="P2"/>
              <text:p text:style-name="P2"/>
            </office:annotation>
            <text:p>Qual seleção será a campeã da Copa?</text:p>
          </table:table-cell>
          <table:covered-table-cell table:number-columns-repeated="6" table:style-name="ce245"/>
          <table:table-cell table:style-name="ce271" office:value-type="string" calcext:value-type="string">
            <text:p>PTS</text:p>
          </table:table-cell>
          <table:table-cell table:style-name="ce305"/>
          <table:table-cell table:number-columns-repeated="996"/>
        </table:table-row>
        <table:table-row table:style-name="ro12">
          <table:table-cell table:style-name="ce217"/>
          <table:table-cell table:style-name="ce341"/>
          <table:covered-table-cell/>
          <table:table-cell table:style-name="ce243" table:content-validation-name="val4" table:number-columns-spanned="9" table:number-rows-spanned="1"/>
          <table:covered-table-cell table:number-columns-repeated="7" table:style-name="ce245"/>
          <table:covered-table-cell table:style-name="ce269"/>
          <table:table-cell table:style-name="ce357" table:formula="of:=IF(COUNTBLANK([$'Resultados Oficiais'.L48:.N48])&gt;0;&quot;&quot;;IF(COUNTBLANK([.I48:.J48])&gt;0;&quot;&quot;; IF(AND([.I48]=[$'Resultados Oficiais'.L48];[$'Resultados Oficiais'.N48]=[.J48]);30;IF([.I48]-[.J48]=[$'Resultados Oficiais'.L48]-[$'Resultados Oficiais'.N48];21;IF(OR(AND([.I48]-[.J48]&gt;0;[$'Resultados Oficiais'.L48]-[$'Resultados Oficiais'.N48]&gt;0);AND([.I48]-[.J48]&lt;0;[$'Resultados Oficiais'.L48]-[$'Resultados Oficiais'.N48]&lt;0));IF(OR([.I48]=[$'Resultados Oficiais'.L48];[$'Resultados Oficiais'.N48]=[.J48]);18;15);IF(OR([.I48]=[$'Resultados Oficiais'.L48];[$'Resultados Oficiais'.N48]=[.J48]);6;0))))))">
            <text:p/>
          </table:table-cell>
          <table:table-cell table:number-columns-repeated="3"/>
          <table:covered-table-cell table:number-columns-repeated="3"/>
          <table:table-cell table:style-name="ce243" table:content-validation-name="val5" table:number-columns-spanned="7" table:number-rows-spanned="1"/>
          <table:covered-table-cell table:number-columns-repeated="5" table:style-name="ce245"/>
          <table:covered-table-cell table:style-name="ce269"/>
          <table:table-cell table:style-name="ce357" table:formula="of:=IF(COUNTBLANK([$'Resultados Oficiais'.X31:.Y31])&gt;0;&quot;&quot;;IF(COUNTBLANK([.W48:.X48])&gt;0;&quot;&quot;;IF(AND([.W48]=[$'Resultados Oficiais'.X31];[$'Resultados Oficiais'.Y31]=[.X48]);300;IF([.W48]-[.X48]=[$'Resultados Oficiais'.X31]-[$'Resultados Oficiais'.Y31];210;IF(OR(AND([.W48]-[.X48]&gt;0;[$'Resultados Oficiais'.X31]-[$'Resultados Oficiais'.Y31]&gt;0);AND([.W48]-[.X48]&lt;0;[$'Resultados Oficiais'.X31]-[$'Resultados Oficiais'.Y31]&lt;0));IF(OR([.W48]=[$'Resultados Oficiais'.X31];[$'Resultados Oficiais'.Y31]=[.X48]);180;150);IF(OR([.W48]=[$'Resultados Oficiais'.X31];[$'Resultados Oficiais'.Y31]=[.X48]);60;0))))))">
            <text:p/>
          </table:table-cell>
          <table:table-cell table:style-name="ce305"/>
          <table:table-cell table:number-columns-repeated="996"/>
        </table:table-row>
        <table:table-row table:style-name="ro12">
          <table:table-cell table:style-name="ce217"/>
          <table:table-cell table:style-name="ce340" table:number-columns-repeated="2"/>
          <table:table-cell table:style-name="ce346" table:number-columns-repeated="2"/>
          <table:table-cell table:style-name="ce340" table:number-columns-repeated="2"/>
          <table:table-cell table:style-name="ce361"/>
          <table:table-cell table:style-name="ce366"/>
          <table:table-cell table:style-name="ce374"/>
          <table:table-cell table:style-name="ce340"/>
          <table:table-cell table:style-name="ce346" table:number-columns-repeated="2"/>
          <table:table-cell table:style-name="ce340"/>
          <table:table-cell table:style-name="ce361" table:number-columns-repeated="2"/>
          <table:table-cell table:style-name="ce382"/>
          <table:table-cell table:style-name="ce334"/>
          <table:table-cell table:style-name="ce305" table:number-columns-repeated="10"/>
          <table:table-cell table:number-columns-repeated="996"/>
        </table:table-row>
        <table:table-row table:style-name="ro3" table:number-rows-repeated="1048526">
          <table:table-cell table:number-columns-repeated="1024"/>
        </table:table-row>
        <table:table-row table:style-name="ro3">
          <table:table-cell table:number-columns-repeated="1024"/>
        </table:table-row>
        <calcext:conditional-formats>
          <calcext:conditional-format calcext:target-range-address="'Cartão de Apostas'.S3:'Cartão de Apostas'.S18 'Cartão de Apostas'.X3:'Cartão de Apostas'.X18 'Cartão de Apostas'.S21:'Cartão de Apostas'.S28 'Cartão de Apostas'.X21:'Cartão de Apostas'.X28">
            <calcext:condition calcext:apply-style-name="ConditionalStyle_2" calcext:value="contains-text(&quot;2X&quot;)" calcext:base-cell-address="'Cartão de Apostas'.S3"/>
          </calcext:conditional-format>
          <calcext:conditional-format calcext:target-range-address="'Cartão de Apostas'.S3:'Cartão de Apostas'.S18 'Cartão de Apostas'.X3:'Cartão de Apostas'.X18 'Cartão de Apostas'.S21:'Cartão de Apostas'.S28 'Cartão de Apostas'.X21:'Cartão de Apostas'.X28">
            <calcext:condition calcext:apply-style-name="ConditionalStyle_6" calcext:value="formula-is(LEN(TRIM([.S3]))=0)" calcext:base-cell-address="'Cartão de Apostas'.S3"/>
          </calcext:conditional-format>
          <calcext:conditional-format calcext:target-range-address="'Cartão de Apostas'.S3:'Cartão de Apostas'.S18 'Cartão de Apostas'.X3:'Cartão de Apostas'.X18 'Cartão de Apostas'.S21:'Cartão de Apostas'.S28 'Cartão de Apostas'.X21:'Cartão de Apostas'.X28">
            <calcext:condition calcext:apply-style-name="ConditionalStyle_4" calcext:value="contains-text(&quot;3X&quot;)" calcext:base-cell-address="'Cartão de Apostas'.S3"/>
          </calcext:conditional-format>
          <calcext:conditional-format calcext:target-range-address="'Cartão de Apostas'.S3:'Cartão de Apostas'.S18 'Cartão de Apostas'.X3:'Cartão de Apostas'.X18 'Cartão de Apostas'.S21:'Cartão de Apostas'.S28 'Cartão de Apostas'.X21:'Cartão de Apostas'.X28">
            <calcext:condition calcext:apply-style-name="ConditionalStyle_5" calcext:value="contains-text(&quot;4X&quot;)" calcext:base-cell-address="'Cartão de Apostas'.S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rebuchet MS&quot;" svg:font-family="'&quot;Trebuchet MS&quot;'"/>
    <style:font-face style:name="Arial" svg:font-family="Arial"/>
    <style:font-face style:name="Cambria" svg:font-family="Cambria"/>
    <style:font-face style:name="Caveat" svg:font-family="Caveat"/>
    <style:font-face style:name="Comfortaa" svg:font-family="Comfortaa"/>
    <style:font-face style:name="EB Garamond" svg:font-family="'EB Garamond'"/>
    <style:font-face style:name="Lexend" svg:font-family="Lexend"/>
    <style:font-face style:name="Oswald" svg:font-family="Oswald"/>
    <style:font-face style:name="Playfair Display" svg:font-family="'Playfair Display'"/>
    <style:font-face style:name="Trebuchet MS" svg:font-family="'Trebuchet MS'"/>
    <style:font-face style:name="Ubuntu" svg:font-family="Ubuntu"/>
    <style:font-face style:name="trebuchet ms" svg:font-family="'trebuchet m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0"/>
      <number:text>º</number:text>
    </number:number-style>
    <number:percentage-style style:name="N126">
      <number:number number:decimal-places="1" loext:min-decimal-places="1" number:min-integer-digits="1"/>
      <number:text>%</number:text>
    </number:percentage-style>
    <number:number-style style:name="N127">
      <number:number number:decimal-places="1" loext:min-decimal-places="1" number:min-integer-digits="1" number:grouping="true"/>
    </number:number-style>
    <number:date-style style:name="N128">
      <number:day/>
      <number:text>-</number:text>
      <number:month number:style="long"/>
    </number:date-style>
    <number:date-style style:name="N129">
      <number:day number:style="long"/>
      <number:text>/</number:text>
      <number:month number:style="long"/>
    </number:date-style>
    <number:date-style style:name="N130">
      <number:day/>
      <number:text>-</number:text>
      <number:month number:textual="true"/>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fff00"/>
    </style:style>
    <style:style style:name="ConditionalStyle_5f_3" style:display-name="ConditionalStyle_3" style:family="table-cell" style:parent-style-name="Default">
      <style:table-cell-properties fo:background-color="#cfe2f3"/>
      <style:text-properties fo:color="#cfe2f3"/>
    </style:style>
    <style:style style:name="ConditionalStyle_5f_4" style:display-name="ConditionalStyle_4" style:family="table-cell" style:parent-style-name="Default">
      <style:table-cell-properties fo:background-color="#ff9900"/>
    </style:style>
    <style:style style:name="ConditionalStyle_5f_5" style:display-name="ConditionalStyle_5" style:family="table-cell" style:parent-style-name="Default">
      <style:table-cell-properties fo:background-color="#ff00ff"/>
    </style:style>
    <style:style style:name="ConditionalStyle_5f_6" style:display-name="ConditionalStyle_6" style:family="table-cell" style:parent-style-name="Default">
      <style:table-cell-properties fo:background-color="#cbeef7"/>
      <style:text-properties fo:color="#cbeef7"/>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4pt" fo:margin-bottom="54pt" fo:margin-left="50.4pt" fo:margin-right="50.4pt" style:print-page-order="ltr" style:first-page-number="continue"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BOLÃO_20_2026" style:display-name="PageStyle_BOLÃO 2026" style:page-layout-name="Mpm3">
      <style:header style:display="false"/>
      <style:header-left style:display="false"/>
      <style:footer style:display="false"/>
      <style:footer-left style:display="false"/>
    </style:master-page>
    <style:master-page style:name="PageStyle_5f_Regras" style:display-name="PageStyle_Regras" style:page-layout-name="Mpm4">
      <style:header style:display="false"/>
      <style:header-left style:display="false"/>
      <style:footer style:display="false"/>
      <style:footer-left style:display="false"/>
    </style:master-page>
    <style:master-page style:name="PageStyle_5f_Ranking_20_Completo" style:display-name="PageStyle_Ranking Completo" style:page-layout-name="Mpm3">
      <style:header style:display="false"/>
      <style:header-left style:display="false"/>
      <style:footer style:display="false"/>
      <style:footer-left style:display="false"/>
    </style:master-page>
    <style:master-page style:name="PageStyle_5f_Rk_20_Histórico" style:display-name="PageStyle_Rk Histórico" style:page-layout-name="Mpm4">
      <style:header style:display="false"/>
      <style:header-left style:display="false"/>
      <style:footer style:display="false"/>
      <style:footer-left style:display="false"/>
    </style:master-page>
    <style:master-page style:name="PageStyle_5f_Resultados_20_Oficiais" style:display-name="PageStyle_Resultados Oficiais" style:page-layout-name="Mpm3">
      <style:header style:display="false"/>
      <style:header-left style:display="false"/>
      <style:footer style:display="false"/>
      <style:footer-left style:display="false"/>
    </style:master-page>
    <style:master-page style:name="PageStyle_5f_Cartão_20_de_20_Apostas" style:display-name="PageStyle_Cartão de Aposta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4530" meta:object-count="34"/>
    <meta:generator>LibreOfficeDev/6.0.5.2$Linux_X86_64 LibreOffice_project/</meta:generator>
  </office:meta>
</office:document-meta>
</file>